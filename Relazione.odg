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1.64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3.47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7.1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f81bd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89cm" fo:min-width="7.9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min-height="3.308cm" fo:min-width="14.8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draw:auto-grow-width="true" fo:min-height="0.551cm" fo:min-width="17.0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8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9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5.939cm" fo:padding-top="0cm" fo:padding-bottom="0cm" fo:padding-left="0cm" fo:padding-right="0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opacity="66%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6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77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41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6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46" style:family="graphic">
      <style:graphic-properties style:protect="size" style:writing-mode="lr-tb" loext:decorative="false"/>
    </style:style>
    <style:style style:name="gr47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34cm" fo:min-width="5.62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389cm" fo:min-width="6.0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9.41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3.839cm" fo:min-width="17.9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3.5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74cm" fo:min-width="1.76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8cm" fo:min-width="4.58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62cm" fo:min-width="4.13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84cm" fo:min-width="4.05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>
      <style:graphic-properties style:protect="size" loext:decorative="false"/>
    </style:style>
    <style:style style:name="gr78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>
      <style:graphic-properties draw:stroke="none" draw:fill="none" draw:fill-color="#ffffff" fo:min-height="0.62cm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05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51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86cm" fo:min-width="1.7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308cm" fo:min-width="2.44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in-height="1.06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in-height="3.729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in-height="6.991cm" loext:decorative="false"/>
      <style:paragraph-properties style:writing-mode="lr-tb"/>
    </style:style>
    <style:style style:name="gr13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3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197cm" fo:min-width="1.684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3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69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loext:decorative="false"/>
      <style:paragraph-properties style:writing-mode="lr-tb"/>
    </style:style>
    <style:style style:name="gr15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5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49cm" fo:min-width="1.31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967cm" fo:min-width="1.365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64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56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50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4.08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4cm" fo:min-width="2.64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257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47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15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22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solid" draw:fill-color="#000000" loext:decorative="false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64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666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8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675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27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521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625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708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76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99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7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18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36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041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2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3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4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836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6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13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83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9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596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619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52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29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7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1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251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89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4" style:family="paragraph">
      <loext:graphic-properties draw:fill="solid" draw:fill-color="#4f81bd"/>
    </style:style>
    <style:style style:name="P5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color="#77bc65" loext:opacity="100%" fo:font-size="14.1000003814697pt" style:font-size-asian="14.1000003814697pt" style:font-size-complex="14.1000003814697pt"/>
    </style:style>
    <style:style style:name="P14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5" style:family="paragraph">
      <loext:graphic-properties draw:fill="none"/>
      <style:paragraph-properties fo:text-align="start"/>
      <style:text-properties fo:color="#c9211e" loext:opacity="100%" fo:font-size="14.1000003814697pt" style:font-size-asian="14.1000003814697pt" style:font-size-complex="14.1000003814697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="solid" draw:fill-color="#ffffff" draw:opacity="66%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3pt" style:font-size-asian="13pt" style:font-size-complex="13pt"/>
    </style:style>
    <style:style style:name="P27" style:family="paragraph">
      <style:paragraph-properties fo:text-align="start" style:writing-mode="lr-tb"/>
      <style:text-properties style:font-name="calibri"/>
    </style:style>
    <style:style style:name="P28" style:family="paragraph">
      <loext:graphic-properties draw:fill="none" draw:fill-color="#ffffff"/>
      <style:paragraph-properties fo:text-align="start"/>
      <style:text-properties style:font-name="calibri"/>
    </style:style>
    <style:style style:name="P29" style:family="paragraph">
      <style:paragraph-properties fo:text-align="start" style:writing-mode="lr-tb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.42cm" fo:margin-bottom="0.35cm" fo:text-align="start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59" style:family="paragraph">
      <style:paragraph-properties fo:margin-top="0.42cm" fo:margin-bottom="0.35cm"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0" style:family="paragraph">
      <loext:graphic-properties draw:fill="none" draw:fill-color="#ffffff"/>
      <style:paragraph-properties fo:margin-top="0.42cm" fo:margin-bottom="0.35cm" fo:text-align="start"/>
      <style:text-properties style:font-name="calibri" fo:font-size="22pt" fo:font-weight="normal" style:font-size-asian="22pt" style:font-weight-asian="normal" style:font-size-complex="22pt" style:font-weight-complex="normal"/>
    </style:style>
    <style:style style:name="P61" style:family="paragraph"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text-properties fo:font-size="12pt" style:font-size-asian="12pt" style:font-size-complex="12pt"/>
    </style:style>
    <style:style style:name="P6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style:paragraph-properties fo:margin-left="0cm" fo:margin-right="0cm" fo:margin-top="0.42cm" fo:margin-bottom="0.35cm" fo:line-height="100%" fo:text-indent="0cm" style:writing-mode="lr-tb"/>
      <style:text-properties fo:font-size="8pt" style:font-size-asian="8pt" style:font-size-complex="8pt"/>
    </style:style>
    <style:style style:name="P68" style:family="paragraph">
      <style:paragraph-properties fo:text-align="left" style:writing-mode="lr-tb"/>
      <style:text-properties style:font-name="calibri"/>
    </style:style>
    <style:style style:name="P69" style:family="paragraph">
      <loext:graphic-properties draw:fill="none" draw:fill-color="#ffffff"/>
      <style:paragraph-properties fo:text-align="left"/>
      <style:text-properties style:font-name="calibri"/>
    </style:style>
    <style:style style:name="P70" style:family="paragraph">
      <style:paragraph-properties fo:margin-left="0cm" fo:margin-right="0cm" fo:margin-top="0.42cm" fo:margin-bottom="0.35cm" fo:line-height="100%" fo:text-align="left" fo:text-indent="0cm" style:writing-mode="lr-tb"/>
      <style:text-properties fo:font-size="10pt" style:font-size-asian="10pt" style:font-size-complex="10pt"/>
    </style:style>
    <style:style style:name="P71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000000"/>
    </style:style>
    <style:style style:name="T1" style:family="text">
      <style:text-properties fo:color="#17365d" loext:opacity="100%" style:font-name="Cambria" fo:font-size="24pt" fo:font-style="italic" fo:font-weight="bold" style:font-name-asian="Cambria" style:font-size-asian="24pt" style:font-style-asian="italic" style:font-weight-asian="bold" style:font-name-complex="Cambria" style:font-size-complex="24pt" style:font-style-complex="italic" style:font-weight-complex="bold"/>
    </style:style>
    <style:style style:name="T2" style:family="text">
      <style:text-properties fo:color="#17365d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3" style:family="text">
      <style:text-properties fo:color="#17365d" loext:opacity="100%" style:font-name="Cambria" fo:font-size="3.90000009536743pt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4" style:family="text">
      <style:text-properties fo:color="#17365d" loext:opacity="100%" style:font-name="Cambria" fo:font-size="27.8999996185303pt" fo:font-weight="normal" style:font-name-asian="Cambria" style:font-size-asian="27.8999996185303pt" style:font-weight-asian="normal" style:font-name-complex="Cambria" style:font-size-complex="27.8999996185303pt" style:font-weight-complex="normal"/>
    </style:style>
    <style:style style:name="T5" style:family="text">
      <style:text-properties fo:color="#000000" loext:opacity="100%" style:font-name="Calibri" fo:font-size="11.1000003814697pt" fo:font-style="italic" fo:font-weight="normal" style:font-name-asian="Calibri" style:font-size-asian="11.1000003814697pt" style:font-style-asian="italic" style:font-weight-asian="normal" style:font-name-complex="Calibri" style:font-size-complex="11.1000003814697pt" style:font-style-complex="italic" style:font-weight-complex="normal"/>
    </style:style>
    <style:style style:name="T6" style:family="text">
      <style:text-properties fo:color="#365f91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c9211e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77bc65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5983b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2" style:family="text">
      <style:text-properties fo:color="#77bc65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3" style:family="text">
      <style:text-properties style:use-window-font-color="true" loext:opacity="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5" style:family="text">
      <style:text-properties fo:color="#c9211e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4f81bd" loext:opacity="100%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T21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2" style:family="text">
      <style:text-properties fo:color="#c9211e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729fc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alibri" fo:font-size="12pt" style:font-name-asian="Calibri" style:font-size-asian="12pt" style:font-name-complex="Calibri" style:font-size-complex="12pt"/>
    </style:style>
    <style:style style:name="T33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0pt" fo:language="zxx" fo:country="none" fo:font-style="normal" fo:text-shadow="none" style:text-underline-style="none" fo:font-weight="bold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3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6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8" style:family="text">
      <style:text-properties fo:color="#4f81bd" loext:opacity="100%" style:font-name="Cambria" fo:font-size="9.89999961853027pt" fo:font-weight="bold" style:font-name-asian="Cambria" style:font-size-asian="9.89999961853027pt" style:font-weight-asian="bold" style:font-name-complex="Cambria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644cm" svg:height="0.932cm" svg:x="4.453cm" svg:y="2.04cm">
          <draw:text-box>
            <text:p text:style-name="P1"><text:span text:style-name="T1">Progetto Assembly RISC-V </text:span><text:span text:style-name="T2">per il <text:s/></text:span></text:p>
          </draw:text-box>
        </draw:frame>
        <draw:frame draw:style-name="gr2" draw:text-style-name="P2" draw:layer="layout" svg:width="13.478cm" svg:height="0.932cm" svg:x="3.412cm" svg:y="3.035cm">
          <draw:text-box>
            <text:p text:style-name="P1"><text:span text:style-name="T2">Corso di Architetture degli Elaboratori <text:s/></text:span></text:p>
          </draw:text-box>
        </draw:frame>
        <draw:frame draw:style-name="gr3" draw:text-style-name="P2" draw:layer="layout" svg:width="7.189cm" svg:height="0.932cm" svg:x="6.934cm" svg:y="4.026cm">
          <draw:text-box>
            <text:p text:style-name="P1"><text:span text:style-name="T2">– A.A. 2025/2026 – <text:s/></text:span></text:p>
          </draw:text-box>
        </draw:frame>
        <draw:frame draw:style-name="gr4" draw:text-style-name="P2" draw:layer="layout" svg:width="0.846cm" svg:height="0.932cm" svg:x="10.499cm" svg:y="4.352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0.139cm" svg:height="0.158cm" svg:x="10.693cm" svg:y="4.988cm">
          <draw:text-box>
            <text:p text:style-name="P1"><text:span text:style-name="T3"><text:s/></text:span></text:p>
          </draw:text-box>
        </draw:frame>
        <draw:polygon draw:style-name="gr6" draw:text-style-name="P4" draw:layer="layout" svg:width="18.301cm" svg:height="0.033cm" svg:x="1.35cm" svg:y="6.443cm" svg:viewBox="0 0 18302 34" draw:points="0,0 18302,0 18302,34 0,34">
          <text:p/>
        </draw:polygon>
        <draw:frame draw:style-name="gr7" draw:text-style-name="P5" draw:layer="layout" svg:width="7.941cm" svg:height="1.089cm" svg:x="6.447cm" svg:y="5.196cm">
          <draw:text-box>
            <text:p text:style-name="P1"><text:span text:style-name="T4">Messaggi in Codice </text:span></text:p>
          </draw:text-box>
        </draw:frame>
        <draw:frame draw:style-name="gr8" draw:text-style-name="P6" draw:layer="layout" svg:width="0.388cm" svg:height="0.437cm" svg:x="19.55cm" svg:y="9.407cm">
          <draw:text-box>
            <text:p text:style-name="P1"><text:span text:style-name="T5"><text:s/></text:span></text:p>
          </draw:text-box>
        </draw:frame>
        <draw:frame draw:style-name="gr9" draw:text-style-name="P7" draw:layer="layout" svg:width="5.175cm" svg:height="0.543cm" svg:x="1.401cm" svg:y="9.477cm">
          <draw:text-box>
            <text:p text:style-name="P1"><text:span text:style-name="T6">Struttura del codice</text:span></text:p>
          </draw:text-box>
        </draw:frame>
        <draw:frame draw:style-name="gr10" draw:text-style-name="P8" draw:layer="layout" svg:width="18.314cm" svg:height="2.356cm" svg:x="1.401cm" svg:y="10.239cm">
          <draw:text-box>
            <text:p text:style-name="P1"><text:span text:style-name="T7">Iniziando dalla procedura _start, Il programma chiama una procedura per inizializzare sulla stack la sttuttura </text:span><text:span text:style-name="T8"><text:a xlink:href="#cypher_data" xlink:type="simple">cypher_data</text:a></text:span><text:span text:style-name="T7">, carica l’indirizzo della stringa </text:span><text:span text:style-name="T9"><text:a xlink:href="#Parametri del programma" xlink:type="simple">myplaintext</text:a></text:span><text:span text:style-name="T7">, e un valore booleano, I quali vengono utilizzati come argomenti della procedura </text:span><text:span text:style-name="T10"><text:a xlink:href="#cypher_iter" xlink:type="simple">cypher_iter</text:a></text:span><text:span text:style-name="T7">, la quale determina la sequenza di procedure di cifratura e decifratura che verranno chiamate.</text:span></text:p>
          </draw:text-box>
        </draw:frame>
        <draw:polygon draw:style-name="gr11" draw:text-style-name="P9" draw:layer="layout" svg:width="18.314cm" svg:height="1.979cm" draw:transform="skewX (0.00296705972839036) rotate (0.00314159265358979) translate (1.39965477405974cm 7.00700108456285cm)" svg:viewBox="0 0 18315 1980" draw:points="0,0 18315,2 18315,1980 0,1978">
          <text:p/>
        </draw:polygon>
        <draw:frame draw:style-name="gr12" draw:text-style-name="P11" draw:layer="layout" svg:width="17.094cm" svg:height="0.551cm" svg:x="1.668cm" svg:y="7.264cm">
          <draw:text-box>
            <text:p text:style-name="P10"><text:span text:style-name="T11">Autore: Federico Carlo Martini <text:s/></text:span><text:span text:style-name="T11"><text:a xlink:href="mailto:federico.martini3@edu.unifi.it" xlink:type="simple">federico.martini3@edu.unifi.it</text:a></text:span><text:span text:style-name="T11"><text:s/>Matricola: 7190724 data:</text:span></text:p>
          </draw:text-box>
        </draw:frame>
        <draw:frame draw:style-name="gr13" draw:text-style-name="P12" draw:layer="layout" svg:width="0.35cm" svg:height="0.391cm" svg:x="1.668cm" svg:y="8.019cm">
          <draw:text-box>
            <text:p text:style-name="P1"><text:span text:style-name="T11"><text:s/></text:span></text:p>
          </draw:text-box>
        </draw:frame>
        <draw:frame draw:style-name="gr14" draw:text-style-name="P13" draw:layer="layout" svg:width="5.858cm" svg:height="0.543cm" svg:x="1.4cm" svg:y="12.712cm">
          <draw:text-box>
            <text:p text:style-name="P1"><text:span text:style-name="T12">Parametri del programma: </text:span></text:p>
          </draw:text-box>
        </draw:frame>
        <draw:frame draw:name="Parametri del programma" draw:style-name="gr10" draw:text-style-name="P8" draw:layer="layout" svg:width="18.314cm" svg:height="1.813cm" svg:x="1.401cm" svg:y="13.34cm">
          <draw:text-box>
            <text:p text:style-name="P1"><text:span text:style-name="T9">myplaintext: </text:span><text:span text:style-name="T13">Satringa di input del programma, oggetto delle procedure di cifratura</text:span></text:p>
            <text:p text:style-name="P1"><text:span text:style-name="T9">sostK: </text:span><text:span text:style-name="T13">Valore numerico usato come parametro dal </text:span><text:span text:style-name="T10"><text:a xlink:href="#caesar_encrypt" xlink:type="simple">cifrario di Cesare</text:a></text:span></text:p>
            <text:p text:style-name="P1"><text:span text:style-name="T9">blocKey: </text:span><text:span text:style-name="T13">Stringa parametro del </text:span><text:span text:style-name="T10">cifrario a blocchi</text:span></text:p>
            <text:p text:style-name="P1"><text:span text:style-name="T9">mycypher: </text:span><text:span text:style-name="T13">Stringa di caratteri tra {A, B, C, D, E} che determina la sequenza di procedure chiamate</text:span></text:p>
          </draw:text-box>
        </draw:frame>
        <draw:frame draw:style-name="gr15" draw:text-style-name="P14" draw:layer="layout" svg:width="0.943cm" svg:height="0.642cm" svg:x="1.475cm" svg:y="28.154cm">
          <draw:text-box>
            <text:p text:style-name="P1"><text:span text:style-name="T14">1</text:span></text:p>
          </draw:text-box>
        </draw:frame>
      </draw:page>
      <draw:page draw:name="page2" draw:style-name="dp1" draw:master-page-name="master-page3">
        <draw:frame draw:style-name="gr5" draw:text-style-name="P3" draw:layer="layout" svg:width="0.139cm" svg:height="0.158cm" svg:x="10.693cm" svg:y="8.988cm">
          <draw:text-box>
            <text:p text:style-name="P1"><text:span text:style-name="T3"><text:s/></text:span></text:p>
          </draw:text-box>
        </draw:frame>
        <draw:frame draw:style-name="gr8" draw:text-style-name="P6" draw:layer="layout" svg:width="0.388cm" svg:height="0.437cm" svg:x="19.55cm" svg:y="10.207cm">
          <draw:text-box>
            <text:p text:style-name="P1"><text:span text:style-name="T5"><text:s/></text:span></text:p>
          </draw:text-box>
        </draw:frame>
        <draw:frame draw:style-name="gr13" draw:text-style-name="P12" draw:layer="layout" svg:width="0.35cm" svg:height="0.391cm" svg:x="1.668cm" svg:y="12.019cm">
          <draw:text-box>
            <text:p text:style-name="P1"><text:span text:style-name="T11"><text:s/></text:span></text:p>
          </draw:text-box>
        </draw:frame>
        <draw:frame draw:style-name="gr16" draw:text-style-name="P15" draw:layer="layout" svg:width="15.939cm" svg:height="0.543cm" svg:x="1.935cm" svg:y="2.117cm">
          <draw:text-box>
            <text:p text:style-name="P1"><text:span text:style-name="T15">Strutture dati utilizzate: </text:span></text:p>
          </draw:text-box>
        </draw:frame>
        <draw:frame draw:name="heap_chunk" draw:style-name="gr10" draw:text-style-name="P8" draw:layer="layout" svg:width="8.789cm" svg:height="1.522cm" svg:x="1.4cm" svg:y="7.87cm">
          <draw:text-box>
            <text:p text:style-name="P1"><text:span text:style-name="T8">heap_chunk: </text:span><text:span text:style-name="T13">struttura di 12+ byte che organizza una zona di memoria</text:span></text:p>
            <text:p text:style-name="P1"><text:span text:style-name="T13"/></text:p>
            <text:p text:style-name="P1"><text:span text:style-name="T13"/></text:p>
            <text:p text:style-name="P1"><text:span text:style-name="T10"/></text:p>
          </draw:text-box>
        </draw:frame>
        <draw:g draw:style-name="gr17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" draw:text-style-name="P17" draw:layer="layout" svg:width="8.89cm" svg:height="0.671cm" svg:x="8.92cm" svg:y="7.2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heap_chu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9" draw:layer="layout" svg:width="8.89cm" svg:height="2.069cm" svg:x="8.92cm" svg:y="7.94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 [byte 0-3] : indirizzo del chunk precedente</text:span></text:p>
            <text:p text:style-name="P18"><text:span text:style-name="T16">- [byte 4-7]: bool -&gt; blocco occupato / libero</text:span></text:p>
            <text:p text:style-name="P18"><text:span text:style-name="T16">- [byte 8-11]: dimensione allocabile x</text:span><text:span text:style-name="T16"><text:line-break/></text:span><text:span text:style-name="T16">- [byte 12-[x+12]]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0" draw:layer="layout" svg:x1="17.81cm" svg:y1="8.64cm" svg:x2="13.365cm" svg:y2="10.01cm" draw:start-shape="id1" draw:end-shape="id1" draw:end-glue-point="2" svg:d="M17810 8640h527v1896h-4972v-526" svg:viewBox="0 0 4973 1897">
          <text:p/>
        </draw:connector>
        <draw:frame draw:style-name="gr21" draw:text-style-name="P22" draw:layer="layout" svg:width="0.711cm" svg:height="0.475cm" svg:x="12.192cm" svg:y="10.219cm">
          <draw:text-box>
            <text:p text:style-name="P21"><text:span text:style-name="T17">0..1</text:span></text:p>
          </draw:text-box>
        </draw:frame>
        <draw:frame draw:style-name="gr22" draw:text-style-name="P22" draw:layer="layout" svg:width="0.711cm" svg:height="0.475cm" svg:x="18.906cm" svg:y="8.128cm">
          <draw:text-box>
            <text:p text:style-name="P21"><text:span text:style-name="T17">0..1</text:span></text:p>
          </draw:text-box>
        </draw:frame>
        <draw:frame draw:style-name="gr23" draw:text-style-name="P23" draw:layer="layout" svg:width="0.422cm" svg:height="0.467cm" svg:x="13.15cm" svg:y="22.433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0.388cm" svg:height="0.437cm" svg:x="18.789cm" svg:y="12.585cm">
          <draw:text-box>
            <text:p text:style-name="P1"><text:span text:style-name="T14"><text:s/></text:span></text:p>
          </draw:text-box>
        </draw:frame>
        <draw:frame draw:style-name="gr8" draw:text-style-name="P6" draw:layer="layout" svg:width="0.388cm" svg:height="0.437cm" svg:x="15.605cm" svg:y="14.503cm">
          <draw:text-box>
            <text:p text:style-name="P1"><text:span text:style-name="T14"><text:s/></text:span></text:p>
          </draw:text-box>
        </draw:frame>
        <draw:frame draw:name="cypher_data" draw:style-name="gr10" draw:text-style-name="P8" draw:layer="layout" svg:width="8.789cm" svg:height="1.522cm" svg:x="1.402cm" svg:y="12.171cm">
          <draw:text-box>
            <text:p text:style-name="P1"><text:span text:style-name="T8">cypher_data:</text:span><text:span text:style-name="T9"> </text:span><text:span text:style-name="T13">Sruttura di 16 byte contenente I parametri per la procedura </text:span><text:span text:style-name="T10"><text:a xlink:href="#cypher_iter" xlink:type="simple">cypher_iter</text:a></text:span></text:p>
            <text:p text:style-name="P1"><text:span text:style-name="T8"/></text:p>
            <text:p text:style-name="P1"><text:span text:style-name="T10"/></text:p>
          </draw:text-box>
        </draw:frame>
        <draw:g draw:style-name="gr17">
          <draw:glue-point draw:id="4" svg:x="-3cm" svg:y="4.701cm"/>
          <draw:glue-point draw:id="5" svg:x="-1cm" svg:y="4.776cm"/>
          <draw:glue-point draw:id="6" svg:x="0.995cm" svg:y="4.85cm"/>
          <draw:glue-point draw:id="7" svg:x="2.995cm" svg:y="4.925cm"/>
          <draw:glue-point draw:id="8" svg:x="-0.001cm" svg:y="-0.655cm" draw:align="bottom-right"/>
          <draw:glue-point draw:id="9" svg:x="0cm" svg:y="-0.725cm" draw:align="bottom-left"/>
          <draw:glue-point draw:id="10" svg:x="-3cm" svg:y="-4.925cm"/>
          <draw:glue-point draw:id="11" svg:x="-1cm" svg:y="-4.85cm"/>
          <draw:glue-point draw:id="12" svg:x="0.995cm" svg:y="-4.776cm"/>
          <draw:glue-point draw:id="13" svg:x="2.995cm" svg:y="-4.701cm"/>
          <draw:glue-point draw:id="14" svg:x="-0.001cm" svg:y="0.706cm" draw:align="top-right"/>
          <draw:glue-point draw:id="15" svg:x="0cm" svg:y="0.636cm" draw:align="top-left"/>
          <draw:custom-shape draw:style-name="gr24" draw:text-style-name="P17" draw:layer="layout" svg:width="9.208cm" svg:height="0.671cm" svg:x="10.508cm" svg:y="11.6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cypher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4" draw:layer="layout" svg:width="9.208cm" svg:height="2.069cm" svg:x="10.508cm" svg:y="12.35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: indirizzo di </text:span><text:span text:style-name="T18"><text:a xlink:href="#Parametri del programma" xlink:type="simple">mycypher</text:a></text:span></text:p>
            <text:p text:style-name="P18"><text:span text:style-name="T16">-[byte 4-7] : copia di </text:span><text:span text:style-name="T18"><text:a xlink:href="#Parametri del programma" xlink:type="simple">sostK</text:a></text:span></text:p>
            <text:p text:style-name="P18"><text:span text:style-name="T16">-[byte 8-11] : indirizzo di </text:span><text:span text:style-name="T18"><text:a xlink:href="#Parametri del programma" xlink:type="simple">blocKey</text:a></text:span></text:p>
            <text:p text:style-name="P18"><text:span text:style-name="T16">-[byte 12-15] : indirizzo di </text:span><text:span text:style-name="T19">dictionary_f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mem_arena" draw:style-name="gr10" draw:text-style-name="P8" draw:layer="layout" svg:width="8.789cm" svg:height="1.522cm" svg:x="1.403cm" svg:y="15.171cm">
          <draw:text-box>
            <text:p text:style-name="P1"><text:span text:style-name="T8">mem_arena:</text:span><text:span text:style-name="T9"> </text:span><text:span text:style-name="T13">Sruttura di grandezza variabile, utilizzata per richieste di memoria in gruppo, con una richiesta di x byte: il programma alloca x + 8 byte e permette di ottenere porzioni della memoria richiesta <text:s/>successivamente</text:span></text:p>
            <text:p text:style-name="P1"><text:span text:style-name="T8"/></text:p>
            <text:p text:style-name="P1"><text:span text:style-name="T10"/></text:p>
          </draw:text-box>
        </draw:frame>
        <draw:g draw:style-name="gr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6" draw:text-style-name="P17" draw:layer="layout" svg:width="8.255cm" svg:height="0.671cm" svg:x="10.508cm" svg:y="14.8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mem_are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9" draw:layer="layout" svg:width="8.255cm" svg:height="1.603cm" svg:x="10.508cm" svg:y="15.52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: intero: numero di byte utilizzati</text:span></text:p>
            <text:p text:style-name="P18"><text:span text:style-name="T16">-[byte 4-7] : intero: grandezza arena</text:span></text:p>
            <text:p text:style-name="P18"><text:span text:style-name="T16">-[byte 8-x] 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occurrence_map" draw:style-name="gr10" draw:text-style-name="P8" draw:layer="layout" svg:width="8.789cm" svg:height="1.522cm" svg:x="1.404cm" svg:y="18.488cm">
          <draw:text-box>
            <text:p text:style-name="P1"><text:span text:style-name="T8">occurrence_map:</text:span><text:span text:style-name="T9"> </text:span><text:span text:style-name="T13">struttura di 384 byte:(carattere massimo – carattere minimo + 1) * 4.</text:span></text:p>
            <text:p text:style-name="P1"><text:span text:style-name="T13">Consiste in un array di puntatori a liste concatenate, ogni elemento “I” corrisponde alla lista di occorrenze del carattere ascii(i + 32), in caso in cui non ci siano occorrenze del carattere, la lista risulta nulla</text:span></text:p>
          </draw:text-box>
        </draw:frame>
        <draw:g draw:style-name="gr17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17" draw:layer="layout" svg:width="8.573cm" svg:height="0.671cm" svg:x="10.508cm" svg:y="19.1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occurrence_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9" draw:layer="layout" svg:width="8.573cm" svg:height="0.671cm" svg:x="10.508cm" svg:y="19.8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83] : list_node[96]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list_node" draw:style-name="gr10" draw:text-style-name="P8" draw:layer="layout" svg:width="8.789cm" svg:height="1.522cm" svg:x="1.405cm" svg:y="22.788cm">
          <draw:text-box>
            <text:p text:style-name="P1"><text:span text:style-name="T8">list_node:</text:span><text:span text:style-name="T9"> </text:span><text:span text:style-name="T13">Struttura di 8 byte che indica una singola occorrenza di un carattere nel testo da cifrare</text:span></text:p>
          </draw:text-box>
        </draw:frame>
        <draw:g draw:style-name="gr17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" draw:text-style-name="P17" draw:layer="layout" svg:width="8.059cm" svg:height="0.671cm" svg:x="11.021cm" svg:y="22.4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list_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8.059cm" svg:height="1.137cm" svg:x="11.021cm" svg:y="23.11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= indice di occorrenza</text:span></text:p>
            <text:p text:style-name="P18"><text:span text:style-name="T16">-[byte 4-7] = indirizzo del prossimo no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20" draw:layer="layout" svg:x1="14.99cm" svg:y1="22.479cm" svg:x2="13.937cm" svg:y2="20.48cm" draw:end-shape="id2" draw:end-glue-point="5" svg:d="M14990 22479v-736h-1053v-1263" svg:viewBox="0 0 1054 2000">
          <text:p/>
        </draw:connector>
        <draw:frame draw:style-name="gr33" draw:text-style-name="P22" draw:layer="layout" svg:width="0.69cm" svg:height="0.769cm" svg:x="12.972cm" svg:y="20.782cm">
          <draw:text-box>
            <text:p text:style-name="P21"><text:span text:style-name="T17">1..1</text:span></text:p>
          </draw:text-box>
        </draw:frame>
        <draw:connector draw:style-name="gr34" draw:text-style-name="P20" draw:layer="layout" svg:x1="17.023cm" svg:y1="24.276cm" svg:x2="15.05cm" svg:y2="24.253cm" draw:end-shape="id3" svg:d="M17023 24276v503h-1973v-526" svg:viewBox="0 0 1974 527">
          <text:p/>
        </draw:connector>
        <draw:frame draw:style-name="gr35" draw:text-style-name="P22" draw:layer="layout" svg:width="0.711cm" svg:height="0.475cm" svg:x="14.01cm" svg:y="24.44cm">
          <draw:text-box>
            <text:p text:style-name="P21"><text:span text:style-name="T17">0..1</text:span></text:p>
          </draw:text-box>
        </draw:frame>
        <draw:frame draw:style-name="gr36" draw:text-style-name="P22" draw:layer="layout" svg:width="0.711cm" svg:height="0.475cm" svg:x="15.195cm" svg:y="21.956cm">
          <draw:text-box>
            <text:p text:style-name="P21"><text:span text:style-name="T17">0..*</text:span></text:p>
          </draw:text-box>
        </draw:frame>
        <draw:frame draw:name="heap" draw:style-name="gr10" draw:text-style-name="P8" draw:layer="layout" svg:width="8.789cm" svg:height="1.522cm" svg:x="1.401cm" svg:y="3.971cm">
          <draw:text-box>
            <text:p text:style-name="P25"><text:span text:style-name="T8">heap: </text:span><text:span text:style-name="T13">Raccoglie la memoria allocata dinamicamente dal programma, unico nel programma, se necessario viene esteso con la syscall “brk”, e heap_size aggiornata di conseguenza</text:span></text:p>
          </draw:text-box>
        </draw:frame>
        <draw:g draw:style-name="gr17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" draw:text-style-name="P17" draw:layer="layout" svg:width="9.207cm" svg:height="0.671cm" svg:x="10.19cm" svg:y="3.8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9" draw:layer="layout" svg:width="9.207cm" svg:height="1.137cm" svg:x="10.19cm" svg:y="4.5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heap_size: grandezza totale in byte</text:span></text:p>
            <text:p text:style-name="P18"><text:span text:style-name="T16">-heap_start : indirizzo da cui inizia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9" draw:text-style-name="P22" draw:layer="layout" svg:width="0.711cm" svg:height="0.475cm" svg:x="15.021cm" svg:y="5.855cm">
          <draw:text-box>
            <text:p text:style-name="P21"><text:span text:style-name="T17">1..1</text:span></text:p>
          </draw:text-box>
        </draw:frame>
        <draw:frame draw:style-name="gr40" draw:text-style-name="P22" draw:layer="layout" svg:width="0.711cm" svg:height="0.475cm" svg:x="12.119cm" svg:y="6.624cm">
          <draw:text-box>
            <text:p text:style-name="P21"><text:span text:style-name="T17">1..*</text:span></text:p>
          </draw:text-box>
        </draw:frame>
        <draw:connector draw:style-name="gr41" draw:text-style-name="P20" draw:layer="layout" svg:x1="13.235cm" svg:y1="7.207cm" svg:x2="14.793cm" svg:y2="5.657cm" draw:end-shape="id4" draw:end-glue-point="2" svg:d="M13235 7207v-512h1558v-1038" svg:viewBox="0 0 1559 1551">
          <text:p/>
        </draw:connector>
        <draw:frame draw:style-name="gr15" draw:text-style-name="P14" draw:layer="layout" svg:width="0.943cm" svg:height="0.642cm" svg:x="1.475cm" svg:y="28.154cm">
          <draw:text-box>
            <text:p text:style-name="P1"><text:span text:style-name="T14">2</text:span></text:p>
          </draw:text-box>
        </draw:frame>
      </draw:page>
      <draw:page draw:name="page3" draw:style-name="dp1" draw:master-page-name="master-page64">
        <draw:frame draw:style-name="gr15" draw:text-style-name="P14" draw:layer="layout" svg:width="0.943cm" svg:height="0.642cm" svg:x="1.474cm" svg:y="28.154cm">
          <draw:text-box>
            <text:p text:style-name="P1"><text:span text:style-name="T14">3</text:span></text:p>
          </draw:text-box>
        </draw:frame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name="cypher_iter" draw:style-name="gr43" draw:text-style-name="P26" draw:layer="layout" svg:width="8.415cm" svg:height="0.501cm" svg:x="1.401cm" svg:y="2.623cm">
          <draw:text-box>
            <text:p text:style-name="P1"><text:span text:style-name="T20">cypher_iter:</text:span></text:p>
          </draw:text-box>
        </draw:frame>
        <draw:frame draw:style-name="gr44" draw:text-style-name="P28" draw:layer="layout" svg:width="18.237cm" svg:height="1.865cm" svg:x="1.455cm" svg:y="3.458cm">
          <draw:text-box>
            <text:p text:style-name="P27"><text:span text:style-name="T7">Procedura principale del programma, itera sulla stringa cypher passata come parametro, applica le funzioni di cifratura in base alla lettera corrente della stringa, poi stampa il risultato, e libera la stringa precedente a partire dal secondo ciclo.</text:span><text:span text:style-name="T7"><text:line-break/></text:span><text:span text:style-name="T7"/></text:p>
          </draw:text-box>
        </draw:frame>
        <draw:frame draw:style-name="gr45" draw:text-style-name="P30" draw:layer="layout" svg:width="8.051cm" svg:height="1.865cm" svg:x="1.493cm" svg:y="5.213cm">
          <draw:text-box>
            <text:p text:style-name="P29"><text:span text:style-name="T21">Parametri: </text:span></text:p>
            <text:p text:style-name="P29"><text:span text:style-name="T21">a0: La stringa da cifrare / decifrare (src)</text:span></text:p>
            <text:p text:style-name="P29"><text:span text:style-name="T21">a1: </text:span><text:span text:style-name="T22"><text:a xlink:href="#cypher_data" xlink:type="simple">cypher_data</text:a></text:span></text:p>
            <text:p text:style-name="P29"><text:span text:style-name="T21">a2: bool → criptazione / decifrazione (encrypt)</text:span></text:p>
          </draw:text-box>
        </draw:frame>
        <draw:frame draw:style-name="gr45" draw:text-style-name="P30" draw:layer="layout" svg:width="8.051cm" svg:height="1.865cm" svg:x="9.594cm" svg:y="5.323cm">
          <draw:text-box>
            <text:p text:style-name="P29"><text:span text:style-name="T21">Valore di ritorno: </text:span></text:p>
            <text:p text:style-name="P29"><text:span text:style-name="T21">a0: La stringa cifrata / decifrata (dest)</text:span></text:p>
          </draw:text-box>
        </draw:frame>
        <draw:g draw:style-name="gr46" xml:id="id28" draw:id="id28">
          <draw:path draw:style-name="gr47" draw:text-style-name="P31" draw:layer="layout" svg:width="0.5cm" svg:height="0.5cm" svg:x="3.932cm" svg:y="7.752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48" draw:text-style-name="P32" draw:layer="layout" svg:width="0.25cm" svg:height="0.25cm" svg:x="4.057cm" svg:y="7.877cm">
            <text:p/>
            <draw:enhanced-geometry svg:viewBox="0 0 21600 21600" draw:type="rectangle" draw:enhanced-path="M 0 0 L 21600 0 21600 21600 0 21600 0 0 Z N"/>
          </draw:custom-shape>
        </draw:g>
        <draw:path draw:style-name="gr49" draw:text-style-name="P34" xml:id="id6" draw:id="id6" draw:layer="layout" svg:width="1.652cm" svg:height="1.273cm" draw:transform="skewX (-0.00698131700797732) rotate (-0.00733038285837597) translate (7.52422195191849cm 9.66915461660746cm)" svg:viewBox="0 0 1653 1274" svg:d="M825 0c276 212 552 425 828 637-276 212-551 425-827 637-275-213-551-425-826-638 275-212 550-424 825-636z">
          <text:p text:style-name="P33"/>
        </draw:path>
        <draw:connector draw:style-name="gr50" draw:text-style-name="P35" draw:layer="layout" svg:x1="11.401cm" svg:y1="10.304cm" svg:x2="9.177cm" svg:y2="10.312cm" draw:start-shape="id5" draw:end-shape="id6" draw:end-glue-point="1" svg:d="M11401 10304h-1104v8h-1120" svg:viewBox="0 0 2225 9">
          <text:p/>
        </draw:connector>
        <draw:custom-shape draw:style-name="gr51" draw:text-style-name="P37" xml:id="id5" draw:id="id5" draw:layer="layout" svg:width="6.283cm" svg:height="1.854cm" svg:x="11.401cm" svg:y="9.37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i = 0</text:span></text:p>
          <text:p text:style-name="P36"><text:span text:style-name="T23">Termine iter = mycypher.len </text:span></text:p>
          <text:p text:style-name="P36"><text:span text:style-name="T23">Incremento iter = 1</text:span></text:p>
          <text:p text:style-name="P36"><text:span text:style-name="T23">Carica tabella di salto di cript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38" draw:layer="layout" svg:width="2.534cm" svg:height="0.601cm" svg:x="9.09cm" svg:y="7.43cm">
          <draw:text-box>
            <text:p text:style-name="P21"><text:span text:style-name="T16">[</text:span><text:span text:style-name="T23">Falso</text:span><text:span text:style-name="T16">]</text:span></text:p>
          </draw:text-box>
        </draw:frame>
        <draw:connector draw:style-name="gr53" draw:text-style-name="P35" draw:layer="layout" svg:x1="11.393cm" svg:y1="8.09cm" svg:x2="8.35cm" svg:y2="9.675cm" draw:start-shape="id7" draw:start-glue-point="3" draw:end-shape="id6" draw:end-glue-point="0" svg:d="M11393 8090h-3043v1585" svg:viewBox="0 0 3044 1586">
          <text:p/>
        </draw:connector>
        <draw:custom-shape draw:style-name="gr54" draw:text-style-name="P37" xml:id="id7" draw:id="id7" draw:layer="layout" svg:width="6.731cm" svg:height="1.805cm" svg:x="11.393cm" svg:y="7.1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i = mycypher.len - 1</text:span></text:p>
          <text:p text:style-name="P36"><text:span text:style-name="T23">Termine iter = <text:s/>-1 </text:span></text:p>
          <text:p text:style-name="P36"><text:span text:style-name="T23">Incremento iter = <text:s/>-1</text:span></text:p>
          <text:p text:style-name="P36"><text:span text:style-name="T23">Carica tabella di salto di decif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37" xml:id="id10" draw:id="id10" draw:layer="layout" svg:width="10.035cm" svg:height="1.5cm" svg:x="9.018cm" svg:y="12.71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a0 = src</text:span></text:p>
          <text:p text:style-name="P36"><text:span text:style-name="T23">a1= src.len</text:span></text:p>
          <text:p text:style-name="P36"><text:span text:style-name="T23">Leggi carattere corrente di my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6" draw:text-style-name="P35" draw:layer="layout" svg:x1="18.632cm" svg:y1="10.322cm" svg:x2="17.684cm" svg:y2="10.304cm" draw:start-shape="id8" draw:start-glue-point="5" draw:end-shape="id5" draw:end-glue-point="1" svg:d="M18632 10322h-479v-18h-469" svg:viewBox="0 0 949 19">
          <text:p/>
        </draw:connector>
        <draw:connector draw:style-name="gr57" draw:text-style-name="P35" draw:layer="layout" svg:x1="19.132cm" svg:y1="9.822cm" svg:x2="18.124cm" svg:y2="8.09cm" draw:start-shape="id8" draw:start-glue-point="4" draw:end-shape="id7" draw:end-glue-point="1" svg:d="M19132 9822v-1732h-1008" svg:viewBox="0 0 1009 1733">
          <text:p/>
        </draw:connector>
        <draw:frame draw:style-name="gr58" draw:text-style-name="P38" draw:layer="layout" svg:width="2.534cm" svg:height="0.736cm" svg:x="9.158cm" svg:y="9.483cm">
          <draw:text-box>
            <text:p text:style-name="P21"><text:span text:style-name="T16">[</text:span><text:span text:style-name="T23">Vero</text:span><text:span text:style-name="T16">]</text:span></text:p>
          </draw:text-box>
        </draw:frame>
        <draw:g draw:style-name="gr17">
          <draw:custom-shape draw:style-name="gr59" draw:text-style-name="P39" draw:layer="layout" svg:width="18.386cm" svg:height="14.043cm" svg:x="1.477cm" svg:y="11.8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0" draw:layer="layout" svg:width="5.418cm" svg:height="0.695cm" svg:x="1.477cm" svg:y="11.83cm">
            <text:p text:style-name="P36"><text:span text:style-name="T23">Ciclo criptazione / decifraione <text:s/></text:span></text:p>
            <draw:enhanced-geometry svg:viewBox="0 0 21600 21600" draw:type="non-primitve" draw:enhanced-path="M 0 0 L 21600 0 19000 21600 0 21600 0 0 Z N"/>
          </draw:custom-shape>
        </draw:g>
        <draw:custom-shape draw:style-name="gr61" draw:text-style-name="P34" xml:id="id9" draw:id="id9" draw:layer="layout" svg:width="1cm" svg:height="1cm" svg:x="1.844cm" svg:y="13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42" draw:layer="layout" svg:width="4.399cm" svg:height="0.779cm" svg:x="1.983cm" svg:y="13.007cm">
          <draw:text-box>
            <text:p text:style-name="P41"><text:span text:style-name="T23">[calcolo su tabella di salto</text:span></text:p>
            <text:p text:style-name="P41"><text:span text:style-name="T23">In base a mycypher [i]]</text:span></text:p>
          </draw:text-box>
        </draw:frame>
        <draw:connector draw:style-name="gr63" draw:text-style-name="P35" draw:layer="layout" svg:x1="2.844cm" svg:y1="14.281cm" svg:x2="9.018cm" svg:y2="13.462cm" draw:start-shape="id9" draw:start-glue-point="7" draw:end-shape="id10" draw:end-glue-point="3" svg:d="M2844 14281h3093v-819h3081" svg:viewBox="0 0 6175 820">
          <text:p/>
        </draw:connector>
        <draw:connector draw:style-name="gr64" draw:text-style-name="P35" draw:layer="layout" svg:x1="4.93cm" svg:y1="24.934cm" svg:x2="2.344cm" svg:y2="14.781cm" draw:start-shape="id11" draw:start-glue-point="3" draw:end-shape="id9" draw:end-glue-point="6" svg:d="M4930 24934h-2586v-10153" svg:viewBox="0 0 2587 10154">
          <text:p/>
        </draw:connector>
        <draw:frame draw:style-name="gr65" draw:text-style-name="P38" draw:layer="layout" svg:width="2.576cm" svg:height="0.601cm" svg:x="5.948cm" svg:y="8.905cm">
          <draw:text-box>
            <text:p text:style-name="P21"><text:span text:style-name="T16">[</text:span><text:span text:style-name="T23">Crittazione?</text:span><text:span text:style-name="T16">]</text:span></text:p>
          </draw:text-box>
        </draw:frame>
        <draw:custom-shape draw:style-name="gr66" draw:text-style-name="P44" xml:id="id11" draw:id="id11" draw:layer="layout" svg:width="2.301cm" svg:height="0.772cm" svg:x="4.93cm" svg:y="24.54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in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7" draw:text-style-name="P35" draw:layer="layout" svg:x1="4.906cm" svg:y1="18.305cm" svg:x2="2.365cm" svg:y2="18.306cm" draw:start-shape="id12" draw:start-glue-point="3" svg:d="M4906 18305h-1534v1h-1007" svg:viewBox="0 0 2542 2">
          <text:p/>
        </draw:connector>
        <draw:custom-shape draw:style-name="gr68" draw:text-style-name="P34" xml:id="id8" draw:id="id8" draw:layer="layout" svg:width="1cm" svg:height="1cm" svg:x="18.6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35" draw:layer="layout" draw:line-skew="0.53cm" svg:x1="14.035cm" svg:y1="12.712cm" svg:x2="19.132cm" svg:y2="10.822cm" draw:start-shape="id10" draw:end-shape="id8" draw:end-glue-point="6" svg:d="M14035 12712v-409h5097v-1481" svg:viewBox="0 0 5098 1891">
          <text:p/>
        </draw:connector>
        <draw:custom-shape draw:style-name="gr70" draw:text-style-name="P46" xml:id="id18" draw:id="id18" draw:layer="layout" svg:width="5.125cm" svg:height="0.81cm" svg:x="4.916cm" svg:y="23.3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5"><text:span text:style-name="T24">a2=</text:span><text:span text:style-name="T26"><text:a xlink:href="#cypher_data" xlink:type="simple">cypher_data</text:a></text:span><text:span text:style-name="T26">.</text:span><text:span text:style-name="T24">dictionary_function</text:span></text:p>
          <text:p text:style-name="P43"><text:span text:style-name="T24">Chiama </text:span><text:span text:style-name="T25">diction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1" draw:text-style-name="P35" draw:layer="layout" svg:x1="4.853cm" svg:y1="22.448cm" svg:x2="2.321cm" svg:y2="22.451cm" draw:start-shape="id13" draw:start-glue-point="3" svg:d="M4853 22448h-1530v3h-1002" svg:viewBox="0 0 2533 4">
          <text:p/>
        </draw:connector>
        <draw:frame draw:style-name="gr72" draw:text-style-name="P48" draw:layer="layout" svg:width="2.534cm" svg:height="0.489cm" svg:x="2.936cm" svg:y="24.934cm">
          <draw:text-box>
            <text:p text:style-name="P47"><text:span text:style-name="T24">[caso E]</text:span></text:p>
          </draw:text-box>
        </draw:frame>
        <draw:custom-shape draw:style-name="gr73" draw:text-style-name="P34" xml:id="id17" draw:id="id17" draw:layer="layout" svg:width="1cm" svg:height="1cm" svg:x="15.345cm" svg:y="14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44" xml:id="id14" draw:id="id14" draw:layer="layout" svg:width="4.683cm" svg:height="0.872cm" svg:x="4.827cm" svg:y="20.78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occurrence_encry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44" xml:id="id13" draw:id="id13" draw:layer="layout" svg:width="4.593cm" svg:height="0.784cm" svg:x="4.853cm" svg:y="22.05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occurrence_de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6" draw:text-style-name="P35" draw:layer="layout" svg:x1="4.827cm" svg:y1="21.223cm" svg:x2="2.381cm" svg:y2="21.216cm" draw:start-shape="id14" draw:start-glue-point="3" svg:d="M4827 21223h-1487v-7h-959" svg:viewBox="0 0 2447 8">
          <text:p/>
        </draw:connector>
        <draw:g draw:style-name="gr77" xml:id="id15" draw:id="id15">
          <draw:path draw:style-name="gr78" draw:text-style-name="P49" draw:layer="layout" svg:width="0.5cm" svg:height="0.5cm" svg:x="10.82cm" svg:y="28.01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79" draw:text-style-name="P31" draw:layer="layout" svg:width="0.2cm" svg:height="0.2cm" svg:x="10.97cm" svg:y="28.16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80" draw:text-style-name="P35" draw:layer="layout" svg:x1="11.07cm" svg:y1="28.018cm" svg:x2="11.064cm" svg:y2="27.182cm" draw:start-shape="id15" draw:start-glue-point="0" draw:end-shape="id16" draw:end-glue-point="2" svg:d="M11070 28018v-418h-6v-418" svg:viewBox="0 0 7 837">
          <text:p/>
        </draw:connector>
        <draw:connector draw:style-name="gr81" draw:text-style-name="P35" draw:layer="layout" draw:line-skew="1.787cm" svg:x1="15.345cm" svg:y1="15.442cm" svg:x2="7.231cm" svg:y2="24.934cm" draw:start-shape="id17" draw:start-glue-point="5" draw:end-shape="id11" draw:end-glue-point="1" svg:d="M15345 15442h-2275v9492h-5839" svg:viewBox="0 0 8115 9493">
          <text:p/>
        </draw:connector>
        <draw:connector draw:style-name="gr82" draw:text-style-name="P35" draw:layer="layout" svg:x1="13.048cm" svg:y1="23.72cm" svg:x2="10.041cm" svg:y2="23.718cm" draw:end-shape="id18" draw:end-glue-point="1" svg:d="M13048 23720h-1240v-2h-1767" svg:viewBox="0 0 3008 3">
          <text:p/>
        </draw:connector>
        <draw:custom-shape draw:style-name="gr83" draw:text-style-name="P44" xml:id="id21" draw:id="id21" draw:layer="layout" svg:width="4cm" svg:height="1.5cm" svg:x="13.835cm" svg:y="20.14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Stampa a0 (dest)</text:span></text:p>
          <text:p text:style-name="P43"><text:span text:style-name="T24">src = dest</text:span></text:p>
          <text:p text:style-name="P43"><text:span text:style-name="T24">i = i + incremento iter</text:span></text:p>
          <text:p text:style-name="P43"><text:span text:style-name="T24">Prima iterazione = fal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4" draw:text-style-name="P35" draw:layer="layout" svg:x1="15.88cm" svg:y1="16.62cm" svg:x2="15.845cm" svg:y2="15.942cm" draw:start-shape="id19" draw:start-glue-point="4" draw:end-shape="id17" draw:end-glue-point="6" svg:d="M15880 16620v-338h-35v-340" svg:viewBox="0 0 36 679">
          <text:p/>
        </draw:connector>
        <draw:custom-shape draw:style-name="gr85" draw:text-style-name="P34" xml:id="id20" draw:id="id20" draw:layer="layout" svg:width="1cm" svg:height="1cm" svg:x="15.345cm" svg:y="2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6" draw:text-style-name="P35" draw:layer="layout" svg:x1="15.845cm" svg:y1="22.647cm" svg:x2="15.835cm" svg:y2="21.646cm" draw:start-shape="id20" draw:start-glue-point="4" draw:end-shape="id21" draw:end-glue-point="2" svg:d="M15845 22647v-505h-10v-496" svg:viewBox="0 0 11 1002">
          <text:p/>
        </draw:connector>
        <draw:frame draw:style-name="gr87" draw:text-style-name="P48" draw:layer="layout" svg:width="2.534cm" svg:height="0.601cm" svg:x="13.311cm" svg:y="22.086cm">
          <draw:text-box>
            <text:p text:style-name="P47"><text:span text:style-name="T24">[i != termine iter]</text:span></text:p>
          </draw:text-box>
        </draw:frame>
        <draw:connector draw:style-name="gr88" draw:text-style-name="P35" draw:layer="layout" draw:line-skew="1.015cm" svg:x1="11.064cm" svg:y1="26.571cm" svg:x2="15.845cm" svg:y2="23.647cm" draw:start-shape="id16" draw:start-glue-point="0" draw:end-shape="id20" draw:end-glue-point="6" svg:d="M11064 26571v-441h4781v-2483" svg:viewBox="0 0 4782 2925">
          <text:p/>
        </draw:connector>
        <draw:connector draw:style-name="gr89" draw:text-style-name="P35" draw:layer="layout" draw:line-skew="1.647cm" svg:x1="19.116cm" svg:y1="12.286cm" svg:x2="16.345cm" svg:y2="23.147cm" draw:end-shape="id20" draw:end-glue-point="7" svg:d="M19116 12286h531v10861h-3302" svg:viewBox="0 0 3303 10862">
          <text:p/>
        </draw:connector>
        <draw:frame draw:style-name="gr90" draw:text-style-name="P48" draw:layer="layout" svg:width="2.534cm" svg:height="0.601cm" svg:x="16.3cm" svg:y="22.446cm">
          <draw:text-box>
            <text:p text:style-name="P47"><text:span text:style-name="T24">[vero]</text:span></text:p>
          </draw:text-box>
        </draw:frame>
        <draw:frame draw:style-name="gr91" draw:text-style-name="P48" draw:layer="layout" svg:width="2.534cm" svg:height="0.601cm" svg:x="14.472cm" svg:y="23.372cm">
          <draw:text-box>
            <text:p text:style-name="P47"><text:span text:style-name="T24">[falso]</text:span></text:p>
          </draw:text-box>
        </draw:frame>
        <draw:frame draw:style-name="gr92" draw:text-style-name="P48" draw:layer="layout" svg:width="2.534cm" svg:height="0.601cm" svg:x="2.796cm" svg:y="23.618cm">
          <draw:text-box>
            <text:p text:style-name="P47"><text:span text:style-name="T24">[caso D]</text:span></text:p>
          </draw:text-box>
        </draw:frame>
        <draw:frame draw:style-name="gr93" draw:text-style-name="P48" draw:layer="layout" svg:width="2.534cm" svg:height="0.601cm" svg:x="2.165cm" svg:y="22.564cm">
          <draw:text-box>
            <text:p text:style-name="P47"><text:span text:style-name="T24">[caso C] &amp;&amp;</text:span></text:p>
            <text:p text:style-name="P47"><text:span text:style-name="T24">[decyhper] </text:span></text:p>
          </draw:text-box>
        </draw:frame>
        <draw:frame draw:style-name="gr94" draw:text-style-name="P50" draw:layer="layout" svg:width="1.47cm" svg:height="0.62cm" svg:x="2.43cm" svg:y="21.305cm">
          <draw:text-box>
            <text:p><text:span text:style-name="T24">[caso C] &amp;&amp;</text:span></text:p>
            <text:p><text:span text:style-name="T24">[encrypt] </text:span></text:p>
          </draw:text-box>
        </draw:frame>
        <draw:custom-shape draw:style-name="gr95" draw:text-style-name="P51" xml:id="id12" draw:id="id12" draw:layer="layout" svg:width="3.632cm" svg:height="1.14cm" svg:x="4.906cm" svg:y="17.73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6"><text:span text:style-name="T24">a2 = </text:span><text:span text:style-name="T26"><text:a xlink:href="#cypher_data" xlink:type="simple">cypher_data</text:a></text:span><text:span text:style-name="T24"><text:s/></text:span></text:p>
          <text:p text:style-name="P16"><text:span text:style-name="T24">Chiama </text:span><text:span text:style-name="T25"><text:a xlink:href="#block_encrypt" xlink:type="simple">block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6" draw:text-style-name="P53" xml:id="id23" draw:id="id23" draw:layer="layout" svg:width="4.024cm" svg:height="0.944cm" svg:x="4.878cm" svg:y="16.3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7"><text:a xlink:href="#Parametri del programma" xlink:type="simple">sostK</text:a></text:span></text:p>
          <text:p text:style-name="P43"><text:span text:style-name="T24">Chiama </text:span><text:span text:style-name="T25"><text:a xlink:href="#caesar_decypher" xlink:type="simple">caesar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7" draw:text-style-name="P44" xml:id="id22" draw:id="id22" draw:layer="layout" svg:width="4.093cm" svg:height="1.14cm" svg:x="4.869cm" svg:y="19.3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6"><text:a xlink:href="#cypher_data" xlink:type="simple">cypher_data</text:a></text:span><text:span text:style-name="T26">.</text:span><text:span text:style-name="T27"><text:a xlink:href="#Parametri del programma" xlink:type="simple">blocKey</text:a></text:span></text:p>
          <text:p text:style-name="P43"><text:span text:style-name="T24">Chiama </text:span><text:span text:style-name="T25"><text:a xlink:href="#block_decypher" xlink:type="simple">block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8" draw:text-style-name="P53" xml:id="id24" draw:id="id24" draw:layer="layout" svg:width="4.024cm" svg:height="0.944cm" svg:x="4.902cm" svg:y="14.97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7"><text:a xlink:href="#Parametri del programma" xlink:type="simple">sostK</text:a></text:span></text:p>
          <text:p text:style-name="P43"><text:span text:style-name="T24">Chiama </text:span><text:span text:style-name="T25"><text:a xlink:href="#caesar_encrypt" xlink:type="simple">caesar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9" draw:text-style-name="P35" draw:layer="layout" svg:x1="4.869cm" svg:y1="19.877cm" svg:x2="2.355cm" svg:y2="19.884cm" draw:start-shape="id22" draw:start-glue-point="3" svg:d="M4869 19877h-1521v7h-993" svg:viewBox="0 0 2515 8">
          <text:p/>
        </draw:connector>
        <draw:connector draw:style-name="gr100" draw:text-style-name="P35" draw:layer="layout" svg:x1="4.916cm" svg:y1="23.718cm" svg:x2="2.339cm" svg:y2="23.728cm" draw:start-shape="id18" draw:start-glue-point="3" svg:d="M4916 23718h-1552v10h-1025" svg:viewBox="0 0 2578 11">
          <text:p/>
        </draw:connector>
        <draw:connector draw:style-name="gr101" draw:text-style-name="P35" draw:layer="layout" svg:x1="4.878cm" svg:y1="16.86cm" svg:x2="2.336cm" svg:y2="16.858cm" draw:start-shape="id23" draw:start-glue-point="3" svg:d="M4878 16860h-1534v-2h-1008" svg:viewBox="0 0 2543 3">
          <text:p/>
        </draw:connector>
        <draw:connector draw:style-name="gr102" draw:text-style-name="P35" draw:layer="layout" svg:x1="4.902cm" svg:y1="15.447cm" svg:x2="2.359cm" svg:y2="15.444cm" draw:start-shape="id24" draw:start-glue-point="3" svg:d="M4902 15447h-1535v-3h-1008" svg:viewBox="0 0 2544 4">
          <text:p/>
        </draw:connector>
        <draw:frame draw:style-name="gr103" draw:text-style-name="P48" draw:layer="layout" svg:width="2.534cm" svg:height="0.601cm" svg:x="2.344cm" svg:y="15.774cm">
          <draw:text-box>
            <text:p text:style-name="P47"><text:span text:style-name="T24">[caso A] &amp;&amp;</text:span><text:span text:style-name="T24"><text:line-break/></text:span><text:span text:style-name="T24">[encrypy]</text:span></text:p>
            <text:p text:style-name="P47"><text:span text:style-name="T24"><text:s/></text:span></text:p>
            <text:p text:style-name="P47"><text:span text:style-name="T24"/></text:p>
          </draw:text-box>
        </draw:frame>
        <draw:frame draw:style-name="gr104" draw:text-style-name="P48" draw:layer="layout" svg:width="2.534cm" svg:height="0.601cm" svg:x="2.244cm" svg:y="17.046cm">
          <draw:text-box>
            <text:p text:style-name="P47"><text:span text:style-name="T24">[caso A] &amp;&amp;</text:span><text:span text:style-name="T24"><text:line-break/></text:span><text:span text:style-name="T24">[decypher]</text:span></text:p>
            <text:p text:style-name="P47"><text:span text:style-name="T24"><text:s/></text:span></text:p>
          </draw:text-box>
        </draw:frame>
        <draw:frame draw:style-name="gr105" draw:text-style-name="P48" draw:layer="layout" svg:width="2.534cm" svg:height="0.601cm" svg:x="2.195cm" svg:y="18.518cm">
          <draw:text-box>
            <text:p text:style-name="P47"><text:span text:style-name="T24">[caso B] &amp;&amp;</text:span><text:span text:style-name="T24"><text:line-break/></text:span><text:span text:style-name="T24">[encrypt]</text:span></text:p>
            <text:p text:style-name="P47"><text:span text:style-name="T24"><text:s/></text:span></text:p>
          </draw:text-box>
        </draw:frame>
        <draw:frame draw:style-name="gr106" draw:text-style-name="P48" draw:layer="layout" svg:width="2.534cm" svg:height="0.601cm" svg:x="2.195cm" svg:y="20.019cm">
          <draw:text-box>
            <text:p text:style-name="P47"><text:span text:style-name="T24">[caso B] &amp;&amp;</text:span><text:span text:style-name="T24"><text:line-break/></text:span><text:span text:style-name="T24">[decypher]</text:span></text:p>
            <text:p text:style-name="P47"><text:span text:style-name="T24"><text:s/></text:span></text:p>
          </draw:text-box>
        </draw:frame>
        <draw:connector draw:style-name="gr107" draw:text-style-name="P35" draw:layer="layout" svg:x1="13.048cm" svg:y1="22.556cm" svg:x2="9.446cm" svg:y2="22.559cm" svg:d="M13048 22556h-1801v3h-1801" svg:viewBox="0 0 3603 4">
          <text:p/>
        </draw:connector>
        <draw:connector draw:style-name="gr108" draw:text-style-name="P35" draw:layer="layout" svg:x1="13.043cm" svg:y1="15.454cm" svg:x2="8.926cm" svg:y2="15.447cm" draw:end-shape="id24" draw:end-glue-point="1" svg:d="M13043 15454h-1794v-7h-2323" svg:viewBox="0 0 4118 8">
          <text:p/>
        </draw:connector>
        <draw:connector draw:style-name="gr109" draw:text-style-name="P35" draw:layer="layout" svg:x1="13.049cm" svg:y1="16.855cm" svg:x2="8.902cm" svg:y2="16.86cm" draw:end-shape="id23" draw:end-glue-point="1" svg:d="M13049 16855h-1809v5h-2338" svg:viewBox="0 0 4148 6">
          <text:p/>
        </draw:connector>
        <draw:connector draw:style-name="gr110" draw:text-style-name="P35" draw:layer="layout" svg:x1="13.073cm" svg:y1="18.311cm" svg:x2="8.538cm" svg:y2="18.305cm" draw:end-shape="id12" draw:end-glue-point="1" svg:d="M13073 18311h-2003v-6h-2532" svg:viewBox="0 0 4536 7">
          <text:p/>
        </draw:connector>
        <draw:connector draw:style-name="gr111" draw:text-style-name="P35" draw:layer="layout" svg:x1="13.031cm" svg:y1="19.871cm" svg:x2="8.962cm" svg:y2="19.877cm" draw:end-shape="id22" draw:end-glue-point="1" svg:d="M13031 19871h-1771v6h-2298" svg:viewBox="0 0 4070 7">
          <text:p/>
        </draw:connector>
        <draw:connector draw:style-name="gr112" draw:text-style-name="P35" draw:layer="layout" svg:x1="13.05cm" svg:y1="21.218cm" svg:x2="9.51cm" svg:y2="21.223cm" draw:end-shape="id14" draw:end-glue-point="1" svg:d="M13050 21218h-1506v5h-2034" svg:viewBox="0 0 3541 6">
          <text:p/>
        </draw:connector>
        <draw:custom-shape draw:style-name="gr113" draw:text-style-name="P34" xml:id="id19" draw:id="id19" draw:layer="layout" svg:width="1cm" svg:height="1cm" svg:x="15.38cm" svg:y="16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4" draw:text-style-name="P48" draw:layer="layout" svg:width="2.534cm" svg:height="0.601cm" svg:x="13.799cm" svg:y="16.359cm">
          <draw:text-box>
            <text:p text:style-name="P47"><text:span text:style-name="T24">[prima </text:span></text:p>
            <text:p text:style-name="P47"><text:span text:style-name="T24">iterazione?]</text:span></text:p>
          </draw:text-box>
        </draw:frame>
        <draw:custom-shape draw:style-name="gr115" draw:text-style-name="P34" xml:id="id25" draw:id="id25" draw:layer="layout" svg:width="1cm" svg:height="1cm" svg:x="15.36cm" svg:y="18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6" draw:text-style-name="P35" draw:layer="layout" svg:x1="15.86cm" svg:y1="18.108cm" svg:x2="15.88cm" svg:y2="17.62cm" draw:start-shape="id25" draw:start-glue-point="4" draw:end-shape="id19" draw:end-glue-point="6" svg:d="M15860 18108v-243h20v-245" svg:viewBox="0 0 21 489">
          <text:p/>
        </draw:connector>
        <draw:connector draw:style-name="gr117" draw:text-style-name="P35" draw:layer="layout" svg:x1="15.835cm" svg:y1="20.146cm" svg:x2="15.86cm" svg:y2="19.108cm" draw:start-shape="id21" draw:start-glue-point="0" draw:end-shape="id25" draw:end-glue-point="6" svg:d="M15835 20146v-513h25v-525" svg:viewBox="0 0 26 1039">
          <text:p/>
        </draw:connector>
        <draw:connector draw:style-name="gr118" draw:text-style-name="P35" draw:layer="layout" svg:x1="17.294cm" svg:y1="17.153cm" svg:x2="16.38cm" svg:y2="17.12cm" draw:start-shape="id26" draw:start-glue-point="3" draw:end-shape="id19" draw:end-glue-point="7" svg:d="M17294 17153h-451v-33h-463" svg:viewBox="0 0 915 34">
          <text:p/>
        </draw:connector>
        <draw:connector draw:style-name="gr119" draw:text-style-name="P35" draw:layer="layout" svg:x1="16.36cm" svg:y1="18.608cm" svg:x2="18.413cm" svg:y2="17.49cm" draw:start-shape="id25" draw:start-glue-point="7" draw:end-shape="id26" draw:end-glue-point="2" svg:d="M16360 18608h2053v-1118" svg:viewBox="0 0 2054 1119">
          <text:p/>
        </draw:connector>
        <draw:custom-shape draw:style-name="gr120" draw:text-style-name="P51" xml:id="id26" draw:id="id26" draw:layer="layout" svg:width="2.238cm" svg:height="0.674cm" svg:x="17.294cm" svg:y="16.8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6"><text:span text:style-name="T24">a0 = src</text:span></text:p>
          <text:p text:style-name="P16"><text:span text:style-name="T24">Chiama f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1" draw:text-style-name="P48" draw:layer="layout" svg:width="2.534cm" svg:height="0.601cm" svg:x="14.66cm" svg:y="17.579cm">
          <draw:text-box>
            <text:p text:style-name="P47"><text:span text:style-name="T24">[vero]</text:span></text:p>
          </draw:text-box>
        </draw:frame>
        <draw:frame draw:style-name="gr122" draw:text-style-name="P48" draw:layer="layout" svg:width="2.534cm" svg:height="0.601cm" svg:x="16.345cm" svg:y="16.359cm">
          <draw:text-box>
            <text:p text:style-name="P47"><text:span text:style-name="T24">[falso]</text:span></text:p>
          </draw:text-box>
        </draw:frame>
        <draw:frame draw:style-name="gr123" draw:text-style-name="P48" draw:layer="layout" svg:width="2.534cm" svg:height="0.601cm" svg:x="19cm" svg:y="10.647cm">
          <draw:text-box>
            <text:p text:style-name="P47"><text:span text:style-name="T24">[end if]</text:span></text:p>
          </draw:text-box>
        </draw:frame>
        <draw:frame draw:style-name="gr124" draw:text-style-name="P48" draw:layer="layout" svg:width="2.534cm" svg:height="0.601cm" svg:x="15.835cm" svg:y="19.108cm">
          <draw:text-box>
            <text:p text:style-name="P47"><text:span text:style-name="T24">[end if]</text:span></text:p>
          </draw:text-box>
        </draw:frame>
        <draw:frame draw:style-name="gr125" draw:text-style-name="P48" draw:layer="layout" svg:width="2.534cm" svg:height="0.601cm" svg:x="15.879cm" svg:y="14.831cm">
          <draw:text-box>
            <text:p text:style-name="P47"><text:span text:style-name="T24">[end switch]</text:span></text:p>
          </draw:text-box>
        </draw:frame>
        <draw:polygon draw:style-name="gr126" draw:text-style-name="P55" xml:id="id27" draw:id="id27" draw:layer="layout" svg:width="3.764cm" svg:height="1.354cm" svg:x="2.297cm" svg:y="9.63cm" svg:viewBox="0 0 3765 1355" draw:points="0,0 2352,0 2824,0 3764,0 3764,677 3765,678 3764,678 3764,1354 2824,1354 2824,1355 0,1355 941,678">
          <text:p text:style-name="P54"><text:span text:style-name="T24">In:</text:span></text:p>
          <text:p text:style-name="P54"><text:span text:style-name="T24">src, </text:span><text:span text:style-name="T26"><text:a xlink:href="#cypher_data" xlink:type="simple">cypher_data</text:a></text:span><text:span text:style-name="T24">, </text:span></text:p>
          <text:p text:style-name="P54"><text:span text:style-name="T24">bool: encrypt </text:span></text:p>
        </draw:polygon>
        <draw:connector draw:style-name="gr127" draw:text-style-name="P35" draw:layer="layout" svg:x1="7.524cm" svg:y1="10.312cm" svg:x2="6.062cm" svg:y2="10.307cm" draw:start-shape="id6" draw:start-glue-point="3" draw:end-shape="id27" draw:end-glue-point="1" svg:d="M7524 10312h-739v-5h-723" svg:viewBox="0 0 1463 6">
          <text:p/>
        </draw:connector>
        <draw:connector draw:style-name="gr128" draw:text-style-name="P35" draw:layer="layout" svg:x1="4.179cm" svg:y1="9.63cm" svg:x2="4.182cm" svg:y2="8.253cm" draw:start-shape="id27" draw:start-glue-point="0" draw:end-shape="id28" draw:end-glue-point="2" svg:d="M4179 9630v-695h3v-682" svg:viewBox="0 0 4 1378">
          <text:p/>
        </draw:connector>
        <draw:custom-shape draw:style-name="gr129" draw:text-style-name="P57" xml:id="id16" draw:id="id16" draw:layer="layout" svg:width="3.018cm" svg:height="0.611cm" svg:x="9.555cm" svg:y="26.571cm">
          <text:p text:style-name="P56"><text:span text:style-name="T24">out = dest</text:span></text:p>
          <draw:enhanced-geometry svg:viewBox="0 0 21600 21600" draw:text-areas="0 0 21600 21600" draw:mirror-horizontal="false" draw:mirror-vertical="false" draw:type="pentagon-right" draw:modifiers="15339.648890361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" draw:style-name="dp1" draw:master-page-name="master-page64">
        <draw:frame draw:style-name="gr15" draw:text-style-name="P14" draw:layer="layout" svg:width="0.943cm" svg:height="0.642cm" svg:x="1.474cm" svg:y="28.154cm">
          <draw:text-box>
            <text:p text:style-name="P1"><text:span text:style-name="T14">4</text:span></text:p>
          </draw:text-box>
        </draw:frame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name="str_map_alloc" draw:style-name="gr43" draw:text-style-name="P26" draw:layer="layout" svg:width="8.415cm" svg:height="0.501cm" svg:x="1.421cm" svg:y="2.834cm">
          <draw:text-box>
            <text:p text:style-name="P1"><text:span text:style-name="T20">str_map_alloc: </text:span></text:p>
          </draw:text-box>
        </draw:frame>
        <draw:frame draw:style-name="gr130" draw:text-style-name="P60" draw:layer="layout" svg:width="18.237cm" svg:height="1.819cm" svg:x="1.391cm" svg:y="3.586cm">
          <draw:text-box>
            <text:p text:style-name="P58"><text:span text:style-name="T28">Procedura che alloca memoria per una stringa che passa come argomento a </text:span><text:span text:style-name="T29">str_map</text:span><text:span text:style-name="T28">.</text:span><text:span text:style-name="T28"><text:line-break/></text:span><text:span text:style-name="T28">Verrà usata spesso da altre procedure</text:span></text:p>
            <text:p text:style-name="P59"><text:span text:style-name="T28"/></text:p>
          </draw:text-box>
        </draw:frame>
        <draw:frame draw:style-name="gr131" draw:text-style-name="P62" draw:layer="layout" svg:width="12.7cm" svg:height="4.195cm" svg:x="1.391cm" svg:y="4.622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str_map_alloc(char [] src, int src_len, char (*funzione)(char))</text:span></text:p>
            <text:p text:style-name="P61"><text:span text:style-name="T30">{</text:span></text:p>
            <text:p text:style-name="P61"><text:span text:style-name="T30"><text:tab/></text:span><text:span text:style-name="T30">char [] dest = malloc(src_len + 1);</text:span></text:p>
            <text:p text:style-name="P61"><text:span text:style-name="T30"><text:tab/></text:span><text:span text:style-name="T30">dest = str_map(src, dest, funzione);</text:span></text:p>
            <text:p text:style-name="P61"><text:span text:style-name="T30"><text:tab/></text:span><text:span text:style-name="T30">return (dest, src_len);</text:span></text:p>
            <text:p text:style-name="P61"><text:span text:style-name="T30">}</text:span></text:p>
            <text:p text:style-name="P61"><text:span text:style-name="T30"/></text:p>
          </draw:text-box>
        </draw:frame>
        <draw:frame draw:name="str_map_alloc 1" draw:style-name="gr43" draw:text-style-name="P26" draw:layer="layout" svg:width="8.415cm" svg:height="0.501cm" svg:x="1.399cm" svg:y="8.786cm">
          <draw:text-box>
            <text:p text:style-name="P1"><text:span text:style-name="T20">str_map: </text:span></text:p>
          </draw:text-box>
        </draw:frame>
        <draw:frame draw:style-name="gr130" draw:text-style-name="P60" draw:layer="layout" svg:width="18.237cm" svg:height="2.285cm" svg:x="1.409cm" svg:y="9.512cm">
          <draw:text-box>
            <text:p text:style-name="P58"><text:span text:style-name="T28">Procedura che itera su una stringa e per ogni carattere applica la funzione passata come argomento, la quale ritorna un carattere che viene scritto nello stesso indice sulla stringa di destinazione</text:span></text:p>
            <text:p text:style-name="P59"><text:span text:style-name="T28"/></text:p>
          </draw:text-box>
        </draw:frame>
      </draw:page>
      <draw:page draw:name="page5" draw:style-name="dp1" draw:master-page-name="master-page64"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style-name="gr132" draw:text-style-name="P62" draw:layer="layout" svg:width="16.392cm" svg:height="6.991cm" svg:x="1.548cm" svg:y="21.87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block_encrypt(char [] src, int src_len, char [] blocKey)</text:span></text:p>
            <text:p text:style-name="P61"><text:span text:style-name="T30">{</text:span></text:p>
            <text:p text:style-name="P61"><text:span text:style-name="T30"><text:tab/></text:span><text:span text:style-name="T30">int i = 0;</text:span></text:p>
            <text:p text:style-name="P61"><text:span text:style-name="T30"><text:tab/></text:span><text:span text:style-name="T30">return (str_map_alloc(src, src_len, curry(block_map, &amp;i, blockey, true));</text:span></text:p>
            <text:p text:style-name="P61"><text:span text:style-name="T30">}</text:span></text:p>
            <text:p text:style-name="P61"><text:span text:style-name="T30"/></text:p>
            <text:p text:style-name="P61"><text:span text:style-name="T30">(char [], int) block_decypher(char [] src, int src_len, char [] blocKey)</text:span></text:p>
            <text:p text:style-name="P61"><text:span text:style-name="T30">{</text:span></text:p>
            <text:p text:style-name="P61"><text:span text:style-name="T30"><text:tab/></text:span><text:span text:style-name="T30">int i = 0;</text:span></text:p>
            <text:p text:style-name="P61"><text:span text:style-name="T30"><text:tab/></text:span><text:span text:style-name="T30">return (str_map_alloc(src, src_len, curry(block_map, &amp;i, blockey, false));</text:span></text:p>
            <text:p text:style-name="P61"><text:span text:style-name="T30">}</text:span><text:span text:style-name="T30"><text:line-break/></text:span><text:span text:style-name="T30"/></text:p>
          </draw:text-box>
        </draw:frame>
        <draw:frame draw:name="caesar_sost" draw:style-name="gr43" draw:text-style-name="P63" draw:layer="layout" svg:width="8.415cm" svg:height="0.501cm" svg:x="1.403cm" svg:y="12.226cm">
          <draw:text-box>
            <text:p text:style-name="P1"><text:span text:style-name="T20">cesar_sost: </text:span></text:p>
          </draw:text-box>
        </draw:frame>
        <draw:g draw:style-name="gr46" xml:id="id30" draw:id="id30">
          <draw:path draw:style-name="gr133" draw:text-style-name="P31" draw:layer="layout" svg:width="0.5cm" svg:height="0.5cm" svg:x="2.152cm" svg:y="16.19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34" draw:text-style-name="P32" draw:layer="layout" svg:width="0.25cm" svg:height="0.25cm" svg:x="2.277cm" svg:y="16.316cm">
            <text:p/>
            <draw:enhanced-geometry svg:viewBox="0 0 21600 21600" draw:type="rectangle" draw:enhanced-path="M 0 0 L 21600 0 21600 21600 0 21600 0 0 Z N"/>
          </draw:custom-shape>
        </draw:g>
        <draw:connector draw:style-name="gr135" draw:text-style-name="P35" draw:layer="layout" svg:x1="3.332cm" svg:y1="16.433cm" svg:x2="2.653cm" svg:y2="16.441cm" draw:start-shape="id29" draw:start-glue-point="3" draw:end-shape="id30" draw:end-glue-point="1" svg:d="M3332 16433h-346v8h-333" svg:viewBox="0 0 680 9">
          <text:p/>
        </draw:connector>
        <draw:custom-shape draw:style-name="gr136" draw:text-style-name="P65" xml:id="id32" draw:id="id32" draw:layer="layout" svg:width="2.26cm" svg:height="1.5cm" svg:x="14.915cm" svg:y="15.566cm">
          <text:p text:style-name="P64"><text:span text:style-name="T16">out: c</text:span></text:p>
          <draw:enhanced-geometry svg:viewBox="0 0 21600 21600" draw:text-areas="0 0 21600 21600" draw:type="pentagon-right" draw:modifiers="13240.86687306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7" draw:text-style-name="P34" xml:id="id31" draw:id="id31" draw:layer="layout" svg:width="1cm" svg:height="1cm" svg:x="9.825cm" svg:y="14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8" draw:text-style-name="P35" draw:layer="layout" draw:line-skew="-0.606cm" svg:x1="9.825cm" svg:y1="14.778cm" svg:x2="7.332cm" svg:y2="16.433cm" draw:start-shape="id31" draw:end-shape="id29" draw:end-glue-point="1" svg:d="M9825 14778h-1858v1655h-635" svg:viewBox="0 0 2494 1656">
          <text:p/>
        </draw:connector>
        <draw:connector draw:style-name="gr139" draw:text-style-name="P35" draw:layer="layout" svg:x1="14.915cm" svg:y1="16.316cm" svg:x2="14.047cm" svg:y2="16.366cm" draw:start-shape="id32" draw:start-glue-point="3" draw:end-shape="id33" draw:end-glue-point="7" svg:d="M14915 16316h-428v50h-440" svg:viewBox="0 0 869 51">
          <text:p/>
        </draw:connector>
        <draw:connector draw:style-name="gr140" draw:text-style-name="P35" draw:layer="layout" svg:x1="13.547cm" svg:y1="15.866cm" svg:x2="10.825cm" svg:y2="14.778cm" draw:start-shape="id33" draw:start-glue-point="4" draw:end-shape="id31" draw:end-glue-point="7" svg:d="M13547 15866v-1088h-2722" svg:viewBox="0 0 2723 1089">
          <text:p/>
        </draw:connector>
        <draw:connector draw:style-name="gr141" draw:text-style-name="P35" draw:layer="layout" svg:x1="18.261cm" svg:y1="16.298cm" svg:x2="17.175cm" svg:y2="16.316cm" draw:start-shape="id34" draw:start-glue-point="3" draw:end-shape="id32" svg:d="M18261 16298h-542v18h-544" svg:viewBox="0 0 1087 19">
          <text:p/>
        </draw:connector>
        <draw:custom-shape draw:style-name="gr142" draw:text-style-name="P34" xml:id="id33" draw:id="id33" draw:layer="layout" svg:width="1cm" svg:height="1cm" svg:x="13.047cm" svg:y="15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7" xml:id="id34" draw:id="id34">
          <draw:path draw:style-name="gr143" draw:text-style-name="P49" draw:layer="layout" svg:width="0.5cm" svg:height="0.5cm" svg:x="18.261cm" svg:y="16.0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44" draw:text-style-name="P31" draw:layer="layout" svg:width="0.2cm" svg:height="0.2cm" svg:x="18.411cm" svg:y="16.1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polygon draw:style-name="gr145" draw:text-style-name="P55" xml:id="id29" draw:id="id29" draw:layer="layout" svg:width="3.999cm" svg:height="1.499cm" svg:x="3.332cm" svg:y="15.683cm" svg:viewBox="0 0 4000 1500" draw:points="0,0 2499,0 3000,0 3999,0 3999,749 4000,750 3999,751 3999,1499 3000,1499 3000,1500 0,1500 1000,750">
          <text:p text:style-name="P66"><text:span text:style-name="T16">in: c, sostK</text:span></text:p>
        </draw:polygon>
        <draw:custom-shape draw:style-name="gr146" draw:text-style-name="P44" xml:id="id35" draw:id="id35" draw:layer="layout" svg:width="4.317cm" svg:height="1.5cm" svg:x="8.195cm" svg:y="16.33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minuscolo = c &amp; 32;</text:span></text:p>
          <text:p text:style-name="P43"><text:span text:style-name="T24">c = (c – 'A' - minuscolo + sostk);</text:span></text:p>
          <text:p text:style-name="P43"><text:span text:style-name="T24">c = c % 26 + minuscolo + 'A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7" draw:text-style-name="P35" draw:layer="layout" svg:x1="10.353cm" svg:y1="16.336cm" svg:x2="10.325cm" svg:y2="15.278cm" draw:start-shape="id35" draw:start-glue-point="0" draw:end-shape="id31" draw:end-glue-point="6" svg:d="M10353 16336v-523h-28v-535" svg:viewBox="0 0 29 1059">
          <text:p/>
        </draw:connector>
        <draw:connector draw:style-name="gr148" draw:text-style-name="P35" draw:layer="layout" svg:x1="13.047cm" svg:y1="16.366cm" svg:x2="12.512cm" svg:y2="17.086cm" draw:start-shape="id33" draw:start-glue-point="5" draw:end-shape="id35" draw:end-glue-point="1" svg:d="M13047 16366h-273v720h-262" svg:viewBox="0 0 536 721">
          <text:p/>
        </draw:connector>
        <draw:frame draw:style-name="gr149" draw:text-style-name="P48" draw:layer="layout" svg:width="2.553cm" svg:height="0.601cm" svg:x="7.479cm" svg:y="14.152cm">
          <draw:text-box>
            <text:p text:style-name="P67"><text:span text:style-name="T24">[c è una lettera?]</text:span></text:p>
          </draw:text-box>
        </draw:frame>
        <draw:frame draw:style-name="gr150" draw:text-style-name="P48" draw:layer="layout" svg:width="2.534cm" svg:height="0.601cm" svg:x="10.831cm" svg:y="14.26cm">
          <draw:text-box>
            <text:p text:style-name="P47"><text:span text:style-name="T24">[falso]</text:span></text:p>
          </draw:text-box>
        </draw:frame>
        <draw:frame draw:style-name="gr151" draw:text-style-name="P48" draw:layer="layout" svg:width="2.534cm" svg:height="0.601cm" svg:x="10.196cm" svg:y="15.096cm">
          <draw:text-box>
            <text:p text:style-name="P47"><text:span text:style-name="T24">[vero]</text:span></text:p>
          </draw:text-box>
        </draw:frame>
        <draw:frame draw:name="block_encrypt" draw:style-name="gr43" draw:text-style-name="P26" draw:layer="layout" svg:width="8.415cm" svg:height="0.501cm" svg:x="1.401cm" svg:y="18.425cm">
          <draw:text-box>
            <text:p text:style-name="P1"><text:span text:style-name="T20">block_encrypt: (Cifrario a blocchi)</text:span></text:p>
          </draw:text-box>
        </draw:frame>
        <draw:frame draw:style-name="gr44" draw:text-style-name="P69" draw:layer="layout" svg:width="18.237cm" svg:height="0.933cm" svg:x="1.455cm" svg:y="19.26cm">
          <draw:text-box>
            <text:p text:style-name="P68"><text:span text:style-name="T7">Semplice procedura che delega il processo alla procedura </text:span><text:span text:style-name="T29">str_map</text:span><text:span text:style-name="T7">, dopo aver effettuato il currying della funzione “</text:span><text:span text:style-name="T29"><text:a xlink:href="#block_map" xlink:type="simple">block_map</text:a></text:span><text:span text:style-name="T7">”</text:span></text:p>
          </draw:text-box>
        </draw:frame>
        <draw:frame draw:name="block_decypher" draw:style-name="gr43" draw:text-style-name="P26" draw:layer="layout" svg:width="8.415cm" svg:height="0.501cm" svg:x="1.402cm" svg:y="20.426cm">
          <draw:text-box>
            <text:p text:style-name="P1"><text:span text:style-name="T20">block_decypher: (Cifrario di Cesare)</text:span></text:p>
          </draw:text-box>
        </draw:frame>
        <draw:frame draw:style-name="gr152" draw:text-style-name="P28" draw:layer="layout" svg:width="18.237cm" svg:height="0.68cm" svg:x="1.456cm" svg:y="21.061cm">
          <draw:text-box>
            <text:p text:style-name="P70"><text:span text:style-name="T31">Uguale alla procedura di cifratura, eccetto che cambia l'argomento booleano</text:span></text:p>
          </draw:text-box>
        </draw:frame>
        <draw:frame draw:style-name="gr44" draw:text-style-name="P28" draw:layer="layout" svg:width="18.237cm" svg:height="0.933cm" svg:x="1.456cm" svg:y="12.96cm">
          <draw:text-box>
            <text:p text:style-name="P27"><text:span text:style-name="T7">Semplice procedura che effettua la cifratura a sostituzione di un carattere in base all’input. </text:span></text:p>
            <text:p text:style-name="P27"><text:span text:style-name="T7">Lascia tutti I caratteri al di fuori delle lettere invariati.</text:span></text:p>
          </draw:text-box>
        </draw:frame>
        <draw:frame draw:style-name="gr15" draw:text-style-name="P14" draw:layer="layout" svg:width="0.943cm" svg:height="0.642cm" svg:x="1.476cm" svg:y="28.155cm">
          <draw:text-box>
            <text:p text:style-name="P1"><text:span text:style-name="T14">5</text:span></text:p>
          </draw:text-box>
        </draw:frame>
        <draw:frame draw:style-name="gr131" draw:text-style-name="P62" draw:layer="layout" svg:width="12.7cm" svg:height="5.593cm" svg:x="1.535cm" svg:y="6.946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caesar_encrypt(char [] src, int src_len, int sostK)</text:span></text:p>
            <text:p text:style-name="P61"><text:span text:style-name="T30">{</text:span></text:p>
            <text:p text:style-name="P61"><text:span text:style-name="T30"><text:tab/></text:span><text:span text:style-name="T30">return (str_map_alloc(src, src_len, curry(caesar_sost, sostK));</text:span></text:p>
            <text:p text:style-name="P61"><text:span text:style-name="T30">}</text:span></text:p>
            <text:p text:style-name="P61"><text:span text:style-name="T30"/></text:p>
            <text:p text:style-name="P61"><text:span text:style-name="T30">(char [], int) caesar_decypher(char [] src, int src_len, int sostK)</text:span></text:p>
            <text:p text:style-name="P61"><text:span text:style-name="T30">{</text:span></text:p>
            <text:p text:style-name="P61"><text:span text:style-name="T30"><text:tab/></text:span><text:span text:style-name="T30">return (caesar_encrypt(src, src_len, 26 – sostK));</text:span></text:p>
            <text:p text:style-name="P61"><text:span text:style-name="T30">}</text:span><text:span text:style-name="T30"><text:line-break/></text:span><text:span text:style-name="T30"/></text:p>
          </draw:text-box>
        </draw:frame>
        <draw:frame draw:name="caesar_encrypt" draw:style-name="gr43" draw:text-style-name="P26" draw:layer="layout" svg:width="8.415cm" svg:height="0.501cm" svg:x="1.401cm" svg:y="3.127cm">
          <draw:text-box>
            <text:p text:style-name="P1"><text:span text:style-name="T20">cesar_encrypt: (Cifrario di Cesare)</text:span></text:p>
          </draw:text-box>
        </draw:frame>
        <draw:frame draw:style-name="gr44" draw:text-style-name="P28" draw:layer="layout" svg:width="18.237cm" svg:height="0.933cm" svg:x="1.455cm" svg:y="3.962cm">
          <draw:text-box>
            <text:p text:style-name="P27"><text:span text:style-name="T7">Semplice procedura che delega il processo alla procedura </text:span><text:span text:style-name="T29">str_map</text:span><text:span text:style-name="T7">, dopo aver effettuato il currying della funzione “</text:span><text:span text:style-name="T29"><text:a xlink:href="#caesar_sost" xlink:type="simple">caesar_sost</text:a></text:span><text:span text:style-name="T7">”</text:span></text:p>
          </draw:text-box>
        </draw:frame>
        <draw:frame draw:name="caesar_decypher" draw:style-name="gr43" draw:text-style-name="P26" draw:layer="layout" svg:width="8.415cm" svg:height="0.501cm" svg:x="1.402cm" svg:y="5.128cm">
          <draw:text-box>
            <text:p text:style-name="P1"><text:span text:style-name="T20">cesar_decypher: (Cifrario di Cesare)</text:span></text:p>
          </draw:text-box>
        </draw:frame>
        <draw:frame draw:style-name="gr44" draw:text-style-name="P28" draw:layer="layout" svg:width="18.237cm" svg:height="0.933cm" svg:x="1.456cm" svg:y="5.763cm">
          <draw:text-box>
            <text:p text:style-name="P71"><text:span text:style-name="T32">Fa rieferimento a </text:span><text:span text:style-name="T19"><text:a xlink:href="#caesar_encrypt" xlink:type="simple">caesar_encrypt</text:a></text:span><text:span text:style-name="T16">, infatti tutto ciò che fa è chiamare la stessa cambiando il terzo argomento da “</text:span><text:span text:style-name="T33"><text:a xlink:href="#Parametri del programma" xlink:type="simple">sostK</text:a></text:span><text:span text:style-name="T16">” a “26 - </text:span><text:span text:style-name="T33"><text:a xlink:href="#Parametri del programma" xlink:type="simple">sostK</text:a></text:span><text:span text:style-name="T16">”</text:span></text:p>
          </draw:text-box>
        </draw:frame>
      </draw:page>
      <draw:page draw:name="page6" draw:style-name="dp1" draw:master-page-name="master-page79">
        <draw:frame draw:name="block_map" draw:style-name="gr43" draw:text-style-name="P26" draw:layer="layout" svg:width="8.415cm" svg:height="0.501cm" svg:x="1.402cm" svg:y="2.924cm">
          <draw:text-box>
            <text:p text:style-name="P1"><text:span text:style-name="T20">block_map:</text:span></text:p>
          </draw:text-box>
        </draw:frame>
        <draw:frame draw:style-name="gr44" draw:text-style-name="P69" draw:layer="layout" svg:width="18.237cm" svg:height="0.933cm" svg:x="1.534cm" svg:y="3.721cm">
          <draw:text-box>
            <text:p text:style-name="P68"><text:span text:style-name="T32">Funzione che ad ogni chiamata avanza la stringa associata, prende un carattere di input e lo somma col carattere corrente della stringa, e ritorna il risultato.</text:span></text:p>
          </draw:text-box>
        </draw:frame>
        <draw:g draw:style-name="gr46" xml:id="id37" draw:id="id37">
          <draw:path draw:style-name="gr153" draw:text-style-name="P31" draw:layer="layout" svg:width="0.5cm" svg:height="0.5cm" svg:x="1.552cm" svg:y="5.864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54" draw:text-style-name="P32" draw:layer="layout" svg:width="0.25cm" svg:height="0.25cm" svg:x="1.677cm" svg:y="5.989cm">
            <text:p/>
            <draw:enhanced-geometry svg:viewBox="0 0 21600 21600" draw:type="rectangle" draw:enhanced-path="M 0 0 L 21600 0 21600 21600 0 21600 0 0 Z N"/>
          </draw:custom-shape>
        </draw:g>
        <draw:connector draw:style-name="gr155" draw:text-style-name="P35" draw:layer="layout" svg:x1="3.17cm" svg:y1="6.054cm" svg:x2="2.053cm" svg:y2="6.114cm" draw:start-shape="id36" draw:start-glue-point="3" draw:end-shape="id37" draw:end-glue-point="1" svg:d="M3170 6054h-565v60h-552" svg:viewBox="0 0 1118 61">
          <text:p/>
        </draw:connector>
        <draw:custom-shape draw:style-name="gr156" draw:text-style-name="P44" xml:id="id43" draw:id="id43" draw:layer="layout" svg:width="1.841cm" svg:height="0.631cm" svg:x="4.058cm" svg:y="9.17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*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157" draw:text-style-name="P73" xml:id="id36" draw:id="id36" draw:layer="layout" svg:width="3.631cm" svg:height="1.486cm" svg:x="3.17cm" svg:y="5.311cm" svg:viewBox="0 0 3632 1487" draw:points="0,0 2269,0 2724,0 3631,0 3631,743 3632,744 3631,744 3631,1486 2724,1486 2724,1487 0,1487 908,744">
          <text:p text:style-name="P72"><text:span text:style-name="T24">In: char c,</text:span></text:p>
          <text:p text:style-name="P72"><text:span text:style-name="T24"><text:s/>int *i,</text:span></text:p>
          <text:p text:style-name="P72"><text:span text:style-name="T24"><text:s/>char [] block_str,</text:span></text:p>
          <text:p text:style-name="P72"><text:span text:style-name="T24">bool: encrypt</text:span></text:p>
        </draw:polygon>
        <draw:custom-shape draw:style-name="gr158" draw:text-style-name="P57" xml:id="id38" draw:id="id38" draw:layer="layout" svg:width="1.941cm" svg:height="1.27cm" svg:x="15.417cm" svg:y="7.966cm">
          <text:p text:style-name="P56"><text:span text:style-name="T24">out: c</text:span></text:p>
          <draw:enhanced-geometry svg:viewBox="0 0 21600 21600" draw:text-areas="0 0 21600 21600" draw:type="pentagon-right" draw:modifiers="11878.8877445932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9" draw:text-style-name="P34" xml:id="id41" draw:id="id41" draw:layer="layout" svg:width="1cm" svg:height="1cm" svg:x="4.475cm" svg:y="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0" draw:text-style-name="P35" draw:layer="layout" svg:x1="15.417cm" svg:y1="8.601cm" svg:x2="14.42cm" svg:y2="8.567cm" draw:start-shape="id38" draw:start-glue-point="3" draw:end-shape="id39" draw:end-glue-point="7" svg:d="M15417 8601h-493v-34h-504" svg:viewBox="0 0 998 35">
          <text:p/>
        </draw:connector>
        <draw:connector draw:style-name="gr161" draw:text-style-name="P35" draw:layer="layout" svg:x1="6.769cm" svg:y1="8.063cm" svg:x2="5.475cm" svg:y2="8.046cm" draw:start-shape="id40" draw:end-shape="id41" draw:end-glue-point="7" svg:d="M6769 8063h-646v-17h-648" svg:viewBox="0 0 1295 18">
          <text:p/>
        </draw:connector>
        <draw:connector draw:style-name="gr162" draw:text-style-name="P35" draw:layer="layout" svg:x1="18.763cm" svg:y1="8.598cm" svg:x2="17.358cm" svg:y2="8.601cm" draw:start-shape="id42" draw:start-glue-point="3" draw:end-shape="id38" svg:d="M18763 8598h-702v3h-703" svg:viewBox="0 0 1406 4">
          <text:p/>
        </draw:connector>
        <draw:custom-shape draw:style-name="gr163" draw:text-style-name="P34" xml:id="id40" draw:id="id40" draw:layer="layout" svg:width="1cm" svg:height="1cm" svg:x="6.769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7" xml:id="id42" draw:id="id42">
          <draw:path draw:style-name="gr164" draw:text-style-name="P49" draw:layer="layout" svg:width="0.5cm" svg:height="0.5cm" svg:x="18.763cm" svg:y="8.3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65" draw:text-style-name="P31" draw:layer="layout" svg:width="0.2cm" svg:height="0.2cm" svg:x="18.913cm" svg:y="8.4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166" draw:text-style-name="P35" draw:layer="layout" svg:x1="4.978cm" svg:y1="9.176cm" svg:x2="4.975cm" svg:y2="8.546cm" draw:start-shape="id43" draw:start-glue-point="0" draw:end-shape="id41" draw:end-glue-point="6" svg:d="M4978 9176v-309h-3v-321" svg:viewBox="0 0 4 631">
          <text:p/>
        </draw:connector>
        <draw:connector draw:style-name="gr167" draw:text-style-name="P35" draw:layer="layout" svg:x1="11.365cm" svg:y1="6.348cm" svg:x2="10.399cm" svg:y2="6.299cm" draw:start-shape="id44" draw:start-glue-point="5" draw:end-shape="id45" draw:end-glue-point="1" svg:d="M11365 6348h-488v-49h-478" svg:viewBox="0 0 967 50">
          <text:p/>
        </draw:connector>
        <draw:frame draw:style-name="gr168" draw:text-style-name="P48" draw:layer="layout" svg:width="1.245cm" svg:height="0.601cm" svg:x="5.656cm" svg:y="7.445cm">
          <draw:text-box>
            <text:p text:style-name="P47"><text:span text:style-name="T24">[falso]</text:span></text:p>
          </draw:text-box>
        </draw:frame>
        <draw:frame draw:style-name="gr169" draw:text-style-name="P48" draw:layer="layout" svg:width="1.197cm" svg:height="0.601cm" svg:x="3.886cm" svg:y="8.375cm">
          <draw:text-box>
            <text:p text:style-name="P47"><text:span text:style-name="T24">[vero]</text:span></text:p>
          </draw:text-box>
        </draw:frame>
        <draw:connector draw:style-name="gr170" draw:text-style-name="P35" draw:layer="layout" svg:x1="4.975cm" svg:y1="7.546cm" svg:x2="4.986cm" svg:y2="6.798cm" draw:start-shape="id41" draw:start-glue-point="4" draw:end-shape="id36" draw:end-glue-point="2" svg:d="M4975 7546v-379h11v-369" svg:viewBox="0 0 12 749">
          <text:p/>
        </draw:connector>
        <draw:connector draw:style-name="gr171" draw:text-style-name="P35" draw:layer="layout" svg:x1="8.806cm" svg:y1="6.702cm" svg:x2="7.769cm" svg:y2="8.063cm" draw:start-shape="id45" draw:start-glue-point="2" draw:end-shape="id40" draw:end-glue-point="7" svg:d="M8806 6702v1361h-1037" svg:viewBox="0 0 1038 1362">
          <text:p/>
        </draw:connector>
        <draw:custom-shape draw:style-name="gr172" draw:text-style-name="P34" xml:id="id44" draw:id="id44" draw:layer="layout" svg:width="1cm" svg:height="1cm" svg:x="11.365cm" svg:y="5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3" draw:text-style-name="P35" draw:layer="layout" svg:x1="7.269cm" svg:y1="8.563cm" svg:x2="5.899cm" svg:y2="9.491cm" draw:start-shape="id40" draw:start-glue-point="6" draw:end-shape="id43" draw:end-glue-point="1" svg:d="M7269 8563v928h-1370" svg:viewBox="0 0 1371 929">
          <text:p/>
        </draw:connector>
        <draw:frame draw:style-name="gr174" draw:text-style-name="P48" draw:layer="layout" svg:width="1.245cm" svg:height="0.601cm" svg:x="10.789cm" svg:y="6.702cm">
          <draw:text-box>
            <text:p text:style-name="P47"><text:span text:style-name="T24">[falso]</text:span></text:p>
          </draw:text-box>
        </draw:frame>
        <draw:frame draw:style-name="gr175" draw:text-style-name="P48" draw:layer="layout" svg:width="3.102cm" svg:height="0.601cm" svg:x="1.433cm" svg:y="7.211cm">
          <draw:text-box>
            <text:p text:style-name="P47"><text:span text:style-name="T24">[block_str[*i] == '\0'?]</text:span></text:p>
          </draw:text-box>
        </draw:frame>
        <draw:custom-shape draw:style-name="gr176" draw:text-style-name="P44" xml:id="id46" draw:id="id46" draw:layer="layout" svg:width="4.623cm" svg:height="0.733cm" svg:x="15.121cm" svg:y="5.95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(c + block_char) % 96 +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7" draw:text-style-name="P48" draw:layer="layout" svg:width="1.732cm" svg:height="0.601cm" svg:x="10.435cm" svg:y="5.247cm">
          <draw:text-box>
            <text:p text:style-name="P47"><text:span text:style-name="T24">[encrypt?]</text:span></text:p>
          </draw:text-box>
        </draw:frame>
        <draw:frame draw:style-name="gr178" draw:text-style-name="P48" draw:layer="layout" svg:width="1.197cm" svg:height="0.601cm" svg:x="12.727cm" svg:y="5.652cm">
          <draw:text-box>
            <text:p text:style-name="P47"><text:span text:style-name="T24">[vero]</text:span></text:p>
          </draw:text-box>
        </draw:frame>
        <draw:custom-shape draw:style-name="gr179" draw:text-style-name="P34" xml:id="id39" draw:id="id39" draw:layer="layout" svg:width="1cm" svg:height="1cm" svg:x="13.42cm" svg:y="8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0" draw:text-style-name="P35" draw:layer="layout" svg:x1="15.121cm" svg:y1="6.319cm" svg:x2="12.365cm" svg:y2="6.348cm" draw:start-shape="id46" draw:start-glue-point="3" draw:end-shape="id44" draw:end-glue-point="7" svg:d="M15121 6319h-1372v29h-1384" svg:viewBox="0 0 2757 30">
          <text:p/>
        </draw:connector>
        <draw:connector draw:style-name="gr181" draw:text-style-name="P35" draw:layer="layout" svg:x1="13.92cm" svg:y1="8.067cm" svg:x2="17.432cm" svg:y2="6.686cm" draw:start-shape="id39" draw:start-glue-point="4" draw:end-shape="id46" draw:end-glue-point="2" svg:d="M13920 8067v-696h3512v-685" svg:viewBox="0 0 3513 1382">
          <text:p/>
        </draw:connector>
        <draw:custom-shape draw:style-name="gr182" draw:text-style-name="P34" xml:id="id48" draw:id="id48" draw:layer="layout" svg:width="1cm" svg:height="1cm" svg:x="10.318cm" svg:y="9.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3" draw:text-style-name="P34" xml:id="id49" draw:id="id49" draw:layer="layout" svg:width="1cm" svg:height="1cm" svg:x="13.409cm" svg:y="9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4" draw:text-style-name="P44" xml:id="id47" draw:id="id47" draw:layer="layout" svg:width="3.37cm" svg:height="0.733cm" svg:x="9.176cm" svg:y="8.164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c - block_char - 3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5" draw:text-style-name="P44" xml:id="id45" draw:id="id45" draw:layer="layout" svg:width="3.186cm" svg:height="0.806cm" svg:x="7.213cm" svg:y="5.89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block_char = str[*i];</text:span></text:p>
          <text:p text:style-name="P43"><text:span text:style-name="T24">*i = *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6" draw:text-style-name="P35" draw:layer="layout" svg:x1="10.861cm" svg:y1="8.164cm" svg:x2="11.865cm" svg:y2="6.848cm" draw:start-shape="id47" draw:end-shape="id44" draw:end-glue-point="6" svg:d="M10861 8164v-652h1004v-664" svg:viewBox="0 0 1005 1317">
          <text:p/>
        </draw:connector>
        <draw:connector draw:style-name="gr187" draw:text-style-name="P35" draw:layer="layout" svg:x1="10.818cm" svg:y1="9.86cm" svg:x2="10.861cm" svg:y2="8.897cm" draw:start-shape="id48" draw:start-glue-point="4" draw:end-shape="id47" draw:end-glue-point="2" svg:d="M10818 9860v-487h43v-476" svg:viewBox="0 0 44 964">
          <text:p/>
        </draw:connector>
        <draw:custom-shape draw:style-name="gr188" draw:text-style-name="P44" xml:id="id50" draw:id="id50" draw:layer="layout" svg:width="3.37cm" svg:height="0.733cm" svg:x="9.15cm" svg:y="11.50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c + 9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89" draw:text-style-name="P48" draw:layer="layout" svg:width="1.583cm" svg:height="0.601cm" svg:x="8.482cm" svg:y="9.735cm">
          <draw:text-box>
            <text:p text:style-name="P47"><text:span text:style-name="T24">[c &lt; 32?]</text:span></text:p>
          </draw:text-box>
        </draw:frame>
        <draw:connector draw:style-name="gr190" draw:text-style-name="P35" draw:layer="layout" svg:x1="13.92cm" svg:y1="9.067cm" svg:x2="13.909cm" svg:y2="9.856cm" draw:start-shape="id39" draw:start-glue-point="6" draw:end-shape="id49" draw:end-glue-point="4" svg:d="M13920 9067v395h-11v394" svg:viewBox="0 0 12 790">
          <text:p/>
        </draw:connector>
        <draw:connector draw:style-name="gr191" draw:text-style-name="P35" draw:layer="layout" svg:x1="13.409cm" svg:y1="10.356cm" svg:x2="11.318cm" svg:y2="10.36cm" draw:start-shape="id49" draw:start-glue-point="5" draw:end-shape="id48" draw:end-glue-point="7" svg:d="M13409 10356h-1045v4h-1046" svg:viewBox="0 0 2092 5">
          <text:p/>
        </draw:connector>
        <draw:connector draw:style-name="gr192" draw:text-style-name="P35" draw:layer="layout" svg:x1="10.318cm" svg:y1="10.36cm" svg:x2="9.15cm" svg:y2="11.868cm" draw:start-shape="id48" draw:start-glue-point="5" draw:end-shape="id50" draw:end-glue-point="3" svg:d="M10318 10360h-1695v1508h527" svg:viewBox="0 0 1696 1509">
          <text:p/>
        </draw:connector>
        <draw:connector draw:style-name="gr193" draw:text-style-name="P35" draw:layer="layout" svg:x1="10.835cm" svg:y1="11.502cm" svg:x2="10.818cm" svg:y2="10.86cm" draw:start-shape="id50" draw:start-glue-point="0" draw:end-shape="id48" draw:end-glue-point="6" svg:d="M10835 11502v-315h-17v-327" svg:viewBox="0 0 18 643">
          <text:p/>
        </draw:connector>
        <draw:frame draw:style-name="gr194" draw:text-style-name="P48" draw:layer="layout" svg:width="1.197cm" svg:height="0.601cm" svg:x="9.638cm" svg:y="10.86cm">
          <draw:text-box>
            <text:p text:style-name="P47"><text:span text:style-name="T24">[vero]</text:span></text:p>
          </draw:text-box>
        </draw:frame>
        <draw:frame draw:style-name="gr195" draw:text-style-name="P48" draw:layer="layout" svg:width="1.245cm" svg:height="0.601cm" svg:x="11.318cm" svg:y="9.755cm">
          <draw:text-box>
            <text:p text:style-name="P47"><text:span text:style-name="T24">[falso]</text:span></text:p>
          </draw:text-box>
        </draw:frame>
        <draw:frame draw:style-name="gr15" draw:text-style-name="P14" draw:layer="layout" svg:width="0.943cm" svg:height="0.642cm" svg:x="1.477cm" svg:y="28.055cm">
          <draw:text-box>
            <text:p text:style-name="P1"><text:span text:style-name="T14">6</text:span></text:p>
          </draw:text-box>
        </draw:frame>
        <draw:frame draw:style-name="gr42" draw:text-style-name="P7" draw:layer="layout" svg:width="5.771cm" svg:height="0.543cm" svg:x="1.402cm" svg:y="2.027cm">
          <draw:text-box>
            <text:p text:style-name="P1"><text:span text:style-name="T6">Procedure notevoli: </text:span></text:p>
          </draw:text-box>
        </draw:frame>
      </draw:page>
      <draw:page draw:name="page7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6 </text:span></text:p>
          </draw:text-box>
        </draw:frame>
      </draw:page>
      <draw:page draw:name="page8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8 </text:span></text:p>
          </draw:text-box>
        </draw:frame>
        <draw:frame draw:style-name="gr196" draw:text-style-name="P7" draw:layer="layout" svg:width="6.257cm" svg:height="0.543cm" svg:x="1.401cm" svg:y="2.026cm">
          <draw:text-box>
            <text:p text:style-name="P1"><text:span text:style-name="T6">Note e Modalità di Consegna </text:span></text:p>
          </draw:text-box>
        </draw:frame>
        <draw:frame draw:style-name="gr197" draw:text-style-name="P26" draw:layer="layout" svg:width="1.147cm" svg:height="0.501cm" svg:x="1.401cm" svg:y="3.043cm">
          <draw:text-box>
            <text:p text:style-name="P1"><text:span text:style-name="T20">Note <text:s/></text:span></text:p>
          </draw:text-box>
        </draw:frame>
        <draw:frame draw:style-name="gr198" draw:text-style-name="P23" draw:layer="layout" svg:width="0.422cm" svg:height="0.422cm" svg:x="1.401cm" svg:y="3.771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596cm" svg:y="3.683cm">
          <draw:text-box>
            <text:p text:style-name="P1"><text:span text:style-name="T35"><text:s/></text:span></text:p>
          </draw:text-box>
        </draw:frame>
        <draw:frame draw:style-name="gr199" draw:text-style-name="P23" draw:layer="layout" svg:width="18.315cm" svg:height="0.467cm" svg:x="2.036cm" svg:y="3.683cm">
          <draw:text-box>
            <text:p text:style-name="P1"><text:span text:style-name="T7">Seguire fedelmente tutte le specifiche dell’esercizio (incluse quelle relative ai nomi delle variabili e al </text:span></text:p>
          </draw:text-box>
        </draw:frame>
        <draw:frame draw:style-name="gr200" draw:text-style-name="P23" draw:layer="layout" svg:width="5.228cm" svg:height="0.467cm" svg:x="2.036cm" svg:y="4.276cm">
          <draw:text-box>
            <text:p text:style-name="P1"><text:span text:style-name="T7">formato del loro contenuto). <text:s/></text:span></text:p>
          </draw:text-box>
        </draw:frame>
        <draw:frame draw:style-name="gr198" draw:text-style-name="P23" draw:layer="layout" svg:width="0.422cm" svg:height="0.422cm" svg:x="1.401cm" svg:y="4.981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596cm" svg:y="4.894cm">
          <draw:text-box>
            <text:p text:style-name="P1"><text:span text:style-name="T35"><text:s/></text:span></text:p>
          </draw:text-box>
        </draw:frame>
        <draw:polygon draw:style-name="gr201" draw:text-style-name="P74" draw:layer="layout" svg:width="16.175cm" svg:height="0.029cm" svg:x="2.036cm" svg:y="5.321cm" svg:viewBox="0 0 16176 30" draw:points="0,0 16176,0 16176,30 0,30">
          <text:p/>
        </draw:polygon>
        <draw:frame draw:style-name="gr202" draw:text-style-name="P23" draw:layer="layout" svg:width="17.964cm" svg:height="0.467cm" svg:x="2.036cm" svg:y="4.894cm">
          <draw:text-box>
            <text:p text:style-name="P1"><text:span text:style-name="T7">Rendere il codice </text:span><text:span text:style-name="T36">modulare </text:span><text:span text:style-name="T7">utilizzando ove opportuno </text:span><text:span text:style-name="T36">chiamate a procedure </text:span><text:span text:style-name="T7">e </text:span><text:span text:style-name="T36">rispettando le </text:span></text:p>
          </draw:text-box>
        </draw:frame>
        <draw:polygon draw:style-name="gr201" draw:text-style-name="P74" draw:layer="layout" svg:width="8.462cm" svg:height="0.03cm" svg:x="2.036cm" svg:y="5.913cm" svg:viewBox="0 0 8463 31" draw:points="0,0 8463,0 8463,31 0,31">
          <text:p/>
        </draw:polygon>
        <draw:frame draw:style-name="gr203" draw:text-style-name="P23" draw:layer="layout" svg:width="17.666cm" svg:height="0.467cm" svg:x="2.036cm" svg:y="5.486cm">
          <draw:text-box>
            <text:p text:style-name="P1"><text:span text:style-name="T36">convenzioni fra procedura chiamante/chiamata</text:span><text:span text:style-name="T7">. La modularità del codice ed il rispetto delle </text:span></text:p>
          </draw:text-box>
        </draw:frame>
        <draw:frame draw:style-name="gr204" draw:text-style-name="P23" draw:layer="layout" svg:width="16.88cm" svg:height="0.467cm" svg:x="2.036cm" svg:y="6.079cm">
          <draw:text-box>
            <text:p text:style-name="P1"><text:span text:style-name="T7">convenzioni saranno aspetti fondamentali per ottenere un’ottima valutazione del progetto. Si </text:span></text:p>
          </draw:text-box>
        </draw:frame>
        <draw:frame draw:style-name="gr205" draw:text-style-name="P23" draw:layer="layout" svg:width="18.675cm" svg:height="0.467cm" svg:x="2.036cm" svg:y="6.676cm">
          <draw:text-box>
            <text:p text:style-name="P1"><text:span text:style-name="T7">richiede in particolare di </text:span><text:span text:style-name="T37">implementare ogni cifrario (ciascun algoritmo A-B-C-D-E, e le loro inversioni </text:span></text:p>
          </draw:text-box>
        </draw:frame>
        <draw:frame draw:style-name="gr206" draw:text-style-name="P23" draw:layer="layout" svg:width="16.827cm" svg:height="0.467cm" svg:x="2.036cm" svg:y="7.269cm">
          <draw:text-box>
            <text:p text:style-name="P1"><text:span text:style-name="T37">per la decifratura) come una procedura separata (chiamate con jal, non con delle branch). </text:span></text:p>
          </draw:text-box>
        </draw:frame>
        <draw:frame draw:style-name="gr198" draw:text-style-name="P23" draw:layer="layout" svg:width="0.422cm" svg:height="0.422cm" svg:x="1.401cm" svg:y="7.974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596cm" svg:y="7.887cm">
          <draw:text-box>
            <text:p text:style-name="P1"><text:span text:style-name="T35"><text:s/></text:span></text:p>
          </draw:text-box>
        </draw:frame>
        <draw:frame draw:style-name="gr207" draw:text-style-name="P23" draw:layer="layout" svg:width="17.521cm" svg:height="0.467cm" svg:x="2.036cm" svg:y="7.887cm">
          <draw:text-box>
            <text:p text:style-name="P1"><text:span text:style-name="T7">Commentare in modo significativo (non commentare </text:span><text:span text:style-name="T37">addi s3, s3, 1 </text:span><text:span text:style-name="T7">con “sommo uno ad s3”.... ). </text:span></text:p>
          </draw:text-box>
        </draw:frame>
        <draw:frame draw:style-name="gr208" draw:text-style-name="P26" draw:layer="layout" svg:width="4.625cm" svg:height="0.501cm" svg:x="1.401cm" svg:y="8.838cm">
          <draw:text-box>
            <text:p text:style-name="P1"><text:span text:style-name="T20">Dettagli sulla Consegna</text:span></text:p>
          </draw:text-box>
        </draw:frame>
        <draw:frame draw:style-name="gr13" draw:text-style-name="P12" draw:layer="layout" svg:width="0.35cm" svg:height="0.391cm" svg:x="6.303cm" svg:y="8.934cm">
          <draw:text-box>
            <text:p text:style-name="P1"><text:span text:style-name="T38"><text:s/></text:span></text:p>
          </draw:text-box>
        </draw:frame>
        <draw:frame draw:style-name="gr198" draw:text-style-name="P23" draw:layer="layout" svg:width="0.422cm" svg:height="0.422cm" svg:x="1.405cm" svg:y="9.566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9.478cm">
          <draw:text-box>
            <text:p text:style-name="P1"><text:span text:style-name="T35"><text:s/></text:span></text:p>
          </draw:text-box>
        </draw:frame>
        <draw:frame draw:style-name="gr209" draw:text-style-name="P23" draw:layer="layout" svg:width="18.708cm" svg:height="0.467cm" svg:x="2.036cm" svg:y="9.478cm">
          <draw:text-box>
            <text:p text:style-name="P1"><text:span text:style-name="T7">Per sostenere l'esame è necessario consegnare il codice e una relazione PDF sul progetto assegnato, </text:span></text:p>
          </draw:text-box>
        </draw:frame>
        <draw:frame draw:style-name="gr210" draw:text-style-name="P23" draw:layer="layout" svg:width="11.762cm" svg:height="0.467cm" svg:x="2.036cm" svg:y="10.067cm">
          <draw:text-box>
            <text:p text:style-name="P1"><text:span text:style-name="T7">oltre ad un breve video che spieghi il funzionamento del codice. <text:s/></text:span></text:p>
          </draw:text-box>
        </draw:frame>
        <draw:frame draw:style-name="gr198" draw:text-style-name="P23" draw:layer="layout" svg:width="0.422cm" svg:height="0.422cm" svg:x="1.405cm" svg:y="10.988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0.901cm">
          <draw:text-box>
            <text:p text:style-name="P1"><text:span text:style-name="T35"><text:s/></text:span></text:p>
          </draw:text-box>
        </draw:frame>
        <draw:frame draw:style-name="gr211" draw:text-style-name="P23" draw:layer="layout" svg:width="16.991cm" svg:height="0.467cm" svg:x="2.036cm" svg:y="10.901cm">
          <draw:text-box>
            <text:p text:style-name="P1"><text:span text:style-name="T7">Il codice consegnato deve essere funzionante sul simulatore RIPES, usato durante le lezioni. </text:span></text:p>
          </draw:text-box>
        </draw:frame>
        <draw:frame draw:style-name="gr198" draw:text-style-name="P23" draw:layer="layout" svg:width="0.422cm" svg:height="0.422cm" svg:x="1.405cm" svg:y="11.814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1.726cm">
          <draw:text-box>
            <text:p text:style-name="P1"><text:span text:style-name="T35"><text:s/></text:span></text:p>
          </draw:text-box>
        </draw:frame>
        <draw:frame draw:style-name="gr212" draw:text-style-name="P23" draw:layer="layout" svg:width="17.777cm" svg:height="0.467cm" svg:x="2.036cm" svg:y="11.726cm">
          <draw:text-box>
            <text:p text:style-name="P1"><text:span text:style-name="T7">La scadenza esatta della consegna verrà resa nota di volta in volta, in base alle date dell’appello. </text:span></text:p>
          </draw:text-box>
        </draw:frame>
        <draw:frame draw:style-name="gr198" draw:text-style-name="P23" draw:layer="layout" svg:width="0.422cm" svg:height="0.422cm" svg:x="1.405cm" svg:y="12.644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2.556cm">
          <draw:text-box>
            <text:p text:style-name="P1"><text:span text:style-name="T35"><text:s/></text:span></text:p>
          </draw:text-box>
        </draw:frame>
        <draw:frame draw:style-name="gr213" draw:text-style-name="P23" draw:layer="layout" svg:width="18.185cm" svg:height="0.467cm" svg:x="2.036cm" svg:y="12.556cm">
          <draw:text-box>
            <text:p text:style-name="P1"><text:span text:style-name="T7">Discussione e valutazione: la discussione degli elaborati avverrà contestualmente all’esame orale e </text:span></text:p>
          </draw:text-box>
        </draw:frame>
        <draw:polygon draw:style-name="gr201" draw:text-style-name="P74" draw:layer="layout" svg:width="13.669cm" svg:height="0.029cm" svg:x="2.036cm" svg:y="13.576cm" svg:viewBox="0 0 13670 30" draw:points="0,0 13670,0 13670,30 0,30">
          <text:p/>
        </draw:polygon>
        <draw:frame draw:style-name="gr214" draw:text-style-name="P23" draw:layer="layout" svg:width="15.936cm" svg:height="0.467cm" svg:x="2.036cm" svg:y="13.149cm">
          <draw:text-box>
            <text:p text:style-name="P1"><text:span text:style-name="T36">prevede anche domande su tutti gli argomenti di laboratorio trattati a lezione</text:span><text:span text:style-name="T7">. <text:s/></text:span></text:p>
          </draw:text-box>
        </draw:frame>
        <draw:frame draw:style-name="gr215" draw:text-style-name="P26" draw:layer="layout" svg:width="5.041cm" svg:height="0.501cm" svg:x="1.401cm" svg:y="14.096cm">
          <draw:text-box>
            <text:p text:style-name="P1"><text:span text:style-name="T20">Struttura della Consegna </text:span></text:p>
          </draw:text-box>
        </draw:frame>
        <draw:frame draw:style-name="gr216" draw:text-style-name="P23" draw:layer="layout" svg:width="18.32cm" svg:height="0.467cm" svg:x="1.401cm" svg:y="14.715cm">
          <draw:text-box>
            <text:p text:style-name="P1"><text:span text:style-name="T7">La consegna dovrà consistere di un unico achivio contenente 3 componenti. L’archivio dovrà essere </text:span></text:p>
          </draw:text-box>
        </draw:frame>
        <draw:frame draw:style-name="gr217" draw:text-style-name="P23" draw:layer="layout" svg:width="17.934cm" svg:height="0.467cm" svg:x="1.401cm" svg:y="15.308cm">
          <draw:text-box>
            <text:p text:style-name="P1"><text:span text:style-name="T7">caricato sul sito moodle del corso seguendo il link che verrà reso disponibile alla pagina del corso. </text:span></text:p>
          </draw:text-box>
        </draw:frame>
        <draw:frame draw:style-name="gr198" draw:text-style-name="P23" draw:layer="layout" svg:width="0.422cm" svg:height="0.422cm" svg:x="1.405cm" svg:y="16.225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6.137cm">
          <draw:text-box>
            <text:p text:style-name="P1"><text:span text:style-name="T35"><text:s/></text:span></text:p>
          </draw:text-box>
        </draw:frame>
        <draw:frame draw:style-name="gr218" draw:text-style-name="P23" draw:layer="layout" svg:width="7.44cm" svg:height="0.467cm" svg:x="2.036cm" svg:y="16.137cm">
          <draw:text-box>
            <text:p text:style-name="P1"><text:span text:style-name="T7">Un file .s contenente il </text:span><text:span text:style-name="T36">codice </text:span><text:span text:style-name="T7">assembly </text:span></text:p>
          </draw:text-box>
        </draw:frame>
        <draw:frame draw:style-name="gr198" draw:text-style-name="P23" draw:layer="layout" svg:width="0.422cm" svg:height="0.422cm" svg:x="1.405cm" svg:y="17.055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6.967cm">
          <draw:text-box>
            <text:p text:style-name="P1"><text:span text:style-name="T35"><text:s/></text:span></text:p>
          </draw:text-box>
        </draw:frame>
        <draw:frame draw:style-name="gr219" draw:text-style-name="P23" draw:layer="layout" svg:width="17.836cm" svg:height="0.467cm" svg:x="2.036cm" svg:y="16.967cm">
          <draw:text-box>
            <text:p text:style-name="P1"><text:span text:style-name="T7">un </text:span><text:span text:style-name="T36">breve video </text:span><text:span text:style-name="T7">(max 5 minuti) dove si registra lo schermo del dispositivo che avete utilizzato per </text:span></text:p>
          </draw:text-box>
        </draw:frame>
        <draw:frame draw:style-name="gr220" draw:text-style-name="P23" draw:layer="layout" svg:width="18.36cm" svg:height="0.467cm" svg:x="2.036cm" svg:y="17.56cm">
          <draw:text-box>
            <text:p text:style-name="P1"><text:span text:style-name="T7">l’implementazione durante l’esecuzione del programma, commentandone il funzionamento in base a </text:span></text:p>
          </draw:text-box>
        </draw:frame>
        <draw:frame draw:style-name="gr221" draw:text-style-name="P23" draw:layer="layout" svg:width="6.137cm" svg:height="0.467cm" svg:x="2.036cm" svg:y="18.153cm">
          <draw:text-box>
            <text:p text:style-name="P1"><text:span text:style-name="T7">2-3 combinazioni di input diverse </text:span></text:p>
          </draw:text-box>
        </draw:frame>
        <draw:frame draw:style-name="gr198" draw:text-style-name="P23" draw:layer="layout" svg:width="0.422cm" svg:height="0.422cm" svg:x="1.405cm" svg:y="19.07cm">
          <draw:text-box>
            <text:p text:style-name="P1"><text:span text:style-name="T34">•</text:span></text:p>
          </draw:text-box>
        </draw:frame>
        <draw:frame draw:style-name="gr23" draw:text-style-name="P23" draw:layer="layout" svg:width="0.422cm" svg:height="0.467cm" svg:x="1.6cm" svg:y="18.982cm">
          <draw:text-box>
            <text:p text:style-name="P1"><text:span text:style-name="T35"><text:s/></text:span></text:p>
          </draw:text-box>
        </draw:frame>
        <draw:frame draw:style-name="gr222" draw:text-style-name="P23" draw:layer="layout" svg:width="9.83cm" svg:height="0.467cm" svg:x="2.036cm" svg:y="18.982cm">
          <draw:text-box>
            <text:p text:style-name="P1"><text:span text:style-name="T7">la </text:span><text:span text:style-name="T36">relazione </text:span><text:span text:style-name="T7">in formato PDF, strutturata come segue. </text:span></text:p>
          </draw:text-box>
        </draw:frame>
        <draw:frame draw:style-name="gr223" draw:text-style-name="P23" draw:layer="layout" svg:width="0.449cm" svg:height="0.467cm" svg:x="2.036cm" svg:y="19.787cm">
          <draw:text-box>
            <text:p text:style-name="P1"><text:span text:style-name="T7">1. </text:span></text:p>
          </draw:text-box>
        </draw:frame>
        <draw:frame draw:style-name="gr224" draw:text-style-name="P23" draw:layer="layout" svg:width="12.596cm" svg:height="0.467cm" svg:x="2.671cm" svg:y="19.787cm">
          <draw:text-box>
            <text:p text:style-name="P1"><text:span text:style-name="T36">Informazioni </text:span><text:span text:style-name="T7">su autore, indirizzo mail, matricola e data di consegna </text:span></text:p>
          </draw:text-box>
        </draw:frame>
        <draw:frame draw:style-name="gr223" draw:text-style-name="P23" draw:layer="layout" svg:width="0.449cm" svg:height="0.467cm" svg:x="2.036cm" svg:y="20.595cm">
          <draw:text-box>
            <text:p text:style-name="P1"><text:span text:style-name="T7">2. </text:span></text:p>
          </draw:text-box>
        </draw:frame>
        <draw:frame draw:style-name="gr225" draw:text-style-name="P23" draw:layer="layout" svg:width="14.619cm" svg:height="0.467cm" svg:x="2.671cm" svg:y="20.595cm">
          <draw:text-box>
            <text:p text:style-name="P1"><text:span text:style-name="T36">Descrizione </text:span><text:span text:style-name="T7">della soluzione adottata, trattando principalmente i seguenti punti: </text:span></text:p>
          </draw:text-box>
        </draw:frame>
        <draw:frame draw:style-name="gr226" draw:text-style-name="P23" draw:layer="layout" svg:width="0.444cm" svg:height="0.467cm" svg:x="3.306cm" svg:y="21.4cm">
          <draw:text-box>
            <text:p text:style-name="P1"><text:span text:style-name="T7">a. </text:span></text:p>
          </draw:text-box>
        </draw:frame>
        <draw:frame draw:style-name="gr227" draw:text-style-name="P23" draw:layer="layout" svg:width="13.652cm" svg:height="0.467cm" svg:x="3.941cm" svg:y="21.4cm">
          <draw:text-box>
            <text:p text:style-name="P1"><text:span text:style-name="T7">Descrizione ad alto livello della struttura del codice, di ciascun algoritmo di </text:span></text:p>
          </draw:text-box>
        </draw:frame>
        <draw:frame draw:style-name="gr228" draw:text-style-name="P23" draw:layer="layout" svg:width="15.929cm" svg:height="0.467cm" svg:x="3.941cm" svg:y="21.992cm">
          <draw:text-box>
            <text:p text:style-name="P1"><text:span text:style-name="T7">cifratura/decifratura, di altre eventuali procedure e del main, in linguaggio naturale, con </text:span></text:p>
          </draw:text-box>
        </draw:frame>
        <draw:frame draw:style-name="gr229" draw:text-style-name="P23" draw:layer="layout" svg:width="6.73cm" svg:height="0.467cm" svg:x="3.941cm" svg:y="22.589cm">
          <draw:text-box>
            <text:p text:style-name="P1"><text:span text:style-name="T7">flow-chart, in pseudo-linguaggio, etc </text:span></text:p>
          </draw:text-box>
        </draw:frame>
        <draw:frame draw:style-name="gr230" draw:text-style-name="P23" draw:layer="layout" svg:width="0.45cm" svg:height="0.467cm" svg:x="3.306cm" svg:y="23.393cm">
          <draw:text-box>
            <text:p text:style-name="P1"><text:span text:style-name="T7">b. </text:span></text:p>
          </draw:text-box>
        </draw:frame>
        <draw:frame draw:style-name="gr231" draw:text-style-name="P23" draw:layer="layout" svg:width="14.1cm" svg:height="0.467cm" svg:x="3.941cm" svg:y="23.393cm">
          <draw:text-box>
            <text:p text:style-name="P1"><text:span text:style-name="T7">Uso dei registri e memoria (stack, piuttosto che memoria statica o dinamica) <text:s/></text:span></text:p>
          </draw:text-box>
        </draw:frame>
        <draw:frame draw:style-name="gr223" draw:text-style-name="P23" draw:layer="layout" svg:width="0.449cm" svg:height="0.467cm" svg:x="2.036cm" svg:y="24.198cm">
          <draw:text-box>
            <text:p text:style-name="P1"><text:span text:style-name="T7">3. </text:span></text:p>
          </draw:text-box>
        </draw:frame>
        <draw:frame draw:style-name="gr232" draw:text-style-name="P23" draw:layer="layout" svg:width="18.251cm" svg:height="0.467cm" svg:x="2.671cm" svg:y="24.198cm">
          <draw:text-box>
            <text:p text:style-name="P1"><text:span text:style-name="T36">Test di corretto funzionamento</text:span><text:span text:style-name="T7">, per fornire evidenze del corretto funzionamento del programma, </text:span></text:p>
          </draw:text-box>
        </draw:frame>
        <draw:frame draw:style-name="gr233" draw:text-style-name="P23" draw:layer="layout" svg:width="3.895cm" svg:height="0.467cm" svg:x="2.671cm" svg:y="24.795cm">
          <draw:text-box>
            <text:p text:style-name="P1"><text:span text:style-name="T7">usando diversi input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meta:document-statistic meta:object-count="305"/>
  </office:meta>
</office:document-meta>
</file>