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00000004F28348659.png" manifest:media-type="image/png"/>
  <manifest:file-entry manifest:full-path="Pictures/100000010000012200000050F922DA2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Arial" svg:font-family="Arial"/>
    <style:font-face style:name="Calibri" svg:font-family="Calibri"/>
    <style:font-face style:name="Cambria" svg:font-family="Cambria"/>
    <style:font-face style:name="FreeSans" svg:font-family="FreeSans" style:font-family-generic="roman" style:font-pitch="variable"/>
    <style:font-face style:name="FreeSans1" svg:font-family="FreeSans" style:font-adornments="Regular" style:font-family-generic="swis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FreeSans4" svg:font-family="FreeSans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family-generic="roman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TexMaths Symbols" svg:font-family="'TexMaths Symbols'" style:font-pitch="variable"/>
    <style:font-face style:name="TexMaths Symbols1" svg:font-family="'TexMaths Symbols'"/>
    <style:font-face style:name="Unifont" svg:font-family="Unifont" style:font-family-generic="system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32cm" fo:min-width="11.64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32cm" fo:min-width="13.47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32cm" fo:min-width="7.18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32cm" fo:min-width="0.84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158cm" fo:min-width="0.139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4f81bd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089cm" fo:min-width="7.94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8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Heading">
      <style:graphic-properties draw:stroke="none" draw:fill="none" draw:textarea-horizontal-align="left" draw:textarea-vertical-align="top" draw:auto-grow-height="true" draw:auto-grow-width="true" fo:min-height="0.543cm" fo:min-width="5.17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Body_20_Text">
      <style:graphic-properties draw:stroke="none" draw:textarea-horizontal-align="left" draw:textarea-vertical-align="top" draw:auto-grow-height="false" draw:auto-grow-width="false" fo:min-height="3.308cm" fo:min-width="14.82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0000" draw:stroke-linejoin="miter" svg:stroke-linecap="butt" draw:fill="solid" draw:fill-color="#ffffff" fo:padding-top="0.013cm" fo:padding-bottom="0.013cm" fo:padding-left="0.013cm" fo:padding-right="0.013cm" loext:decorative="false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draw:auto-grow-width="true" fo:min-height="0.551cm" fo:min-width="17.09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5.858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42cm" fo:min-width="0.94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Body_20_Text">
      <style:graphic-properties draw:stroke="none" draw:textarea-horizontal-align="left" draw:textarea-vertical-align="top" draw:auto-grow-height="true" draw:auto-grow-width="true" fo:min-height="0.536cm" fo:min-width="0.13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Body_20_Text">
      <style:graphic-properties draw:stroke="none" draw:textarea-horizontal-align="left" draw:textarea-vertical-align="top" draw:auto-grow-height="true" draw:auto-grow-width="true" fo:min-height="0.536cm" fo:min-width="0.3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Heading">
      <style:graphic-properties draw:stroke="none" draw:fill="none" draw:textarea-horizontal-align="left" draw:textarea-vertical-align="top" draw:auto-grow-height="true" draw:auto-grow-width="true" fo:min-height="0.543cm" fo:min-width="15.939cm" fo:padding-top="0cm" fo:padding-bottom="0cm" fo:padding-left="0cm" fo:padding-right="0cm" loext:decorative="false"/>
      <style:paragraph-properties style:writing-mode="lr-tb"/>
    </style:style>
    <style:style style:name="gr19" style:family="graphic">
      <style:graphic-properties style:writing-mode="lr-tb" loext:decorative="false"/>
    </style:style>
    <style:style style:name="gr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" style:family="graphic" style:parent-style-name="Body_20_Text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textarea-horizontal-align="justify" fo:min-height="0.536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5" style:family="graphic" style:parent-style-name="Body_20_Text">
      <style:graphic-properties draw:stroke="none" draw:textarea-horizontal-align="left" draw:textarea-vertical-align="top" draw:auto-grow-height="true" draw:auto-grow-width="true" fo:min-height="0.536cm" fo:min-width="0.422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opacity="66%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" style:family="graphic" style:parent-style-name="Body_20_Text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textarea-horizontal-align="justify" fo:min-height="0.769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" style:family="graphic" style:parent-style-name="Body_20_Text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textarea-horizontal-align="justify" fo:min-height="0.536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42" style:family="graphic" style:parent-style-name="Body_20_Text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textarea-horizontal-align="justify" fo:min-height="0.536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43" style:family="graphic" style:parent-style-name="Body_20_Text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Heading">
      <style:graphic-properties draw:stroke="none" draw:fill="none" draw:textarea-horizontal-align="left" draw:textarea-vertical-align="top" draw:auto-grow-height="true" draw:auto-grow-width="true" fo:min-height="0.543cm" fo:min-width="5.771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Heading">
      <style:graphic-properties draw:stroke="none" draw:fill="none" draw:textarea-horizontal-align="left" draw:textarea-vertical-align="top" draw:auto-grow-height="true" draw:auto-grow-width="true" fo:min-height="0.543cm" fo:min-width="8.415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Body_20_Text">
      <style:graphic-properties draw:stroke="none" svg:stroke-color="#000000" draw:auto-grow-height="true" draw:auto-grow-width="false" fo:min-height="2.072cm" loext:decorative="false"/>
      <style:paragraph-properties style:writing-mode="lr-tb"/>
    </style:style>
    <style:style style:name="gr47" style:family="graphic" style:parent-style-name="caption">
      <style:graphic-properties draw:stroke="none" svg:stroke-color="#000000" draw:fill="none" draw:fill-color="#ffffff" draw:auto-grow-height="true" draw:auto-grow-width="false" fo:min-height="1.865cm" loext:decorative="false"/>
      <style:paragraph-properties style:writing-mode="lr-tb"/>
    </style:style>
    <style:style style:name="gr48" style:family="graphic">
      <style:graphic-properties style:protect="size" style:writing-mode="lr-tb" loext:decorative="false"/>
    </style:style>
    <style:style style:name="gr49" style:family="graphic" style:parent-style-name="standard" style:list-style-name="L3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style:protect="size" loext:decorative="false"/>
    </style:style>
    <style:style style:name="gr50" style:family="graphic" style:parent-style-name="standard" style:list-style-name="L3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1.434cm" fo:min-width="5.623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1.389cm" fo:min-width="6.075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1.12cm" fo:min-width="9.415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justify" draw:textarea-vertical-align="top" draw:auto-grow-height="false" fo:min-height="13.839cm" fo:min-width="17.932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6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3.89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5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76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474cm" fo:min-width="1.763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7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508cm" fo:min-width="4.583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562cm" fo:min-width="4.133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484cm" fo:min-width="4.053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8" style:family="graphic">
      <style:graphic-properties style:protect="size" loext:decorative="false"/>
    </style:style>
    <style:style style:name="gr79" style:family="graphic" style:parent-style-name="standard" style:list-style-name="L3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3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8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8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5" style:family="graphic" style:parent-style-name="standard">
      <style:graphic-properties draw:stroke="none" draw:fill="none" draw:fill-color="#ffffff" fo:min-height="0.62cm" loext:decorative="false"/>
      <style:paragraph-properties style:writing-mode="lr-tb"/>
    </style:style>
    <style:style style:name="gr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8cm" fo:min-width="3.052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626cm" fo:min-width="3.466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8cm" fo:min-width="3.513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626cm" fo:min-width="3.466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11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11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386cm" fo:min-width="1.71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12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308cm" fo:min-width="2.442cm" fo:padding-top="0.152cm" fo:padding-bottom="0.152cm" fo:padding-left="0.3cm" fo:padding-right="0.27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131" style:family="graphic" style:parent-style-name="Body_20_Text">
      <style:graphic-properties draw:stroke="none" svg:stroke-color="#000000" draw:auto-grow-height="true" draw:auto-grow-width="false" fo:min-height="1.819cm" loext:decorative="false"/>
      <style:paragraph-properties style:writing-mode="lr-tb"/>
    </style:style>
    <style:style style:name="gr132" style:family="graphic" style:parent-style-name="caption">
      <style:graphic-properties draw:stroke="none" svg:stroke-color="#000000" draw:fill="none" draw:fill-color="#ffffff" draw:auto-grow-height="true" draw:auto-grow-width="false" fo:min-height="4.195cm" loext:decorative="false"/>
      <style:paragraph-properties style:writing-mode="lr-tb"/>
    </style:style>
    <style:style style:name="gr133" style:family="graphic" style:parent-style-name="Body_20_Text">
      <style:graphic-properties draw:stroke="none" svg:stroke-color="#000000" draw:auto-grow-height="true" draw:auto-grow-width="false" fo:min-height="2.285cm" loext:decorative="false"/>
      <style:paragraph-properties style:writing-mode="lr-tb"/>
    </style:style>
    <style:style style:name="gr134" style:family="graphic" style:parent-style-name="standard" style:list-style-name="L3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style:protect="size" loext:decorative="false"/>
    </style:style>
    <style:style style:name="gr135" style:family="graphic" style:parent-style-name="standard" style:list-style-name="L3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6" style:family="graphic" style:parent-style-name="Graphic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1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73cm" fo:min-width="2.47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1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justify" draw:textarea-vertical-align="top" draw:auto-grow-height="false" fo:min-height="5.435cm" fo:min-width="11.107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14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74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862cm" fo:min-width="2.454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58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69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306cm" fo:min-width="2.524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1.21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584cm" fo:min-width="2.059cm" fo:padding-top="0.152cm" fo:padding-bottom="0.152cm" fo:padding-left="0.3cm" fo:padding-right="0.27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6" style:family="graphic" style:parent-style-name="standard" style:list-style-name="L3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7" style:family="graphic" style:parent-style-name="standard" style:list-style-name="L3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15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0" style:family="graphic" style:parent-style-name="Heading">
      <style:graphic-properties draw:stroke="none" draw:fill="none" draw:textarea-horizontal-align="left" draw:textarea-vertical-align="top" draw:auto-grow-height="true" draw:auto-grow-width="true" fo:min-height="0.543cm" fo:min-width="3.213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Body_20_Text">
      <style:graphic-properties draw:stroke="none" svg:stroke-color="#000000" draw:auto-grow-height="true" draw:auto-grow-width="false" fo:min-height="6.038cm" loext:decorative="false"/>
      <style:paragraph-properties style:writing-mode="lr-tb"/>
    </style:style>
    <style:style style:name="gr162" style:family="graphic" style:parent-style-name="Heading">
      <style:graphic-properties draw:stroke="none" draw:fill="none" draw:textarea-horizontal-align="left" draw:textarea-vertical-align="top" draw:auto-grow-height="true" draw:auto-grow-width="true" fo:min-height="0.543cm" fo:min-width="7.789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Body_20_Text">
      <style:graphic-properties draw:stroke="none" svg:stroke-color="#000000" draw:auto-grow-height="true" draw:auto-grow-width="false" fo:min-height="7.567cm" loext:decorative="false"/>
      <style:paragraph-properties style:writing-mode="lr-tb"/>
    </style:style>
    <style:style style:name="gr1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5" style:family="graphic" style:parent-style-name="Body_20_Text">
      <style:graphic-properties draw:stroke="none" svg:stroke-color="#000000" draw:auto-grow-height="true" draw:auto-grow-width="false" fo:min-height="6.497cm" loext:decorative="false"/>
      <style:paragraph-properties style:writing-mode="lr-tb"/>
    </style:style>
    <style:style style:name="gr166" style:family="graphic" style:parent-style-name="caption">
      <style:graphic-properties draw:stroke="none" svg:stroke-color="#000000" draw:fill="none" draw:fill-color="#ffffff" draw:auto-grow-height="true" draw:auto-grow-width="false" fo:min-height="9.652cm" loext:decorative="false"/>
      <style:paragraph-properties style:writing-mode="lr-tb"/>
    </style:style>
    <style:style style:name="gr167" style:family="graphic" style:parent-style-name="caption">
      <style:graphic-properties draw:stroke="none" svg:stroke-color="#000000" draw:fill="none" draw:fill-color="#ffffff" draw:auto-grow-height="true" draw:auto-grow-width="false" fo:min-height="1.171cm" loext:decorative="false"/>
      <style:paragraph-properties style:writing-mode="lr-tb"/>
    </style:style>
    <style:style style:name="gr168" style:family="graphic" style:parent-style-name="caption">
      <style:graphic-properties draw:stroke="none" svg:stroke-color="#000000" draw:fill="none" draw:fill-color="#ffffff" draw:auto-grow-height="true" draw:auto-grow-width="false" fo:min-height="6.991cm" loext:decorative="false"/>
      <style:paragraph-properties style:writing-mode="lr-tb"/>
    </style:style>
    <style:style style:name="gr169" style:family="graphic" style:parent-style-name="standard" style:list-style-name="L3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style:protect="size" loext:decorative="false"/>
    </style:style>
    <style:style style:name="gr170" style:family="graphic" style:parent-style-name="standard" style:list-style-name="L3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7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1.197cm" fo:min-width="1.684cm" fo:padding-top="0.152cm" fo:padding-bottom="0.152cm" fo:padding-left="0.3cm" fo:padding-right="0.27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17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5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179" style:family="graphic" style:parent-style-name="standard" style:list-style-name="L3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0" style:family="graphic" style:parent-style-name="standard" style:list-style-name="L3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1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1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1.12cm" fo:min-width="3.697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5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8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8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88" style:family="graphic" style:parent-style-name="Body_20_Text">
      <style:graphic-properties draw:stroke="none" svg:stroke-color="#000000" draw:auto-grow-height="true" draw:auto-grow-width="false" fo:min-height="1.071cm" loext:decorative="false"/>
      <style:paragraph-properties style:writing-mode="lr-tb"/>
    </style:style>
    <style:style style:name="gr189" style:family="graphic" style:parent-style-name="Heading">
      <style:graphic-properties draw:stroke="none" draw:fill="none" draw:textarea-horizontal-align="left" draw:textarea-vertical-align="top" draw:auto-grow-height="true" draw:auto-grow-width="true" fo:min-height="0.543cm" fo:min-width="8.588cm" fo:padding-top="0cm" fo:padding-bottom="0cm" fo:padding-left="0cm" fo:padding-right="0cm" loext:decorative="false"/>
      <style:paragraph-properties style:writing-mode="lr-tb"/>
    </style:style>
    <style:style style:name="gr190" style:family="graphic" style:parent-style-name="Body_20_Text">
      <style:graphic-properties draw:stroke="none" svg:stroke-color="#000000" draw:textarea-horizontal-align="left" draw:auto-grow-height="true" draw:auto-grow-width="false" fo:min-height="0.68cm" loext:decorative="false"/>
      <style:paragraph-properties style:writing-mode="lr-tb"/>
    </style:style>
    <style:style style:name="gr191" style:family="graphic" style:parent-style-name="Body_20_Text">
      <style:graphic-properties draw:stroke="none" svg:stroke-color="#000000" draw:auto-grow-height="true" draw:auto-grow-width="false" fo:min-height="1.147cm" loext:decorative="false"/>
      <style:paragraph-properties style:writing-mode="lr-tb"/>
    </style:style>
    <style:style style:name="gr192" style:family="graphic" style:parent-style-name="caption">
      <style:graphic-properties draw:stroke="none" svg:stroke-color="#000000" draw:fill="none" draw:fill-color="#ffffff" draw:auto-grow-height="true" draw:auto-grow-width="false" fo:min-height="5.593cm" loext:decorative="false"/>
      <style:paragraph-properties style:writing-mode="lr-tb"/>
    </style:style>
    <style:style style:name="gr193" style:family="graphic" style:parent-style-name="Heading">
      <style:graphic-properties draw:stroke="none" draw:fill="none" draw:textarea-horizontal-align="left" draw:textarea-vertical-align="top" draw:auto-grow-height="true" draw:auto-grow-width="true" fo:min-height="0.543cm" fo:min-width="8.601cm" fo:padding-top="0cm" fo:padding-bottom="0cm" fo:padding-left="0cm" fo:padding-right="0cm" loext:decorative="false"/>
      <style:paragraph-properties style:writing-mode="lr-tb"/>
    </style:style>
    <style:style style:name="gr194" style:family="graphic" style:parent-style-name="standard" style:list-style-name="L3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style:protect="size" loext:decorative="false"/>
    </style:style>
    <style:style style:name="gr195" style:family="graphic" style:parent-style-name="standard" style:list-style-name="L3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349cm" fo:min-width="1.319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1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967cm" fo:min-width="1.365cm" fo:padding-top="0.152cm" fo:padding-bottom="0.152cm" fo:padding-left="0.3cm" fo:padding-right="0.27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20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205" style:family="graphic" style:parent-style-name="standard" style:list-style-name="L3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6" style:family="graphic" style:parent-style-name="standard" style:list-style-name="L3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20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74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1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69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1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21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74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1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602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439cm" fo:min-width="4.089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1.232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1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69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22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2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2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439cm" fo:min-width="2.957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504cm" fo:min-width="2.644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439cm" fo:min-width="2.836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1.08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3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69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3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74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37" style:family="graphic" style:parent-style-name="standard" style:list-style-name="L3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style:protect="size" loext:decorative="false"/>
    </style:style>
    <style:style style:name="gr238" style:family="graphic" style:parent-style-name="standard" style:list-style-name="L3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3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1.12cm" fo:min-width="3.58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1.12cm" fo:min-width="4.569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1.293cm" fo:min-width="5.702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1.033cm" fo:min-width="1.882cm" fo:padding-top="0.152cm" fo:padding-bottom="0.152cm" fo:padding-left="0.3cm" fo:padding-right="0.27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245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9" style:family="graphic" style:parent-style-name="standard" style:list-style-name="L3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0" style:family="graphic" style:parent-style-name="standard" style:list-style-name="L3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25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2" style:family="graphic" style:parent-style-name="Body_20_Text">
      <style:graphic-properties draw:stroke="none" svg:stroke-color="#000000" draw:auto-grow-height="true" draw:auto-grow-width="false" fo:min-height="0.415cm" loext:decorative="false"/>
      <style:paragraph-properties style:writing-mode="lr-tb"/>
    </style:style>
    <style:style style:name="gr253" style:family="graphic" style:parent-style-name="standard" style:list-style-name="L3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style:protect="size" loext:decorative="false"/>
    </style:style>
    <style:style style:name="gr254" style:family="graphic" style:parent-style-name="standard" style:list-style-name="L3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55" style:family="graphic" style:parent-style-name="Graphic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2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73cm" fo:min-width="2.879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2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justify" draw:textarea-vertical-align="top" draw:auto-grow-height="false" fo:min-height="6.479cm" fo:min-width="16.127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26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74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588cm" fo:min-width="2.828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58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6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69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7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1.21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584cm" fo:min-width="2.181cm" fo:padding-top="0.152cm" fo:padding-bottom="0.152cm" fo:padding-left="0.3cm" fo:padding-right="0.27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4" style:family="graphic" style:parent-style-name="standard" style:list-style-name="L3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5" style:family="graphic" style:parent-style-name="standard" style:list-style-name="L3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27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27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58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466cm" fo:min-width="0.838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466cm" fo:min-width="2.245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28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466cm" fo:min-width="4.042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69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8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74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592cm" fo:min-width="3.302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3" style:family="graphic" style:parent-style-name="caption">
      <style:graphic-properties draw:stroke="none" svg:stroke-color="#000000" draw:fill="none" draw:fill-color="#ffffff" draw:auto-grow-height="true" draw:auto-grow-width="false" fo:min-height="1.315cm" loext:decorative="false"/>
      <style:paragraph-properties style:writing-mode="lr-tb"/>
    </style:style>
    <style:style style:name="gr294" style:family="graphic" style:parent-style-name="standard">
      <style:graphic-properties draw:stroke="none" draw:fill="none" fo:min-height="1.433cm" loext:decorative="false"/>
      <style:paragraph-properties style:writing-mode="lr-tb"/>
    </style:style>
    <style:style style:name="gr295" style:family="graphic" style:parent-style-name="standard">
      <style:graphic-properties draw:stroke="none" draw:fill="none" fo:min-height="1.337cm" loext:decorative="false"/>
      <style:paragraph-properties style:writing-mode="lr-tb"/>
    </style:style>
    <style:style style:name="gr296" style:family="graphic" style:parent-style-name="standard" style:list-style-name="L3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style:protect="size" loext:decorative="false"/>
    </style:style>
    <style:style style:name="gr297" style:family="graphic" style:parent-style-name="standard" style:list-style-name="L3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98" style:family="graphic" style:parent-style-name="Graphic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3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911cm" fo:min-width="4.468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3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justify" draw:textarea-vertical-align="top" draw:auto-grow-height="false" fo:min-height="6.859cm" fo:min-width="17.563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5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30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74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0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58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1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69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1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1.21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671cm" fo:min-width="2.181cm" fo:padding-top="0.152cm" fo:padding-bottom="0.152cm" fo:padding-left="0.3cm" fo:padding-right="0.27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3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6" style:family="graphic" style:parent-style-name="standard" style:list-style-name="L3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31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3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466cm" fo:min-width="0.838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32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5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69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2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74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741cm" fo:min-width="3.875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2.058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33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69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631cm" fo:min-width="3.241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0.74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3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1.98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34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style:protect="size" loext:decorative="false"/>
    </style:style>
    <style:style style:name="gr3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1.401cm" fo:min-width="4.279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auto-grow-width="true" fo:min-height="0.702cm" fo:min-width="1.21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center" draw:textarea-vertical-align="middle" draw:auto-grow-height="false" fo:min-height="0.631cm" fo:min-width="3.241cm" fo:padding-top="0.106cm" fo:padding-bottom="0.10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6.257cm" fo:padding-top="0cm" fo:padding-bottom="0cm" fo:padding-left="0cm" fo:padding-right="0cm" loext:decorative="false"/>
      <style:paragraph-properties style:writing-mode="lr-tb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.147cm" fo:padding-top="0cm" fo:padding-bottom="0cm" fo:padding-left="0cm" fo:padding-right="0cm" loext:decorative="false"/>
      <style:paragraph-properties style:writing-mode="lr-tb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422cm" fo:padding-top="0cm" fo:padding-bottom="0cm" fo:padding-left="0cm" fo:padding-right="0cm" loext:decorative="false"/>
      <style:paragraph-properties style:writing-mode="lr-tb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315cm" fo:padding-top="0cm" fo:padding-bottom="0cm" fo:padding-left="0cm" fo:padding-right="0cm" loext:decorative="false"/>
      <style:paragraph-properties style:writing-mode="lr-tb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5.228cm" fo:padding-top="0cm" fo:padding-bottom="0cm" fo:padding-left="0cm" fo:padding-right="0cm" loext:decorative="false"/>
      <style:paragraph-properties style:writing-mode="lr-tb"/>
    </style:style>
    <style:style style:name="gr354" style:family="graphic" style:parent-style-name="standard">
      <style:graphic-properties draw:stroke="none" draw:fill="solid" draw:fill-color="#000000" loext:decorative="false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7.964cm" fo:padding-top="0cm" fo:padding-bottom="0cm" fo:padding-left="0cm" fo:padding-right="0cm" loext:decorative="false"/>
      <style:paragraph-properties style:writing-mode="lr-tb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7.666cm" fo:padding-top="0cm" fo:padding-bottom="0cm" fo:padding-left="0cm" fo:padding-right="0cm" loext:decorative="false"/>
      <style:paragraph-properties style:writing-mode="lr-tb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6.88cm" fo:padding-top="0cm" fo:padding-bottom="0cm" fo:padding-left="0cm" fo:padding-right="0cm" loext:decorative="false"/>
      <style:paragraph-properties style:writing-mode="lr-tb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675cm" fo:padding-top="0cm" fo:padding-bottom="0cm" fo:padding-left="0cm" fo:padding-right="0cm" loext:decorative="false"/>
      <style:paragraph-properties style:writing-mode="lr-tb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6.827cm" fo:padding-top="0cm" fo:padding-bottom="0cm" fo:padding-left="0cm" fo:padding-right="0cm" loext:decorative="false"/>
      <style:paragraph-properties style:writing-mode="lr-tb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7.521cm" fo:padding-top="0cm" fo:padding-bottom="0cm" fo:padding-left="0cm" fo:padding-right="0cm" loext:decorative="false"/>
      <style:paragraph-properties style:writing-mode="lr-tb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4.625cm" fo:padding-top="0cm" fo:padding-bottom="0cm" fo:padding-left="0cm" fo:padding-right="0cm" loext:decorative="false"/>
      <style:paragraph-properties style:writing-mode="lr-tb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708cm" fo:padding-top="0cm" fo:padding-bottom="0cm" fo:padding-left="0cm" fo:padding-right="0cm" loext:decorative="false"/>
      <style:paragraph-properties style:writing-mode="lr-tb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1.762cm" fo:padding-top="0cm" fo:padding-bottom="0cm" fo:padding-left="0cm" fo:padding-right="0cm" loext:decorative="false"/>
      <style:paragraph-properties style:writing-mode="lr-tb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6.991cm" fo:padding-top="0cm" fo:padding-bottom="0cm" fo:padding-left="0cm" fo:padding-right="0cm" loext:decorative="false"/>
      <style:paragraph-properties style:writing-mode="lr-tb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7.777cm" fo:padding-top="0cm" fo:padding-bottom="0cm" fo:padding-left="0cm" fo:padding-right="0cm" loext:decorative="false"/>
      <style:paragraph-properties style:writing-mode="lr-tb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185cm" fo:padding-top="0cm" fo:padding-bottom="0cm" fo:padding-left="0cm" fo:padding-right="0cm" loext:decorative="false"/>
      <style:paragraph-properties style:writing-mode="lr-tb"/>
    </style:style>
    <style:style style:name="gr36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936cm" fo:padding-top="0cm" fo:padding-bottom="0cm" fo:padding-left="0cm" fo:padding-right="0cm" loext:decorative="false"/>
      <style:paragraph-properties style:writing-mode="lr-tb"/>
    </style:style>
    <style:style style:name="gr368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5.041cm" fo:padding-top="0cm" fo:padding-bottom="0cm" fo:padding-left="0cm" fo:padding-right="0cm" loext:decorative="false"/>
      <style:paragraph-properties style:writing-mode="lr-tb"/>
    </style:style>
    <style:style style:name="gr36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32cm" fo:padding-top="0cm" fo:padding-bottom="0cm" fo:padding-left="0cm" fo:padding-right="0cm" loext:decorative="false"/>
      <style:paragraph-properties style:writing-mode="lr-tb"/>
    </style:style>
    <style:style style:name="gr37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7.934cm" fo:padding-top="0cm" fo:padding-bottom="0cm" fo:padding-left="0cm" fo:padding-right="0cm" loext:decorative="false"/>
      <style:paragraph-properties style:writing-mode="lr-tb"/>
    </style:style>
    <style:style style:name="gr37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7.44cm" fo:padding-top="0cm" fo:padding-bottom="0cm" fo:padding-left="0cm" fo:padding-right="0cm" loext:decorative="false"/>
      <style:paragraph-properties style:writing-mode="lr-tb"/>
    </style:style>
    <style:style style:name="gr37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7.836cm" fo:padding-top="0cm" fo:padding-bottom="0cm" fo:padding-left="0cm" fo:padding-right="0cm" loext:decorative="false"/>
      <style:paragraph-properties style:writing-mode="lr-tb"/>
    </style:style>
    <style:style style:name="gr37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36cm" fo:padding-top="0cm" fo:padding-bottom="0cm" fo:padding-left="0cm" fo:padding-right="0cm" loext:decorative="false"/>
      <style:paragraph-properties style:writing-mode="lr-tb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6.137cm" fo:padding-top="0cm" fo:padding-bottom="0cm" fo:padding-left="0cm" fo:padding-right="0cm" loext:decorative="false"/>
      <style:paragraph-properties style:writing-mode="lr-tb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9.83cm" fo:padding-top="0cm" fo:padding-bottom="0cm" fo:padding-left="0cm" fo:padding-right="0cm" loext:decorative="false"/>
      <style:paragraph-properties style:writing-mode="lr-tb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449cm" fo:padding-top="0cm" fo:padding-bottom="0cm" fo:padding-left="0cm" fo:padding-right="0cm" loext:decorative="false"/>
      <style:paragraph-properties style:writing-mode="lr-tb"/>
    </style:style>
    <style:style style:name="gr37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2.596cm" fo:padding-top="0cm" fo:padding-bottom="0cm" fo:padding-left="0cm" fo:padding-right="0cm" loext:decorative="false"/>
      <style:paragraph-properties style:writing-mode="lr-tb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4.619cm" fo:padding-top="0cm" fo:padding-bottom="0cm" fo:padding-left="0cm" fo:padding-right="0cm" loext:decorative="false"/>
      <style:paragraph-properties style:writing-mode="lr-tb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444cm" fo:padding-top="0cm" fo:padding-bottom="0cm" fo:padding-left="0cm" fo:padding-right="0cm" loext:decorative="false"/>
      <style:paragraph-properties style:writing-mode="lr-tb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3.652cm" fo:padding-top="0cm" fo:padding-bottom="0cm" fo:padding-left="0cm" fo:padding-right="0cm" loext:decorative="false"/>
      <style:paragraph-properties style:writing-mode="lr-tb"/>
    </style:style>
    <style:style style:name="gr38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929cm" fo:padding-top="0cm" fo:padding-bottom="0cm" fo:padding-left="0cm" fo:padding-right="0cm" loext:decorative="false"/>
      <style:paragraph-properties style:writing-mode="lr-tb"/>
    </style:style>
    <style:style style:name="gr38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6.73cm" fo:padding-top="0cm" fo:padding-bottom="0cm" fo:padding-left="0cm" fo:padding-right="0cm" loext:decorative="false"/>
      <style:paragraph-properties style:writing-mode="lr-tb"/>
    </style:style>
    <style:style style:name="gr38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45cm" fo:padding-top="0cm" fo:padding-bottom="0cm" fo:padding-left="0cm" fo:padding-right="0cm" loext:decorative="false"/>
      <style:paragraph-properties style:writing-mode="lr-tb"/>
    </style:style>
    <style:style style:name="gr38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4.1cm" fo:padding-top="0cm" fo:padding-bottom="0cm" fo:padding-left="0cm" fo:padding-right="0cm" loext:decorative="false"/>
      <style:paragraph-properties style:writing-mode="lr-tb"/>
    </style:style>
    <style:style style:name="gr38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8.251cm" fo:padding-top="0cm" fo:padding-bottom="0cm" fo:padding-left="0cm" fo:padding-right="0cm" loext:decorative="false"/>
      <style:paragraph-properties style:writing-mode="lr-tb"/>
    </style:style>
    <style:style style:name="gr38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895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style:font-name="FreeSerif" fo:font-size="24pt" style:font-size-asian="24pt" style:font-size-complex="24pt"/>
    </style:style>
    <style:style style:name="P3" style:family="paragraph">
      <loext:graphic-properties draw:fill="none"/>
      <style:text-properties fo:font-size="24pt" style:font-size-asian="24pt" style:font-size-complex="24pt"/>
    </style:style>
    <style:style style:name="P4" style:family="paragraph">
      <loext:graphic-properties draw:fill="none"/>
      <style:text-properties fo:font-size="3.90000009536743pt" style:font-size-asian="3.90000009536743pt" style:font-size-complex="3.90000009536743pt"/>
    </style:style>
    <style:style style:name="P5" style:family="paragraph">
      <loext:graphic-properties draw:fill="solid" draw:fill-color="#4f81bd"/>
    </style:style>
    <style:style style:name="P6" style:family="paragraph">
      <loext:graphic-properties draw:fill="none"/>
      <style:text-properties style:font-name="FreeSerif" fo:font-size="27.8999996185303pt" style:font-size-asian="27.8999996185303pt" style:font-size-complex="27.8999996185303pt"/>
    </style:style>
    <style:style style:name="P7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8" style:family="paragraph">
      <loext:graphic-properties draw:fill="none"/>
      <style:text-properties style:font-size-asian="14.1000003814697pt"/>
    </style:style>
    <style:style style:name="P9" style:family="paragraph">
      <style:paragraph-properties fo:text-align="start"/>
      <style:text-properties style:font-size-asian="12pt" style:font-size-complex="12pt"/>
    </style:style>
    <style:style style:name="P10" style:family="paragraph">
      <loext:graphic-properties draw:fill="solid" draw:fill-color="#ffffff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  <style:text-properties fo:font-size="9.89999961853027pt" style:font-size-asian="9.89999961853027pt" style:font-size-complex="9.89999961853027pt"/>
    </style:style>
    <style:style style:name="P13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4" style:family="paragraph">
      <loext:graphic-properties draw:fill="none"/>
      <style:text-properties fo:color="#77bc65" loext:opacity="100%" style:font-name="FreeSerif" fo:font-size="14.1000003814697pt" style:font-size-asian="14.1000003814697pt" style:font-size-complex="14.1000003814697pt"/>
    </style:style>
    <style:style style:name="P15" style:family="paragraph">
      <loext:graphic-properties draw:fill="none"/>
      <style:paragraph-properties fo:text-align="start"/>
      <style:text-properties fo:font-size="11.1000003814697pt" style:font-size-asian="11.1000003814697pt" style:font-size-complex="11.1000003814697pt"/>
    </style:style>
    <style:style style:name="P16" style:family="paragraph">
      <style:text-properties style:font-size-asian="3.90000009536743pt" style:font-size-complex="3.90000009536743pt"/>
    </style:style>
    <style:style style:name="P17" style:family="paragraph">
      <style:text-properties style:font-size-asian="9.89999961853027pt" style:font-size-complex="9.89999961853027pt"/>
    </style:style>
    <style:style style:name="P18" style:family="paragraph">
      <loext:graphic-properties draw:fill="none"/>
      <style:paragraph-properties fo:text-align="start"/>
      <style:text-properties fo:color="#c9211e" loext:opacity="100%" style:font-size-asian="14.1000003814697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text-indent="0cm" style:writing-mode="lr-tb"/>
    </style:style>
    <style:style style:name="P25" style:family="paragraph">
      <style:paragraph-properties fo:margin-left="0cm" fo:margin-right="0cm" fo:text-indent="0cm"/>
      <style:text-properties fo:font-variant="normal" fo:text-transform="none" style:use-window-font-color="true" loext:opacity="0%" style:text-outline="false" style:text-line-through-style="none" style:text-line-through-type="none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indent="0cm" style:writing-mode="lr-tb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text-properties style:font-size-asian="12pt" style:font-size-complex="12pt"/>
    </style:style>
    <style:style style:name="P29" style:family="paragraph">
      <loext:graphic-properties draw:fill="solid" draw:fill-color="#ffffff" draw:opacity="66%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text-properties style:font-size-asian="13pt"/>
    </style:style>
    <style:style style:name="P32" style:family="paragraph">
      <style:paragraph-properties fo:text-align="start"/>
    </style:style>
    <style:style style:name="P33" style:family="paragraph">
      <loext:graphic-properties draw:fill="none" draw:fill-color="#ffffff"/>
      <style:paragraph-properties fo:text-align="start"/>
    </style:style>
    <style:style style:name="P3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ffffff"/>
    </style:style>
    <style:style style:name="P5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text-align="start"/>
      <style:text-properties fo:font-weight="normal" style:font-size-asian="22pt" style:font-weight-asian="normal" style:font-size-complex="22pt" style:font-weight-complex="normal"/>
    </style:style>
    <style:style style:name="P5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none"/>
      <style:paragraph-properties fo:text-align="start"/>
      <style:text-properties style:font-size-asian="13pt"/>
    </style:style>
    <style:style style:name="P63" style:family="paragraph">
      <style:paragraph-properties fo:text-align="start"/>
      <style:text-properties fo:font-weight="normal" style:font-size-asian="12pt" style:font-weight-asian="normal" style:font-size-complex="12pt" style:font-weight-complex="normal"/>
    </style:style>
    <style:style style:name="P64" style:family="paragraph">
      <loext:graphic-properties draw:fill="none"/>
      <style:paragraph-properties fo:text-align="center"/>
    </style:style>
    <style:style style:name="P6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8" style:family="paragraph">
      <style:paragraph-properties fo:margin-left="0cm" fo:margin-right="0cm" fo:margin-top="0.42cm" fo:margin-bottom="0.35cm" fo:line-height="100%" fo:text-indent="0cm" style:writing-mode="lr-tb"/>
    </style:style>
    <style:style style:name="P69" style:family="paragraph">
      <style:paragraph-properties fo:text-align="left" style:writing-mode="lr-tb"/>
    </style:style>
    <style:style style:name="P70" style:family="paragraph">
      <style:paragraph-properties fo:text-align="left"/>
    </style:style>
    <style:style style:name="P71" style:family="paragraph">
      <style:paragraph-properties fo:margin-left="0cm" fo:margin-right="0cm" fo:text-align="left" fo:text-indent="0cm" style:writing-mode="lr-tb"/>
    </style:style>
    <style:style style:name="P72" style:family="paragraph">
      <style:paragraph-properties fo:margin-left="0cm" fo:margin-right="0cm" fo:text-align="left" fo:text-indent="0cm"/>
    </style:style>
    <style:style style:name="P73" style:family="paragraph">
      <style:paragraph-properties fo:margin-top="0.051cm" fo:margin-bottom="0.051cm" fo:line-height="115%" fo:text-align="start" style:text-autospace="none" style:writing-mode="lr-tb"/>
    </style:style>
    <style:style style:name="P74" style:family="paragraph">
      <style:paragraph-properties fo:margin-left="0cm" fo:margin-right="0cm" fo:margin-top="0.051cm" fo:margin-bottom="0.051cm" fo:line-height="115%" fo:text-align="start" fo:text-indent="0cm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ffffff"/>
      <style:paragraph-properties fo:margin-left="0cm" fo:margin-right="0cm" fo:margin-top="0.051cm" fo:margin-bottom="0.051cm" fo:line-height="115%" fo:text-align="start" fo:text-indent="0cm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style:paragraph-properties fo:margin-top="0.42cm" fo:margin-bottom="0.35cm" fo:line-height="115%" fo:text-align="start" style:text-autospace="none" style:writing-mode="lr-tb"/>
      <style:text-properties fo:font-size="22pt" fo:font-weight="bold" style:font-size-asian="22pt" style:font-weight-asian="bold" style:font-size-complex="22pt" style:font-weight-complex="bold"/>
    </style:style>
    <style:style style:name="P77" style:family="paragraph">
      <style:paragraph-properties fo:margin-top="0.42cm" fo:margin-bottom="0.35cm" fo:line-height="115%" fo:text-align="start" style:text-autospace="none"/>
      <style:text-properties fo:font-size="22pt" fo:font-weight="bold" style:font-size-asian="22pt" style:font-weight-asian="bold" style:font-size-complex="22pt" style:font-weight-complex="bold"/>
    </style:style>
    <style:style style:name="P78" style:family="paragraph">
      <style:paragraph-properties fo:margin-left="1cm" fo:margin-right="0cm" fo:margin-top="0.051cm" fo:margin-bottom="0.051cm" fo:line-height="115%" fo:text-align="start" fo:text-indent="0cm" style:text-autospace="none" style:writing-mode="lr-tb"/>
      <style:text-properties style:font-name="FreeSans1" fo:font-size="12pt"/>
    </style:style>
    <style:style style:name="P79" style:family="paragraph">
      <style:paragraph-properties fo:margin-left="1cm" fo:margin-right="0cm" fo:margin-top="0.42cm" fo:margin-bottom="0.35cm" fo:line-height="115%" fo:text-align="start" fo:text-indent="0cm" style:text-autospace="none" style:writing-mode="lr-tb"/>
      <style:text-properties fo:font-size="10pt" style:font-size-asian="10pt" style:font-size-complex="10pt"/>
    </style:style>
    <style:style style:name="P80" style:family="paragraph">
      <style:text-properties fo:font-size="16pt" style:font-size-asian="16pt" style:font-size-complex="16pt"/>
    </style:style>
    <style:style style:name="P81" style:family="paragraph">
      <loext:graphic-properties draw:fill="none"/>
      <style:text-properties fo:font-size="16pt" style:font-size-asian="16pt" style:font-size-complex="16pt"/>
    </style:style>
    <style:style style:name="P82" style:family="paragraph">
      <loext:graphic-properties draw:fill="none"/>
      <style:text-properties fo:font-size="10pt" style:font-size-asian="10pt" style:font-size-complex="10pt"/>
    </style:style>
    <style:style style:name="P83" style:family="paragraph">
      <style:paragraph-properties fo:margin-top="0.051cm" fo:margin-bottom="0.051cm" fo:line-height="115%" fo:text-align="start" style:text-autospace="none" style:writing-mode="lr-tb"/>
      <style:text-properties fo:color="#4f81bd" loext:opacity="100%"/>
    </style:style>
    <style:style style:name="P84" style:family="paragraph">
      <loext:graphic-properties draw:fill="none"/>
      <style:text-properties fo:color="#4f81bd" loext:opacity="100%" style:font-size-asian="13pt"/>
    </style:style>
    <style:style style:name="P8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86" style:family="paragraph">
      <loext:graphic-properties draw:fill="none"/>
      <style:text-properties fo:font-size="13pt" style:font-size-asian="13pt" style:font-size-complex="13pt"/>
    </style:style>
    <style:style style:name="P87" style:family="paragraph">
      <loext:graphic-properties draw:fill="none"/>
      <style:text-properties fo:font-size="12pt" style:font-size-asian="12pt" style:font-size-complex="12pt"/>
    </style:style>
    <style:style style:name="P88" style:family="paragraph">
      <loext:graphic-properties draw:fill="solid" draw:fill-color="#000000"/>
    </style:style>
    <style:style style:name="T1" style:family="text">
      <style:text-properties fo:color="#17365d" loext:opacity="100%" style:font-name="FreeSerif" fo:font-size="24pt" fo:font-style="italic" fo:font-weight="bold" style:font-name-asian="Cambria" style:font-size-asian="24pt" style:font-style-asian="italic" style:font-weight-asian="bold" style:font-name-complex="Cambria" style:font-size-complex="24pt" style:font-style-complex="italic" style:font-weight-complex="bold"/>
    </style:style>
    <style:style style:name="T2" style:family="text">
      <style:text-properties fo:color="#17365d" loext:opacity="100%" style:font-name="FreeSerif" fo:font-size="24pt" fo:font-weight="normal" style:font-name-asian="Cambria" style:font-size-asian="24pt" style:font-weight-asian="normal" style:font-name-complex="Cambria" style:font-size-complex="24pt" style:font-weight-complex="normal"/>
    </style:style>
    <style:style style:name="T3" style:family="text">
      <style:text-properties fo:color="#17365d" loext:opacity="100%" style:font-name="Cambria" fo:font-size="24pt" fo:font-weight="normal" style:font-name-asian="Cambria" style:font-size-asian="24pt" style:font-weight-asian="normal" style:font-name-complex="Cambria" style:font-size-complex="24pt" style:font-weight-complex="normal"/>
    </style:style>
    <style:style style:name="T4" style:family="text">
      <style:text-properties fo:color="#17365d" loext:opacity="100%" style:font-name="Cambria" fo:font-size="3.90000009536743pt" fo:font-weight="normal" style:font-name-asian="Cambria" style:font-size-asian="3.90000009536743pt" style:font-weight-asian="normal" style:font-name-complex="Cambria" style:font-size-complex="3.90000009536743pt" style:font-weight-complex="normal"/>
    </style:style>
    <style:style style:name="T5" style:family="text">
      <style:text-properties fo:color="#17365d" loext:opacity="100%" style:font-name="FreeSerif" fo:font-size="27.8999996185303pt" fo:font-weight="normal" style:font-name-asian="Cambria" style:font-size-asian="27.8999996185303pt" style:font-weight-asian="normal" style:font-name-complex="Cambria" style:font-size-complex="27.8999996185303pt" style:font-weight-complex="normal"/>
    </style:style>
    <style:style style:name="T6" style:family="text">
      <style:text-properties fo:color="#000000" loext:opacity="100%" style:font-name="Calibri" fo:font-size="11.1000003814697pt" fo:font-style="italic" fo:font-weight="normal" style:font-name-asian="Calibri" style:font-size-asian="11.1000003814697pt" style:font-style-asian="italic" style:font-weight-asian="normal" style:font-name-complex="Calibri" style:font-size-complex="11.1000003814697pt" style:font-style-complex="italic" style:font-weight-complex="normal"/>
    </style:style>
    <style:style style:name="T7" style:family="text">
      <style:text-properties fo:color="#365f91" loext:opacity="100%" fo:font-weight="bold" style:font-size-asian="14.1000003814697pt" style:font-weight-asian="bold" style:font-weight-complex="bold"/>
    </style:style>
    <style:style style:name="T8" style:family="text">
      <style:text-properties fo:color="#000000" loext:opacity="100%" fo:font-weight="normal" style:font-name-asian="Calibri" style:font-size-asian="12pt" style:font-weight-asian="normal" style:font-name-complex="Calibri" style:font-size-complex="12pt" style:font-weight-complex="normal"/>
    </style:style>
    <style:style style:name="T9" style:family="text">
      <style:text-properties fo:color="#c9211e" loext:opacity="100%" fo:font-weight="bold" style:font-name-asian="Calibri" style:font-size-asian="12pt" style:font-weight-asian="bold" style:font-name-complex="Calibri" style:font-size-complex="12pt" style:font-weight-complex="bold"/>
    </style:style>
    <style:style style:name="T10" style:family="text">
      <style:text-properties fo:color="#77bc65" loext:opacity="100%" fo:font-weight="bold" style:font-name-asian="Calibri" style:font-size-asian="12pt" style:font-weight-asian="bold" style:font-name-complex="Calibri" style:font-size-complex="12pt" style:font-weight-complex="bold"/>
    </style:style>
    <style:style style:name="T11" style:family="text">
      <style:text-properties fo:color="#5983b0" loext:opacity="100%" fo:font-weight="bold" style:font-name-asian="Calibri" style:font-size-asian="12pt" style:font-weight-asian="bold" style:font-name-complex="Calibri" style:font-size-complex="12pt" style:font-weight-complex="bold"/>
    </style:style>
    <style:style style:name="T12" style:family="text">
      <style:text-properties fo:color="#000000" loext:opacity="100%" style:font-name="FreeSerif" fo:font-size="9.89999961853027pt" fo:font-weight="normal" style:font-name-asian="Calibri" style:font-size-asian="9.89999961853027pt" style:font-weight-asian="normal" style:font-name-complex="Calibri" style:font-size-complex="9.89999961853027pt" style:font-weight-complex="normal"/>
    </style:style>
    <style:style style:name="T13" style:family="text">
      <style:text-properties fo:color="#000000" loext:opacity="100%" style:font-name="Calibri" fo:font-size="9.89999961853027pt" fo:font-weight="normal" style:font-name-asian="Calibri" style:font-size-asian="9.89999961853027pt" style:font-weight-asian="normal" style:font-name-complex="Calibri" style:font-size-complex="9.89999961853027pt" style:font-weight-complex="normal"/>
    </style:style>
    <style:style style:name="T14" style:family="text">
      <style:text-properties fo:color="#77bc65" loext:opacity="100%" style:font-name="FreeSerif" fo:font-size="14.1000003814697pt" fo:font-weight="bold" style:font-name-asian="Cambria" style:font-size-asian="14.1000003814697pt" style:font-weight-asian="bold" style:font-name-complex="Cambria" style:font-size-complex="14.1000003814697pt" style:font-weight-complex="bold"/>
    </style:style>
    <style:style style:name="T15" style:family="text">
      <style:text-properties style:use-window-font-color="true" loext:opacity="0%" fo:font-weight="normal" style:font-name-asian="Calibri" style:font-size-asian="12pt" style:font-weight-asian="normal" style:font-name-complex="Calibri" style:font-size-complex="12pt" style:font-weight-complex="normal"/>
    </style:style>
    <style:style style:name="T16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17" style:family="text">
      <style:text-properties fo:color="#17365d" loext:opacity="100%" fo:font-weight="normal" style:font-name-asian="Cambria" style:font-size-asian="3.90000009536743pt" style:font-weight-asian="normal" style:font-name-complex="Cambria" style:font-size-complex="3.90000009536743pt" style:font-weight-complex="normal"/>
    </style:style>
    <style:style style:name="T18" style:family="text">
      <style:text-properties fo:color="#000000" loext:opacity="100%" fo:font-weight="normal" style:font-name-asian="Calibri" style:font-size-asian="9.89999961853027pt" style:font-weight-asian="normal" style:font-name-complex="Calibri" style:font-size-complex="9.89999961853027pt" style:font-weight-complex="normal"/>
    </style:style>
    <style:style style:name="T19" style:family="text">
      <style:text-properties fo:color="#c9211e" loext:opacity="100%" fo:font-weight="bold" style:font-size-asian="14.1000003814697pt" style:font-weight-asian="bold" style:font-weight-complex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77bc65" loext:opacity="100%" style:text-outline="false" style:text-line-through-style="none" style:text-line-through-type="none" style:font-name="Calibri" fo:font-size="12pt" fo:language="zxx" fo:country="none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4f81bd" loext:opacity="100%" fo:font-weight="bold" style:font-size-asian="13pt" style:font-weight-asian="bold" style:font-weight-complex="bold"/>
    </style:style>
    <style:style style:name="T26" style:family="text">
      <style:text-properties fo:color="#000000" loext:opacity="100%" fo:font-weight="normal" style:font-name-asian="Calibri" style:font-weight-asian="normal" style:font-weight-complex="normal"/>
    </style:style>
    <style:style style:name="T27" style:family="text">
      <style:text-properties fo:color="#c9211e" loext:opacity="100%" fo:font-weight="bold" style:font-name-asian="Calibri" style:font-weight-asian="bold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9211e" loext:opacity="100%" style:text-outline="false" style:text-line-through-style="none" style:text-line-through-type="none" style:font-name="Calibri" fo:font-size="8pt" fo:language="zxx" fo:country="none" fo:font-style="normal" fo:text-shadow="none" style:text-underline-style="none" fo:font-weight="bold" style:letter-kerning="true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77bc65" loext:opacity="100%" style:text-outline="false" style:text-line-through-style="none" style:text-line-through-type="none" style:font-name="Calibri" fo:font-size="8pt" fo:language="zxx" fo:country="none" fo:font-style="normal" fo:text-shadow="none" style:text-underline-style="none" fo:font-weight="bold" style:letter-kerning="true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weight="normal" style:font-name-asian="Calibri" style:font-size-asian="12pt" style:font-weight-asian="normal" style:font-name-complex="Calibri" style:font-size-complex="12pt" style:font-weight-complex="normal"/>
    </style:style>
    <style:style style:name="T34" style:family="text">
      <style:text-properties fo:color="#729fcf" loext:opacity="100%" fo:font-weight="bold" style:font-name-asian="Calibri" style:font-size-asian="12pt" style:font-weight-asian="bold" style:font-name-complex="Calibri" style:font-size-complex="12pt" style:font-weight-complex="bold"/>
    </style:style>
    <style:style style:name="T35" style:family="text">
      <style:text-properties fo:font-weight="normal" style:font-name-asian="FreeSerif1" style:font-size-asian="12pt" style:font-weight-asian="normal" style:font-name-complex="FreeSerif1" style:font-size-complex="12pt" style:font-weight-complex="normal"/>
    </style:style>
    <style:style style:name="T36" style:family="text">
      <style:text-properties fo:font-weight="bold" style:font-name-asian="Calibri" style:font-size-asian="12pt" style:font-weight-asian="bold" style:font-name-complex="Calibri" style:font-size-complex="12pt" style:font-weight-complex="bold"/>
    </style:style>
    <style:style style:name="T37" style:family="text">
      <style:text-properties fo:color="#000000" loext:opacity="100%" fo:font-style="normal" fo:font-weight="normal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/>
    </style:style>
    <style:style style:name="T38" style:family="text">
      <style:text-properties fo:color="#000000" loext:opacity="100%" fo:font-style="normal" style:text-underline-style="none" fo:font-weight="normal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/>
    </style:style>
    <style:style style:name="T39" style:family="text">
      <style:text-properties fo:color="#000000" loext:opacity="100%" fo:font-style="normal" style:text-underline-style="none" fo:font-weight="normal" style:font-name-asian="FreeSerif1" style:font-size-asian="12pt" style:font-style-asian="normal" style:font-weight-asian="normal" style:font-name-complex="FreeSerif1" style:font-size-complex="12pt" style:font-style-complex="normal" style:font-weight-complex="normal"/>
    </style:style>
    <style:style style:name="T40" style:family="text">
      <style:text-properties fo:color="#000000" loext:opacity="100%" style:text-position="sub 58%" fo:font-style="normal" style:text-underline-style="none" fo:font-weight="normal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/>
    </style:style>
    <style:style style:name="T41" style:family="text">
      <style:text-properties fo:color="#000000" loext:opacity="100%" style:text-position="0% 100%" fo:font-style="normal" style:text-underline-style="none" fo:font-weight="normal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/>
    </style:style>
    <style:style style:name="T42" style:family="text">
      <style:text-properties fo:color="#000000" loext:opacity="100%" style:text-position="0% 100%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43" style:family="text">
      <style:text-properties style:font-size-asian="12pt" style:font-size-complex="12pt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729fcf" loext:opacity="100%" style:text-outline="false" style:text-line-through-style="none" style:text-line-through-type="none" fo:language="zxx" fo:country="none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fo:language="zxx" fo:country="none" fo:font-style="normal" fo:text-shadow="none" style:text-underline-style="none" fo:font-weight="normal" style:letter-kerning="true" style:font-name-asian="FreeSerif1" style:font-size-asian="12pt" style:font-style-asian="normal" style:font-weight-asian="normal" style:font-name-complex="FreeSerif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77bc65" loext:opacity="100%" style:text-outline="false" style:text-line-through-style="none" style:text-line-through-type="none" fo:language="zxx" fo:country="none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fo:language="zxx" fo:country="none" fo:text-shadow="none" style:text-underline-style="none" fo:font-weight="normal" style:letter-kerning="true" style:font-name-asian="FreeSerif1" style:font-weight-asian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fo:language="zxx" fo:country="none" fo:font-style="normal" fo:text-shadow="none" style:text-underline-style="none" fo:font-weight="normal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-asian="Calibri" style:font-size-asian="12pt" style:font-name-complex="Calibri" style:font-size-complex="12pt"/>
    </style:style>
    <style:style style:name="T51" style:family="text">
      <style:text-properties style:font-name="FreeSans1" fo:font-size="12pt" style:font-name-asian="Calibri" style:font-size-asian="12pt" style:font-name-complex="Calibri" style:font-size-complex="12pt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font-name="FreeSans1" fo:font-size="12pt" fo:language="zxx" fo:country="none" fo:text-shadow="none" style:text-underline-style="none" fo:font-weight="normal" style:letter-kerning="true" style:font-name-asian="FreeSerif1" style:font-size-asian="12pt" style:font-weight-asian="normal" style:font-name-complex="Calibri" style:font-size-complex="12pt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Free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729fcf" loext:opacity="100%" style:text-outline="false" style:text-line-through-style="none" style:text-line-through-type="none" style:font-name="FreeSans1" fo:font-size="12pt" fo:language="zxx" fo:country="none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Free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c9211e" loext:opacity="100%" style:text-outline="false" style:text-line-through-style="none" style:text-line-through-type="none" style:font-name="FreeSans1" fo:font-size="12pt" fo:language="zxx" fo:country="none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FreeSans1" fo:font-size="12pt" fo:language="zxx" fo:country="none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Noto Sans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fo:language="zxx" fo:country="none" fo:text-shadow="none" style:text-underline-style="none" fo:font-weight="normal" style:letter-kerning="true" style:font-name-asian="FreeSerif1" style:font-size-asian="12pt" style:font-weight-asian="normal" style:font-name-complex="Calibri" style:font-size-complex="12pt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729fcf" loext:opacity="100%" style:text-outline="false" style:text-line-through-style="none" style:text-line-through-type="none" style:font-name="FreeSans1" fo:font-size="8pt" fo:language="zxx" fo:country="none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text-outline="false" style:text-line-through-style="none" style:text-line-through-type="none" style:font-name="FreeSans1" fo:font-size="12pt" fo:language="zxx" fo:country="none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FreeSans1" fo:font-size="12pt" fo:language="zxx" fo:country="none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font-name="FreeSans1" fo:font-size="12pt" fo:language="zxx" fo:country="none" fo:font-style="normal" fo:text-shadow="none" style:text-underline-style="none" fo:font-weight="normal" style:letter-kerning="true" style:font-name-asian="FreeSerif1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c9211e" loext:opacity="100%" style:text-outline="false" style:text-line-through-style="none" style:text-line-through-type="none" style:font-name="FreeSans1" fo:font-size="12pt" fo:language="zxx" fo:country="none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loext:opacity="100%" style:text-outline="false" style:text-line-through-style="none" style:text-line-through-type="none" style:font-name="FreeSans1" fo:font-size="12pt" fo:language="zxx" fo:country="none" fo:font-style="normal" fo:text-shadow="none" style:text-underline-style="none" fo:font-weight="normal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loext:opacity="100%" style:text-outline="false" style:text-line-through-style="none" style:text-line-through-type="none" style:font-name="FreeSans1" fo:font-size="12pt" fo:language="zxx" fo:country="none" fo:font-style="italic" fo:text-shadow="none" style:text-underline-style="none" fo:font-weight="normal" style:letter-kerning="true" style:font-name-asian="Calibri" style:font-size-asian="12pt" style:font-style-asian="italic" style:font-weight-asian="normal" style:font-name-complex="Calib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9211e" loext:opacity="100%" style:text-outline="false" style:text-line-through-style="none" style:text-line-through-type="none" style:font-name="FreeSans1" fo:font-size="12pt" fo:language="zxx" fo:country="none" fo:font-style="normal" fo:text-shadow="none" style:text-underline-style="none" fo:font-weight="bold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c9211e" loext:opacity="100%" style:text-outline="false" style:text-line-through-style="none" style:text-line-through-type="none" style:font-name="FreeSans1" fo:font-size="12pt" fo:language="zxx" fo:country="none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font-name="FreeSans1" fo:font-size="12pt" fo:language="zxx" fo:country="none" fo:text-shadow="none" style:text-underline-style="none" fo:font-weight="normal" style:letter-kerning="true" fo:background-color="transparent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loext:opacity="100%" style:text-outline="false" style:text-line-through-style="none" style:text-line-through-type="none" style:font-name="FreeSans1" fo:font-size="12pt" fo:language="zxx" fo:country="none" fo:text-shadow="none" style:text-underline-style="none" fo:font-weight="normal" style:letter-kerning="true" fo:background-color="#729fcf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text-outline="false" style:text-line-through-style="none" style:text-line-through-type="none" style:font-name="FreeSans1" fo:font-size="12pt" fo:language="zxx" fo:country="none" fo:text-shadow="none" style:text-underline-style="none" fo:font-weight="normal" style:letter-kerning="true" fo:background-color="#729fcf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text-outline="false" style:text-line-through-style="none" style:text-line-through-type="none" style:font-name="FreeSans1" fo:font-size="12pt" fo:language="zxx" fo:country="none" fo:text-shadow="none" style:text-underline-style="none" fo:font-weight="normal" style:letter-kerning="true" fo:background-color="#5eb91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text-outline="false" style:text-line-through-style="none" style:text-line-through-type="none" style:font-name="FreeSans2" fo:font-size="12pt" fo:language="zxx" fo:country="none" fo:font-style="normal" fo:text-shadow="none" style:text-underline-style="none" fo:font-weight="normal" style:letter-kerning="true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text-outline="false" style:text-line-through-style="none" style:text-line-through-type="none" style:font-name="FreeSans2" fo:font-size="12pt" fo:language="zxx" fo:country="none" fo:font-style="normal" fo:text-shadow="none" style:text-underline-style="none" fo:font-weight="normal" style:letter-kerning="true" fo:background-color="#5eb91e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font-name="FreeSans2" fo:font-size="12pt" fo:language="zxx" fo:country="none" fo:font-style="normal" fo:text-shadow="none" style:text-underline-style="none" fo:font-weight="normal" style:letter-kerning="true" fo:background-color="#e96666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text-outline="false" style:text-line-through-style="none" style:text-line-through-type="none" style:text-position="0% 100%" style:font-name="TexMaths Symbols1" fo:font-size="12pt" fo:letter-spacing="normal" fo:language="zxx" fo:country="none" fo:font-style="normal" fo:text-shadow="none" style:text-underline-style="none" fo:font-weight="normal" style:letter-kerning="true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text-outline="false" style:text-line-through-style="none" style:text-line-through-type="none" style:text-position="super 58%" style:font-name="TexMaths Symbols1" fo:font-size="12pt" fo:letter-spacing="normal" fo:language="zxx" fo:country="none" fo:font-style="normal" fo:text-shadow="none" style:text-underline-style="none" fo:font-weight="normal" style:letter-kerning="true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text-outline="false" style:text-line-through-style="none" style:text-line-through-type="none" style:text-position="0% 100%" style:font-name="TexMaths Symbols1" fo:font-size="12pt" fo:language="zxx" fo:country="none" fo:font-style="normal" fo:text-shadow="none" style:text-underline-style="none" fo:font-weight="normal" style:letter-kerning="true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text-outline="false" style:text-line-through-style="none" style:text-line-through-type="none" style:text-position="sub 58%" style:font-name="TexMaths Symbols1" fo:font-size="12pt" fo:language="zxx" fo:country="none" fo:font-style="normal" fo:text-shadow="none" style:text-underline-style="none" fo:font-weight="normal" style:letter-kerning="true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text-outline="false" style:text-line-through-style="none" style:text-line-through-type="none" style:text-position="super 58%" style:font-name="TexMaths Symbols1" fo:font-size="12pt" fo:letter-spacing="-0.471cm" fo:language="zxx" fo:country="none" fo:font-style="normal" fo:text-shadow="none" style:text-underline-style="none" fo:font-weight="normal" style:letter-kerning="true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text-outline="false" style:text-line-through-style="none" style:text-line-through-type="none" style:text-position="0% 100%" style:font-name="TexMaths Symbols" fo:font-size="12pt" fo:letter-spacing="normal" fo:language="zxx" fo:country="none" fo:font-style="normal" fo:text-shadow="none" style:text-underline-style="none" fo:font-weight="normal" style:letter-kerning="true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text-outline="false" style:text-line-through-style="none" style:text-line-through-type="none" style:text-position="sub 58%" style:font-name="TexMaths Symbols" fo:font-size="12pt" fo:letter-spacing="normal" fo:language="zxx" fo:country="none" fo:font-style="normal" fo:text-shadow="none" style:text-underline-style="none" fo:font-weight="normal" style:letter-kerning="true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text-outline="false" style:text-line-through-style="none" style:text-line-through-type="none" style:text-position="0% 100%" style:font-name="TexMaths Symbols1" fo:font-size="16pt" fo:language="zxx" fo:country="none" fo:font-style="normal" fo:text-shadow="none" style:text-underline-style="none" fo:font-weight="normal" style:letter-kerning="true" style:font-name-asian="TexMaths Symbols1" style:font-size-asian="16pt" style:font-style-asian="normal" style:font-weight-asian="normal" style:font-name-complex="TexMaths Symbol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text-outline="false" style:text-line-through-style="none" style:text-line-through-type="none" style:text-position="0% 100%" style:font-name="TexMaths Symbols1" fo:font-size="16pt" fo:language="zxx" fo:country="none" fo:font-style="normal" fo:text-shadow="none" style:text-underline-style="none" fo:font-weight="normal" style:letter-kerning="true" fo:background-color="#729fcf" style:font-name-asian="TexMaths Symbols1" style:font-size-asian="16pt" style:font-style-asian="normal" style:font-weight-asian="normal" style:font-name-complex="TexMaths Symbol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text-outline="false" style:text-line-through-style="none" style:text-line-through-type="none" style:text-position="0% 100%" style:font-name="TexMaths Symbols1" fo:font-size="16pt" fo:language="zxx" fo:country="none" fo:font-style="normal" fo:text-shadow="none" style:text-underline-style="none" fo:font-weight="normal" style:letter-kerning="true" fo:background-color="#5eb91e" style:font-name-asian="TexMaths Symbols1" style:font-size-asian="16pt" style:font-style-asian="normal" style:font-weight-asian="normal" style:font-name-complex="TexMaths Symbol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exMaths Symbols1" fo:font-size="16pt" fo:letter-spacing="normal" fo:language="zxx" fo:country="none" fo:font-style="normal" fo:text-shadow="none" style:text-underline-style="none" fo:font-weight="normal" style:letter-kerning="true" fo:background-color="#e96666" style:font-name-asian="TexMaths Symbols1" style:font-size-asian="16pt" style:font-style-asian="normal" style:font-weight-asian="normal" style:font-name-complex="TexMaths Symbol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exMaths Symbols1" fo:font-size="16pt" fo:letter-spacing="normal" fo:language="zxx" fo:country="none" fo:font-style="normal" fo:text-shadow="none" style:text-underline-style="none" fo:font-weight="normal" style:letter-kerning="true" fo:background-color="transparent" style:font-name-asian="TexMaths Symbols1" style:font-size-asian="16pt" style:font-style-asian="normal" style:font-weight-asian="normal" style:font-name-complex="TexMaths Symbol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text-outline="false" style:text-line-through-style="none" style:text-line-through-type="none" style:text-position="sub 58%" style:font-name="TexMaths Symbols1" fo:font-size="16pt" fo:language="zxx" fo:country="none" fo:font-style="normal" fo:text-shadow="none" style:text-underline-style="none" fo:font-weight="normal" style:letter-kerning="true" style:font-name-asian="TexMaths Symbols1" style:font-size-asian="16pt" style:font-style-asian="normal" style:font-weight-asian="normal" style:font-name-complex="TexMaths Symbol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text-outline="false" style:text-line-through-style="none" style:text-line-through-type="none" style:text-position="super 58%" style:font-name="TexMaths Symbols1" fo:font-size="16pt" fo:letter-spacing="-0.471cm" fo:language="zxx" fo:country="none" fo:font-style="normal" fo:text-shadow="none" style:text-underline-style="none" fo:font-weight="normal" style:letter-kerning="true" style:font-name-asian="TexMaths Symbols1" style:font-size-asian="16pt" style:font-style-asian="normal" style:font-weight-asian="normal" style:font-name-complex="TexMaths Symbol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text-outline="false" style:text-line-through-style="none" style:text-line-through-type="none" style:text-position="0% 100%" style:font-name="TexMaths Symbols1" fo:font-size="16pt" fo:letter-spacing="normal" fo:language="zxx" fo:country="none" fo:font-style="normal" fo:text-shadow="none" style:text-underline-style="none" fo:font-weight="normal" style:letter-kerning="true" style:font-name-asian="TexMaths Symbols1" style:font-size-asian="16pt" style:font-style-asian="normal" style:font-weight-asian="normal" style:font-name-complex="TexMaths Symbol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text-outline="false" style:text-line-through-style="none" style:text-line-through-type="none" style:text-position="super 58%" style:font-name="TexMaths Symbols1" fo:font-size="16pt" fo:letter-spacing="normal" fo:language="zxx" fo:country="none" fo:font-style="normal" fo:text-shadow="none" style:text-underline-style="none" fo:font-weight="normal" style:letter-kerning="true" style:font-name-asian="TexMaths Symbols1" style:font-size-asian="16pt" style:font-style-asian="normal" style:font-weight-asian="normal" style:font-name-complex="TexMaths Symbol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text-outline="false" style:text-line-through-style="none" style:text-line-through-type="none" style:font-name="TexMaths Symbols1" fo:font-size="8pt" fo:language="zxx" fo:country="none" fo:font-style="normal" fo:text-shadow="none" style:text-underline-style="none" fo:font-weight="normal" style:letter-kerning="true" style:font-name-asian="TexMaths Symbols1" style:font-size-asian="8pt" style:font-style-asian="normal" style:font-weight-asian="normal" style:font-name-complex="TexMaths Symbols1" style:font-size-complex="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text-outline="false" style:text-line-through-style="none" style:text-line-through-type="none" style:text-position="0% 100%" style:font-name="TexMaths Symbols1" fo:font-size="8pt" fo:language="zxx" fo:country="none" fo:font-style="normal" fo:text-shadow="none" style:text-underline-style="none" fo:font-weight="normal" style:letter-kerning="true" style:font-name-asian="TexMaths Symbols1" style:font-size-asian="8pt" style:font-style-asian="normal" style:font-weight-asian="normal" style:font-name-complex="TexMaths Symbols1" style:font-size-complex="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text-outline="false" style:text-line-through-style="none" style:text-line-through-type="none" style:text-position="0% 100%" style:font-name="TexMaths Symbols" fo:font-size="8pt" fo:letter-spacing="normal" fo:language="zxx" fo:country="none" fo:font-style="normal" fo:text-shadow="none" style:text-underline-style="none" fo:font-weight="normal" style:letter-kerning="true" style:font-name-asian="TexMaths Symbols1" style:font-size-asian="8pt" style:font-style-asian="normal" style:font-weight-asian="normal" style:font-name-complex="TexMaths Symbols1" style:font-size-complex="8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text-outline="false" style:text-line-through-style="none" style:text-line-through-type="none" style:text-position="sub 58%" style:font-name="TexMaths Symbols" fo:font-size="8pt" fo:letter-spacing="normal" fo:language="zxx" fo:country="none" fo:font-style="normal" fo:text-shadow="none" style:text-underline-style="none" fo:font-weight="normal" style:letter-kerning="true" style:font-name-asian="TexMaths Symbols1" style:font-size-asian="8pt" style:font-style-asian="normal" style:font-weight-asian="normal" style:font-name-complex="TexMaths Symbols1" style:font-size-complex="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729fcf" loext:opacity="100%" style:text-outline="false" style:text-line-through-style="none" style:text-line-through-type="none" fo:language="zxx" fo:country="none" fo:font-style="normal" fo:text-shadow="none" style:text-underline-style="none" fo:font-weight="bold" style:letter-kerning="true" style:font-size-asian="12pt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color="#365f91" loext:opacity="100%" style:font-name="Cambria" fo:font-size="14.1000003814697pt" fo:font-weight="bold" style:font-name-asian="Cambria" style:font-size-asian="14.1000003814697pt" style:font-weight-asian="bold" style:font-name-complex="Cambria" style:font-size-complex="14.1000003814697pt" style:font-weight-complex="bold"/>
    </style:style>
    <style:style style:name="T99" style:family="text">
      <style:text-properties fo:color="#4f81bd" loext:opacity="100%" style:font-name="Cambria" fo:font-size="13pt" fo:font-weight="bold" style:font-name-asian="Cambria" style:font-size-asian="13pt" style:font-weight-asian="bold" style:font-name-complex="Cambria" style:font-size-complex="13pt" style:font-weight-complex="bold"/>
    </style:style>
    <style:style style:name="T100" style:family="text">
      <style:text-properties fo:color="#000000" loext:opacity="100%" style:font-name="Symbol" fo:font-size="12pt" fo:font-weight="normal" style:font-name-asian="Symbol" style:font-size-asian="12pt" style:font-weight-asian="normal" style:font-name-complex="Symbol" style:font-size-complex="12pt" style:font-weight-complex="normal"/>
    </style:style>
    <style:style style:name="T101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102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03" style:family="text">
      <style:text-properties fo:color="#000000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104" style:family="text">
      <style:text-properties fo:color="#000000" loext:opacity="100%" style:font-name="Calibri" fo:font-size="12pt" fo:font-style="italic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105" style:family="text">
      <style:text-properties fo:color="#4f81bd" loext:opacity="100%" style:font-name="Cambria" fo:font-size="9.89999961853027pt" fo:font-weight="bold" style:font-name-asian="Cambria" style:font-size-asian="9.89999961853027pt" style:font-weight-asian="bold" style:font-name-complex="Cambria" style:font-size-complex="9.8999996185302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1.644cm" svg:height="0.932cm" svg:x="4.453cm" svg:y="2.04cm">
          <draw:text-box>
            <text:p text:style-name="P1"><text:span text:style-name="T1">Progett</text:span><text:span text:style-name="T1">o </text:span><text:span text:style-name="T1">Assem</text:span><text:span text:style-name="T1">bly </text:span><text:span text:style-name="T1">RISC-</text:span><text:span text:style-name="T1">V </text:span><text:span text:style-name="T2">per </text:span><text:span text:style-name="T2">il <text:s/></text:span></text:p>
          </draw:text-box>
        </draw:frame>
        <draw:frame draw:style-name="gr2" draw:text-style-name="P2" draw:layer="layout" svg:width="13.478cm" svg:height="0.932cm" svg:x="3.412cm" svg:y="3.035cm">
          <draw:text-box>
            <text:p text:style-name="P1"><text:span text:style-name="T2">C</text:span><text:span text:style-name="T2">or</text:span><text:span text:style-name="T2">so </text:span><text:span text:style-name="T2">di </text:span><text:span text:style-name="T2">A</text:span><text:span text:style-name="T2">rc</text:span><text:span text:style-name="T2">hi</text:span><text:span text:style-name="T2">te</text:span><text:span text:style-name="T2">tt</text:span><text:span text:style-name="T2">ur</text:span><text:span text:style-name="T2">e </text:span><text:span text:style-name="T2">d</text:span><text:span text:style-name="T2">e</text:span><text:span text:style-name="T2">gl</text:span><text:span text:style-name="T2">i </text:span><text:span text:style-name="T2">El</text:span><text:span text:style-name="T2">a</text:span><text:span text:style-name="T2">b</text:span><text:span text:style-name="T2">or</text:span><text:span text:style-name="T2">at</text:span><text:span text:style-name="T2">or</text:span><text:span text:style-name="T2">i <text:s/></text:span></text:p>
          </draw:text-box>
        </draw:frame>
        <draw:frame draw:style-name="gr3" draw:text-style-name="P2" draw:layer="layout" svg:width="7.189cm" svg:height="0.932cm" svg:x="6.934cm" svg:y="4.026cm">
          <draw:text-box>
            <text:p text:style-name="P1"><text:span text:style-name="T2">– A.A. 2025/2026 – <text:s/></text:span></text:p>
          </draw:text-box>
        </draw:frame>
        <draw:frame draw:style-name="gr4" draw:text-style-name="P3" draw:layer="layout" svg:width="0.846cm" svg:height="0.932cm" svg:x="10.499cm" svg:y="4.352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139cm" svg:height="0.158cm" svg:x="10.693cm" svg:y="4.988cm">
          <draw:text-box>
            <text:p text:style-name="P1"><text:span text:style-name="T4"><text:s/></text:span></text:p>
          </draw:text-box>
        </draw:frame>
        <draw:polygon draw:style-name="gr6" draw:text-style-name="P5" draw:layer="layout" svg:width="18.301cm" svg:height="0.033cm" svg:x="1.35cm" svg:y="6.443cm" svg:viewBox="0 0 18302 34" draw:points="0,0 18302,0 18302,34 0,34">
          <text:p/>
        </draw:polygon>
        <draw:frame draw:style-name="gr7" draw:text-style-name="P6" draw:layer="layout" svg:width="7.941cm" svg:height="1.089cm" svg:x="6.447cm" svg:y="5.196cm">
          <draw:text-box>
            <text:p text:style-name="P1"><text:span text:style-name="T5">Messaggi in Codice </text:span></text:p>
          </draw:text-box>
        </draw:frame>
        <draw:frame draw:style-name="gr8" draw:text-style-name="P7" draw:layer="layout" svg:width="0.388cm" svg:height="0.437cm" svg:x="19.55cm" svg:y="9.407cm">
          <draw:text-box>
            <text:p text:style-name="P1"><text:span text:style-name="T6"><text:s/></text:span></text:p>
          </draw:text-box>
        </draw:frame>
        <draw:frame draw:style-name="gr9" draw:text-style-name="P8" draw:layer="layout" svg:width="5.175cm" svg:height="0.543cm" svg:x="1.401cm" svg:y="9.477cm">
          <draw:text-box>
            <text:p text:style-name="P1"><text:span text:style-name="T7">Struttura del codice</text:span></text:p>
          </draw:text-box>
        </draw:frame>
        <draw:frame draw:style-name="gr10" draw:text-style-name="P9" draw:layer="layout" svg:width="18.314cm" svg:height="2.356cm" svg:x="1.401cm" svg:y="10.239cm">
          <draw:text-box>
            <text:p text:style-name="P1"><text:span text:style-name="T8">I</text:span><text:span text:style-name="T8">n</text:span><text:span text:style-name="T8">i</text:span><text:span text:style-name="T8">z</text:span><text:span text:style-name="T8">i</text:span><text:span text:style-name="T8">a</text:span><text:span text:style-name="T8">n</text:span><text:span text:style-name="T8">d</text:span><text:span text:style-name="T8">o</text:span><text:span text:style-name="T8"> </text:span><text:span text:style-name="T8">d</text:span><text:span text:style-name="T8">a</text:span><text:span text:style-name="T8">l</text:span><text:span text:style-name="T8">l</text:span><text:span text:style-name="T8">a</text:span><text:span text:style-name="T8"> </text:span><text:span text:style-name="T8">p</text:span><text:span text:style-name="T8">r</text:span><text:span text:style-name="T8">o</text:span><text:span text:style-name="T8">c</text:span><text:span text:style-name="T8">e</text:span><text:span text:style-name="T8">d</text:span><text:span text:style-name="T8">u</text:span><text:span text:style-name="T8">r</text:span><text:span text:style-name="T8">a</text:span><text:span text:style-name="T8"> </text:span><text:span text:style-name="T8">_</text:span><text:span text:style-name="T8">s</text:span><text:span text:style-name="T8">t</text:span><text:span text:style-name="T8">a</text:span><text:span text:style-name="T8">r</text:span><text:span text:style-name="T8">t</text:span><text:span text:style-name="T8">,</text:span><text:span text:style-name="T8"> </text:span><text:span text:style-name="T8">I</text:span><text:span text:style-name="T8">l</text:span><text:span text:style-name="T8"> </text:span><text:span text:style-name="T8">p</text:span><text:span text:style-name="T8">r</text:span><text:span text:style-name="T8">o</text:span><text:span text:style-name="T8">g</text:span><text:span text:style-name="T8">r</text:span><text:span text:style-name="T8">a</text:span><text:span text:style-name="T8">m</text:span><text:span text:style-name="T8">m</text:span><text:span text:style-name="T8">a</text:span><text:span text:style-name="T8"> </text:span><text:span text:style-name="T8">c</text:span><text:span text:style-name="T8">h</text:span><text:span text:style-name="T8">i</text:span><text:span text:style-name="T8">a</text:span><text:span text:style-name="T8">m</text:span><text:span text:style-name="T8">a</text:span><text:span text:style-name="T8"> </text:span><text:span text:style-name="T8">u</text:span><text:span text:style-name="T8">n</text:span><text:span text:style-name="T8">a</text:span><text:span text:style-name="T8"> </text:span><text:span text:style-name="T8">p</text:span><text:span text:style-name="T8">r</text:span><text:span text:style-name="T8">o</text:span><text:span text:style-name="T8">c</text:span><text:span text:style-name="T8">e</text:span><text:span text:style-name="T8">d</text:span><text:span text:style-name="T8">u</text:span><text:span text:style-name="T8">r</text:span><text:span text:style-name="T8">a</text:span><text:span text:style-name="T8"> </text:span><text:span text:style-name="T8">p</text:span><text:span text:style-name="T8">e</text:span><text:span text:style-name="T8">r</text:span><text:span text:style-name="T8"> </text:span><text:span text:style-name="T8">i</text:span><text:span text:style-name="T8">n</text:span><text:span text:style-name="T8">i</text:span><text:span text:style-name="T8">z</text:span><text:span text:style-name="T8">i</text:span><text:span text:style-name="T8">a</text:span><text:span text:style-name="T8">l</text:span><text:span text:style-name="T8">i</text:span><text:span text:style-name="T8">z</text:span><text:span text:style-name="T8">z</text:span><text:span text:style-name="T8">a</text:span><text:span text:style-name="T8">r</text:span><text:span text:style-name="T8">e</text:span><text:span text:style-name="T8"> </text:span><text:span text:style-name="T8">s</text:span><text:span text:style-name="T8">u</text:span><text:span text:style-name="T8">l</text:span><text:span text:style-name="T8">l</text:span><text:span text:style-name="T8">a</text:span><text:span text:style-name="T8"> </text:span><text:span text:style-name="T8">s</text:span><text:span text:style-name="T8">t</text:span><text:span text:style-name="T8">a</text:span><text:span text:style-name="T8">c</text:span><text:span text:style-name="T8">k</text:span><text:span text:style-name="T8"> </text:span><text:span text:style-name="T8">l</text:span><text:span text:style-name="T8">a</text:span><text:span text:style-name="T8"> </text:span><text:span text:style-name="T8">s</text:span><text:span text:style-name="T8">t</text:span><text:span text:style-name="T8">t</text:span><text:span text:style-name="T8">u</text:span><text:span text:style-name="T8">t</text:span><text:span text:style-name="T8">t</text:span><text:span text:style-name="T8">u</text:span><text:span text:style-name="T8">r</text:span><text:span text:style-name="T8">a</text:span><text:span text:style-name="T8"> </text:span><text:span text:style-name="T9"><text:a xlink:href="#cypher_data" xlink:type="simple">cypher_data</text:a></text:span><text:span text:style-name="T8">,</text:span><text:span text:style-name="T8"> </text:span><text:span text:style-name="T8">c</text:span><text:span text:style-name="T8">a</text:span><text:span text:style-name="T8">r</text:span><text:span text:style-name="T8">i</text:span><text:span text:style-name="T8">c</text:span><text:span text:style-name="T8">a</text:span><text:span text:style-name="T8"> </text:span><text:span text:style-name="T8">l</text:span><text:span text:style-name="T8">’</text:span><text:span text:style-name="T8">i</text:span><text:span text:style-name="T8">n</text:span><text:span text:style-name="T8">d</text:span><text:span text:style-name="T8">i</text:span><text:span text:style-name="T8">r</text:span><text:span text:style-name="T8">i</text:span><text:span text:style-name="T8">z</text:span><text:span text:style-name="T8">z</text:span><text:span text:style-name="T8">o</text:span><text:span text:style-name="T8"> </text:span><text:span text:style-name="T8">d</text:span><text:span text:style-name="T8">e</text:span><text:span text:style-name="T8">l</text:span><text:span text:style-name="T8">l</text:span><text:span text:style-name="T8">a</text:span><text:span text:style-name="T8"> </text:span><text:span text:style-name="T8">s</text:span><text:span text:style-name="T8">t</text:span><text:span text:style-name="T8">r</text:span><text:span text:style-name="T8">i</text:span><text:span text:style-name="T8">n</text:span><text:span text:style-name="T8">g</text:span><text:span text:style-name="T8">a</text:span><text:span text:style-name="T8"> </text:span><text:span text:style-name="T10"><text:a xlink:href="#Parametri del programma" xlink:type="simple">myplaintext</text:a></text:span><text:span text:style-name="T8">,</text:span><text:span text:style-name="T8"> </text:span><text:span text:style-name="T8">e</text:span><text:span text:style-name="T8"> </text:span><text:span text:style-name="T8">u</text:span><text:span text:style-name="T8">n</text:span><text:span text:style-name="T8"> </text:span><text:span text:style-name="T8">v</text:span><text:span text:style-name="T8">a</text:span><text:span text:style-name="T8">l</text:span><text:span text:style-name="T8">o</text:span><text:span text:style-name="T8">r</text:span><text:span text:style-name="T8">e</text:span><text:span text:style-name="T8"> </text:span><text:span text:style-name="T8">b</text:span><text:span text:style-name="T8">o</text:span><text:span text:style-name="T8">o</text:span><text:span text:style-name="T8">l</text:span><text:span text:style-name="T8">e</text:span><text:span text:style-name="T8">a</text:span><text:span text:style-name="T8">n</text:span><text:span text:style-name="T8">o</text:span><text:span text:style-name="T8">,</text:span><text:span text:style-name="T8"> </text:span><text:span text:style-name="T8">I</text:span><text:span text:style-name="T8"> </text:span><text:span text:style-name="T8">q</text:span><text:span text:style-name="T8">u</text:span><text:span text:style-name="T8">a</text:span><text:span text:style-name="T8">l</text:span><text:span text:style-name="T8">i</text:span><text:span text:style-name="T8"> </text:span><text:span text:style-name="T8">v</text:span><text:span text:style-name="T8">e</text:span><text:span text:style-name="T8">n</text:span><text:span text:style-name="T8">g</text:span><text:span text:style-name="T8">o</text:span><text:span text:style-name="T8">n</text:span><text:span text:style-name="T8">o</text:span><text:span text:style-name="T8"> </text:span><text:span text:style-name="T8">u</text:span><text:span text:style-name="T8">t</text:span><text:span text:style-name="T8">i</text:span><text:span text:style-name="T8">l</text:span><text:span text:style-name="T8">i</text:span><text:span text:style-name="T8">z</text:span><text:span text:style-name="T8">z</text:span><text:span text:style-name="T8">a</text:span><text:span text:style-name="T8">t</text:span><text:span text:style-name="T8">i</text:span><text:span text:style-name="T8"> </text:span><text:span text:style-name="T8">c</text:span><text:span text:style-name="T8">o</text:span><text:span text:style-name="T8">m</text:span><text:span text:style-name="T8">e</text:span><text:span text:style-name="T8"> </text:span><text:span text:style-name="T8">a</text:span><text:span text:style-name="T8">r</text:span><text:span text:style-name="T8">g</text:span><text:span text:style-name="T8">o</text:span><text:span text:style-name="T8">m</text:span><text:span text:style-name="T8">e</text:span><text:span text:style-name="T8">n</text:span><text:span text:style-name="T8">t</text:span><text:span text:style-name="T8">i</text:span><text:span text:style-name="T8"> </text:span><text:span text:style-name="T8">d</text:span><text:span text:style-name="T8">e</text:span><text:span text:style-name="T8">l</text:span><text:span text:style-name="T8">l</text:span><text:span text:style-name="T8">a</text:span><text:span text:style-name="T8"> </text:span><text:span text:style-name="T8">p</text:span><text:span text:style-name="T8">r</text:span><text:span text:style-name="T8">o</text:span><text:span text:style-name="T8">c</text:span><text:span text:style-name="T8">e</text:span><text:span text:style-name="T8">d</text:span><text:span text:style-name="T8">u</text:span><text:span text:style-name="T8">r</text:span><text:span text:style-name="T8">a</text:span><text:span text:style-name="T8"> </text:span><text:span text:style-name="T11"><text:a xlink:href="#cypher_iter" xlink:type="simple">cypher_iter</text:a></text:span><text:span text:style-name="T8">,</text:span><text:span text:style-name="T8"> </text:span><text:span text:style-name="T8">l</text:span><text:span text:style-name="T8">a</text:span><text:span text:style-name="T8"> </text:span><text:span text:style-name="T8">q</text:span><text:span text:style-name="T8">u</text:span><text:span text:style-name="T8">a</text:span><text:span text:style-name="T8">l</text:span><text:span text:style-name="T8">e</text:span><text:span text:style-name="T8"> </text:span><text:span text:style-name="T8">d</text:span><text:span text:style-name="T8">e</text:span><text:span text:style-name="T8">t</text:span><text:span text:style-name="T8">e</text:span><text:span text:style-name="T8">r</text:span><text:span text:style-name="T8">m</text:span><text:span text:style-name="T8">i</text:span><text:span text:style-name="T8">n</text:span><text:span text:style-name="T8">a</text:span><text:span text:style-name="T8"> </text:span><text:span text:style-name="T8">l</text:span><text:span text:style-name="T8">a</text:span><text:span text:style-name="T8"> </text:span><text:span text:style-name="T8">s</text:span><text:span text:style-name="T8">e</text:span><text:span text:style-name="T8">q</text:span><text:span text:style-name="T8">u</text:span><text:span text:style-name="T8">e</text:span><text:span text:style-name="T8">n</text:span><text:span text:style-name="T8">z</text:span><text:span text:style-name="T8">a</text:span><text:span text:style-name="T8"> </text:span><text:span text:style-name="T8">d</text:span><text:span text:style-name="T8">i</text:span><text:span text:style-name="T8"> </text:span><text:span text:style-name="T8">p</text:span><text:span text:style-name="T8">r</text:span><text:span text:style-name="T8">o</text:span><text:span text:style-name="T8">c</text:span><text:span text:style-name="T8">e</text:span><text:span text:style-name="T8">d</text:span><text:span text:style-name="T8">u</text:span><text:span text:style-name="T8">r</text:span><text:span text:style-name="T8">e</text:span><text:span text:style-name="T8"> </text:span><text:span text:style-name="T8">d</text:span><text:span text:style-name="T8">i</text:span><text:span text:style-name="T8"> </text:span><text:span text:style-name="T8">c</text:span><text:span text:style-name="T8">i</text:span><text:span text:style-name="T8">f</text:span><text:span text:style-name="T8">r</text:span><text:span text:style-name="T8">a</text:span><text:span text:style-name="T8">t</text:span><text:span text:style-name="T8">u</text:span><text:span text:style-name="T8">r</text:span><text:span text:style-name="T8">a</text:span><text:span text:style-name="T8"> </text:span><text:span text:style-name="T8">e</text:span><text:span text:style-name="T8"> </text:span><text:span text:style-name="T8">d</text:span><text:span text:style-name="T8">e</text:span><text:span text:style-name="T8">c</text:span><text:span text:style-name="T8">i</text:span><text:span text:style-name="T8">f</text:span><text:span text:style-name="T8">r</text:span><text:span text:style-name="T8">a</text:span><text:span text:style-name="T8">t</text:span><text:span text:style-name="T8">u</text:span><text:span text:style-name="T8">r</text:span><text:span text:style-name="T8">a</text:span><text:span text:style-name="T8"> </text:span><text:span text:style-name="T8">c</text:span><text:span text:style-name="T8">h</text:span><text:span text:style-name="T8">e</text:span><text:span text:style-name="T8"> </text:span><text:span text:style-name="T8">v</text:span><text:span text:style-name="T8">e</text:span><text:span text:style-name="T8">r</text:span><text:span text:style-name="T8">r</text:span><text:span text:style-name="T8">a</text:span><text:span text:style-name="T8">n</text:span><text:span text:style-name="T8">n</text:span><text:span text:style-name="T8">o</text:span><text:span text:style-name="T8"> </text:span><text:span text:style-name="T8">c</text:span><text:span text:style-name="T8">h</text:span><text:span text:style-name="T8">i</text:span><text:span text:style-name="T8">a</text:span><text:span text:style-name="T8">m</text:span><text:span text:style-name="T8">a</text:span><text:span text:style-name="T8">t</text:span><text:span text:style-name="T8">e</text:span><text:span text:style-name="T8">.</text:span></text:p>
          </draw:text-box>
        </draw:frame>
        <draw:polygon draw:style-name="gr11" draw:text-style-name="P10" draw:layer="layout" svg:width="18.314cm" svg:height="1.979cm" draw:transform="skewX (0.00296705972839036) rotate (0.00314159265358979) translate (1.39965477405974cm 7.00700108456285cm)" svg:viewBox="0 0 18315 1980" draw:points="0,0 18315,2 18315,1980 0,1978">
          <text:p/>
        </draw:polygon>
        <draw:frame draw:style-name="gr12" draw:text-style-name="P12" draw:layer="layout" svg:width="17.094cm" svg:height="0.551cm" svg:x="1.668cm" svg:y="7.264cm">
          <draw:text-box>
            <text:p text:style-name="P11"><text:span text:style-name="T12">A</text:span><text:span text:style-name="T12">u</text:span><text:span text:style-name="T12">t</text:span><text:span text:style-name="T12">o</text:span><text:span text:style-name="T12">r</text:span><text:span text:style-name="T12">e</text:span><text:span text:style-name="T12">:</text:span><text:span text:style-name="T12"> </text:span><text:span text:style-name="T12">F</text:span><text:span text:style-name="T12">e</text:span><text:span text:style-name="T12">d</text:span><text:span text:style-name="T12">e</text:span><text:span text:style-name="T12">r</text:span><text:span text:style-name="T12">i</text:span><text:span text:style-name="T12">c</text:span><text:span text:style-name="T12">o</text:span><text:span text:style-name="T12"> </text:span><text:span text:style-name="T12">C</text:span><text:span text:style-name="T12">a</text:span><text:span text:style-name="T12">r</text:span><text:span text:style-name="T12">l</text:span><text:span text:style-name="T12">o</text:span><text:span text:style-name="T12"> </text:span><text:span text:style-name="T12">M</text:span><text:span text:style-name="T12">a</text:span><text:span text:style-name="T12">r</text:span><text:span text:style-name="T12">t</text:span><text:span text:style-name="T12">i</text:span><text:span text:style-name="T12">n</text:span><text:span text:style-name="T12">i</text:span><text:span text:style-name="T12"> </text:span><text:span text:style-name="T12"><text:s/></text:span><text:span text:style-name="T12"><text:a xlink:href="mailto:federico.martini3@edu.unifi.it" xlink:type="simple">federico.martini3@edu.unifi.it</text:a></text:span><text:span text:style-name="T12"><text:s/></text:span><text:span text:style-name="T12">M</text:span><text:span text:style-name="T12">a</text:span><text:span text:style-name="T12">t</text:span><text:span text:style-name="T12">r</text:span><text:span text:style-name="T12">i</text:span><text:span text:style-name="T12">c</text:span><text:span text:style-name="T12">o</text:span><text:span text:style-name="T12">l</text:span><text:span text:style-name="T12">a</text:span><text:span text:style-name="T12">:</text:span><text:span text:style-name="T12"> </text:span><text:span text:style-name="T12">7</text:span><text:span text:style-name="T12">1</text:span><text:span text:style-name="T12">9</text:span><text:span text:style-name="T12">0</text:span><text:span text:style-name="T12">7</text:span><text:span text:style-name="T12">2</text:span><text:span text:style-name="T12">4</text:span><text:span text:style-name="T12"> </text:span><text:span text:style-name="T12">d</text:span><text:span text:style-name="T12">a</text:span><text:span text:style-name="T12">t</text:span><text:span text:style-name="T12">a</text:span><text:span text:style-name="T12">:</text:span></text:p>
          </draw:text-box>
        </draw:frame>
        <draw:frame draw:style-name="gr13" draw:text-style-name="P13" draw:layer="layout" svg:width="0.35cm" svg:height="0.391cm" svg:x="1.668cm" svg:y="8.019cm">
          <draw:text-box>
            <text:p text:style-name="P1"><text:span text:style-name="T13"><text:s/></text:span></text:p>
          </draw:text-box>
        </draw:frame>
        <draw:frame draw:style-name="gr14" draw:text-style-name="P14" draw:layer="layout" svg:width="5.858cm" svg:height="0.543cm" svg:x="1.4cm" svg:y="12.712cm">
          <draw:text-box>
            <text:p text:style-name="P1"><text:span text:style-name="T14">Pa</text:span><text:span text:style-name="T14">ra</text:span><text:span text:style-name="T14">me</text:span><text:span text:style-name="T14">tri </text:span><text:span text:style-name="T14">del </text:span><text:span text:style-name="T14">pr</text:span><text:span text:style-name="T14">og</text:span><text:span text:style-name="T14">ra</text:span><text:span text:style-name="T14">m</text:span><text:span text:style-name="T14">ma</text:span><text:span text:style-name="T14">: </text:span></text:p>
          </draw:text-box>
        </draw:frame>
        <draw:frame draw:name="Parametri del programma" draw:style-name="gr10" draw:text-style-name="P9" draw:layer="layout" svg:width="18.314cm" svg:height="1.813cm" svg:x="1.401cm" svg:y="13.34cm">
          <draw:text-box>
            <text:p text:style-name="P1"><text:span text:style-name="T10">my</text:span><text:span text:style-name="T10">pla</text:span><text:span text:style-name="T10">int</text:span><text:span text:style-name="T10">ext</text:span><text:span text:style-name="T10">: </text:span><text:span text:style-name="T15">Sat</text:span><text:span text:style-name="T15">ring</text:span><text:span text:style-name="T15">a di </text:span><text:span text:style-name="T15">inp</text:span><text:span text:style-name="T15">ut </text:span><text:span text:style-name="T15">del </text:span><text:span text:style-name="T15">pro</text:span><text:span text:style-name="T15">gra</text:span><text:span text:style-name="T15">mm</text:span><text:span text:style-name="T15">a, </text:span><text:span text:style-name="T15">ogg</text:span><text:span text:style-name="T15">etto </text:span><text:span text:style-name="T15">dell</text:span><text:span text:style-name="T15">e </text:span><text:span text:style-name="T15">pro</text:span><text:span text:style-name="T15">ced</text:span><text:span text:style-name="T15">ure </text:span><text:span text:style-name="T15">di </text:span><text:span text:style-name="T15">cifr</text:span><text:span text:style-name="T15">atu</text:span><text:span text:style-name="T15">ra</text:span><text:span text:style-name="T15"><text:line-break/></text:span><text:span text:style-name="T10">so</text:span><text:span text:style-name="T10">stK</text:span><text:span text:style-name="T10">: </text:span><text:span text:style-name="T15">Val</text:span><text:span text:style-name="T15">ore </text:span><text:span text:style-name="T15">nu</text:span><text:span text:style-name="T15">me</text:span><text:span text:style-name="T15">rico </text:span><text:span text:style-name="T15">usa</text:span><text:span text:style-name="T15">to </text:span><text:span text:style-name="T15">co</text:span><text:span text:style-name="T15">me </text:span><text:span text:style-name="T15">par</text:span><text:span text:style-name="T15">am</text:span><text:span text:style-name="T15">etr</text:span><text:span text:style-name="T15">o </text:span><text:span text:style-name="T15">dal </text:span><text:span text:style-name="T11"><text:a xlink:href="#caesar_encrypt" xlink:type="simple">cifrario di Cesare</text:a></text:span><text:span text:style-name="T11"><text:line-break/></text:span><text:span text:style-name="T10">blo</text:span><text:span text:style-name="T10">cK</text:span><text:span text:style-name="T10">ey: </text:span><text:span text:style-name="T15">Stri</text:span><text:span text:style-name="T15">nga </text:span><text:span text:style-name="T15">par</text:span><text:span text:style-name="T15">am</text:span><text:span text:style-name="T15">etr</text:span><text:span text:style-name="T15">o </text:span><text:span text:style-name="T15">del </text:span><text:span text:style-name="T11"><text:a xlink:href="#block_encrypt" xlink:type="simple">cifrario a blocchi</text:a></text:span><text:span text:style-name="T11"><text:line-break/></text:span><text:span text:style-name="T10">my</text:span><text:span text:style-name="T10">cy</text:span><text:span text:style-name="T10">ph</text:span><text:span text:style-name="T10">er: </text:span><text:span text:style-name="T15">Stri</text:span><text:span text:style-name="T15">nga </text:span><text:span text:style-name="T15">di </text:span><text:span text:style-name="T15">car</text:span><text:span text:style-name="T15">atte</text:span><text:span text:style-name="T15">ri </text:span><text:span text:style-name="T15">tra </text:span><text:span text:style-name="T15">{A, </text:span><text:span text:style-name="T15">B, </text:span><text:span text:style-name="T15">C, </text:span><text:span text:style-name="T15">D, </text:span><text:span text:style-name="T15">E} </text:span><text:span text:style-name="T15">che </text:span><text:span text:style-name="T15">det</text:span><text:span text:style-name="T15">er</text:span><text:span text:style-name="T15">min</text:span><text:span text:style-name="T15">a la </text:span><text:span text:style-name="T15">seq</text:span><text:span text:style-name="T15">uen</text:span><text:span text:style-name="T15">za </text:span><text:span text:style-name="T15">di </text:span><text:span text:style-name="T15">pro</text:span><text:span text:style-name="T15">ced</text:span><text:span text:style-name="T15">ure </text:span><text:span text:style-name="T15">chi</text:span><text:span text:style-name="T15">am</text:span><text:span text:style-name="T15">ate</text:span></text:p>
          </draw:text-box>
        </draw:frame>
        <draw:frame draw:style-name="gr15" draw:text-style-name="P15" draw:layer="layout" svg:width="0.943cm" svg:height="0.642cm" svg:x="1.475cm" svg:y="28.154cm">
          <draw:text-box>
            <text:p text:style-name="P1"><text:span text:style-name="T16">1</text:span></text:p>
          </draw:text-box>
        </draw:frame>
      </draw:page>
      <draw:page draw:name="page2" draw:style-name="dp1" draw:master-page-name="master-page3">
        <draw:frame draw:style-name="gr16" draw:text-style-name="P16" draw:layer="layout" svg:width="0.139cm" svg:height="0.536cm" svg:x="10.893cm" svg:y="8.988cm">
          <draw:text-box>
            <text:p text:style-name="P1"><text:span text:style-name="T17"><text:s/></text:span></text:p>
          </draw:text-box>
        </draw:frame>
        <draw:frame draw:style-name="gr8" draw:text-style-name="P7" draw:layer="layout" svg:width="0.388cm" svg:height="0.437cm" svg:x="19.55cm" svg:y="10.207cm">
          <draw:text-box>
            <text:p text:style-name="P1"><text:span text:style-name="T6"><text:s/></text:span></text:p>
          </draw:text-box>
        </draw:frame>
        <draw:frame draw:style-name="gr17" draw:text-style-name="P17" draw:layer="layout" svg:width="0.35cm" svg:height="0.536cm" svg:x="1.868cm" svg:y="12.019cm">
          <draw:text-box>
            <text:p text:style-name="P1"><text:span text:style-name="T18"><text:s/></text:span></text:p>
          </draw:text-box>
        </draw:frame>
        <draw:frame draw:style-name="gr18" draw:text-style-name="P18" draw:layer="layout" svg:width="15.939cm" svg:height="0.543cm" svg:x="1.935cm" svg:y="2.117cm">
          <draw:text-box>
            <text:p text:style-name="P1"><text:span text:style-name="T19">Strut</text:span><text:span text:style-name="T19">ture </text:span><text:span text:style-name="T19">dati </text:span><text:span text:style-name="T19">utiliz</text:span><text:span text:style-name="T19">zate: </text:span></text:p>
          </draw:text-box>
        </draw:frame>
        <draw:frame draw:name="heap_chunk" draw:style-name="gr10" draw:text-style-name="P9" draw:layer="layout" svg:width="6.983cm" svg:height="1.522cm" svg:x="1.6cm" svg:y="7.87cm">
          <draw:text-box>
            <text:p text:style-name="P1"><text:span text:style-name="T9">h</text:span><text:span text:style-name="T9">e</text:span><text:span text:style-name="T9">a</text:span><text:span text:style-name="T9">p</text:span><text:span text:style-name="T9">_</text:span><text:span text:style-name="T9">c</text:span><text:span text:style-name="T9">h</text:span><text:span text:style-name="T9">u</text:span><text:span text:style-name="T9">n</text:span><text:span text:style-name="T9">k</text:span><text:span text:style-name="T9">:</text:span><text:span text:style-name="T9"> </text:span><text:span text:style-name="T15">s</text:span><text:span text:style-name="T15">t</text:span><text:span text:style-name="T15">r</text:span><text:span text:style-name="T15">u</text:span><text:span text:style-name="T15">t</text:span><text:span text:style-name="T15">t</text:span><text:span text:style-name="T15">u</text:span><text:span text:style-name="T15">r</text:span><text:span text:style-name="T15">a</text:span><text:span text:style-name="T15"> </text:span><text:span text:style-name="T15">d</text:span><text:span text:style-name="T15">i</text:span><text:span text:style-name="T15"> </text:span><text:span text:style-name="T15">1</text:span><text:span text:style-name="T15">2</text:span><text:span text:style-name="T15">+</text:span><text:span text:style-name="T15"> </text:span><text:span text:style-name="T15">b</text:span><text:span text:style-name="T15">y</text:span><text:span text:style-name="T15">t</text:span><text:span text:style-name="T15">e</text:span><text:span text:style-name="T15"> </text:span><text:span text:style-name="T15">c</text:span><text:span text:style-name="T15">h</text:span><text:span text:style-name="T15">e</text:span><text:span text:style-name="T15"> </text:span><text:span text:style-name="T15">o</text:span><text:span text:style-name="T15">r</text:span><text:span text:style-name="T15">g</text:span><text:span text:style-name="T15">a</text:span><text:span text:style-name="T15">n</text:span><text:span text:style-name="T15">i</text:span><text:span text:style-name="T15">z</text:span><text:span text:style-name="T15">z</text:span><text:span text:style-name="T15">a</text:span><text:span text:style-name="T15"> </text:span><text:span text:style-name="T15">u</text:span><text:span text:style-name="T15">n</text:span><text:span text:style-name="T15">a</text:span><text:span text:style-name="T15"> </text:span><text:span text:style-name="T15">z</text:span><text:span text:style-name="T15">o</text:span><text:span text:style-name="T15">n</text:span><text:span text:style-name="T15">a</text:span><text:span text:style-name="T15"> </text:span><text:span text:style-name="T15">d</text:span><text:span text:style-name="T15">i</text:span><text:span text:style-name="T15"> </text:span><text:span text:style-name="T15">m</text:span><text:span text:style-name="T15">e</text:span><text:span text:style-name="T15">m</text:span><text:span text:style-name="T15">o</text:span><text:span text:style-name="T15">r</text:span><text:span text:style-name="T15">i</text:span><text:span text:style-name="T15">a</text:span></text:p>
            <text:p text:style-name="P1"><text:span text:style-name="T15"/></text:p>
            <text:p text:style-name="P1"><text:span text:style-name="T15"/></text:p>
            <text:p text:style-name="P1"><text:span text:style-name="T11"/></text:p>
          </draw:text-box>
        </draw:frame>
        <draw:g draw:style-name="gr19" xml:id="id1" draw:id="id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0" draw:text-style-name="P20" draw:layer="layout" svg:width="8.89cm" svg:height="0.671cm" svg:x="8.92cm" svg:y="7.2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9"><text:span text:style-name="T20">heap_chu</text:span><text:span text:style-name="T20">n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2" draw:layer="layout" svg:width="8.89cm" svg:height="2.069cm" svg:x="8.92cm" svg:y="7.94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21"><text:span text:style-name="T20">- [byte 0-3] : indirizzo del chunk precedente</text:span></text:p>
            <text:p text:style-name="P21"><text:span text:style-name="T20">- [byte 4-7]: bool -&gt; blocco occupato / libero</text:span></text:p>
            <text:p text:style-name="P21"><text:span text:style-name="T20">- [byte 8-11]: dimensione allocabile x</text:span><text:span text:style-name="T20"><text:line-break/></text:span><text:span text:style-name="T20">- [byte 12-[x+12]]: memoria allocabil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2" draw:text-style-name="P23" draw:layer="layout" svg:x1="17.81cm" svg:y1="8.64cm" svg:x2="13.365cm" svg:y2="10.01cm" draw:start-shape="id1" draw:end-shape="id1" draw:end-glue-point="2" svg:d="M17810 8640h527v1896h-4972v-526" svg:viewBox="0 0 4973 1897">
          <text:p/>
        </draw:connector>
        <draw:frame draw:style-name="gr23" draw:text-style-name="P25" draw:layer="layout" svg:width="0.711cm" svg:height="0.536cm" svg:x="12.192cm" svg:y="10.219cm">
          <draw:text-box>
            <text:p text:style-name="P24"><text:span text:style-name="T21">0..1</text:span></text:p>
          </draw:text-box>
        </draw:frame>
        <draw:frame draw:style-name="gr24" draw:text-style-name="P27" draw:layer="layout" svg:width="0.711cm" svg:height="0.475cm" svg:x="18.906cm" svg:y="8.128cm">
          <draw:text-box>
            <text:p text:style-name="P26"><text:span text:style-name="T22">0..1</text:span></text:p>
          </draw:text-box>
        </draw:frame>
        <draw:frame draw:style-name="gr25" draw:text-style-name="P28" draw:layer="layout" svg:width="0.422cm" svg:height="0.536cm" svg:x="13.15cm" svg:y="23.533cm">
          <draw:text-box>
            <text:p text:style-name="P1"><text:span text:style-name="T8"><text:s/></text:span></text:p>
          </draw:text-box>
        </draw:frame>
        <draw:frame draw:style-name="gr8" draw:text-style-name="P7" draw:layer="layout" svg:width="0.388cm" svg:height="0.437cm" svg:x="18.789cm" svg:y="12.585cm">
          <draw:text-box>
            <text:p text:style-name="P1"><text:span text:style-name="T16"><text:s/></text:span></text:p>
          </draw:text-box>
        </draw:frame>
        <draw:frame draw:style-name="gr8" draw:text-style-name="P7" draw:layer="layout" svg:width="0.388cm" svg:height="0.437cm" svg:x="15.605cm" svg:y="14.503cm">
          <draw:text-box>
            <text:p text:style-name="P1"><text:span text:style-name="T16"><text:s/></text:span></text:p>
          </draw:text-box>
        </draw:frame>
        <draw:frame draw:name="cypher_data" draw:style-name="gr10" draw:text-style-name="P9" draw:layer="layout" svg:width="8.789cm" svg:height="1.522cm" svg:x="1.602cm" svg:y="12.171cm">
          <draw:text-box>
            <text:p text:style-name="P1"><text:span text:style-name="T9">cypher_data:</text:span><text:span text:style-name="T10"> </text:span><text:span text:style-name="T15">Sruttura di 16 byte contenente I parametri per la procedura </text:span><text:span text:style-name="T11"><text:a xlink:href="#cypher_iter" xlink:type="simple">cypher_iter</text:a></text:span></text:p>
            <text:p text:style-name="P1"><text:span text:style-name="T9"/></text:p>
            <text:p text:style-name="P1"><text:span text:style-name="T11"/></text:p>
          </draw:text-box>
        </draw:frame>
        <draw:g draw:style-name="gr19">
          <draw:glue-point draw:id="4" svg:x="-3cm" svg:y="4.701cm"/>
          <draw:glue-point draw:id="5" svg:x="-1cm" svg:y="4.776cm"/>
          <draw:glue-point draw:id="6" svg:x="0.995cm" svg:y="4.85cm"/>
          <draw:glue-point draw:id="7" svg:x="2.995cm" svg:y="4.925cm"/>
          <draw:glue-point draw:id="8" svg:x="-0.001cm" svg:y="-0.655cm" draw:align="bottom-right"/>
          <draw:glue-point draw:id="9" svg:x="0cm" svg:y="-0.725cm" draw:align="bottom-left"/>
          <draw:glue-point draw:id="10" svg:x="-3cm" svg:y="-4.925cm"/>
          <draw:glue-point draw:id="11" svg:x="-1cm" svg:y="-4.85cm"/>
          <draw:glue-point draw:id="12" svg:x="0.995cm" svg:y="-4.776cm"/>
          <draw:glue-point draw:id="13" svg:x="2.995cm" svg:y="-4.701cm"/>
          <draw:glue-point draw:id="14" svg:x="-0.001cm" svg:y="0.706cm" draw:align="top-right"/>
          <draw:glue-point draw:id="15" svg:x="0cm" svg:y="0.636cm" draw:align="top-left"/>
          <draw:custom-shape draw:style-name="gr26" draw:text-style-name="P20" draw:layer="layout" svg:width="9.208cm" svg:height="0.671cm" svg:x="10.508cm" svg:y="11.68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9"><text:span text:style-name="T20">cyp</text:span><text:span text:style-name="T20">her</text:span><text:span text:style-name="T20">_da</text:span><text:span text:style-name="T20">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9" draw:layer="layout" svg:width="9.208cm" svg:height="2.069cm" svg:x="10.508cm" svg:y="12.35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21"><text:span text:style-name="T20">-</text:span><text:span text:style-name="T20">[</text:span><text:span text:style-name="T20">b</text:span><text:span text:style-name="T20">y</text:span><text:span text:style-name="T20">t</text:span><text:span text:style-name="T20">e</text:span><text:span text:style-name="T20"> </text:span><text:span text:style-name="T20">0</text:span><text:span text:style-name="T20">-</text:span><text:span text:style-name="T20">3</text:span><text:span text:style-name="T20">]</text:span><text:span text:style-name="T20"> </text:span><text:span text:style-name="T20">:</text:span><text:span text:style-name="T20"> </text:span><text:span text:style-name="T20">i</text:span><text:span text:style-name="T20">n</text:span><text:span text:style-name="T20">d</text:span><text:span text:style-name="T20">i</text:span><text:span text:style-name="T20">r</text:span><text:span text:style-name="T20">i</text:span><text:span text:style-name="T20">z</text:span><text:span text:style-name="T20">z</text:span><text:span text:style-name="T20">o</text:span><text:span text:style-name="T20"> </text:span><text:span text:style-name="T20">d</text:span><text:span text:style-name="T20">i</text:span><text:span text:style-name="T20"> </text:span><text:span text:style-name="T23"><text:a xlink:href="#Parametri del programma" xlink:type="simple">mycypher</text:a></text:span></text:p>
            <text:p text:style-name="P21"><text:span text:style-name="T20">-</text:span><text:span text:style-name="T20">[</text:span><text:span text:style-name="T20">b</text:span><text:span text:style-name="T20">y</text:span><text:span text:style-name="T20">t</text:span><text:span text:style-name="T20">e</text:span><text:span text:style-name="T20"> </text:span><text:span text:style-name="T20">4</text:span><text:span text:style-name="T20">-</text:span><text:span text:style-name="T20">7</text:span><text:span text:style-name="T20">]</text:span><text:span text:style-name="T20"> </text:span><text:span text:style-name="T20">:</text:span><text:span text:style-name="T20"> </text:span><text:span text:style-name="T20">c</text:span><text:span text:style-name="T20">o</text:span><text:span text:style-name="T20">p</text:span><text:span text:style-name="T20">i</text:span><text:span text:style-name="T20">a</text:span><text:span text:style-name="T20"> </text:span><text:span text:style-name="T20">d</text:span><text:span text:style-name="T20">i</text:span><text:span text:style-name="T20"> </text:span><text:span text:style-name="T23"><text:a xlink:href="#Parametri del programma" xlink:type="simple">sostK</text:a></text:span></text:p>
            <text:p text:style-name="P21"><text:span text:style-name="T20">-</text:span><text:span text:style-name="T20">[</text:span><text:span text:style-name="T20">b</text:span><text:span text:style-name="T20">y</text:span><text:span text:style-name="T20">t</text:span><text:span text:style-name="T20">e</text:span><text:span text:style-name="T20"> </text:span><text:span text:style-name="T20">8</text:span><text:span text:style-name="T20">-</text:span><text:span text:style-name="T20">1</text:span><text:span text:style-name="T20">1</text:span><text:span text:style-name="T20">]</text:span><text:span text:style-name="T20"> </text:span><text:span text:style-name="T20">:</text:span><text:span text:style-name="T20"> </text:span><text:span text:style-name="T20">i</text:span><text:span text:style-name="T20">n</text:span><text:span text:style-name="T20">d</text:span><text:span text:style-name="T20">i</text:span><text:span text:style-name="T20">r</text:span><text:span text:style-name="T20">i</text:span><text:span text:style-name="T20">z</text:span><text:span text:style-name="T20">z</text:span><text:span text:style-name="T20">o</text:span><text:span text:style-name="T20"> </text:span><text:span text:style-name="T20">d</text:span><text:span text:style-name="T20">i</text:span><text:span text:style-name="T20"> </text:span><text:span text:style-name="T23"><text:a xlink:href="#Parametri del programma" xlink:type="simple">blocKey</text:a></text:span></text:p>
            <text:p text:style-name="P21"><text:span text:style-name="T20">-</text:span><text:span text:style-name="T20">[</text:span><text:span text:style-name="T20">b</text:span><text:span text:style-name="T20">y</text:span><text:span text:style-name="T20">t</text:span><text:span text:style-name="T20">e</text:span><text:span text:style-name="T20"> </text:span><text:span text:style-name="T20">1</text:span><text:span text:style-name="T20">2</text:span><text:span text:style-name="T20">-</text:span><text:span text:style-name="T20">1</text:span><text:span text:style-name="T20">5</text:span><text:span text:style-name="T20">]</text:span><text:span text:style-name="T20"> </text:span><text:span text:style-name="T20">:</text:span><text:span text:style-name="T20"> </text:span><text:span text:style-name="T20">i</text:span><text:span text:style-name="T20">n</text:span><text:span text:style-name="T20">d</text:span><text:span text:style-name="T20">i</text:span><text:span text:style-name="T20">r</text:span><text:span text:style-name="T20">i</text:span><text:span text:style-name="T20">z</text:span><text:span text:style-name="T20">z</text:span><text:span text:style-name="T20">o</text:span><text:span text:style-name="T20"> </text:span><text:span text:style-name="T20">d</text:span><text:span text:style-name="T20">i</text:span><text:span text:style-name="T20"> </text:span><text:span text:style-name="T24">d</text:span><text:span text:style-name="T24">i</text:span><text:span text:style-name="T24">c</text:span><text:span text:style-name="T24">t</text:span><text:span text:style-name="T24">i</text:span><text:span text:style-name="T24">o</text:span><text:span text:style-name="T24">n</text:span><text:span text:style-name="T24">a</text:span><text:span text:style-name="T24">r</text:span><text:span text:style-name="T24">y</text:span><text:span text:style-name="T24">_</text:span><text:span text:style-name="T24">f</text:span><text:span text:style-name="T24">u</text:span><text:span text:style-name="T24">n</text:span><text:span text:style-name="T24">c</text:span><text:span text:style-name="T24">t</text:span><text:span text:style-name="T24">i</text:span><text:span text:style-name="T24">o</text:span><text:span text:style-name="T24">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name="mem_arena" draw:style-name="gr10" draw:text-style-name="P9" draw:layer="layout" svg:width="8.789cm" svg:height="1.522cm" svg:x="1.603cm" svg:y="15.271cm">
          <draw:text-box>
            <text:p text:style-name="P1"><text:span text:style-name="T9">m</text:span><text:span text:style-name="T9">e</text:span><text:span text:style-name="T9">m</text:span><text:span text:style-name="T9">_</text:span><text:span text:style-name="T9">a</text:span><text:span text:style-name="T9">r</text:span><text:span text:style-name="T9">e</text:span><text:span text:style-name="T9">n</text:span><text:span text:style-name="T9">a</text:span><text:span text:style-name="T9">:</text:span><text:span text:style-name="T10"> </text:span><text:span text:style-name="T15">S</text:span><text:span text:style-name="T15">r</text:span><text:span text:style-name="T15">u</text:span><text:span text:style-name="T15">t</text:span><text:span text:style-name="T15">t</text:span><text:span text:style-name="T15">u</text:span><text:span text:style-name="T15">r</text:span><text:span text:style-name="T15">a</text:span><text:span text:style-name="T15"> </text:span><text:span text:style-name="T15">d</text:span><text:span text:style-name="T15">i</text:span><text:span text:style-name="T15"> </text:span><text:span text:style-name="T15">g</text:span><text:span text:style-name="T15">r</text:span><text:span text:style-name="T15">a</text:span><text:span text:style-name="T15">n</text:span><text:span text:style-name="T15">d</text:span><text:span text:style-name="T15">e</text:span><text:span text:style-name="T15">z</text:span><text:span text:style-name="T15">z</text:span><text:span text:style-name="T15">a</text:span><text:span text:style-name="T15"> </text:span><text:span text:style-name="T15">v</text:span><text:span text:style-name="T15">a</text:span><text:span text:style-name="T15">r</text:span><text:span text:style-name="T15">i</text:span><text:span text:style-name="T15">a</text:span><text:span text:style-name="T15">b</text:span><text:span text:style-name="T15">i</text:span><text:span text:style-name="T15">l</text:span><text:span text:style-name="T15">e</text:span><text:span text:style-name="T15">,</text:span><text:span text:style-name="T15"> </text:span><text:span text:style-name="T15">u</text:span><text:span text:style-name="T15">t</text:span><text:span text:style-name="T15">i</text:span><text:span text:style-name="T15">l</text:span><text:span text:style-name="T15">i</text:span><text:span text:style-name="T15">z</text:span><text:span text:style-name="T15">z</text:span><text:span text:style-name="T15">a</text:span><text:span text:style-name="T15">t</text:span><text:span text:style-name="T15">a</text:span><text:span text:style-name="T15"> </text:span><text:span text:style-name="T15">p</text:span><text:span text:style-name="T15">e</text:span><text:span text:style-name="T15">r</text:span><text:span text:style-name="T15"> </text:span><text:span text:style-name="T15">r</text:span><text:span text:style-name="T15">i</text:span><text:span text:style-name="T15">c</text:span><text:span text:style-name="T15">h</text:span><text:span text:style-name="T15">i</text:span><text:span text:style-name="T15">e</text:span><text:span text:style-name="T15">s</text:span><text:span text:style-name="T15">t</text:span><text:span text:style-name="T15">e</text:span><text:span text:style-name="T15"> </text:span><text:span text:style-name="T15">d</text:span><text:span text:style-name="T15">i</text:span><text:span text:style-name="T15"> </text:span><text:span text:style-name="T15">m</text:span><text:span text:style-name="T15">e</text:span><text:span text:style-name="T15">m</text:span><text:span text:style-name="T15">o</text:span><text:span text:style-name="T15">r</text:span><text:span text:style-name="T15">i</text:span><text:span text:style-name="T15">a</text:span><text:span text:style-name="T15"> </text:span><text:span text:style-name="T15">i</text:span><text:span text:style-name="T15">n</text:span><text:span text:style-name="T15"> </text:span><text:span text:style-name="T15">g</text:span><text:span text:style-name="T15">r</text:span><text:span text:style-name="T15">u</text:span><text:span text:style-name="T15">p</text:span><text:span text:style-name="T15">p</text:span><text:span text:style-name="T15">o</text:span><text:span text:style-name="T15">,</text:span><text:span text:style-name="T15"> </text:span><text:span text:style-name="T15">c</text:span><text:span text:style-name="T15">o</text:span><text:span text:style-name="T15">n</text:span><text:span text:style-name="T15"> </text:span><text:span text:style-name="T15">u</text:span><text:span text:style-name="T15">n</text:span><text:span text:style-name="T15">a</text:span><text:span text:style-name="T15"> </text:span><text:span text:style-name="T15">r</text:span><text:span text:style-name="T15">i</text:span><text:span text:style-name="T15">c</text:span><text:span text:style-name="T15">h</text:span><text:span text:style-name="T15">i</text:span><text:span text:style-name="T15">e</text:span><text:span text:style-name="T15">s</text:span><text:span text:style-name="T15">t</text:span><text:span text:style-name="T15">a</text:span><text:span text:style-name="T15"> </text:span><text:span text:style-name="T15">d</text:span><text:span text:style-name="T15">i</text:span><text:span text:style-name="T15"> </text:span><text:span text:style-name="T15">x</text:span><text:span text:style-name="T15"> </text:span><text:span text:style-name="T15">b</text:span><text:span text:style-name="T15">y</text:span><text:span text:style-name="T15">t</text:span><text:span text:style-name="T15">e</text:span><text:span text:style-name="T15">:</text:span><text:span text:style-name="T15"> </text:span><text:span text:style-name="T15">i</text:span><text:span text:style-name="T15">l</text:span><text:span text:style-name="T15"> </text:span><text:span text:style-name="T15">p</text:span><text:span text:style-name="T15">r</text:span><text:span text:style-name="T15">o</text:span><text:span text:style-name="T15">g</text:span><text:span text:style-name="T15">r</text:span><text:span text:style-name="T15">a</text:span><text:span text:style-name="T15">m</text:span><text:span text:style-name="T15">m</text:span><text:span text:style-name="T15">a</text:span><text:span text:style-name="T15"> </text:span><text:span text:style-name="T15">a</text:span><text:span text:style-name="T15">l</text:span><text:span text:style-name="T15">l</text:span><text:span text:style-name="T15">o</text:span><text:span text:style-name="T15">c</text:span><text:span text:style-name="T15">a</text:span><text:span text:style-name="T15"> </text:span><text:span text:style-name="T15">x</text:span><text:span text:style-name="T15"> </text:span><text:span text:style-name="T15">+</text:span><text:span text:style-name="T15"> </text:span><text:span text:style-name="T15">8</text:span><text:span text:style-name="T15"> </text:span><text:span text:style-name="T15">b</text:span><text:span text:style-name="T15">y</text:span><text:span text:style-name="T15">t</text:span><text:span text:style-name="T15">e</text:span><text:span text:style-name="T15"> </text:span><text:span text:style-name="T15">e</text:span><text:span text:style-name="T15"> </text:span><text:span text:style-name="T15">p</text:span><text:span text:style-name="T15">e</text:span><text:span text:style-name="T15">r</text:span><text:span text:style-name="T15">m</text:span><text:span text:style-name="T15">e</text:span><text:span text:style-name="T15">t</text:span><text:span text:style-name="T15">t</text:span><text:span text:style-name="T15">e</text:span><text:span text:style-name="T15"> </text:span><text:span text:style-name="T15">d</text:span><text:span text:style-name="T15">i</text:span><text:span text:style-name="T15"> </text:span><text:span text:style-name="T15">o</text:span><text:span text:style-name="T15">t</text:span><text:span text:style-name="T15">t</text:span><text:span text:style-name="T15">e</text:span><text:span text:style-name="T15">n</text:span><text:span text:style-name="T15">e</text:span><text:span text:style-name="T15">r</text:span><text:span text:style-name="T15">e</text:span><text:span text:style-name="T15"> </text:span><text:span text:style-name="T15">p</text:span><text:span text:style-name="T15">o</text:span><text:span text:style-name="T15">r</text:span><text:span text:style-name="T15">z</text:span><text:span text:style-name="T15">i</text:span><text:span text:style-name="T15">o</text:span><text:span text:style-name="T15">n</text:span><text:span text:style-name="T15">i</text:span><text:span text:style-name="T15"> </text:span><text:span text:style-name="T15">d</text:span><text:span text:style-name="T15">e</text:span><text:span text:style-name="T15">l</text:span><text:span text:style-name="T15">l</text:span><text:span text:style-name="T15">a</text:span><text:span text:style-name="T15"> </text:span><text:span text:style-name="T15">m</text:span><text:span text:style-name="T15">e</text:span><text:span text:style-name="T15">m</text:span><text:span text:style-name="T15">o</text:span><text:span text:style-name="T15">r</text:span><text:span text:style-name="T15">i</text:span><text:span text:style-name="T15">a</text:span><text:span text:style-name="T15"> </text:span><text:span text:style-name="T15">r</text:span><text:span text:style-name="T15">i</text:span><text:span text:style-name="T15">c</text:span><text:span text:style-name="T15">h</text:span><text:span text:style-name="T15">i</text:span><text:span text:style-name="T15">e</text:span><text:span text:style-name="T15">s</text:span><text:span text:style-name="T15">t</text:span><text:span text:style-name="T15">a</text:span><text:span text:style-name="T15"> </text:span><text:span text:style-name="T15"><text:s/></text:span><text:span text:style-name="T15">s</text:span><text:span text:style-name="T15">u</text:span><text:span text:style-name="T15">c</text:span><text:span text:style-name="T15">c</text:span><text:span text:style-name="T15">e</text:span><text:span text:style-name="T15">s</text:span><text:span text:style-name="T15">s</text:span><text:span text:style-name="T15">i</text:span><text:span text:style-name="T15">v</text:span><text:span text:style-name="T15">a</text:span><text:span text:style-name="T15">m</text:span><text:span text:style-name="T15">e</text:span><text:span text:style-name="T15">n</text:span><text:span text:style-name="T15">t</text:span><text:span text:style-name="T15">e</text:span></text:p>
            <text:p text:style-name="P1"><text:span text:style-name="T9"/></text:p>
            <text:p text:style-name="P1"><text:span text:style-name="T11"/></text:p>
          </draw:text-box>
        </draw:frame>
        <draw:g draw:style-name="gr19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8" draw:text-style-name="P20" draw:layer="layout" svg:width="8.255cm" svg:height="0.671cm" svg:x="10.508cm" svg:y="15.25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9"><text:span text:style-name="T20">mem_aren</text:span><text:span text:style-name="T20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2" draw:layer="layout" svg:width="8.255cm" svg:height="1.603cm" svg:x="10.508cm" svg:y="15.92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21"><text:span text:style-name="T20">-</text:span><text:span text:style-name="T20">[</text:span><text:span text:style-name="T20">b</text:span><text:span text:style-name="T20">y</text:span><text:span text:style-name="T20">t</text:span><text:span text:style-name="T20">e</text:span><text:span text:style-name="T20"> </text:span><text:span text:style-name="T20">0</text:span><text:span text:style-name="T20">-</text:span><text:span text:style-name="T20">3</text:span><text:span text:style-name="T20">]</text:span><text:span text:style-name="T20"> </text:span><text:span text:style-name="T20">:</text:span><text:span text:style-name="T20"> </text:span><text:span text:style-name="T20">i</text:span><text:span text:style-name="T20">n</text:span><text:span text:style-name="T20">t</text:span><text:span text:style-name="T20">e</text:span><text:span text:style-name="T20">r</text:span><text:span text:style-name="T20">o</text:span><text:span text:style-name="T20">:</text:span><text:span text:style-name="T20"> </text:span><text:span text:style-name="T20">n</text:span><text:span text:style-name="T20">u</text:span><text:span text:style-name="T20">m</text:span><text:span text:style-name="T20">e</text:span><text:span text:style-name="T20">r</text:span><text:span text:style-name="T20">o</text:span><text:span text:style-name="T20"> </text:span><text:span text:style-name="T20">d</text:span><text:span text:style-name="T20">i</text:span><text:span text:style-name="T20"> </text:span><text:span text:style-name="T20">b</text:span><text:span text:style-name="T20">y</text:span><text:span text:style-name="T20">t</text:span><text:span text:style-name="T20">e</text:span><text:span text:style-name="T20"> </text:span><text:span text:style-name="T20">u</text:span><text:span text:style-name="T20">t</text:span><text:span text:style-name="T20">i</text:span><text:span text:style-name="T20">l</text:span><text:span text:style-name="T20">i</text:span><text:span text:style-name="T20">z</text:span><text:span text:style-name="T20">z</text:span><text:span text:style-name="T20">a</text:span><text:span text:style-name="T20">t</text:span><text:span text:style-name="T20">i</text:span></text:p>
            <text:p text:style-name="P21"><text:span text:style-name="T20">-</text:span><text:span text:style-name="T20">[</text:span><text:span text:style-name="T20">b</text:span><text:span text:style-name="T20">y</text:span><text:span text:style-name="T20">t</text:span><text:span text:style-name="T20">e</text:span><text:span text:style-name="T20"> </text:span><text:span text:style-name="T20">4</text:span><text:span text:style-name="T20">-</text:span><text:span text:style-name="T20">7</text:span><text:span text:style-name="T20">]</text:span><text:span text:style-name="T20"> </text:span><text:span text:style-name="T20">:</text:span><text:span text:style-name="T20"> </text:span><text:span text:style-name="T20">i</text:span><text:span text:style-name="T20">n</text:span><text:span text:style-name="T20">t</text:span><text:span text:style-name="T20">e</text:span><text:span text:style-name="T20">r</text:span><text:span text:style-name="T20">o</text:span><text:span text:style-name="T20">:</text:span><text:span text:style-name="T20"> </text:span><text:span text:style-name="T20">g</text:span><text:span text:style-name="T20">r</text:span><text:span text:style-name="T20">a</text:span><text:span text:style-name="T20">n</text:span><text:span text:style-name="T20">d</text:span><text:span text:style-name="T20">e</text:span><text:span text:style-name="T20">z</text:span><text:span text:style-name="T20">z</text:span><text:span text:style-name="T20">a</text:span><text:span text:style-name="T20"> </text:span><text:span text:style-name="T20">a</text:span><text:span text:style-name="T20">r</text:span><text:span text:style-name="T20">e</text:span><text:span text:style-name="T20">n</text:span><text:span text:style-name="T20">a</text:span></text:p>
            <text:p text:style-name="P21"><text:span text:style-name="T20">-</text:span><text:span text:style-name="T20">[</text:span><text:span text:style-name="T20">b</text:span><text:span text:style-name="T20">y</text:span><text:span text:style-name="T20">t</text:span><text:span text:style-name="T20">e</text:span><text:span text:style-name="T20"> </text:span><text:span text:style-name="T20">8</text:span><text:span text:style-name="T20">-</text:span><text:span text:style-name="T20">x</text:span><text:span text:style-name="T20">]</text:span><text:span text:style-name="T20"> </text:span><text:span text:style-name="T20">:</text:span><text:span text:style-name="T20"> </text:span><text:span text:style-name="T20">m</text:span><text:span text:style-name="T20">e</text:span><text:span text:style-name="T20">m</text:span><text:span text:style-name="T20">o</text:span><text:span text:style-name="T20">r</text:span><text:span text:style-name="T20">i</text:span><text:span text:style-name="T20">a</text:span><text:span text:style-name="T20"> </text:span><text:span text:style-name="T20">a</text:span><text:span text:style-name="T20">l</text:span><text:span text:style-name="T20">l</text:span><text:span text:style-name="T20">o</text:span><text:span text:style-name="T20">c</text:span><text:span text:style-name="T20">a</text:span><text:span text:style-name="T20">b</text:span><text:span text:style-name="T20">i</text:span><text:span text:style-name="T20">l</text:span><text:span text:style-name="T20">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name="occurrence_map" draw:style-name="gr10" draw:text-style-name="P9" draw:layer="layout" svg:width="8.789cm" svg:height="1.522cm" svg:x="1.604cm" svg:y="19.188cm">
          <draw:text-box>
            <text:p text:style-name="P1"><text:span text:style-name="T9">occurrence_map:</text:span><text:span text:style-name="T10"> </text:span><text:span text:style-name="T15">struttura di 384 byte:</text:span><text:span text:style-name="T15">(carattere massimo – carattere minimo + 1) </text:span><text:span text:style-name="T15">* 4.</text:span></text:p>
            <text:p text:style-name="P1"><text:span text:style-name="T15">Consiste in un array di puntatori a liste </text:span><text:span text:style-name="T15">concatenate, ogni elemento “I” corrisponde </text:span><text:span text:style-name="T15">alla lista di occorrenze del carattere ascii(i + </text:span><text:span text:style-name="T15">32), in caso in cui non ci siano occorrenze </text:span><text:span text:style-name="T15">del carattere, la lista risulta nulla</text:span></text:p>
          </draw:text-box>
        </draw:frame>
        <draw:g draw:style-name="gr19" xml:id="id3" draw:id="id3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0" draw:text-style-name="P20" draw:layer="layout" svg:width="8.573cm" svg:height="0.671cm" svg:x="10.508cm" svg:y="19.8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9"><text:span text:style-name="T20">o</text:span><text:span text:style-name="T20">c</text:span><text:span text:style-name="T20">c</text:span><text:span text:style-name="T20">u</text:span><text:span text:style-name="T20">r</text:span><text:span text:style-name="T20">r</text:span><text:span text:style-name="T20">e</text:span><text:span text:style-name="T20">n</text:span><text:span text:style-name="T20">c</text:span><text:span text:style-name="T20">e</text:span><text:span text:style-name="T20">_</text:span><text:span text:style-name="T20">m</text:span><text:span text:style-name="T20">a</text:span><text:span text:style-name="T20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2" draw:layer="layout" svg:width="8.573cm" svg:height="0.671cm" svg:x="10.508cm" svg:y="20.50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21"><text:span text:style-name="T20">-</text:span><text:span text:style-name="T20">[byt</text:span><text:span text:style-name="T20">e </text:span><text:span text:style-name="T20">0-</text:span><text:span text:style-name="T20">38</text:span><text:span text:style-name="T20">3] : </text:span><text:span text:style-name="T20">list</text:span><text:span text:style-name="T20">_no</text:span><text:span text:style-name="T20">de[</text:span><text:span text:style-name="T20">96] 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name="list_node" draw:style-name="gr10" draw:text-style-name="P9" draw:layer="layout" svg:width="8.789cm" svg:height="1.522cm" svg:x="1.705cm" svg:y="23.988cm">
          <draw:text-box>
            <text:p text:style-name="P1"><text:span text:style-name="T9">l</text:span><text:span text:style-name="T9">i</text:span><text:span text:style-name="T9">s</text:span><text:span text:style-name="T9">t</text:span><text:span text:style-name="T9">_</text:span><text:span text:style-name="T9">n</text:span><text:span text:style-name="T9">o</text:span><text:span text:style-name="T9">d</text:span><text:span text:style-name="T9">e</text:span><text:span text:style-name="T9">:</text:span><text:span text:style-name="T10"> </text:span><text:span text:style-name="T15">S</text:span><text:span text:style-name="T15">t</text:span><text:span text:style-name="T15">r</text:span><text:span text:style-name="T15">u</text:span><text:span text:style-name="T15">t</text:span><text:span text:style-name="T15">t</text:span><text:span text:style-name="T15">u</text:span><text:span text:style-name="T15">r</text:span><text:span text:style-name="T15">a</text:span><text:span text:style-name="T15"> </text:span><text:span text:style-name="T15">d</text:span><text:span text:style-name="T15">i</text:span><text:span text:style-name="T15"> </text:span><text:span text:style-name="T15">8</text:span><text:span text:style-name="T15"> </text:span><text:span text:style-name="T15">b</text:span><text:span text:style-name="T15">y</text:span><text:span text:style-name="T15">t</text:span><text:span text:style-name="T15">e</text:span><text:span text:style-name="T15"> </text:span><text:span text:style-name="T15">c</text:span><text:span text:style-name="T15">h</text:span><text:span text:style-name="T15">e</text:span><text:span text:style-name="T15"> </text:span><text:span text:style-name="T15">i</text:span><text:span text:style-name="T15">n</text:span><text:span text:style-name="T15">d</text:span><text:span text:style-name="T15">i</text:span><text:span text:style-name="T15">c</text:span><text:span text:style-name="T15">a</text:span><text:span text:style-name="T15"> </text:span><text:span text:style-name="T15">u</text:span><text:span text:style-name="T15">n</text:span><text:span text:style-name="T15">a</text:span><text:span text:style-name="T15"> </text:span><text:span text:style-name="T15">s</text:span><text:span text:style-name="T15">i</text:span><text:span text:style-name="T15">n</text:span><text:span text:style-name="T15">g</text:span><text:span text:style-name="T15">o</text:span><text:span text:style-name="T15">l</text:span><text:span text:style-name="T15">a</text:span><text:span text:style-name="T15"> </text:span><text:span text:style-name="T15">o</text:span><text:span text:style-name="T15">c</text:span><text:span text:style-name="T15">c</text:span><text:span text:style-name="T15">o</text:span><text:span text:style-name="T15">r</text:span><text:span text:style-name="T15">r</text:span><text:span text:style-name="T15">e</text:span><text:span text:style-name="T15">n</text:span><text:span text:style-name="T15">z</text:span><text:span text:style-name="T15">a</text:span><text:span text:style-name="T15"> </text:span><text:span text:style-name="T15">d</text:span><text:span text:style-name="T15">i</text:span><text:span text:style-name="T15"> </text:span><text:span text:style-name="T15">u</text:span><text:span text:style-name="T15">n</text:span><text:span text:style-name="T15"> </text:span><text:span text:style-name="T15">c</text:span><text:span text:style-name="T15">a</text:span><text:span text:style-name="T15">r</text:span><text:span text:style-name="T15">a</text:span><text:span text:style-name="T15">t</text:span><text:span text:style-name="T15">t</text:span><text:span text:style-name="T15">e</text:span><text:span text:style-name="T15">r</text:span><text:span text:style-name="T15">e</text:span><text:span text:style-name="T15"> </text:span><text:span text:style-name="T15">n</text:span><text:span text:style-name="T15">e</text:span><text:span text:style-name="T15">l</text:span><text:span text:style-name="T15"> </text:span><text:span text:style-name="T15">t</text:span><text:span text:style-name="T15">e</text:span><text:span text:style-name="T15">s</text:span><text:span text:style-name="T15">t</text:span><text:span text:style-name="T15">o</text:span><text:span text:style-name="T15"> </text:span><text:span text:style-name="T15">d</text:span><text:span text:style-name="T15">a</text:span><text:span text:style-name="T15"> </text:span><text:span text:style-name="T15">c</text:span><text:span text:style-name="T15">i</text:span><text:span text:style-name="T15">f</text:span><text:span text:style-name="T15">r</text:span><text:span text:style-name="T15">a</text:span><text:span text:style-name="T15">r</text:span><text:span text:style-name="T15">e</text:span></text:p>
          </draw:text-box>
        </draw:frame>
        <draw:g draw:style-name="gr19" xml:id="id2" draw:id="id2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2" draw:text-style-name="P20" draw:layer="layout" svg:width="8.059cm" svg:height="0.671cm" svg:x="11.021cm" svg:y="23.54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9"><text:span text:style-name="T20">l</text:span><text:span text:style-name="T20">i</text:span><text:span text:style-name="T20">s</text:span><text:span text:style-name="T20">t</text:span><text:span text:style-name="T20">_</text:span><text:span text:style-name="T20">n</text:span><text:span text:style-name="T20">o</text:span><text:span text:style-name="T20">d</text:span><text:span text:style-name="T20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22" draw:layer="layout" svg:width="8.059cm" svg:height="1.137cm" svg:x="11.021cm" svg:y="24.21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21"><text:span text:style-name="T20">-[byte 0-3] = indice di occorrenza</text:span></text:p>
            <text:p text:style-name="P21"><text:span text:style-name="T20">-[byte 4-7] = indirizzo del prossimo nod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4" draw:text-style-name="P23" draw:layer="layout" svg:x1="15.05cm" svg:y1="23.545cm" svg:x2="13.937cm" svg:y2="21.18cm" draw:start-shape="id2" draw:start-glue-point="0" draw:end-shape="id3" draw:end-glue-point="5" svg:d="M15050 23545v-1183h-1113v-1182" svg:viewBox="0 0 1114 2366">
          <text:p/>
        </draw:connector>
        <draw:frame draw:style-name="gr35" draw:text-style-name="P25" draw:layer="layout" svg:width="0.69cm" svg:height="0.769cm" svg:x="12.972cm" svg:y="21.482cm">
          <draw:text-box>
            <text:p text:style-name="P24"><text:span text:style-name="T21">1</text:span><text:span text:style-name="T21">..</text:span><text:span text:style-name="T21">1</text:span></text:p>
          </draw:text-box>
        </draw:frame>
        <draw:connector draw:style-name="gr36" draw:text-style-name="P23" draw:layer="layout" svg:x1="17.023cm" svg:y1="25.376cm" svg:x2="15.05cm" svg:y2="25.353cm" draw:end-shape="id2" svg:d="M17023 25376v503h-1973v-526" svg:viewBox="0 0 1974 527">
          <text:p/>
        </draw:connector>
        <draw:frame draw:style-name="gr37" draw:text-style-name="P25" draw:layer="layout" svg:width="0.711cm" svg:height="0.536cm" svg:x="14.01cm" svg:y="25.54cm">
          <draw:text-box>
            <text:p text:style-name="P24"><text:span text:style-name="T21">0..1</text:span></text:p>
          </draw:text-box>
        </draw:frame>
        <draw:frame draw:style-name="gr38" draw:text-style-name="P27" draw:layer="layout" svg:width="0.711cm" svg:height="0.475cm" svg:x="15.195cm" svg:y="23.056cm">
          <draw:text-box>
            <text:p text:style-name="P26"><text:span text:style-name="T22">0</text:span><text:span text:style-name="T22">.</text:span><text:span text:style-name="T22">.</text:span><text:span text:style-name="T22">*</text:span></text:p>
          </draw:text-box>
        </draw:frame>
        <draw:frame draw:name="heap" draw:style-name="gr10" draw:text-style-name="P9" draw:layer="layout" svg:width="8.49cm" svg:height="1.522cm" svg:x="1.601cm" svg:y="3.971cm">
          <draw:text-box>
            <text:p text:style-name="P1"><text:span text:style-name="T9">h</text:span><text:span text:style-name="T9">e</text:span><text:span text:style-name="T9">a</text:span><text:span text:style-name="T9">p</text:span><text:span text:style-name="T9">:</text:span><text:span text:style-name="T9"> </text:span><text:span text:style-name="T15">R</text:span><text:span text:style-name="T15">a</text:span><text:span text:style-name="T15">c</text:span><text:span text:style-name="T15">c</text:span><text:span text:style-name="T15">o</text:span><text:span text:style-name="T15">g</text:span><text:span text:style-name="T15">l</text:span><text:span text:style-name="T15">i</text:span><text:span text:style-name="T15">e</text:span><text:span text:style-name="T15"> </text:span><text:span text:style-name="T15">l</text:span><text:span text:style-name="T15">a</text:span><text:span text:style-name="T15"> </text:span><text:span text:style-name="T15">m</text:span><text:span text:style-name="T15">e</text:span><text:span text:style-name="T15">m</text:span><text:span text:style-name="T15">o</text:span><text:span text:style-name="T15">r</text:span><text:span text:style-name="T15">i</text:span><text:span text:style-name="T15">a</text:span><text:span text:style-name="T15"> </text:span><text:span text:style-name="T15">a</text:span><text:span text:style-name="T15">l</text:span><text:span text:style-name="T15">l</text:span><text:span text:style-name="T15">o</text:span><text:span text:style-name="T15">c</text:span><text:span text:style-name="T15">a</text:span><text:span text:style-name="T15">t</text:span><text:span text:style-name="T15">a</text:span><text:span text:style-name="T15"> </text:span><text:span text:style-name="T15">d</text:span><text:span text:style-name="T15">i</text:span><text:span text:style-name="T15">n</text:span><text:span text:style-name="T15">a</text:span><text:span text:style-name="T15">m</text:span><text:span text:style-name="T15">i</text:span><text:span text:style-name="T15">c</text:span><text:span text:style-name="T15">a</text:span><text:span text:style-name="T15">m</text:span><text:span text:style-name="T15">e</text:span><text:span text:style-name="T15">n</text:span><text:span text:style-name="T15">t</text:span><text:span text:style-name="T15">e</text:span><text:span text:style-name="T15"> </text:span><text:span text:style-name="T15">d</text:span><text:span text:style-name="T15">a</text:span><text:span text:style-name="T15">l</text:span><text:span text:style-name="T15"> </text:span><text:span text:style-name="T15">p</text:span><text:span text:style-name="T15">r</text:span><text:span text:style-name="T15">o</text:span><text:span text:style-name="T15">g</text:span><text:span text:style-name="T15">r</text:span><text:span text:style-name="T15">a</text:span><text:span text:style-name="T15">m</text:span><text:span text:style-name="T15">m</text:span><text:span text:style-name="T15">a</text:span><text:span text:style-name="T15">,</text:span><text:span text:style-name="T15"> </text:span><text:span text:style-name="T15">u</text:span><text:span text:style-name="T15">n</text:span><text:span text:style-name="T15">i</text:span><text:span text:style-name="T15">c</text:span><text:span text:style-name="T15">o</text:span><text:span text:style-name="T15"> </text:span><text:span text:style-name="T15">n</text:span><text:span text:style-name="T15">e</text:span><text:span text:style-name="T15">l</text:span><text:span text:style-name="T15"> </text:span><text:span text:style-name="T15">p</text:span><text:span text:style-name="T15">r</text:span><text:span text:style-name="T15">o</text:span><text:span text:style-name="T15">g</text:span><text:span text:style-name="T15">r</text:span><text:span text:style-name="T15">a</text:span><text:span text:style-name="T15">m</text:span><text:span text:style-name="T15">m</text:span><text:span text:style-name="T15">a</text:span><text:span text:style-name="T15">,</text:span><text:span text:style-name="T15"> </text:span><text:span text:style-name="T15">s</text:span><text:span text:style-name="T15">e</text:span><text:span text:style-name="T15"> </text:span><text:span text:style-name="T15">n</text:span><text:span text:style-name="T15">e</text:span><text:span text:style-name="T15">c</text:span><text:span text:style-name="T15">e</text:span><text:span text:style-name="T15">s</text:span><text:span text:style-name="T15">s</text:span><text:span text:style-name="T15">a</text:span><text:span text:style-name="T15">r</text:span><text:span text:style-name="T15">i</text:span><text:span text:style-name="T15">o</text:span><text:span text:style-name="T15"> </text:span><text:span text:style-name="T15">v</text:span><text:span text:style-name="T15">i</text:span><text:span text:style-name="T15">e</text:span><text:span text:style-name="T15">n</text:span><text:span text:style-name="T15">e</text:span><text:span text:style-name="T15"> </text:span><text:span text:style-name="T15">e</text:span><text:span text:style-name="T15">s</text:span><text:span text:style-name="T15">t</text:span><text:span text:style-name="T15">e</text:span><text:span text:style-name="T15">s</text:span><text:span text:style-name="T15">o</text:span><text:span text:style-name="T15"> </text:span><text:span text:style-name="T15">c</text:span><text:span text:style-name="T15">o</text:span><text:span text:style-name="T15">n</text:span><text:span text:style-name="T15"> </text:span><text:span text:style-name="T15">l</text:span><text:span text:style-name="T15">a</text:span><text:span text:style-name="T15"> </text:span><text:span text:style-name="T15">s</text:span><text:span text:style-name="T15">y</text:span><text:span text:style-name="T15">s</text:span><text:span text:style-name="T15">c</text:span><text:span text:style-name="T15">a</text:span><text:span text:style-name="T15">l</text:span><text:span text:style-name="T15">l</text:span><text:span text:style-name="T15"> </text:span><text:span text:style-name="T15">“</text:span><text:span text:style-name="T15">b</text:span><text:span text:style-name="T15">r</text:span><text:span text:style-name="T15">k</text:span><text:span text:style-name="T15">”</text:span><text:span text:style-name="T15">,</text:span><text:span text:style-name="T15"> </text:span><text:span text:style-name="T15">e</text:span><text:span text:style-name="T15"> </text:span><text:span text:style-name="T15">h</text:span><text:span text:style-name="T15">e</text:span><text:span text:style-name="T15">a</text:span><text:span text:style-name="T15">p</text:span><text:span text:style-name="T15">_</text:span><text:span text:style-name="T15">s</text:span><text:span text:style-name="T15">i</text:span><text:span text:style-name="T15">z</text:span><text:span text:style-name="T15">e</text:span><text:span text:style-name="T15"> </text:span><text:span text:style-name="T15">a</text:span><text:span text:style-name="T15">g</text:span><text:span text:style-name="T15">g</text:span><text:span text:style-name="T15">i</text:span><text:span text:style-name="T15">o</text:span><text:span text:style-name="T15">r</text:span><text:span text:style-name="T15">n</text:span><text:span text:style-name="T15">a</text:span><text:span text:style-name="T15">t</text:span><text:span text:style-name="T15">a</text:span><text:span text:style-name="T15"> </text:span><text:span text:style-name="T15">d</text:span><text:span text:style-name="T15">i</text:span><text:span text:style-name="T15"> </text:span><text:span text:style-name="T15">c</text:span><text:span text:style-name="T15">o</text:span><text:span text:style-name="T15">n</text:span><text:span text:style-name="T15">s</text:span><text:span text:style-name="T15">e</text:span><text:span text:style-name="T15">g</text:span><text:span text:style-name="T15">u</text:span><text:span text:style-name="T15">e</text:span><text:span text:style-name="T15">n</text:span><text:span text:style-name="T15">z</text:span><text:span text:style-name="T15">a</text:span></text:p>
          </draw:text-box>
        </draw:frame>
        <draw:g draw:style-name="gr19" xml:id="id4" draw:id="id4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9" draw:text-style-name="P20" draw:layer="layout" svg:width="9.207cm" svg:height="0.671cm" svg:x="10.19cm" svg:y="3.84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9"><text:span text:style-name="T20">h</text:span><text:span text:style-name="T20">e</text:span><text:span text:style-name="T20">a</text:span><text:span text:style-name="T20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2" draw:layer="layout" svg:width="9.207cm" svg:height="1.137cm" svg:x="10.19cm" svg:y="4.52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21"><text:span text:style-name="T20">-heap_size</text:span><text:span text:style-name="T20">: </text:span><text:span text:style-name="T20">grandezza </text:span><text:span text:style-name="T20">totale in </text:span><text:span text:style-name="T20">byte</text:span></text:p>
            <text:p text:style-name="P21"><text:span text:style-name="T20">-heap_star</text:span><text:span text:style-name="T20">t : indirizzo </text:span><text:span text:style-name="T20">da cui </text:span><text:span text:style-name="T20">inizia 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1" draw:text-style-name="P27" draw:layer="layout" svg:width="0.711cm" svg:height="0.475cm" svg:x="15.021cm" svg:y="5.855cm">
          <draw:text-box>
            <text:p text:style-name="P26"><text:span text:style-name="T22">1..1</text:span></text:p>
          </draw:text-box>
        </draw:frame>
        <draw:frame draw:style-name="gr42" draw:text-style-name="P25" draw:layer="layout" svg:width="0.711cm" svg:height="0.536cm" svg:x="12.119cm" svg:y="6.624cm">
          <draw:text-box>
            <text:p text:style-name="P24"><text:span text:style-name="T21">1..</text:span><text:span text:style-name="T21">*</text:span></text:p>
          </draw:text-box>
        </draw:frame>
        <draw:connector draw:style-name="gr43" draw:text-style-name="P30" draw:layer="layout" svg:x1="13.235cm" svg:y1="7.207cm" svg:x2="14.793cm" svg:y2="5.657cm" draw:end-shape="id4" draw:end-glue-point="2" svg:d="M13235 7207v-512h1558v-1038" svg:viewBox="0 0 1559 1551">
          <text:p/>
        </draw:connector>
        <draw:frame draw:style-name="gr15" draw:text-style-name="P15" draw:layer="layout" svg:width="0.943cm" svg:height="0.642cm" svg:x="1.475cm" svg:y="28.154cm">
          <draw:text-box>
            <text:p text:style-name="P1"><text:span text:style-name="T16">2</text:span></text:p>
          </draw:text-box>
        </draw:frame>
      </draw:page>
      <draw:page draw:name="page3" draw:style-name="dp1" draw:master-page-name="master-page64">
        <draw:frame draw:style-name="gr15" draw:text-style-name="P15" draw:layer="layout" svg:width="0.943cm" svg:height="0.642cm" svg:x="1.474cm" svg:y="28.154cm">
          <draw:text-box>
            <text:p text:style-name="P1"><text:span text:style-name="T16">3</text:span></text:p>
          </draw:text-box>
        </draw:frame>
        <draw:frame draw:style-name="gr44" draw:text-style-name="P8" draw:layer="layout" svg:width="5.771cm" svg:height="0.543cm" svg:x="1.401cm" svg:y="2.026cm">
          <draw:text-box>
            <text:p text:style-name="P1"><text:span text:style-name="T7">Procedu</text:span><text:span text:style-name="T7">re </text:span><text:span text:style-name="T7">notevoli: </text:span></text:p>
          </draw:text-box>
        </draw:frame>
        <draw:frame draw:name="cypher_iter" draw:style-name="gr45" draw:text-style-name="P31" draw:layer="layout" svg:width="8.415cm" svg:height="0.543cm" svg:x="1.401cm" svg:y="2.623cm">
          <draw:text-box>
            <text:p text:style-name="P1"><text:span text:style-name="T25">cy</text:span><text:span text:style-name="T25">ph</text:span><text:span text:style-name="T25">er</text:span><text:span text:style-name="T25">_it</text:span><text:span text:style-name="T25">er:</text:span></text:p>
          </draw:text-box>
        </draw:frame>
        <draw:frame draw:style-name="gr46" draw:text-style-name="P32" draw:layer="layout" svg:width="18.237cm" svg:height="2.072cm" svg:x="1.455cm" svg:y="3.458cm">
          <draw:text-box>
            <text:p text:style-name="P1"><text:span text:style-name="T8">P</text:span><text:span text:style-name="T8">r</text:span><text:span text:style-name="T8">o</text:span><text:span text:style-name="T8">c</text:span><text:span text:style-name="T8">e</text:span><text:span text:style-name="T8">d</text:span><text:span text:style-name="T8">u</text:span><text:span text:style-name="T8">r</text:span><text:span text:style-name="T8">a</text:span><text:span text:style-name="T8"> </text:span><text:span text:style-name="T8">p</text:span><text:span text:style-name="T8">r</text:span><text:span text:style-name="T8">i</text:span><text:span text:style-name="T8">n</text:span><text:span text:style-name="T8">c</text:span><text:span text:style-name="T8">i</text:span><text:span text:style-name="T8">p</text:span><text:span text:style-name="T8">a</text:span><text:span text:style-name="T8">l</text:span><text:span text:style-name="T8">e</text:span><text:span text:style-name="T8"> </text:span><text:span text:style-name="T8">d</text:span><text:span text:style-name="T8">e</text:span><text:span text:style-name="T8">l</text:span><text:span text:style-name="T8"> </text:span><text:span text:style-name="T8">p</text:span><text:span text:style-name="T8">r</text:span><text:span text:style-name="T8">o</text:span><text:span text:style-name="T8">g</text:span><text:span text:style-name="T8">r</text:span><text:span text:style-name="T8">a</text:span><text:span text:style-name="T8">m</text:span><text:span text:style-name="T8">m</text:span><text:span text:style-name="T8">a</text:span><text:span text:style-name="T8">,</text:span><text:span text:style-name="T8"> </text:span><text:span text:style-name="T8">i</text:span><text:span text:style-name="T8">t</text:span><text:span text:style-name="T8">e</text:span><text:span text:style-name="T8">r</text:span><text:span text:style-name="T8">a</text:span><text:span text:style-name="T8"> </text:span><text:span text:style-name="T8">s</text:span><text:span text:style-name="T8">u</text:span><text:span text:style-name="T8">l</text:span><text:span text:style-name="T8">l</text:span><text:span text:style-name="T8">a</text:span><text:span text:style-name="T8"> </text:span><text:span text:style-name="T8">s</text:span><text:span text:style-name="T8">t</text:span><text:span text:style-name="T8">r</text:span><text:span text:style-name="T8">i</text:span><text:span text:style-name="T8">n</text:span><text:span text:style-name="T8">g</text:span><text:span text:style-name="T8">a</text:span><text:span text:style-name="T8"> </text:span><text:span text:style-name="T8">c</text:span><text:span text:style-name="T8">y</text:span><text:span text:style-name="T8">p</text:span><text:span text:style-name="T8">h</text:span><text:span text:style-name="T8">e</text:span><text:span text:style-name="T8">r</text:span><text:span text:style-name="T8"> </text:span><text:span text:style-name="T8">p</text:span><text:span text:style-name="T8">a</text:span><text:span text:style-name="T8">s</text:span><text:span text:style-name="T8">s</text:span><text:span text:style-name="T8">a</text:span><text:span text:style-name="T8">t</text:span><text:span text:style-name="T8">a</text:span><text:span text:style-name="T8"> </text:span><text:span text:style-name="T8">c</text:span><text:span text:style-name="T8">o</text:span><text:span text:style-name="T8">m</text:span><text:span text:style-name="T8">e</text:span><text:span text:style-name="T8"> </text:span><text:span text:style-name="T8">p</text:span><text:span text:style-name="T8">a</text:span><text:span text:style-name="T8">r</text:span><text:span text:style-name="T8">a</text:span><text:span text:style-name="T8">m</text:span><text:span text:style-name="T8">e</text:span><text:span text:style-name="T8">t</text:span><text:span text:style-name="T8">r</text:span><text:span text:style-name="T8">o</text:span><text:span text:style-name="T8">,</text:span><text:span text:style-name="T8"> </text:span><text:span text:style-name="T8">a</text:span><text:span text:style-name="T8">p</text:span><text:span text:style-name="T8">p</text:span><text:span text:style-name="T8">l</text:span><text:span text:style-name="T8">i</text:span><text:span text:style-name="T8">c</text:span><text:span text:style-name="T8">a</text:span><text:span text:style-name="T8"> </text:span><text:span text:style-name="T8">l</text:span><text:span text:style-name="T8">e</text:span><text:span text:style-name="T8"> </text:span><text:span text:style-name="T8">f</text:span><text:span text:style-name="T8">u</text:span><text:span text:style-name="T8">n</text:span><text:span text:style-name="T8">z</text:span><text:span text:style-name="T8">i</text:span><text:span text:style-name="T8">o</text:span><text:span text:style-name="T8">n</text:span><text:span text:style-name="T8">i</text:span><text:span text:style-name="T8"> </text:span><text:span text:style-name="T8">d</text:span><text:span text:style-name="T8">i</text:span><text:span text:style-name="T8"> </text:span><text:span text:style-name="T8">c</text:span><text:span text:style-name="T8">i</text:span><text:span text:style-name="T8">f</text:span><text:span text:style-name="T8">r</text:span><text:span text:style-name="T8">a</text:span><text:span text:style-name="T8">t</text:span><text:span text:style-name="T8">u</text:span><text:span text:style-name="T8">r</text:span><text:span text:style-name="T8">a</text:span><text:span text:style-name="T8"> </text:span><text:span text:style-name="T8">i</text:span><text:span text:style-name="T8">n</text:span><text:span text:style-name="T8"> </text:span><text:span text:style-name="T8">b</text:span><text:span text:style-name="T8">a</text:span><text:span text:style-name="T8">s</text:span><text:span text:style-name="T8">e</text:span><text:span text:style-name="T8"> </text:span><text:span text:style-name="T8">a</text:span><text:span text:style-name="T8">l</text:span><text:span text:style-name="T8">l</text:span><text:span text:style-name="T8">a</text:span><text:span text:style-name="T8"> </text:span><text:span text:style-name="T8">l</text:span><text:span text:style-name="T8">e</text:span><text:span text:style-name="T8">t</text:span><text:span text:style-name="T8">t</text:span><text:span text:style-name="T8">e</text:span><text:span text:style-name="T8">r</text:span><text:span text:style-name="T8">a</text:span><text:span text:style-name="T8"> </text:span><text:span text:style-name="T8">c</text:span><text:span text:style-name="T8">o</text:span><text:span text:style-name="T8">r</text:span><text:span text:style-name="T8">r</text:span><text:span text:style-name="T8">e</text:span><text:span text:style-name="T8">n</text:span><text:span text:style-name="T8">t</text:span><text:span text:style-name="T8">e</text:span><text:span text:style-name="T8"> </text:span><text:span text:style-name="T8">d</text:span><text:span text:style-name="T8">e</text:span><text:span text:style-name="T8">l</text:span><text:span text:style-name="T8">l</text:span><text:span text:style-name="T8">a</text:span><text:span text:style-name="T8"> </text:span><text:span text:style-name="T8">s</text:span><text:span text:style-name="T8">t</text:span><text:span text:style-name="T8">r</text:span><text:span text:style-name="T8">i</text:span><text:span text:style-name="T8">n</text:span><text:span text:style-name="T8">g</text:span><text:span text:style-name="T8">a</text:span><text:span text:style-name="T8">,</text:span><text:span text:style-name="T8"> </text:span><text:span text:style-name="T8">p</text:span><text:span text:style-name="T8">o</text:span><text:span text:style-name="T8">i</text:span><text:span text:style-name="T8"> </text:span><text:span text:style-name="T8">s</text:span><text:span text:style-name="T8">t</text:span><text:span text:style-name="T8">a</text:span><text:span text:style-name="T8">m</text:span><text:span text:style-name="T8">p</text:span><text:span text:style-name="T8">a</text:span><text:span text:style-name="T8"> </text:span><text:span text:style-name="T8">i</text:span><text:span text:style-name="T8">l</text:span><text:span text:style-name="T8"> </text:span><text:span text:style-name="T8">r</text:span><text:span text:style-name="T8">i</text:span><text:span text:style-name="T8">s</text:span><text:span text:style-name="T8">u</text:span><text:span text:style-name="T8">l</text:span><text:span text:style-name="T8">t</text:span><text:span text:style-name="T8">a</text:span><text:span text:style-name="T8">t</text:span><text:span text:style-name="T8">o</text:span><text:span text:style-name="T8">,</text:span><text:span text:style-name="T8"> </text:span><text:span text:style-name="T8">e</text:span><text:span text:style-name="T8"> </text:span><text:span text:style-name="T8">l</text:span><text:span text:style-name="T8">i</text:span><text:span text:style-name="T8">b</text:span><text:span text:style-name="T8">e</text:span><text:span text:style-name="T8">r</text:span><text:span text:style-name="T8">a</text:span><text:span text:style-name="T8"> </text:span><text:span text:style-name="T8">l</text:span><text:span text:style-name="T8">a</text:span><text:span text:style-name="T8"> </text:span><text:span text:style-name="T8">s</text:span><text:span text:style-name="T8">t</text:span><text:span text:style-name="T8">r</text:span><text:span text:style-name="T8">i</text:span><text:span text:style-name="T8">n</text:span><text:span text:style-name="T8">g</text:span><text:span text:style-name="T8">a</text:span><text:span text:style-name="T8"> </text:span><text:span text:style-name="T8">p</text:span><text:span text:style-name="T8">r</text:span><text:span text:style-name="T8">e</text:span><text:span text:style-name="T8">c</text:span><text:span text:style-name="T8">e</text:span><text:span text:style-name="T8">d</text:span><text:span text:style-name="T8">e</text:span><text:span text:style-name="T8">n</text:span><text:span text:style-name="T8">t</text:span><text:span text:style-name="T8">e</text:span><text:span text:style-name="T8"> </text:span><text:span text:style-name="T8">a</text:span><text:span text:style-name="T8"> </text:span><text:span text:style-name="T8">p</text:span><text:span text:style-name="T8">a</text:span><text:span text:style-name="T8">r</text:span><text:span text:style-name="T8">t</text:span><text:span text:style-name="T8">i</text:span><text:span text:style-name="T8">r</text:span><text:span text:style-name="T8">e</text:span><text:span text:style-name="T8"> </text:span><text:span text:style-name="T8">d</text:span><text:span text:style-name="T8">a</text:span><text:span text:style-name="T8">l</text:span><text:span text:style-name="T8"> </text:span><text:span text:style-name="T8">s</text:span><text:span text:style-name="T8">e</text:span><text:span text:style-name="T8">c</text:span><text:span text:style-name="T8">o</text:span><text:span text:style-name="T8">n</text:span><text:span text:style-name="T8">d</text:span><text:span text:style-name="T8">o</text:span><text:span text:style-name="T8"> </text:span><text:span text:style-name="T8">c</text:span><text:span text:style-name="T8">i</text:span><text:span text:style-name="T8">c</text:span><text:span text:style-name="T8">l</text:span><text:span text:style-name="T8">o</text:span><text:span text:style-name="T8">.</text:span><text:span text:style-name="T8"><text:line-break/></text:span><text:span text:style-name="T8"/></text:p>
          </draw:text-box>
        </draw:frame>
        <draw:frame draw:style-name="gr47" draw:text-style-name="P33" draw:layer="layout" svg:width="8.051cm" svg:height="1.865cm" svg:x="1.493cm" svg:y="5.313cm">
          <draw:text-box>
            <text:p text:style-name="P1"><text:span text:style-name="T26">Parametri: </text:span></text:p>
            <text:p text:style-name="P1"><text:span text:style-name="T26">a0: La stringa </text:span><text:span text:style-name="T26">da cifrare / </text:span><text:span text:style-name="T26">decifrare (src)</text:span><text:span text:style-name="T26"><text:line-break/></text:span><text:span text:style-name="T26">a1: </text:span><text:span text:style-name="T27"><text:a xlink:href="#cypher_data" xlink:type="simple">cypher_data</text:a></text:span><text:span text:style-name="T27"><text:line-break/></text:span><text:span text:style-name="T26">a2: bool → </text:span><text:span text:style-name="T26">criptazione / </text:span><text:span text:style-name="T26">decifrazione </text:span><text:span text:style-name="T26">(encrypt)</text:span></text:p>
          </draw:text-box>
        </draw:frame>
        <draw:frame draw:style-name="gr47" draw:text-style-name="P33" draw:layer="layout" svg:width="8.051cm" svg:height="1.865cm" svg:x="9.594cm" svg:y="5.423cm">
          <draw:text-box>
            <text:p text:style-name="P1"><text:span text:style-name="T26">Valore </text:span><text:span text:style-name="T26">di </text:span><text:span text:style-name="T26">ritorno: </text:span></text:p>
            <text:p text:style-name="P1"><text:span text:style-name="T26">a0: La </text:span><text:span text:style-name="T26">stringa </text:span><text:span text:style-name="T26">cifrata / </text:span><text:span text:style-name="T26">decifrat</text:span><text:span text:style-name="T26">a (dest)</text:span></text:p>
          </draw:text-box>
        </draw:frame>
        <draw:g draw:style-name="gr48" xml:id="id28" draw:id="id28">
          <draw:path draw:style-name="gr49" draw:text-style-name="P34" draw:layer="layout" svg:width="0.5cm" svg:height="0.5cm" svg:x="3.932cm" svg:y="7.752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custom-shape draw:style-name="gr50" draw:text-style-name="P35" draw:layer="layout" svg:width="0.25cm" svg:height="0.25cm" svg:x="4.057cm" svg:y="7.877cm">
            <text:p/>
            <draw:enhanced-geometry svg:viewBox="0 0 21600 21600" draw:type="rectangle" draw:enhanced-path="M 0 0 L 21600 0 21600 21600 0 21600 0 0 Z N"/>
          </draw:custom-shape>
        </draw:g>
        <draw:connector draw:style-name="gr51" draw:text-style-name="P36" draw:layer="layout" svg:x1="11.401cm" svg:y1="10.304cm" svg:x2="9.132cm" svg:y2="10.322cm" draw:start-shape="id5" draw:end-shape="id6" draw:end-glue-point="7" svg:d="M11401 10304h-1129v18h-1140" svg:viewBox="0 0 2270 19">
          <text:p/>
        </draw:connector>
        <draw:custom-shape draw:style-name="gr52" draw:text-style-name="P38" xml:id="id5" draw:id="id5" draw:layer="layout" svg:width="6.283cm" svg:height="1.854cm" svg:x="11.401cm" svg:y="9.377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37"><text:span text:style-name="T28">i = 0</text:span></text:p>
          <text:p text:style-name="P37"><text:span text:style-name="T28">Termine iter = mycypher.len </text:span></text:p>
          <text:p text:style-name="P37"><text:span text:style-name="T28">Incremento iter = 1</text:span></text:p>
          <text:p text:style-name="P37"><text:span text:style-name="T28">Carica tabella di salto di criptazi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53" draw:text-style-name="P39" draw:layer="layout" svg:width="2.534cm" svg:height="0.601cm" svg:x="9.09cm" svg:y="7.43cm">
          <draw:text-box>
            <text:p text:style-name="P26"><text:span text:style-name="T20">[</text:span><text:span text:style-name="T28">Falso</text:span><text:span text:style-name="T20">]</text:span></text:p>
          </draw:text-box>
        </draw:frame>
        <draw:connector draw:style-name="gr54" draw:text-style-name="P36" draw:layer="layout" svg:x1="11.393cm" svg:y1="8.09cm" svg:x2="8.632cm" svg:y2="9.822cm" draw:start-shape="id7" draw:start-glue-point="3" draw:end-shape="id6" draw:end-glue-point="4" svg:d="M11393 8090h-2761v1732" svg:viewBox="0 0 2762 1733">
          <text:p/>
        </draw:connector>
        <draw:custom-shape draw:style-name="gr55" draw:text-style-name="P38" xml:id="id7" draw:id="id7" draw:layer="layout" svg:width="6.731cm" svg:height="1.805cm" svg:x="11.393cm" svg:y="7.188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37"><text:span text:style-name="T28">i = mycypher.len - 1</text:span></text:p>
          <text:p text:style-name="P37"><text:span text:style-name="T28">Termine iter = <text:s/>-1 </text:span></text:p>
          <text:p text:style-name="P37"><text:span text:style-name="T28">Incremento iter = <text:s/>-1</text:span></text:p>
          <text:p text:style-name="P37"><text:span text:style-name="T28">Carica tabella di salto di decifrazi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" draw:text-style-name="P38" xml:id="id10" draw:id="id10" draw:layer="layout" svg:width="10.035cm" svg:height="1.5cm" svg:x="9.018cm" svg:y="12.712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37"><text:span text:style-name="T28">a0 = src</text:span></text:p>
          <text:p text:style-name="P37"><text:span text:style-name="T28">a1= src.len</text:span></text:p>
          <text:p text:style-name="P37"><text:span text:style-name="T28">Leggi carattere corrente di mycyph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7" draw:text-style-name="P36" draw:layer="layout" svg:x1="18.632cm" svg:y1="10.322cm" svg:x2="17.684cm" svg:y2="10.304cm" draw:start-shape="id8" draw:start-glue-point="5" draw:end-shape="id5" draw:end-glue-point="1" svg:d="M18632 10322h-479v-18h-469" svg:viewBox="0 0 949 19">
          <text:p/>
        </draw:connector>
        <draw:connector draw:style-name="gr58" draw:text-style-name="P36" draw:layer="layout" svg:x1="19.132cm" svg:y1="9.822cm" svg:x2="18.124cm" svg:y2="8.09cm" draw:start-shape="id8" draw:start-glue-point="4" draw:end-shape="id7" draw:end-glue-point="1" svg:d="M19132 9822v-1732h-1008" svg:viewBox="0 0 1009 1733">
          <text:p/>
        </draw:connector>
        <draw:frame draw:style-name="gr59" draw:text-style-name="P39" draw:layer="layout" svg:width="2.534cm" svg:height="0.736cm" svg:x="9.158cm" svg:y="9.483cm">
          <draw:text-box>
            <text:p text:style-name="P26"><text:span text:style-name="T20">[</text:span><text:span text:style-name="T28">Vero</text:span><text:span text:style-name="T20">]</text:span></text:p>
          </draw:text-box>
        </draw:frame>
        <draw:g draw:style-name="gr19">
          <draw:custom-shape draw:style-name="gr60" draw:text-style-name="P40" draw:layer="layout" svg:width="18.386cm" svg:height="14.043cm" svg:x="1.477cm" svg:y="11.83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41" draw:layer="layout" svg:width="5.418cm" svg:height="0.695cm" svg:x="1.477cm" svg:y="11.83cm">
            <text:p text:style-name="P37"><text:span text:style-name="T28">Ci</text:span><text:span text:style-name="T28">clo </text:span><text:span text:style-name="T28">cri</text:span><text:span text:style-name="T28">pta</text:span><text:span text:style-name="T28">zio</text:span><text:span text:style-name="T28">ne </text:span><text:span text:style-name="T28">/ </text:span><text:span text:style-name="T28">de</text:span><text:span text:style-name="T28">cifr</text:span><text:span text:style-name="T28">aio</text:span><text:span text:style-name="T28">ne <text:s/></text:span></text:p>
            <draw:enhanced-geometry svg:viewBox="0 0 21600 21600" draw:type="non-primitve" draw:enhanced-path="M 0 0 L 21600 0 19000 21600 0 21600 0 0 Z N"/>
          </draw:custom-shape>
        </draw:g>
        <draw:custom-shape draw:style-name="gr62" draw:text-style-name="P42" xml:id="id9" draw:id="id9" draw:layer="layout" svg:width="1cm" svg:height="1cm" svg:x="1.844cm" svg:y="13.7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43" draw:layer="layout" svg:width="4.399cm" svg:height="0.779cm" svg:x="1.983cm" svg:y="13.007cm">
          <draw:text-box>
            <text:p text:style-name="P26"><text:span text:style-name="T28">[</text:span><text:span text:style-name="T28">c</text:span><text:span text:style-name="T28">a</text:span><text:span text:style-name="T28">l</text:span><text:span text:style-name="T28">c</text:span><text:span text:style-name="T28">o</text:span><text:span text:style-name="T28">l</text:span><text:span text:style-name="T28">o</text:span><text:span text:style-name="T28"> </text:span><text:span text:style-name="T28">s</text:span><text:span text:style-name="T28">u</text:span><text:span text:style-name="T28"> </text:span><text:span text:style-name="T28">t</text:span><text:span text:style-name="T28">a</text:span><text:span text:style-name="T28">b</text:span><text:span text:style-name="T28">e</text:span><text:span text:style-name="T28">l</text:span><text:span text:style-name="T28">l</text:span><text:span text:style-name="T28">a</text:span><text:span text:style-name="T28"> </text:span><text:span text:style-name="T28">d</text:span><text:span text:style-name="T28">i</text:span><text:span text:style-name="T28"> </text:span><text:span text:style-name="T28">s</text:span><text:span text:style-name="T28">a</text:span><text:span text:style-name="T28">l</text:span><text:span text:style-name="T28">t</text:span><text:span text:style-name="T28">o</text:span></text:p>
            <text:p text:style-name="P26"><text:span text:style-name="T28">I</text:span><text:span text:style-name="T28">n</text:span><text:span text:style-name="T28"> </text:span><text:span text:style-name="T28">b</text:span><text:span text:style-name="T28">a</text:span><text:span text:style-name="T28">s</text:span><text:span text:style-name="T28">e</text:span><text:span text:style-name="T28"> </text:span><text:span text:style-name="T28">a</text:span><text:span text:style-name="T28"> </text:span><text:span text:style-name="T28">m</text:span><text:span text:style-name="T28">y</text:span><text:span text:style-name="T28">c</text:span><text:span text:style-name="T28">y</text:span><text:span text:style-name="T28">p</text:span><text:span text:style-name="T28">h</text:span><text:span text:style-name="T28">e</text:span><text:span text:style-name="T28">r</text:span><text:span text:style-name="T28"> </text:span><text:span text:style-name="T28">[</text:span><text:span text:style-name="T28">i</text:span><text:span text:style-name="T28">]</text:span><text:span text:style-name="T28">]</text:span></text:p>
          </draw:text-box>
        </draw:frame>
        <draw:connector draw:style-name="gr64" draw:text-style-name="P36" draw:layer="layout" svg:x1="2.844cm" svg:y1="14.281cm" svg:x2="9.018cm" svg:y2="13.462cm" draw:start-shape="id9" draw:start-glue-point="7" draw:end-shape="id10" draw:end-glue-point="3" svg:d="M2844 14281h3093v-819h3081" svg:viewBox="0 0 6175 820">
          <text:p/>
        </draw:connector>
        <draw:connector draw:style-name="gr65" draw:text-style-name="P36" draw:layer="layout" svg:x1="4.93cm" svg:y1="24.934cm" svg:x2="2.344cm" svg:y2="14.781cm" draw:start-shape="id11" draw:start-glue-point="3" draw:end-shape="id9" draw:end-glue-point="6" svg:d="M4930 24934h-2586v-10153" svg:viewBox="0 0 2587 10154">
          <text:p/>
        </draw:connector>
        <draw:frame draw:style-name="gr66" draw:text-style-name="P39" draw:layer="layout" svg:width="2.576cm" svg:height="0.601cm" svg:x="6.048cm" svg:y="9.205cm">
          <draw:text-box>
            <text:p text:style-name="P26"><text:span text:style-name="T20">[</text:span><text:span text:style-name="T28">Crittazione?</text:span><text:span text:style-name="T20">]</text:span></text:p>
          </draw:text-box>
        </draw:frame>
        <draw:custom-shape draw:style-name="gr67" draw:text-style-name="P45" xml:id="id11" draw:id="id11" draw:layer="layout" svg:width="2.301cm" svg:height="0.772cm" svg:x="4.93cm" svg:y="24.548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4"><text:span text:style-name="T29">Chiama </text:span><text:span text:style-name="T30">inver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8" draw:text-style-name="P36" draw:layer="layout" svg:x1="4.906cm" svg:y1="18.305cm" svg:x2="2.365cm" svg:y2="18.306cm" draw:start-shape="id12" draw:start-glue-point="3" svg:d="M4906 18305h-1534v1h-1007" svg:viewBox="0 0 2542 2">
          <text:p/>
        </draw:connector>
        <draw:custom-shape draw:style-name="gr69" draw:text-style-name="P42" xml:id="id8" draw:id="id8" draw:layer="layout" svg:width="1cm" svg:height="1cm" svg:x="18.632cm" svg:y="9.8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0" draw:text-style-name="P36" draw:layer="layout" draw:line-skew="0.53cm" svg:x1="14.035cm" svg:y1="12.712cm" svg:x2="19.132cm" svg:y2="10.822cm" draw:start-shape="id10" draw:end-shape="id8" draw:end-glue-point="6" svg:d="M14035 12712v-409h5097v-1481" svg:viewBox="0 0 5098 1891">
          <text:p/>
        </draw:connector>
        <draw:custom-shape draw:style-name="gr71" draw:text-style-name="P47" xml:id="id18" draw:id="id18" draw:layer="layout" svg:width="5.125cm" svg:height="0.81cm" svg:x="4.916cm" svg:y="23.313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6"><text:span text:style-name="T29">a2=</text:span><text:span text:style-name="T31"><text:a xlink:href="#cypher_data" xlink:type="simple">cypher_data</text:a></text:span><text:span text:style-name="T31">.</text:span><text:span text:style-name="T29">dic</text:span><text:span text:style-name="T29">tionary_fu</text:span><text:span text:style-name="T29">nction</text:span></text:p>
          <text:p text:style-name="P46"><text:span text:style-name="T29">Chiama </text:span><text:span text:style-name="T30">dictionar</text:span><text:span text:style-name="T30">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2" draw:text-style-name="P36" draw:layer="layout" svg:x1="4.853cm" svg:y1="22.448cm" svg:x2="2.321cm" svg:y2="22.451cm" draw:start-shape="id13" draw:start-glue-point="3" svg:d="M4853 22448h-1530v3h-1002" svg:viewBox="0 0 2533 4">
          <text:p/>
        </draw:connector>
        <draw:frame draw:style-name="gr73" draw:text-style-name="P48" draw:layer="layout" svg:width="2.534cm" svg:height="0.489cm" svg:x="2.936cm" svg:y="24.934cm">
          <draw:text-box>
            <text:p text:style-name="P26"><text:span text:style-name="T29">[caso E]</text:span></text:p>
          </draw:text-box>
        </draw:frame>
        <draw:custom-shape draw:style-name="gr74" draw:text-style-name="P42" xml:id="id17" draw:id="id17" draw:layer="layout" svg:width="1cm" svg:height="1cm" svg:x="15.345cm" svg:y="14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5" draw:text-style-name="P45" xml:id="id14" draw:id="id14" draw:layer="layout" svg:width="4.683cm" svg:height="0.872cm" svg:x="4.827cm" svg:y="20.787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4"><text:span text:style-name="T29">Chiama </text:span><text:span text:style-name="T30">occurrence_encryp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6" draw:text-style-name="P45" xml:id="id13" draw:id="id13" draw:layer="layout" svg:width="4.593cm" svg:height="0.784cm" svg:x="4.853cm" svg:y="22.056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4"><text:span text:style-name="T29">Chia</text:span><text:span text:style-name="T29">ma </text:span><text:span text:style-name="T30">occu</text:span><text:span text:style-name="T30">rren</text:span><text:span text:style-name="T30">ce_d</text:span><text:span text:style-name="T30">ecyp</text:span><text:span text:style-name="T30">h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7" draw:text-style-name="P36" draw:layer="layout" svg:x1="4.827cm" svg:y1="21.223cm" svg:x2="2.381cm" svg:y2="21.216cm" draw:start-shape="id14" draw:start-glue-point="3" svg:d="M4827 21223h-1487v-7h-959" svg:viewBox="0 0 2447 8">
          <text:p/>
        </draw:connector>
        <draw:g draw:style-name="gr78" xml:id="id15" draw:id="id15">
          <draw:path draw:style-name="gr79" draw:text-style-name="P49" draw:layer="layout" svg:width="0.5cm" svg:height="0.5cm" svg:x="10.82cm" svg:y="28.018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path draw:style-name="gr80" draw:text-style-name="P34" draw:layer="layout" svg:width="0.2cm" svg:height="0.2cm" svg:x="10.97cm" svg:y="28.168cm" svg:viewBox="0 0 201 201" svg:d="M201 101c0 17-5 34-13 50-9 15-22 28-37 37-16 8-33 13-50 13-18 0-35-5-51-13-15-9-28-22-37-37-8-16-13-33-13-50 0-18 5-35 13-51 9-15 22-28 37-37 16-8 33-13 51-13 17 0 34 5 50 13 15 9 28 22 37 37 8 16 13 33 13 51z">
            <text:p/>
          </draw:path>
        </draw:g>
        <draw:connector draw:style-name="gr81" draw:text-style-name="P36" draw:layer="layout" svg:x1="11.07cm" svg:y1="28.018cm" svg:x2="11.064cm" svg:y2="27.182cm" draw:start-shape="id15" draw:start-glue-point="0" draw:end-shape="id16" draw:end-glue-point="2" svg:d="M11070 28018v-418h-6v-418" svg:viewBox="0 0 7 837">
          <text:p/>
        </draw:connector>
        <draw:connector draw:style-name="gr82" draw:text-style-name="P36" draw:layer="layout" draw:line-skew="1.787cm" svg:x1="15.345cm" svg:y1="15.442cm" svg:x2="7.231cm" svg:y2="24.934cm" draw:start-shape="id17" draw:start-glue-point="5" draw:end-shape="id11" draw:end-glue-point="1" svg:d="M15345 15442h-2275v9492h-5839" svg:viewBox="0 0 8115 9493">
          <text:p/>
        </draw:connector>
        <draw:connector draw:style-name="gr83" draw:text-style-name="P36" draw:layer="layout" svg:x1="13.048cm" svg:y1="23.72cm" svg:x2="10.041cm" svg:y2="23.718cm" draw:end-shape="id18" draw:end-glue-point="1" svg:d="M13048 23720h-1240v-2h-1767" svg:viewBox="0 0 3008 3">
          <text:p/>
        </draw:connector>
        <draw:custom-shape draw:style-name="gr84" draw:text-style-name="P45" xml:id="id21" draw:id="id21" draw:layer="layout" svg:width="4cm" svg:height="1.5cm" svg:x="13.835cm" svg:y="20.146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4"><text:span text:style-name="T29">Stampa a0 (dest)</text:span></text:p>
          <text:p text:style-name="P44"><text:span text:style-name="T29">src = dest</text:span></text:p>
          <text:p text:style-name="P44"><text:span text:style-name="T29">i = i + incremento iter</text:span></text:p>
          <text:p text:style-name="P44"><text:span text:style-name="T29">Prima iterazione = fals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5" draw:text-style-name="P36" draw:layer="layout" svg:x1="15.88cm" svg:y1="16.62cm" svg:x2="15.845cm" svg:y2="15.942cm" draw:start-shape="id19" draw:start-glue-point="4" draw:end-shape="id17" draw:end-glue-point="6" svg:d="M15880 16620v-338h-35v-340" svg:viewBox="0 0 36 679">
          <text:p/>
        </draw:connector>
        <draw:custom-shape draw:style-name="gr86" draw:text-style-name="P42" xml:id="id20" draw:id="id20" draw:layer="layout" svg:width="1cm" svg:height="1cm" svg:x="15.345cm" svg:y="2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7" draw:text-style-name="P36" draw:layer="layout" svg:x1="15.845cm" svg:y1="22.647cm" svg:x2="15.835cm" svg:y2="21.646cm" draw:start-shape="id20" draw:start-glue-point="4" draw:end-shape="id21" draw:end-glue-point="2" svg:d="M15845 22647v-505h-10v-496" svg:viewBox="0 0 11 1002">
          <text:p/>
        </draw:connector>
        <draw:frame draw:style-name="gr88" draw:text-style-name="P48" draw:layer="layout" svg:width="2.534cm" svg:height="0.601cm" svg:x="13.311cm" svg:y="22.086cm">
          <draw:text-box>
            <text:p text:style-name="P26"><text:span text:style-name="T29">[i != </text:span><text:span text:style-name="T29">termi</text:span><text:span text:style-name="T29">ne </text:span><text:span text:style-name="T29">iter]</text:span></text:p>
          </draw:text-box>
        </draw:frame>
        <draw:connector draw:style-name="gr89" draw:text-style-name="P36" draw:layer="layout" draw:line-skew="1.015cm" svg:x1="11.064cm" svg:y1="26.571cm" svg:x2="15.845cm" svg:y2="23.647cm" draw:start-shape="id16" draw:start-glue-point="0" draw:end-shape="id20" draw:end-glue-point="6" svg:d="M11064 26571v-441h4781v-2483" svg:viewBox="0 0 4782 2925">
          <text:p/>
        </draw:connector>
        <draw:connector draw:style-name="gr90" draw:text-style-name="P36" draw:layer="layout" draw:line-skew="1.647cm" svg:x1="19.116cm" svg:y1="12.286cm" svg:x2="16.345cm" svg:y2="23.147cm" draw:end-shape="id20" draw:end-glue-point="7" svg:d="M19116 12286h531v10861h-3302" svg:viewBox="0 0 3303 10862">
          <text:p/>
        </draw:connector>
        <draw:frame draw:style-name="gr91" draw:text-style-name="P48" draw:layer="layout" svg:width="2.534cm" svg:height="0.601cm" svg:x="16.3cm" svg:y="22.446cm">
          <draw:text-box>
            <text:p text:style-name="P26"><text:span text:style-name="T29">[vero]</text:span></text:p>
          </draw:text-box>
        </draw:frame>
        <draw:frame draw:style-name="gr92" draw:text-style-name="P48" draw:layer="layout" svg:width="2.534cm" svg:height="0.601cm" svg:x="14.472cm" svg:y="23.372cm">
          <draw:text-box>
            <text:p text:style-name="P26"><text:span text:style-name="T29">[falso]</text:span></text:p>
          </draw:text-box>
        </draw:frame>
        <draw:frame draw:style-name="gr93" draw:text-style-name="P48" draw:layer="layout" svg:width="2.534cm" svg:height="0.601cm" svg:x="2.796cm" svg:y="23.618cm">
          <draw:text-box>
            <text:p text:style-name="P26"><text:span text:style-name="T29">[caso D]</text:span></text:p>
          </draw:text-box>
        </draw:frame>
        <draw:frame draw:style-name="gr94" draw:text-style-name="P48" draw:layer="layout" svg:width="2.534cm" svg:height="0.601cm" svg:x="2.165cm" svg:y="22.564cm">
          <draw:text-box>
            <text:p text:style-name="P26"><text:span text:style-name="T29">[</text:span><text:span text:style-name="T29">c</text:span><text:span text:style-name="T29">a</text:span><text:span text:style-name="T29">s</text:span><text:span text:style-name="T29">o</text:span><text:span text:style-name="T29"> </text:span><text:span text:style-name="T29">C</text:span><text:span text:style-name="T29">]</text:span><text:span text:style-name="T29"> </text:span><text:span text:style-name="T29">&amp;</text:span><text:span text:style-name="T29">&amp;</text:span></text:p>
            <text:p text:style-name="P26"><text:span text:style-name="T29">[</text:span><text:span text:style-name="T29">d</text:span><text:span text:style-name="T29">e</text:span><text:span text:style-name="T29">c</text:span><text:span text:style-name="T29">y</text:span><text:span text:style-name="T29">h</text:span><text:span text:style-name="T29">p</text:span><text:span text:style-name="T29">e</text:span><text:span text:style-name="T29">r</text:span><text:span text:style-name="T29">]</text:span><text:span text:style-name="T29"> </text:span></text:p>
          </draw:text-box>
        </draw:frame>
        <draw:frame draw:style-name="gr95" draw:text-style-name="P50" draw:layer="layout" svg:width="1.47cm" svg:height="0.62cm" svg:x="2.43cm" svg:y="21.305cm">
          <draw:text-box>
            <text:p><text:span text:style-name="T29">[caso C] &amp;&amp;</text:span></text:p>
            <text:p><text:span text:style-name="T29">[encrypt] </text:span></text:p>
          </draw:text-box>
        </draw:frame>
        <draw:custom-shape draw:style-name="gr96" draw:text-style-name="P51" xml:id="id12" draw:id="id12" draw:layer="layout" svg:width="3.632cm" svg:height="1.14cm" svg:x="4.906cm" svg:y="17.73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19"><text:span text:style-name="T29">a2 = </text:span><text:span text:style-name="T31"><text:a xlink:href="#cypher_data" xlink:type="simple">cypher_data</text:a></text:span><text:span text:style-name="T29"><text:s/></text:span></text:p>
          <text:p text:style-name="P19"><text:span text:style-name="T29">Chiama </text:span><text:span text:style-name="T30"><text:a xlink:href="#block_encrypt" xlink:type="simple">block_encrypt</text:a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7" draw:text-style-name="P53" xml:id="id23" draw:id="id23" draw:layer="layout" svg:width="4.024cm" svg:height="0.944cm" svg:x="4.878cm" svg:y="16.388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52"><text:span text:style-name="T29">a2 = </text:span><text:span text:style-name="T32"><text:a xlink:href="#Parametri del programma" xlink:type="simple">sostK</text:a></text:span></text:p>
          <text:p text:style-name="P46"><text:span text:style-name="T29">Chiama </text:span><text:span text:style-name="T30"><text:a xlink:href="#caesar_decypher" xlink:type="simple">caesar_decypher</text:a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8" draw:text-style-name="P45" xml:id="id22" draw:id="id22" draw:layer="layout" svg:width="4.093cm" svg:height="1.14cm" svg:x="4.869cm" svg:y="19.307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52"><text:span text:style-name="T29">a</text:span><text:span text:style-name="T29">2</text:span><text:span text:style-name="T29"> </text:span><text:span text:style-name="T29">=</text:span><text:span text:style-name="T29"> </text:span><text:span text:style-name="T31"><text:a xlink:href="#cypher_data" xlink:type="simple">cypher_data</text:a></text:span><text:span text:style-name="T31">.</text:span><text:span text:style-name="T32"><text:a xlink:href="#Parametri del programma" xlink:type="simple">blocKey</text:a></text:span></text:p>
          <text:p text:style-name="P44"><text:span text:style-name="T29">C</text:span><text:span text:style-name="T29">h</text:span><text:span text:style-name="T29">i</text:span><text:span text:style-name="T29">a</text:span><text:span text:style-name="T29">m</text:span><text:span text:style-name="T29">a</text:span><text:span text:style-name="T29"> </text:span><text:span text:style-name="T30"><text:a xlink:href="#block_decypher" xlink:type="simple">block_decypher</text:a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9" draw:text-style-name="P53" xml:id="id24" draw:id="id24" draw:layer="layout" svg:width="4.024cm" svg:height="0.944cm" svg:x="4.902cm" svg:y="14.97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52"><text:span text:style-name="T29">a</text:span><text:span text:style-name="T29">2</text:span><text:span text:style-name="T29"> </text:span><text:span text:style-name="T29">=</text:span><text:span text:style-name="T29"> </text:span><text:span text:style-name="T32"><text:a xlink:href="#Parametri del programma" xlink:type="simple">sostK</text:a></text:span></text:p>
          <text:p text:style-name="P46"><text:span text:style-name="T29">C</text:span><text:span text:style-name="T29">h</text:span><text:span text:style-name="T29">i</text:span><text:span text:style-name="T29">a</text:span><text:span text:style-name="T29">m</text:span><text:span text:style-name="T29">a</text:span><text:span text:style-name="T29"> </text:span><text:span text:style-name="T30"><text:a xlink:href="#caesar_encrypt" xlink:type="simple">caesar_encrypt</text:a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00" draw:text-style-name="P36" draw:layer="layout" svg:x1="4.869cm" svg:y1="19.877cm" svg:x2="2.355cm" svg:y2="19.884cm" draw:start-shape="id22" draw:start-glue-point="3" svg:d="M4869 19877h-1521v7h-993" svg:viewBox="0 0 2515 8">
          <text:p/>
        </draw:connector>
        <draw:connector draw:style-name="gr101" draw:text-style-name="P36" draw:layer="layout" svg:x1="4.916cm" svg:y1="23.718cm" svg:x2="2.339cm" svg:y2="23.728cm" draw:start-shape="id18" draw:start-glue-point="3" svg:d="M4916 23718h-1552v10h-1025" svg:viewBox="0 0 2578 11">
          <text:p/>
        </draw:connector>
        <draw:connector draw:style-name="gr102" draw:text-style-name="P36" draw:layer="layout" svg:x1="4.878cm" svg:y1="16.86cm" svg:x2="2.336cm" svg:y2="16.858cm" draw:start-shape="id23" draw:start-glue-point="3" svg:d="M4878 16860h-1534v-2h-1008" svg:viewBox="0 0 2543 3">
          <text:p/>
        </draw:connector>
        <draw:connector draw:style-name="gr103" draw:text-style-name="P36" draw:layer="layout" svg:x1="4.902cm" svg:y1="15.447cm" svg:x2="2.359cm" svg:y2="15.444cm" draw:start-shape="id24" draw:start-glue-point="3" svg:d="M4902 15447h-1535v-3h-1008" svg:viewBox="0 0 2544 4">
          <text:p/>
        </draw:connector>
        <draw:frame draw:style-name="gr104" draw:text-style-name="P48" draw:layer="layout" svg:width="2.534cm" svg:height="0.601cm" svg:x="2.344cm" svg:y="15.774cm">
          <draw:text-box>
            <text:p text:style-name="P26"><text:span text:style-name="T29">[caso </text:span><text:span text:style-name="T29">A] &amp;&amp;</text:span><text:span text:style-name="T29"><text:line-break/></text:span><text:span text:style-name="T29">[encr</text:span><text:span text:style-name="T29">ypy]</text:span></text:p>
            <text:p text:style-name="P26"><text:span text:style-name="T29"><text:s/></text:span></text:p>
            <text:p text:style-name="P26"><text:span text:style-name="T29"/></text:p>
          </draw:text-box>
        </draw:frame>
        <draw:frame draw:style-name="gr105" draw:text-style-name="P48" draw:layer="layout" svg:width="2.534cm" svg:height="0.601cm" svg:x="2.244cm" svg:y="17.046cm">
          <draw:text-box>
            <text:p text:style-name="P26"><text:span text:style-name="T29">[caso A] &amp;&amp;</text:span><text:span text:style-name="T29"><text:line-break/></text:span><text:span text:style-name="T29">[decypher]</text:span></text:p>
            <text:p text:style-name="P26"><text:span text:style-name="T29"><text:s/></text:span></text:p>
          </draw:text-box>
        </draw:frame>
        <draw:frame draw:style-name="gr106" draw:text-style-name="P48" draw:layer="layout" svg:width="2.534cm" svg:height="0.601cm" svg:x="2.195cm" svg:y="18.518cm">
          <draw:text-box>
            <text:p text:style-name="P26"><text:span text:style-name="T29">[caso B] &amp;&amp;</text:span><text:span text:style-name="T29"><text:line-break/></text:span><text:span text:style-name="T29">[encrypt]</text:span></text:p>
            <text:p text:style-name="P26"><text:span text:style-name="T29"><text:s/></text:span></text:p>
          </draw:text-box>
        </draw:frame>
        <draw:frame draw:style-name="gr107" draw:text-style-name="P48" draw:layer="layout" svg:width="2.534cm" svg:height="0.601cm" svg:x="2.195cm" svg:y="20.019cm">
          <draw:text-box>
            <text:p text:style-name="P26"><text:span text:style-name="T29">[caso B] &amp;&amp;</text:span><text:span text:style-name="T29"><text:line-break/></text:span><text:span text:style-name="T29">[decypher]</text:span></text:p>
            <text:p text:style-name="P26"><text:span text:style-name="T29"><text:s/></text:span></text:p>
          </draw:text-box>
        </draw:frame>
        <draw:connector draw:style-name="gr108" draw:text-style-name="P36" draw:layer="layout" svg:x1="13.048cm" svg:y1="22.556cm" svg:x2="9.446cm" svg:y2="22.559cm" svg:d="M13048 22556h-1801v3h-1801" svg:viewBox="0 0 3603 4">
          <text:p/>
        </draw:connector>
        <draw:connector draw:style-name="gr109" draw:text-style-name="P36" draw:layer="layout" svg:x1="13.043cm" svg:y1="15.454cm" svg:x2="8.926cm" svg:y2="15.447cm" draw:end-shape="id24" draw:end-glue-point="1" svg:d="M13043 15454h-1794v-7h-2323" svg:viewBox="0 0 4118 8">
          <text:p/>
        </draw:connector>
        <draw:connector draw:style-name="gr110" draw:text-style-name="P36" draw:layer="layout" svg:x1="13.049cm" svg:y1="16.855cm" svg:x2="8.902cm" svg:y2="16.86cm" draw:end-shape="id23" draw:end-glue-point="1" svg:d="M13049 16855h-1809v5h-2338" svg:viewBox="0 0 4148 6">
          <text:p/>
        </draw:connector>
        <draw:connector draw:style-name="gr111" draw:text-style-name="P36" draw:layer="layout" svg:x1="13.073cm" svg:y1="18.311cm" svg:x2="8.538cm" svg:y2="18.305cm" draw:end-shape="id12" draw:end-glue-point="1" svg:d="M13073 18311h-2003v-6h-2532" svg:viewBox="0 0 4536 7">
          <text:p/>
        </draw:connector>
        <draw:connector draw:style-name="gr112" draw:text-style-name="P36" draw:layer="layout" svg:x1="13.031cm" svg:y1="19.871cm" svg:x2="8.962cm" svg:y2="19.877cm" draw:end-shape="id22" draw:end-glue-point="1" svg:d="M13031 19871h-1771v6h-2298" svg:viewBox="0 0 4070 7">
          <text:p/>
        </draw:connector>
        <draw:connector draw:style-name="gr113" draw:text-style-name="P36" draw:layer="layout" svg:x1="13.05cm" svg:y1="21.218cm" svg:x2="9.51cm" svg:y2="21.223cm" draw:end-shape="id14" draw:end-glue-point="1" svg:d="M13050 21218h-1506v5h-2034" svg:viewBox="0 0 3541 6">
          <text:p/>
        </draw:connector>
        <draw:custom-shape draw:style-name="gr114" draw:text-style-name="P42" xml:id="id19" draw:id="id19" draw:layer="layout" svg:width="1cm" svg:height="1cm" svg:x="15.38cm" svg:y="16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5" draw:text-style-name="P48" draw:layer="layout" svg:width="2.534cm" svg:height="0.601cm" svg:x="13.799cm" svg:y="16.359cm">
          <draw:text-box>
            <text:p text:style-name="P26"><text:span text:style-name="T29">[prima </text:span></text:p>
            <text:p text:style-name="P26"><text:span text:style-name="T29">iterazione?]</text:span></text:p>
          </draw:text-box>
        </draw:frame>
        <draw:custom-shape draw:style-name="gr116" draw:text-style-name="P42" xml:id="id25" draw:id="id25" draw:layer="layout" svg:width="1cm" svg:height="1cm" svg:x="15.36cm" svg:y="18.1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7" draw:text-style-name="P36" draw:layer="layout" svg:x1="15.86cm" svg:y1="18.108cm" svg:x2="15.88cm" svg:y2="17.62cm" draw:start-shape="id25" draw:start-glue-point="4" draw:end-shape="id19" draw:end-glue-point="6" svg:d="M15860 18108v-243h20v-245" svg:viewBox="0 0 21 489">
          <text:p/>
        </draw:connector>
        <draw:connector draw:style-name="gr118" draw:text-style-name="P36" draw:layer="layout" svg:x1="15.835cm" svg:y1="20.146cm" svg:x2="15.86cm" svg:y2="19.108cm" draw:start-shape="id21" draw:start-glue-point="0" draw:end-shape="id25" draw:end-glue-point="6" svg:d="M15835 20146v-513h25v-525" svg:viewBox="0 0 26 1039">
          <text:p/>
        </draw:connector>
        <draw:connector draw:style-name="gr119" draw:text-style-name="P36" draw:layer="layout" svg:x1="17.294cm" svg:y1="17.153cm" svg:x2="16.38cm" svg:y2="17.12cm" draw:start-shape="id26" draw:start-glue-point="3" draw:end-shape="id19" draw:end-glue-point="7" svg:d="M17294 17153h-451v-33h-463" svg:viewBox="0 0 915 34">
          <text:p/>
        </draw:connector>
        <draw:connector draw:style-name="gr120" draw:text-style-name="P36" draw:layer="layout" svg:x1="16.36cm" svg:y1="18.608cm" svg:x2="18.413cm" svg:y2="17.49cm" draw:start-shape="id25" draw:start-glue-point="7" draw:end-shape="id26" draw:end-glue-point="2" svg:d="M16360 18608h2053v-1118" svg:viewBox="0 0 2054 1119">
          <text:p/>
        </draw:connector>
        <draw:custom-shape draw:style-name="gr121" draw:text-style-name="P51" xml:id="id26" draw:id="id26" draw:layer="layout" svg:width="2.238cm" svg:height="0.674cm" svg:x="17.294cm" svg:y="16.816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19"><text:span text:style-name="T29">a0 = src</text:span></text:p>
          <text:p text:style-name="P19"><text:span text:style-name="T29">Chiama fre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22" draw:text-style-name="P48" draw:layer="layout" svg:width="2.534cm" svg:height="0.601cm" svg:x="14.66cm" svg:y="17.579cm">
          <draw:text-box>
            <text:p text:style-name="P26"><text:span text:style-name="T29">[vero]</text:span></text:p>
          </draw:text-box>
        </draw:frame>
        <draw:frame draw:style-name="gr123" draw:text-style-name="P48" draw:layer="layout" svg:width="2.534cm" svg:height="0.601cm" svg:x="16.345cm" svg:y="16.359cm">
          <draw:text-box>
            <text:p text:style-name="P26"><text:span text:style-name="T29">[falso]</text:span></text:p>
          </draw:text-box>
        </draw:frame>
        <draw:frame draw:style-name="gr124" draw:text-style-name="P48" draw:layer="layout" svg:width="2.534cm" svg:height="0.601cm" svg:x="19cm" svg:y="10.647cm">
          <draw:text-box>
            <text:p text:style-name="P26"><text:span text:style-name="T29">[end if]</text:span></text:p>
          </draw:text-box>
        </draw:frame>
        <draw:frame draw:style-name="gr125" draw:text-style-name="P48" draw:layer="layout" svg:width="2.534cm" svg:height="0.601cm" svg:x="15.879cm" svg:y="14.831cm">
          <draw:text-box>
            <text:p text:style-name="P26"><text:span text:style-name="T29">[</text:span><text:span text:style-name="T29">e</text:span><text:span text:style-name="T29">n</text:span><text:span text:style-name="T29">d</text:span><text:span text:style-name="T29"> </text:span><text:span text:style-name="T29">s</text:span><text:span text:style-name="T29">w</text:span><text:span text:style-name="T29">i</text:span><text:span text:style-name="T29">t</text:span><text:span text:style-name="T29">c</text:span><text:span text:style-name="T29">h</text:span><text:span text:style-name="T29">]</text:span></text:p>
          </draw:text-box>
        </draw:frame>
        <draw:polygon draw:style-name="gr126" draw:text-style-name="P55" xml:id="id27" draw:id="id27" draw:layer="layout" svg:width="3.764cm" svg:height="1.354cm" svg:x="2.297cm" svg:y="9.63cm" svg:viewBox="0 0 3765 1355" draw:points="0,0 2352,0 2824,0 3764,0 3764,677 3765,678 3764,678 3764,1354 2824,1354 2824,1355 0,1355 941,678">
          <text:p text:style-name="P54"><text:span text:style-name="T29">In:</text:span></text:p>
          <text:p text:style-name="P54"><text:span text:style-name="T29">src, </text:span><text:span text:style-name="T31"><text:a xlink:href="#cypher_data" xlink:type="simple">cypher_data</text:a></text:span><text:span text:style-name="T29">, </text:span></text:p>
          <text:p text:style-name="P54"><text:span text:style-name="T29">bool: encrypt </text:span></text:p>
        </draw:polygon>
        <draw:connector draw:style-name="gr127" draw:text-style-name="P36" draw:layer="layout" svg:x1="8.132cm" svg:y1="10.322cm" svg:x2="6.062cm" svg:y2="10.307cm" draw:start-shape="id6" draw:start-glue-point="5" draw:end-shape="id27" draw:end-glue-point="1" svg:d="M8132 10322h-1040v-15h-1030" svg:viewBox="0 0 2071 16">
          <text:p/>
        </draw:connector>
        <draw:connector draw:style-name="gr128" draw:text-style-name="P36" draw:layer="layout" svg:x1="4.179cm" svg:y1="9.63cm" svg:x2="4.182cm" svg:y2="8.253cm" draw:start-shape="id27" draw:start-glue-point="0" draw:end-shape="id28" draw:end-glue-point="2" svg:d="M4179 9630v-695h3v-682" svg:viewBox="0 0 4 1378">
          <text:p/>
        </draw:connector>
        <draw:custom-shape draw:style-name="gr129" draw:text-style-name="P57" xml:id="id16" draw:id="id16" draw:layer="layout" svg:width="3.018cm" svg:height="0.611cm" svg:x="9.555cm" svg:y="26.571cm">
          <text:p text:style-name="P56"><text:span text:style-name="T29">out = dest</text:span></text:p>
          <draw:enhanced-geometry svg:viewBox="0 0 21600 21600" draw:mirror-horizontal="false" draw:mirror-vertical="false" draw:text-areas="0 0 21600 21600" draw:type="pentagon-right" draw:modifiers="15339.648890361" draw:enhanced-path="M 0 0 L ?f0 0 21600 10800 ?f0 21600 0 21600 Z N">
            <draw:equation draw:name="f0" draw:formula="$0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30" draw:text-style-name="P42" xml:id="id6" draw:id="id6" draw:layer="layout" svg:width="1cm" svg:height="1cm" svg:x="8.132cm" svg:y="9.8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4" draw:style-name="dp1" draw:master-page-name="master-page64">
        <draw:frame draw:style-name="gr15" draw:text-style-name="P15" draw:layer="layout" svg:width="0.943cm" svg:height="0.642cm" svg:x="1.474cm" svg:y="28.154cm">
          <draw:text-box>
            <text:p text:style-name="P1"><text:span text:style-name="T16">4</text:span></text:p>
          </draw:text-box>
        </draw:frame>
        <draw:frame draw:style-name="gr44" draw:text-style-name="P8" draw:layer="layout" svg:width="5.771cm" svg:height="0.543cm" svg:x="1.401cm" svg:y="2.026cm">
          <draw:text-box>
            <text:p text:style-name="P1"><text:span text:style-name="T7">Pr</text:span><text:span text:style-name="T7">oc</text:span><text:span text:style-name="T7">ed</text:span><text:span text:style-name="T7">ur</text:span><text:span text:style-name="T7">e </text:span><text:span text:style-name="T7">no</text:span><text:span text:style-name="T7">tev</text:span><text:span text:style-name="T7">oli: </text:span></text:p>
          </draw:text-box>
        </draw:frame>
        <draw:frame draw:name="str_map_alloc" draw:style-name="gr45" draw:text-style-name="P31" draw:layer="layout" svg:width="8.415cm" svg:height="0.543cm" svg:x="1.421cm" svg:y="2.834cm">
          <draw:text-box>
            <text:p text:style-name="P1"><text:span text:style-name="T25">str_map_alloc: </text:span></text:p>
          </draw:text-box>
        </draw:frame>
        <draw:frame draw:style-name="gr131" draw:text-style-name="P58" draw:layer="layout" svg:width="18.237cm" svg:height="1.819cm" svg:x="1.391cm" svg:y="3.486cm">
          <draw:text-box>
            <text:p text:style-name="P1"><text:span text:style-name="T33">P</text:span><text:span text:style-name="T33">r</text:span><text:span text:style-name="T33">o</text:span><text:span text:style-name="T33">c</text:span><text:span text:style-name="T33">e</text:span><text:span text:style-name="T33">d</text:span><text:span text:style-name="T33">u</text:span><text:span text:style-name="T33">r</text:span><text:span text:style-name="T33">a</text:span><text:span text:style-name="T33"> </text:span><text:span text:style-name="T33">c</text:span><text:span text:style-name="T33">h</text:span><text:span text:style-name="T33">e</text:span><text:span text:style-name="T33"> </text:span><text:span text:style-name="T33">a</text:span><text:span text:style-name="T33">l</text:span><text:span text:style-name="T33">l</text:span><text:span text:style-name="T33">o</text:span><text:span text:style-name="T33">c</text:span><text:span text:style-name="T33">a</text:span><text:span text:style-name="T33"> </text:span><text:span text:style-name="T33">m</text:span><text:span text:style-name="T33">e</text:span><text:span text:style-name="T33">m</text:span><text:span text:style-name="T33">o</text:span><text:span text:style-name="T33">r</text:span><text:span text:style-name="T33">i</text:span><text:span text:style-name="T33">a</text:span><text:span text:style-name="T33"> </text:span><text:span text:style-name="T33">p</text:span><text:span text:style-name="T33">e</text:span><text:span text:style-name="T33">r</text:span><text:span text:style-name="T33"> </text:span><text:span text:style-name="T33">u</text:span><text:span text:style-name="T33">n</text:span><text:span text:style-name="T33">a</text:span><text:span text:style-name="T33"> </text:span><text:span text:style-name="T33">s</text:span><text:span text:style-name="T33">t</text:span><text:span text:style-name="T33">r</text:span><text:span text:style-name="T33">i</text:span><text:span text:style-name="T33">n</text:span><text:span text:style-name="T33">g</text:span><text:span text:style-name="T33">a</text:span><text:span text:style-name="T33"> </text:span><text:span text:style-name="T33">c</text:span><text:span text:style-name="T33">h</text:span><text:span text:style-name="T33">e</text:span><text:span text:style-name="T33"> </text:span><text:span text:style-name="T33">p</text:span><text:span text:style-name="T33">a</text:span><text:span text:style-name="T33">s</text:span><text:span text:style-name="T33">s</text:span><text:span text:style-name="T33">a</text:span><text:span text:style-name="T33"> </text:span><text:span text:style-name="T33">c</text:span><text:span text:style-name="T33">o</text:span><text:span text:style-name="T33">m</text:span><text:span text:style-name="T33">e</text:span><text:span text:style-name="T33"> </text:span><text:span text:style-name="T33">a</text:span><text:span text:style-name="T33">r</text:span><text:span text:style-name="T33">g</text:span><text:span text:style-name="T33">o</text:span><text:span text:style-name="T33">m</text:span><text:span text:style-name="T33">e</text:span><text:span text:style-name="T33">n</text:span><text:span text:style-name="T33">t</text:span><text:span text:style-name="T33">o</text:span><text:span text:style-name="T33"> </text:span><text:span text:style-name="T33">a</text:span><text:span text:style-name="T33"> </text:span><text:span text:style-name="T34">s</text:span><text:span text:style-name="T34">t</text:span><text:span text:style-name="T34">r</text:span><text:span text:style-name="T34">_</text:span><text:span text:style-name="T34">m</text:span><text:span text:style-name="T34">a</text:span><text:span text:style-name="T34">p</text:span><text:span text:style-name="T33">.</text:span><text:span text:style-name="T33"><text:line-break/></text:span><text:span text:style-name="T33">V</text:span><text:span text:style-name="T33">e</text:span><text:span text:style-name="T33">r</text:span><text:span text:style-name="T33">r</text:span><text:span text:style-name="T33">à</text:span><text:span text:style-name="T33"> </text:span><text:span text:style-name="T33">u</text:span><text:span text:style-name="T33">s</text:span><text:span text:style-name="T33">a</text:span><text:span text:style-name="T33">t</text:span><text:span text:style-name="T33">a</text:span><text:span text:style-name="T33"> </text:span><text:span text:style-name="T33">s</text:span><text:span text:style-name="T33">p</text:span><text:span text:style-name="T33">e</text:span><text:span text:style-name="T33">s</text:span><text:span text:style-name="T33">s</text:span><text:span text:style-name="T33">o</text:span><text:span text:style-name="T33"> </text:span><text:span text:style-name="T33">d</text:span><text:span text:style-name="T33">a</text:span><text:span text:style-name="T33"> </text:span><text:span text:style-name="T33">a</text:span><text:span text:style-name="T33">l</text:span><text:span text:style-name="T33">t</text:span><text:span text:style-name="T33">r</text:span><text:span text:style-name="T33">e</text:span><text:span text:style-name="T33"> </text:span><text:span text:style-name="T33">p</text:span><text:span text:style-name="T33">r</text:span><text:span text:style-name="T33">o</text:span><text:span text:style-name="T33">c</text:span><text:span text:style-name="T33">e</text:span><text:span text:style-name="T33">d</text:span><text:span text:style-name="T33">u</text:span><text:span text:style-name="T33">r</text:span><text:span text:style-name="T33">e</text:span></text:p>
            <text:p text:style-name="P1"><text:span text:style-name="T33"/></text:p>
          </draw:text-box>
        </draw:frame>
        <draw:frame draw:style-name="gr132" draw:text-style-name="P50" draw:layer="layout" svg:width="12.7cm" svg:height="4.195cm" svg:x="1.391cm" svg:y="4.822cm">
          <draw:text-box>
            <text:p>Pseudocodice:</text:p>
            <text:p/>
            <text:p>(char [], int) str_map_alloc(char [] src, int src_len, char (*funzione)(char))</text:p>
            <text:p>{</text:p>
            <text:p><text:tab/>char [] dest = malloc(src_len + 1);</text:p>
            <text:p><text:tab/>dest = str_map(src, dest, funzione);</text:p>
            <text:p><text:tab/>return (dest, src_len);</text:p>
            <text:p>}</text:p>
            <text:p/>
          </draw:text-box>
        </draw:frame>
        <draw:frame draw:name="str_map" draw:style-name="gr45" draw:text-style-name="P31" draw:layer="layout" svg:width="8.415cm" svg:height="0.543cm" svg:x="1.399cm" svg:y="8.586cm">
          <draw:text-box>
            <text:p text:style-name="P1"><text:span text:style-name="T25">s</text:span><text:span text:style-name="T25">t</text:span><text:span text:style-name="T25">r</text:span><text:span text:style-name="T25">_</text:span><text:span text:style-name="T25">m</text:span><text:span text:style-name="T25">a</text:span><text:span text:style-name="T25">p</text:span><text:span text:style-name="T25">:</text:span><text:span text:style-name="T25"> </text:span></text:p>
          </draw:text-box>
        </draw:frame>
        <draw:frame draw:style-name="gr133" draw:text-style-name="P58" draw:layer="layout" svg:width="18.237cm" svg:height="2.285cm" svg:x="1.409cm" svg:y="9.312cm">
          <draw:text-box>
            <text:p text:style-name="P1"><text:span text:style-name="T33">Procedura ispirata </text:span><text:span text:style-name="T33">dal linguaggio </text:span><text:span text:style-name="T33">funzionale che </text:span><text:span text:style-name="T33">itera su una </text:span><text:span text:style-name="T33">stringa, e che per </text:span><text:span text:style-name="T33">ogni carattere </text:span><text:span text:style-name="T33">nell’indice “i” </text:span><text:span text:style-name="T33">applica la funzione </text:span><text:span text:style-name="T33">passata come </text:span><text:span text:style-name="T33">argomento, la </text:span><text:span text:style-name="T33">quale produce un </text:span><text:span text:style-name="T33">carattere che viene </text:span><text:span text:style-name="T33">scritto nello stesso </text:span><text:span text:style-name="T33">indice sulla stringa </text:span><text:span text:style-name="T33">di destinazione.</text:span></text:p>
          </draw:text-box>
        </draw:frame>
        <draw:g draw:style-name="gr48" xml:id="id30" draw:id="id30">
          <draw:path draw:style-name="gr134" draw:text-style-name="P34" draw:layer="layout" svg:width="0.5cm" svg:height="0.5cm" svg:x="2.298cm" svg:y="11.699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custom-shape draw:style-name="gr135" draw:text-style-name="P35" draw:layer="layout" svg:width="0.25cm" svg:height="0.25cm" svg:x="2.423cm" svg:y="11.824cm">
            <text:p/>
            <draw:enhanced-geometry svg:viewBox="0 0 21600 21600" draw:type="rectangle" draw:enhanced-path="M 0 0 L 21600 0 21600 21600 0 21600 0 0 Z N"/>
          </draw:custom-shape>
        </draw:g>
        <draw:connector draw:style-name="gr136" draw:text-style-name="P59" draw:layer="layout" svg:x1="4.218cm" svg:y1="11.93cm" svg:x2="2.799cm" svg:y2="11.949cm" draw:start-shape="id29" draw:start-glue-point="3" draw:end-shape="id30" draw:end-glue-point="1" svg:d="M4218 11930h-716v19h-703" svg:viewBox="0 0 1420 20">
          <text:p/>
        </draw:connector>
        <draw:polygon draw:style-name="gr137" draw:text-style-name="P60" xml:id="id29" draw:id="id29" draw:layer="layout" svg:width="3.791cm" svg:height="1.432cm" svg:x="4.218cm" svg:y="11.214cm" svg:viewBox="0 0 3792 1433" draw:points="0,0 2369,0 2844,0 3791,0 3791,716 3792,717 3791,717 3791,1432 2844,1432 2844,1433 0,1433 948,717">
          <text:p text:style-name="P54"><text:span text:style-name="T29">In: char [] src, </text:span></text:p>
          <text:p text:style-name="P54"><text:span text:style-name="T29">char [] dest,</text:span></text:p>
          <text:p text:style-name="P54"><text:span text:style-name="T29"><text:s/>funzione (char) -&gt; char</text:span></text:p>
        </draw:polygon>
        <draw:custom-shape draw:style-name="gr138" draw:text-style-name="P45" xml:id="id31" draw:id="id31" draw:layer="layout" svg:width="3.042cm" svg:height="1.062cm" draw:transform="skewX (0.00663225115757845) translate (9.428cm 11.413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i</text:span><text:span text:style-name="T29"> </text:span><text:span text:style-name="T29">=</text:span><text:span text:style-name="T29"> </text:span><text:span text:style-name="T29">0</text:span><text:span text:style-name="T29">;</text:span></text:p>
          <text:p text:style-name="P44"><text:span text:style-name="T29">c</text:span><text:span text:style-name="T29"> </text:span><text:span text:style-name="T29">=</text:span><text:span text:style-name="T29"> </text:span><text:span text:style-name="T29">f</text:span><text:span text:style-name="T29">u</text:span><text:span text:style-name="T29">n</text:span><text:span text:style-name="T29">z</text:span><text:span text:style-name="T29">i</text:span><text:span text:style-name="T29">o</text:span><text:span text:style-name="T29">n</text:span><text:span text:style-name="T29">e</text:span><text:span text:style-name="T29">(</text:span><text:span text:style-name="T29">s</text:span><text:span text:style-name="T29">t</text:span><text:span text:style-name="T29">r</text:span><text:span text:style-name="T29">[</text:span><text:span text:style-name="T29">i</text:span><text:span text:style-name="T29">]</text:span><text:span text:style-name="T29">)</text:span><text:span text:style-name="T29">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39" draw:text-style-name="P36" draw:layer="layout" svg:x1="9.421cm" svg:y1="11.944cm" svg:x2="8.01cm" svg:y2="11.93cm" draw:start-shape="id31" draw:start-glue-point="3" draw:end-shape="id29" draw:end-glue-point="1" svg:d="M9421 11944h-705v-14h-706" svg:viewBox="0 0 1412 15">
          <text:p/>
        </draw:connector>
        <draw:custom-shape draw:style-name="gr140" draw:text-style-name="P42" xml:id="id32" draw:id="id32" draw:layer="layout" svg:width="1cm" svg:height="1cm" svg:x="10.436cm" svg:y="13.5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draw:style-name="gr19">
          <draw:custom-shape draw:style-name="gr141" draw:text-style-name="P40" draw:layer="layout" svg:width="11.561cm" svg:height="5.639cm" svg:x="5.252cm" svg:y="12.984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2" draw:text-style-name="P61" draw:layer="layout" svg:width="2.363cm" svg:height="0.614cm" svg:x="5.252cm" svg:y="12.984cm">
            <text:p text:style-name="P44"><text:span text:style-name="T29">str_map loop</text:span></text:p>
            <draw:enhanced-geometry svg:viewBox="0 0 21600 21600" draw:type="non-primitve" draw:enhanced-path="M 0 0 L 21600 0 19000 21600 0 21600 0 0 Z N"/>
          </draw:custom-shape>
        </draw:g>
        <draw:connector draw:style-name="gr143" draw:text-style-name="P36" draw:layer="layout" svg:x1="10.936cm" svg:y1="13.525cm" svg:x2="10.942cm" svg:y2="12.475cm" draw:start-shape="id32" draw:start-glue-point="4" draw:end-shape="id31" draw:end-glue-point="2" svg:d="M10936 13525v-530h6v-520" svg:viewBox="0 0 7 1051">
          <text:p/>
        </draw:connector>
        <draw:custom-shape draw:style-name="gr144" draw:text-style-name="P42" xml:id="id34" draw:id="id34" draw:layer="layout" svg:width="1cm" svg:height="1cm" svg:x="10.436cm" svg:y="17.0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5" draw:text-style-name="P48" draw:layer="layout" svg:width="1.245cm" svg:height="0.601cm" svg:x="11.214cm" svg:y="13.375cm">
          <draw:text-box>
            <text:p text:style-name="P26"><text:span text:style-name="T29">[falso]</text:span></text:p>
          </draw:text-box>
        </draw:frame>
        <draw:custom-shape draw:style-name="gr146" draw:text-style-name="P45" xml:id="id33" draw:id="id33" draw:layer="layout" svg:width="3.042cm" svg:height="1.21cm" draw:transform="skewX (0.00663225115757845) translate (9.416cm 15.428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dest[i] = c;</text:span></text:p>
          <text:p text:style-name="P44"><text:span text:style-name="T29">i++;</text:span></text:p>
          <text:p text:style-name="P44"><text:span text:style-name="T29">c = funzione(str[i]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47" draw:text-style-name="P36" draw:layer="layout" svg:x1="10.937cm" svg:y1="15.428cm" svg:x2="10.936cm" svg:y2="14.525cm" draw:start-shape="id33" draw:start-glue-point="0" draw:end-shape="id32" draw:end-glue-point="6" svg:d="M10937 15428v-445h-1v-458" svg:viewBox="0 0 2 904">
          <text:p/>
        </draw:connector>
        <draw:connector draw:style-name="gr148" draw:text-style-name="P36" draw:layer="layout" svg:x1="10.436cm" svg:y1="14.025cm" svg:x2="9.408cm" svg:y2="16.033cm" draw:start-shape="id32" draw:start-glue-point="5" draw:end-shape="id33" draw:end-glue-point="3" svg:d="M10436 14025h-1553v2008h525" svg:viewBox="0 0 1554 2009">
          <text:p/>
        </draw:connector>
        <draw:frame draw:style-name="gr149" draw:text-style-name="P48" draw:layer="layout" svg:width="2.558cm" svg:height="0.601cm" svg:x="8.078cm" svg:y="13.275cm">
          <draw:text-box>
            <text:p text:style-name="P26"><text:span text:style-name="T29">[src[i] != ‘\0’] &amp;&amp; </text:span></text:p>
            <text:p text:style-name="P26"><text:span text:style-name="T29">[c != ‘\0’]</text:span></text:p>
          </draw:text-box>
        </draw:frame>
        <draw:frame draw:style-name="gr150" draw:text-style-name="P48" draw:layer="layout" svg:width="1.197cm" svg:height="0.668cm" svg:x="9.715cm" svg:y="14.525cm">
          <draw:text-box>
            <text:p text:style-name="P26"><text:span text:style-name="T29">[vero]</text:span></text:p>
          </draw:text-box>
        </draw:frame>
        <draw:connector draw:style-name="gr151" draw:text-style-name="P36" draw:layer="layout" draw:line-skew="1.585cm" svg:x1="11.436cm" svg:y1="17.525cm" svg:x2="11.436cm" svg:y2="14.025cm" draw:start-shape="id34" draw:start-glue-point="7" draw:end-shape="id32" draw:end-glue-point="7" svg:d="M11436 17525h2124v-3500h-2124" svg:viewBox="0 0 2125 3501">
          <text:p/>
        </draw:connector>
        <draw:custom-shape draw:style-name="gr152" draw:text-style-name="P45" xml:id="id35" draw:id="id35" draw:layer="layout" svg:width="3.042cm" svg:height="0.584cm" draw:transform="skewX (0.00680678408277789) translate (9.427cm 19.211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dest[i] = '\0'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53" draw:text-style-name="P36" draw:layer="layout" svg:x1="10.948cm" svg:y1="19.211cm" svg:x2="10.936cm" svg:y2="18.025cm" draw:start-shape="id35" draw:start-glue-point="0" draw:end-shape="id34" draw:end-glue-point="6" svg:d="M10948 19211v-587h-12v-599" svg:viewBox="0 0 13 1187">
          <text:p/>
        </draw:connector>
        <draw:frame draw:style-name="gr154" draw:text-style-name="P48" draw:layer="layout" svg:width="1.715cm" svg:height="0.601cm" svg:x="10.983cm" svg:y="17.776cm">
          <draw:text-box>
            <text:p text:style-name="P26"><text:span text:style-name="T29">[end loop]</text:span></text:p>
          </draw:text-box>
        </draw:frame>
        <draw:custom-shape draw:style-name="gr155" draw:text-style-name="P57" xml:id="id36" draw:id="id36" draw:layer="layout" svg:width="2.635cm" svg:height="0.887cm" svg:x="13.972cm" svg:y="19.074cm">
          <text:p text:style-name="P56"><text:span text:style-name="T29">Out: dest</text:span></text:p>
          <draw:enhanced-geometry svg:viewBox="0 0 21600 21600" draw:text-areas="0 0 21600 21600" draw:type="pentagon-right" draw:modifiers="14438.2397572079" draw:enhanced-path="M 0 0 L ?f0 0 21600 10800 ?f0 21600 0 21600 Z N">
            <draw:equation draw:name="f0" draw:formula="$0 "/>
            <draw:handle draw:handle-range-x-minimum="0" draw:handle-range-x-maximum="21600" draw:handle-position="$0 top" draw:handle-position-x="$0" draw:handle-position-y="top"/>
          </draw:enhanced-geometry>
        </draw:custom-shape>
        <draw:g draw:style-name="gr78" xml:id="id37" draw:id="id37">
          <draw:path draw:style-name="gr156" draw:text-style-name="P49" draw:layer="layout" svg:width="0.5cm" svg:height="0.5cm" svg:x="17.798cm" svg:y="19.246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path draw:style-name="gr157" draw:text-style-name="P34" draw:layer="layout" svg:width="0.2cm" svg:height="0.2cm" svg:x="17.948cm" svg:y="19.396cm" svg:viewBox="0 0 201 201" svg:d="M201 101c0 17-5 34-13 50-9 15-22 28-37 37-16 8-33 13-50 13-18 0-35-5-51-13-15-9-28-22-37-37-8-16-13-33-13-50 0-18 5-35 13-51 9-15 22-28 37-37 16-8 33-13 51-13 17 0 34 5 50 13 15 9 28 22 37 37 8 16 13 33 13 51z">
            <text:p/>
          </draw:path>
        </draw:g>
        <draw:connector draw:style-name="gr158" draw:text-style-name="P36" draw:layer="layout" svg:x1="13.972cm" svg:y1="19.517cm" svg:x2="12.469cm" svg:y2="19.503cm" draw:start-shape="id36" draw:start-glue-point="3" draw:end-shape="id35" draw:end-glue-point="1" svg:d="M13972 19517h-752v-14h-751" svg:viewBox="0 0 1504 15">
          <text:p/>
        </draw:connector>
        <draw:connector draw:style-name="gr159" draw:text-style-name="P36" draw:layer="layout" svg:x1="17.798cm" svg:y1="19.496cm" svg:x2="16.607cm" svg:y2="19.517cm" draw:start-shape="id37" draw:start-glue-point="3" draw:end-shape="id36" draw:end-glue-point="1" svg:d="M17798 19496h-595v21h-596" svg:viewBox="0 0 1192 22">
          <text:p/>
        </draw:connector>
        <draw:frame draw:name="str_map_alloc 2" draw:style-name="gr160" draw:text-style-name="P62" draw:layer="layout" svg:width="3.213cm" svg:height="0.543cm" svg:x="1.4cm" svg:y="20.287cm">
          <draw:text-box>
            <text:p text:style-name="P1"><text:span text:style-name="T25">curry_word: </text:span></text:p>
          </draw:text-box>
        </draw:frame>
        <draw:frame draw:style-name="gr161" draw:text-style-name="P58" draw:layer="layout" svg:width="17.605cm" svg:height="6.038cm" svg:x="1.41cm" svg:y="21.113cm">
          <draw:text-box>
            <text:p text:style-name="P1"><text:span text:style-name="T33">P</text:span><text:span text:style-name="T33">e</text:span><text:span text:style-name="T33">r</text:span><text:span text:style-name="T33"> </text:span><text:span text:style-name="T33">f</text:span><text:span text:style-name="T33">a</text:span><text:span text:style-name="T33">r</text:span><text:span text:style-name="T33">e</text:span><text:span text:style-name="T33"> </text:span><text:span text:style-name="T33">p</text:span><text:span text:style-name="T33">i</text:span><text:span text:style-name="T33">e</text:span><text:span text:style-name="T33">n</text:span><text:span text:style-name="T33">o</text:span><text:span text:style-name="T33"> </text:span><text:span text:style-name="T33">u</text:span><text:span text:style-name="T33">s</text:span><text:span text:style-name="T33">o</text:span><text:span text:style-name="T33"> </text:span><text:span text:style-name="T33">d</text:span><text:span text:style-name="T33">e</text:span><text:span text:style-name="T33">l</text:span><text:span text:style-name="T33">l</text:span><text:span text:style-name="T33">a</text:span><text:span text:style-name="T33"> </text:span><text:span text:style-name="T33">p</text:span><text:span text:style-name="T33">o</text:span><text:span text:style-name="T33">t</text:span><text:span text:style-name="T33">e</text:span><text:span text:style-name="T33">n</text:span><text:span text:style-name="T33">z</text:span><text:span text:style-name="T33">i</text:span><text:span text:style-name="T33">a</text:span><text:span text:style-name="T33">l</text:span><text:span text:style-name="T33">i</text:span><text:span text:style-name="T33">t</text:span><text:span text:style-name="T33">à</text:span><text:span text:style-name="T33"> </text:span><text:span text:style-name="T33">d</text:span><text:span text:style-name="T33">e</text:span><text:span text:style-name="T33">l</text:span><text:span text:style-name="T33"> </text:span><text:span text:style-name="T33">l</text:span><text:span text:style-name="T33">i</text:span><text:span text:style-name="T33">n</text:span><text:span text:style-name="T33">g</text:span><text:span text:style-name="T33">u</text:span><text:span text:style-name="T33">a</text:span><text:span text:style-name="T33">g</text:span><text:span text:style-name="T33">g</text:span><text:span text:style-name="T33">i</text:span><text:span text:style-name="T33">o</text:span><text:span text:style-name="T33"> </text:span><text:span text:style-name="T33">f</text:span><text:span text:style-name="T33">u</text:span><text:span text:style-name="T33">n</text:span><text:span text:style-name="T33">z</text:span><text:span text:style-name="T33">i</text:span><text:span text:style-name="T33">o</text:span><text:span text:style-name="T33">n</text:span><text:span text:style-name="T33">a</text:span><text:span text:style-name="T33">l</text:span><text:span text:style-name="T33">e</text:span><text:span text:style-name="T33"> </text:span><text:span text:style-name="T35">è</text:span><text:span text:style-name="T33"> </text:span><text:span text:style-name="T33">n</text:span><text:span text:style-name="T33">e</text:span><text:span text:style-name="T33">c</text:span><text:span text:style-name="T33">e</text:span><text:span text:style-name="T33">s</text:span><text:span text:style-name="T33">s</text:span><text:span text:style-name="T33">a</text:span><text:span text:style-name="T33">r</text:span><text:span text:style-name="T33">i</text:span><text:span text:style-name="T33">o</text:span><text:span text:style-name="T33"> </text:span><text:span text:style-name="T33">e</text:span><text:span text:style-name="T33">s</text:span><text:span text:style-name="T33">s</text:span><text:span text:style-name="T33">e</text:span><text:span text:style-name="T33">r</text:span><text:span text:style-name="T33">e</text:span><text:span text:style-name="T33"> </text:span><text:span text:style-name="T33">i</text:span><text:span text:style-name="T33">n</text:span><text:span text:style-name="T33"> </text:span><text:span text:style-name="T33">g</text:span><text:span text:style-name="T33">r</text:span><text:span text:style-name="T33">a</text:span><text:span text:style-name="T33">d</text:span><text:span text:style-name="T33">o</text:span><text:span text:style-name="T33"> </text:span><text:span text:style-name="T33">d</text:span><text:span text:style-name="T33">i</text:span><text:span text:style-name="T33"> </text:span><text:span text:style-name="T33">e</text:span><text:span text:style-name="T33">s</text:span><text:span text:style-name="T33">e</text:span><text:span text:style-name="T33">g</text:span><text:span text:style-name="T33">u</text:span><text:span text:style-name="T33">i</text:span><text:span text:style-name="T33">r</text:span><text:span text:style-name="T33">e</text:span><text:span text:style-name="T33"> </text:span><text:span text:style-name="T33">l</text:span><text:span text:style-name="T33">’</text:span><text:span text:style-name="T33">o</text:span><text:span text:style-name="T33">p</text:span><text:span text:style-name="T33">e</text:span><text:span text:style-name="T33">r</text:span><text:span text:style-name="T33">a</text:span><text:span text:style-name="T33">z</text:span><text:span text:style-name="T33">i</text:span><text:span text:style-name="T33">o</text:span><text:span text:style-name="T33">n</text:span><text:span text:style-name="T33">e</text:span><text:span text:style-name="T33"> </text:span><text:span text:style-name="T33">d</text:span><text:span text:style-name="T33">i</text:span><text:span text:style-name="T33"> </text:span><text:span text:style-name="T36">c</text:span><text:span text:style-name="T36">u</text:span><text:span text:style-name="T36">r</text:span><text:span text:style-name="T36">r</text:span><text:span text:style-name="T36">y</text:span><text:span text:style-name="T36">i</text:span><text:span text:style-name="T36">n</text:span><text:span text:style-name="T36">g</text:span><text:span text:style-name="T33">,</text:span><text:span text:style-name="T33"> </text:span><text:span text:style-name="T33">o</text:span><text:span text:style-name="T33"> </text:span><text:span text:style-name="T33">d</text:span><text:span text:style-name="T33">i</text:span><text:span text:style-name="T33"> </text:span><text:span text:style-name="T33">a</text:span><text:span text:style-name="T33">p</text:span><text:span text:style-name="T33">p</text:span><text:span text:style-name="T33">l</text:span><text:span text:style-name="T33">i</text:span><text:span text:style-name="T33">c</text:span><text:span text:style-name="T33">a</text:span><text:span text:style-name="T33">z</text:span><text:span text:style-name="T33">i</text:span><text:span text:style-name="T33">o</text:span><text:span text:style-name="T33">n</text:span><text:span text:style-name="T33">e</text:span><text:span text:style-name="T33"> </text:span><text:span text:style-name="T33">p</text:span><text:span text:style-name="T33">a</text:span><text:span text:style-name="T33">r</text:span><text:span text:style-name="T33">z</text:span><text:span text:style-name="T33">i</text:span><text:span text:style-name="T33">a</text:span><text:span text:style-name="T33">l</text:span><text:span text:style-name="T33">e</text:span><text:span text:style-name="T33"> </text:span><text:span text:style-name="T33">d</text:span><text:span text:style-name="T33">i</text:span><text:span text:style-name="T33"> </text:span><text:span text:style-name="T33">f</text:span><text:span text:style-name="T33">u</text:span><text:span text:style-name="T33">n</text:span><text:span text:style-name="T33">z</text:span><text:span text:style-name="T33">i</text:span><text:span text:style-name="T33">o</text:span><text:span text:style-name="T33">n</text:span><text:span text:style-name="T33">i</text:span><text:span text:style-name="T33">,</text:span><text:span text:style-name="T33"> </text:span><text:span text:style-name="T33">i</text:span><text:span text:style-name="T33">n</text:span><text:span text:style-name="T33"> </text:span><text:span text:style-name="T33">q</text:span><text:span text:style-name="T33">u</text:span><text:span text:style-name="T33">a</text:span><text:span text:style-name="T33">n</text:span><text:span text:style-name="T33">t</text:span><text:span text:style-name="T33">o</text:span><text:span text:style-name="T33"> </text:span><text:span text:style-name="T34"><text:a xlink:href="#str_map" xlink:type="simple">str_map</text:a></text:span><text:span text:style-name="T8"><text:s/></text:span><text:span text:style-name="T8">p</text:span><text:span text:style-name="T8">u</text:span><text:span text:style-name="T8">ò</text:span><text:span text:style-name="T8"> </text:span><text:span text:style-name="T8">s</text:span><text:span text:style-name="T8">o</text:span><text:span text:style-name="T8">l</text:span><text:span text:style-name="T8">o</text:span><text:span text:style-name="T8"> </text:span><text:span text:style-name="T8">v</text:span><text:span text:style-name="T8">a</text:span><text:span text:style-name="T8">l</text:span><text:span text:style-name="T8">u</text:span><text:span text:style-name="T8">t</text:span><text:span text:style-name="T8">a</text:span><text:span text:style-name="T8">r</text:span><text:span text:style-name="T8">e</text:span><text:span text:style-name="T8"> </text:span><text:span text:style-name="T8">f</text:span><text:span text:style-name="T8">u</text:span><text:span text:style-name="T8">n</text:span><text:span text:style-name="T8">z</text:span><text:span text:style-name="T8">i</text:span><text:span text:style-name="T8">o</text:span><text:span text:style-name="T8">n</text:span><text:span text:style-name="T8">i</text:span><text:span text:style-name="T8"> </text:span><text:span text:style-name="T8">c</text:span><text:span text:style-name="T8">o</text:span><text:span text:style-name="T8">n</text:span><text:span text:style-name="T8"> </text:span><text:span text:style-name="T8">u</text:span><text:span text:style-name="T8">n</text:span><text:span text:style-name="T8"> </text:span><text:span text:style-name="T8">s</text:span><text:span text:style-name="T8">i</text:span><text:span text:style-name="T8">n</text:span><text:span text:style-name="T8">g</text:span><text:span text:style-name="T8">o</text:span><text:span text:style-name="T8">l</text:span><text:span text:style-name="T8">o</text:span><text:span text:style-name="T8"> </text:span><text:span text:style-name="T8">p</text:span><text:span text:style-name="T8">a</text:span><text:span text:style-name="T8">r</text:span><text:span text:style-name="T8">a</text:span><text:span text:style-name="T8">m</text:span><text:span text:style-name="T8">e</text:span><text:span text:style-name="T8">t</text:span><text:span text:style-name="T8">r</text:span><text:span text:style-name="T8">o</text:span><text:span text:style-name="T8">.</text:span><text:span text:style-name="T8"><text:line-break/></text:span><text:span text:style-name="T8">I</text:span><text:span text:style-name="T8">n</text:span><text:span text:style-name="T8"> </text:span><text:span text:style-name="T8">l</text:span><text:span text:style-name="T8">i</text:span><text:span text:style-name="T8">n</text:span><text:span text:style-name="T8">g</text:span><text:span text:style-name="T8">u</text:span><text:span text:style-name="T8">a</text:span><text:span text:style-name="T8">g</text:span><text:span text:style-name="T8">g</text:span><text:span text:style-name="T8">i</text:span><text:span text:style-name="T8">o</text:span><text:span text:style-name="T8"> </text:span><text:span text:style-name="T8">i</text:span><text:span text:style-name="T8">n</text:span><text:span text:style-name="T8">f</text:span><text:span text:style-name="T8">o</text:span><text:span text:style-name="T8">r</text:span><text:span text:style-name="T8">m</text:span><text:span text:style-name="T8">a</text:span><text:span text:style-name="T8">l</text:span><text:span text:style-name="T8">e</text:span><text:span text:style-name="T8">,</text:span><text:span text:style-name="T8"> </text:span><text:span text:style-name="T8">e</text:span><text:span text:style-name="T8">s</text:span><text:span text:style-name="T8">e</text:span><text:span text:style-name="T8">g</text:span><text:span text:style-name="T8">u</text:span><text:span text:style-name="T8">e</text:span><text:span text:style-name="T8">n</text:span><text:span text:style-name="T8">d</text:span><text:span text:style-name="T8">o</text:span><text:span text:style-name="T8"> </text:span><text:span text:style-name="T8">q</text:span><text:span text:style-name="T8">u</text:span><text:span text:style-name="T8">e</text:span><text:span text:style-name="T8">s</text:span><text:span text:style-name="T8">t</text:span><text:span text:style-name="T8">a</text:span><text:span text:style-name="T8"> </text:span><text:span text:style-name="T8">o</text:span><text:span text:style-name="T8">p</text:span><text:span text:style-name="T8">e</text:span><text:span text:style-name="T8">r</text:span><text:span text:style-name="T8">a</text:span><text:span text:style-name="T8">z</text:span><text:span text:style-name="T8">i</text:span><text:span text:style-name="T8">o</text:span><text:span text:style-name="T8">n</text:span><text:span text:style-name="T8">e</text:span><text:span text:style-name="T8"> </text:span><text:span text:style-name="T8">s</text:span><text:span text:style-name="T8">u</text:span><text:span text:style-name="T8"> </text:span><text:span text:style-name="T8">u</text:span><text:span text:style-name="T8">n</text:span><text:span text:style-name="T8">a</text:span><text:span text:style-name="T8"> </text:span><text:span text:style-name="T8">f</text:span><text:span text:style-name="T8">u</text:span><text:span text:style-name="T8">n</text:span><text:span text:style-name="T8">z</text:span><text:span text:style-name="T8">i</text:span><text:span text:style-name="T8">o</text:span><text:span text:style-name="T8">n</text:span><text:span text:style-name="T8">e</text:span><text:span text:style-name="T8"> </text:span><text:span text:style-name="T37">f</text:span><text:span text:style-name="T38">:</text:span><text:span text:style-name="T38"> </text:span><text:span text:style-name="T38">(</text:span><text:span text:style-name="T38">X</text:span><text:span text:style-name="T38">×</text:span><text:span text:style-name="T38">Y</text:span><text:span text:style-name="T38"> </text:span><text:span text:style-name="T38">)</text:span><text:span text:style-name="T38">→</text:span><text:span text:style-name="T38">Z</text:span><text:span text:style-name="T38">,</text:span><text:span text:style-name="T38"> </text:span><text:span text:style-name="T38"><text:s/></text:span><text:span text:style-name="T39">è</text:span><text:span text:style-name="T8"> </text:span><text:span text:style-name="T8">p</text:span><text:span text:style-name="T8">o</text:span><text:span text:style-name="T8">s</text:span><text:span text:style-name="T8">s</text:span><text:span text:style-name="T8">i</text:span><text:span text:style-name="T8">b</text:span><text:span text:style-name="T8">i</text:span><text:span text:style-name="T8">l</text:span><text:span text:style-name="T8">e</text:span><text:span text:style-name="T8"> </text:span><text:span text:style-name="T8">d</text:span><text:span text:style-name="T8">e</text:span><text:span text:style-name="T8">f</text:span><text:span text:style-name="T8">i</text:span><text:span text:style-name="T8">n</text:span><text:span text:style-name="T8">i</text:span><text:span text:style-name="T8">r</text:span><text:span text:style-name="T8">e</text:span><text:span text:style-name="T8"> </text:span><text:span text:style-name="T8">u</text:span><text:span text:style-name="T8">n</text:span><text:span text:style-name="T8">a</text:span><text:span text:style-name="T8"> </text:span><text:span text:style-name="T8">f</text:span><text:span text:style-name="T8">u</text:span><text:span text:style-name="T8">n</text:span><text:span text:style-name="T8">z</text:span><text:span text:style-name="T8">i</text:span><text:span text:style-name="T8">o</text:span><text:span text:style-name="T8">n</text:span><text:span text:style-name="T8">e</text:span><text:span text:style-name="T8"> </text:span><text:span text:style-name="T38">f</text:span><text:span text:style-name="T40">x</text:span><text:span text:style-name="T41">:</text:span><text:span text:style-name="T41">(</text:span><text:span text:style-name="T41">Y</text:span><text:span text:style-name="T41">)</text:span><text:span text:style-name="T41">→</text:span><text:span text:style-name="T41">Z</text:span><text:span text:style-name="T41">,</text:span><text:span text:style-name="T41"> </text:span><text:span text:style-name="T42"><text:s/></text:span><text:span text:style-name="T42">c</text:span><text:span text:style-name="T42">h</text:span><text:span text:style-name="T42">e</text:span><text:span text:style-name="T42"> </text:span><text:span text:style-name="T42">a</text:span><text:span text:style-name="T42">c</text:span><text:span text:style-name="T42">c</text:span><text:span text:style-name="T42">e</text:span><text:span text:style-name="T42">t</text:span><text:span text:style-name="T42">t</text:span><text:span text:style-name="T42">a</text:span><text:span text:style-name="T42"> </text:span><text:span text:style-name="T42">u</text:span><text:span text:style-name="T42">n</text:span><text:span text:style-name="T42"> </text:span><text:span text:style-name="T42">n</text:span><text:span text:style-name="T42">u</text:span><text:span text:style-name="T42">m</text:span><text:span text:style-name="T42">e</text:span><text:span text:style-name="T42">r</text:span><text:span text:style-name="T42">o</text:span><text:span text:style-name="T42"> </text:span><text:span text:style-name="T42">r</text:span><text:span text:style-name="T42">i</text:span><text:span text:style-name="T42">d</text:span><text:span text:style-name="T42">o</text:span><text:span text:style-name="T42">t</text:span><text:span text:style-name="T42">t</text:span><text:span text:style-name="T42">o</text:span><text:span text:style-name="T42"> </text:span><text:span text:style-name="T42">d</text:span><text:span text:style-name="T42">i</text:span><text:span text:style-name="T42"> </text:span><text:span text:style-name="T42">a</text:span><text:span text:style-name="T42">r</text:span><text:span text:style-name="T42">g</text:span><text:span text:style-name="T42">o</text:span><text:span text:style-name="T42">m</text:span><text:span text:style-name="T42">e</text:span><text:span text:style-name="T42">n</text:span><text:span text:style-name="T42">t</text:span><text:span text:style-name="T42">i</text:span><text:span text:style-name="T42">,</text:span><text:span text:style-name="T42"> </text:span><text:span text:style-name="T42">i</text:span><text:span text:style-name="T42">n</text:span><text:span text:style-name="T42"> </text:span><text:span text:style-name="T42">u</text:span><text:span text:style-name="T42">n</text:span><text:span text:style-name="T42"> </text:span><text:span text:style-name="T42">c</text:span><text:span text:style-name="T42">e</text:span><text:span text:style-name="T42">r</text:span><text:span text:style-name="T42">t</text:span><text:span text:style-name="T42">o</text:span><text:span text:style-name="T42"> </text:span><text:span text:style-name="T42">s</text:span><text:span text:style-name="T42">e</text:span><text:span text:style-name="T42">n</text:span><text:span text:style-name="T42">s</text:span><text:span text:style-name="T42">o</text:span><text:span text:style-name="T42"> </text:span><text:span text:style-name="T42">“</text:span><text:span text:style-name="T42">f</text:span><text:span text:style-name="T42">i</text:span><text:span text:style-name="T42">s</text:span><text:span text:style-name="T42">s</text:span><text:span text:style-name="T42">a</text:span><text:span text:style-name="T42">n</text:span><text:span text:style-name="T42">d</text:span><text:span text:style-name="T42">o</text:span><text:span text:style-name="T42">”</text:span><text:span text:style-name="T42"> </text:span><text:span text:style-name="T42">i</text:span><text:span text:style-name="T42">l</text:span><text:span text:style-name="T42"> </text:span><text:span text:style-name="T42">v</text:span><text:span text:style-name="T42">a</text:span><text:span text:style-name="T42">l</text:span><text:span text:style-name="T42">o</text:span><text:span text:style-name="T42">r</text:span><text:span text:style-name="T42">e</text:span><text:span text:style-name="T42"> </text:span><text:span text:style-name="T42">d</text:span><text:span text:style-name="T42">i</text:span><text:span text:style-name="T42"> </text:span><text:span text:style-name="T42">x</text:span><text:span text:style-name="T42">.</text:span></text:p>
            <text:p text:style-name="P1"><text:span text:style-name="T42">I</text:span><text:span text:style-name="T42">n</text:span><text:span text:style-name="T42"> </text:span><text:span text:style-name="T42">q</text:span><text:span text:style-name="T42">u</text:span><text:span text:style-name="T42">e</text:span><text:span text:style-name="T42">s</text:span><text:span text:style-name="T42">t</text:span><text:span text:style-name="T42">o</text:span><text:span text:style-name="T42"> </text:span><text:span text:style-name="T42">d</text:span><text:span text:style-name="T42">o</text:span><text:span text:style-name="T42">c</text:span><text:span text:style-name="T42">u</text:span><text:span text:style-name="T42">m</text:span><text:span text:style-name="T42">e</text:span><text:span text:style-name="T42">n</text:span><text:span text:style-name="T42">t</text:span><text:span text:style-name="T42">o</text:span><text:span text:style-name="T42"> </text:span><text:span text:style-name="T42">r</text:span><text:span text:style-name="T42">i</text:span><text:span text:style-name="T42">c</text:span><text:span text:style-name="T42">h</text:span><text:span text:style-name="T42">i</text:span><text:span text:style-name="T42">a</text:span><text:span text:style-name="T42">m</text:span><text:span text:style-name="T42">e</text:span><text:span text:style-name="T42">r</text:span><text:span text:style-name="T42">ò</text:span><text:span text:style-name="T42"> </text:span><text:span text:style-name="T42">l</text:span><text:span text:style-name="T42">a</text:span><text:span text:style-name="T42"> </text:span><text:span text:style-name="T42">f</text:span><text:span text:style-name="T42">u</text:span><text:span text:style-name="T42">n</text:span><text:span text:style-name="T42">z</text:span><text:span text:style-name="T42">i</text:span><text:span text:style-name="T42">o</text:span><text:span text:style-name="T42">n</text:span><text:span text:style-name="T42">e</text:span><text:span text:style-name="T42"> </text:span><text:span text:style-name="T42">“</text:span><text:span text:style-name="T42">c</text:span><text:span text:style-name="T42">u</text:span><text:span text:style-name="T42">r</text:span><text:span text:style-name="T42">r</text:span><text:span text:style-name="T42">y</text:span><text:span text:style-name="T42">(</text:span><text:span text:style-name="T42">)</text:span><text:span text:style-name="T42">”</text:span><text:span text:style-name="T42"> </text:span><text:span text:style-name="T42">c</text:span><text:span text:style-name="T42">o</text:span><text:span text:style-name="T42">m</text:span><text:span text:style-name="T42">e</text:span><text:span text:style-name="T42"> </text:span><text:span text:style-name="T42">u</text:span><text:span text:style-name="T42">n</text:span><text:span text:style-name="T42">a</text:span><text:span text:style-name="T42"> </text:span><text:span text:style-name="T42">f</text:span><text:span text:style-name="T42">u</text:span><text:span text:style-name="T42">n</text:span><text:span text:style-name="T42">z</text:span><text:span text:style-name="T42">i</text:span><text:span text:style-name="T42">o</text:span><text:span text:style-name="T42">n</text:span><text:span text:style-name="T42">e</text:span><text:span text:style-name="T42"> </text:span><text:span text:style-name="T42">c</text:span><text:span text:style-name="T42">a</text:span><text:span text:style-name="T42">p</text:span><text:span text:style-name="T42">a</text:span><text:span text:style-name="T42">c</text:span><text:span text:style-name="T42">e</text:span><text:span text:style-name="T42"> </text:span><text:span text:style-name="T42">d</text:span><text:span text:style-name="T42">i</text:span><text:span text:style-name="T42"> </text:span><text:span text:style-name="T42">a</text:span><text:span text:style-name="T42">s</text:span><text:span text:style-name="T42">s</text:span><text:span text:style-name="T42">o</text:span><text:span text:style-name="T42">c</text:span><text:span text:style-name="T42">i</text:span><text:span text:style-name="T42">a</text:span><text:span text:style-name="T42">r</text:span><text:span text:style-name="T42">e</text:span><text:span text:style-name="T42"> </text:span><text:span text:style-name="T42">l</text:span><text:span text:style-name="T42">a</text:span><text:span text:style-name="T42"> </text:span><text:span text:style-name="T42">f</text:span><text:span text:style-name="T42">u</text:span><text:span text:style-name="T42">n</text:span><text:span text:style-name="T42">z</text:span><text:span text:style-name="T42">i</text:span><text:span text:style-name="T42">o</text:span><text:span text:style-name="T42">n</text:span><text:span text:style-name="T42">e</text:span><text:span text:style-name="T42"> </text:span><text:span text:style-name="T42">p</text:span><text:span text:style-name="T42">a</text:span><text:span text:style-name="T42">s</text:span><text:span text:style-name="T42">s</text:span><text:span text:style-name="T42">a</text:span><text:span text:style-name="T42">t</text:span><text:span text:style-name="T42">a</text:span><text:span text:style-name="T42"> </text:span><text:span text:style-name="T42">c</text:span><text:span text:style-name="T42">o</text:span><text:span text:style-name="T42">m</text:span><text:span text:style-name="T42">e</text:span><text:span text:style-name="T42"> </text:span><text:span text:style-name="T42">p</text:span><text:span text:style-name="T42">r</text:span><text:span text:style-name="T42">i</text:span><text:span text:style-name="T42">m</text:span><text:span text:style-name="T42">o</text:span><text:span text:style-name="T42"> </text:span><text:span text:style-name="T42">a</text:span><text:span text:style-name="T42">r</text:span><text:span text:style-name="T42">g</text:span><text:span text:style-name="T42">o</text:span><text:span text:style-name="T42">m</text:span><text:span text:style-name="T42">e</text:span><text:span text:style-name="T42">n</text:span><text:span text:style-name="T42">t</text:span><text:span text:style-name="T42">o</text:span><text:span text:style-name="T42">,</text:span><text:span text:style-name="T42"> </text:span><text:span text:style-name="T42">a</text:span><text:span text:style-name="T42">g</text:span><text:span text:style-name="T42">l</text:span><text:span text:style-name="T42">i</text:span><text:span text:style-name="T42"> </text:span><text:span text:style-name="T42">a</text:span><text:span text:style-name="T42">r</text:span><text:span text:style-name="T42">g</text:span><text:span text:style-name="T42">o</text:span><text:span text:style-name="T42">m</text:span><text:span text:style-name="T42">e</text:span><text:span text:style-name="T42">n</text:span><text:span text:style-name="T42">t</text:span><text:span text:style-name="T42">i</text:span><text:span text:style-name="T42"> </text:span><text:span text:style-name="T42">s</text:span><text:span text:style-name="T42">u</text:span><text:span text:style-name="T42">c</text:span><text:span text:style-name="T42">c</text:span><text:span text:style-name="T42">e</text:span><text:span text:style-name="T42">s</text:span><text:span text:style-name="T42">s</text:span><text:span text:style-name="T42">i</text:span><text:span text:style-name="T42">v</text:span><text:span text:style-name="T42">i</text:span><text:span text:style-name="T42">,</text:span><text:span text:style-name="T42"> </text:span><text:span text:style-name="T42">c</text:span><text:span text:style-name="T42">o</text:span><text:span text:style-name="T42">m</text:span><text:span text:style-name="T42">e</text:span><text:span text:style-name="T42"> </text:span><text:span text:style-name="T42">d</text:span><text:span text:style-name="T42">i</text:span><text:span text:style-name="T42">r</text:span><text:span text:style-name="T42">e</text:span><text:span text:style-name="T42">:</text:span><text:span text:style-name="T42"> </text:span><text:span text:style-name="T42"><text:line-break/></text:span><text:span text:style-name="T42">c</text:span><text:span text:style-name="T42">u</text:span><text:span text:style-name="T42">r</text:span><text:span text:style-name="T42">r</text:span><text:span text:style-name="T42">y</text:span><text:span text:style-name="T42">(</text:span><text:span text:style-name="T42">f</text:span><text:span text:style-name="T42">u</text:span><text:span text:style-name="T42">n</text:span><text:span text:style-name="T42">c</text:span><text:span text:style-name="T42">(</text:span><text:span text:style-name="T42">)</text:span><text:span text:style-name="T42">,</text:span><text:span text:style-name="T42"> </text:span><text:span text:style-name="T42">a</text:span><text:span text:style-name="T42">,</text:span><text:span text:style-name="T42"> </text:span><text:span text:style-name="T42">b</text:span><text:span text:style-name="T42">)</text:span><text:span text:style-name="T42"> </text:span><text:span text:style-name="T42">=</text:span><text:span text:style-name="T42"> </text:span><text:span text:style-name="T42">f</text:span><text:span text:style-name="T42">u</text:span><text:span text:style-name="T42">n</text:span><text:span text:style-name="T42">c</text:span><text:span text:style-name="T42">(</text:span><text:span text:style-name="T42">a</text:span><text:span text:style-name="T42">,</text:span><text:span text:style-name="T42"> </text:span><text:span text:style-name="T42">b</text:span><text:span text:style-name="T42">,</text:span><text:span text:style-name="T42"> </text:span><text:span text:style-name="T42">…</text:span><text:span text:style-name="T42">)</text:span><text:span text:style-name="T42">.</text:span><text:span text:style-name="T42"> </text:span></text:p>
            <text:p text:style-name="P1"><text:span text:style-name="T42">V</text:span><text:span text:style-name="T42">o</text:span><text:span text:style-name="T42">l</text:span><text:span text:style-name="T42">e</text:span><text:span text:style-name="T42">v</text:span><text:span text:style-name="T42">o</text:span><text:span text:style-name="T42"> </text:span><text:span text:style-name="T42">f</text:span><text:span text:style-name="T42">a</text:span><text:span text:style-name="T42">r</text:span><text:span text:style-name="T42"> </text:span><text:span text:style-name="T42">p</text:span><text:span text:style-name="T42">r</text:span><text:span text:style-name="T42">e</text:span><text:span text:style-name="T42">s</text:span><text:span text:style-name="T42">e</text:span><text:span text:style-name="T42">n</text:span><text:span text:style-name="T42">t</text:span><text:span text:style-name="T42">e</text:span><text:span text:style-name="T42"> </text:span><text:span text:style-name="T42">c</text:span><text:span text:style-name="T42">h</text:span><text:span text:style-name="T42">e</text:span><text:span text:style-name="T42"> </text:span><text:span text:style-name="T42">l</text:span><text:span text:style-name="T42">’</text:span><text:span text:style-name="T42">i</text:span><text:span text:style-name="T42">m</text:span><text:span text:style-name="T42">p</text:span><text:span text:style-name="T42">l</text:span><text:span text:style-name="T42">e</text:span><text:span text:style-name="T42">m</text:span><text:span text:style-name="T42">e</text:span><text:span text:style-name="T42">n</text:span><text:span text:style-name="T42">t</text:span><text:span text:style-name="T42">a</text:span><text:span text:style-name="T42">z</text:span><text:span text:style-name="T42">i</text:span><text:span text:style-name="T42">o</text:span><text:span text:style-name="T42">n</text:span><text:span text:style-name="T42">e</text:span><text:span text:style-name="T42"> </text:span><text:span text:style-name="T42">e</text:span><text:span text:style-name="T42">f</text:span><text:span text:style-name="T42">f</text:span><text:span text:style-name="T42">e</text:span><text:span text:style-name="T42">t</text:span><text:span text:style-name="T42">t</text:span><text:span text:style-name="T42">i</text:span><text:span text:style-name="T42">v</text:span><text:span text:style-name="T42">a</text:span><text:span text:style-name="T42"> </text:span><text:span text:style-name="T42">d</text:span><text:span text:style-name="T42">i</text:span><text:span text:style-name="T42">f</text:span><text:span text:style-name="T42">f</text:span><text:span text:style-name="T42">e</text:span><text:span text:style-name="T42">r</text:span><text:span text:style-name="T42">i</text:span><text:span text:style-name="T42">s</text:span><text:span text:style-name="T42">c</text:span><text:span text:style-name="T42">e</text:span><text:span text:style-name="T42"> </text:span><text:span text:style-name="T42">d</text:span><text:span text:style-name="T42">a</text:span><text:span text:style-name="T42"> </text:span><text:span text:style-name="T42">q</text:span><text:span text:style-name="T42">u</text:span><text:span text:style-name="T42">e</text:span><text:span text:style-name="T42">s</text:span><text:span text:style-name="T42">t</text:span><text:span text:style-name="T42">o</text:span><text:span text:style-name="T42"> </text:span><text:span text:style-name="T42">c</text:span><text:span text:style-name="T42">o</text:span><text:span text:style-name="T42">m</text:span><text:span text:style-name="T42">p</text:span><text:span text:style-name="T42">o</text:span><text:span text:style-name="T42">r</text:span><text:span text:style-name="T42">t</text:span><text:span text:style-name="T42">a</text:span><text:span text:style-name="T42">m</text:span><text:span text:style-name="T42">e</text:span><text:span text:style-name="T42">n</text:span><text:span text:style-name="T42">t</text:span><text:span text:style-name="T42">o</text:span><text:span text:style-name="T42">,</text:span><text:span text:style-name="T42"> </text:span><text:span text:style-name="T42">a</text:span><text:span text:style-name="T42">n</text:span><text:span text:style-name="T42">c</text:span><text:span text:style-name="T42">h</text:span><text:span text:style-name="T42">e</text:span><text:span text:style-name="T42"> </text:span><text:span text:style-name="T42">s</text:span><text:span text:style-name="T42">e</text:span><text:span text:style-name="T42"> </text:span><text:span text:style-name="T42">p</text:span><text:span text:style-name="T42">r</text:span><text:span text:style-name="T42">o</text:span><text:span text:style-name="T42">d</text:span><text:span text:style-name="T42">u</text:span><text:span text:style-name="T42">c</text:span><text:span text:style-name="T42">e</text:span><text:span text:style-name="T42"> </text:span><text:span text:style-name="T42">u</text:span><text:span text:style-name="T42">n</text:span><text:span text:style-name="T42"> </text:span><text:span text:style-name="T42">e</text:span><text:span text:style-name="T42">f</text:span><text:span text:style-name="T42">f</text:span><text:span text:style-name="T42">e</text:span><text:span text:style-name="T42">t</text:span><text:span text:style-name="T42">t</text:span><text:span text:style-name="T42">o</text:span><text:span text:style-name="T42"> </text:span><text:span text:style-name="T42">a</text:span><text:span text:style-name="T42">n</text:span><text:span text:style-name="T42">a</text:span><text:span text:style-name="T42">l</text:span><text:span text:style-name="T42">o</text:span><text:span text:style-name="T42">g</text:span><text:span text:style-name="T42">o</text:span><text:span text:style-name="T42">.</text:span></text:p>
          </draw:text-box>
        </draw:frame>
      </draw:page>
      <draw:page draw:name="page5" draw:style-name="dp1" draw:master-page-name="master-page64">
        <draw:frame draw:style-name="gr15" draw:text-style-name="P15" draw:layer="layout" svg:width="0.943cm" svg:height="0.642cm" svg:x="1.474cm" svg:y="28.154cm">
          <draw:text-box>
            <text:p text:style-name="P1"><text:span text:style-name="T16">5</text:span></text:p>
          </draw:text-box>
        </draw:frame>
        <draw:frame draw:style-name="gr44" draw:text-style-name="P8" draw:layer="layout" svg:width="5.771cm" svg:height="0.543cm" svg:x="1.401cm" svg:y="2.026cm">
          <draw:text-box>
            <text:p text:style-name="P1"><text:span text:style-name="T7">Procedure notevoli: </text:span></text:p>
          </draw:text-box>
        </draw:frame>
        <draw:frame draw:name="Implementazione di curry_word" draw:style-name="gr162" draw:text-style-name="P62" draw:layer="layout" svg:width="7.789cm" svg:height="0.543cm" svg:x="1.4cm" svg:y="2.987cm">
          <draw:text-box>
            <text:p text:style-name="P1"><text:span text:style-name="T25">Implementazione di curry_word: </text:span></text:p>
          </draw:text-box>
        </draw:frame>
        <draw:frame draw:style-name="gr163" draw:text-style-name="P63" draw:layer="layout" svg:width="17.605cm" svg:height="7.567cm" svg:x="1.658cm" svg:y="3.919cm">
          <draw:text-box>
            <text:p text:style-name="P1"><text:span text:style-name="T43">Nel codice l’implementazione della procedura risulta non convenzionale e rompe alcune delle regole che mi sono imposto durante la scrittura del codice, ho fatto questa scelta per mantenere il resto della struttura e logica del programma, e per evitare di appoggiarmi a variabili globali alterando ulteriormente lo stato del programma tra chiamate. </text:span><text:span text:style-name="T43"><text:line-break/></text:span><text:span text:style-name="T43">E in tutta onestà per testare i un po’ limiti della mia conoscenza di Riscv e Ripes, mantenendo comunque un codice deterministico.</text:span><text:span text:style-name="T43"><text:line-break/></text:span><text:span text:style-name="T43"><text:line-break/></text:span><text:span text:style-name="T43">In breve la procedura altera la sezione .text del programma durante l’esecuzione, inserendo due operazioni che permettono di caricare una parola arbitraria in un registro specificato durante la chiamata.</text:span><text:span text:style-name="T43"><text:line-break/></text:span><text:span text:style-name="T43">Questo pu</text:span><text:span text:style-name="T44">ò essere fatto con sicurezza solo se abbiamo definito un simbolo e lasciato spazio per due operazioni nella sezione del codice che vogliamo modificare.</text:span></text:p>
            <text:p text:style-name="P1"><text:span text:style-name="T43"><text:line-break/></text:span><text:span text:style-name="T43"/></text:p>
          </draw:text-box>
        </draw:frame>
        <draw:frame draw:style-name="gr164" draw:text-style-name="P64" draw:layer="layout" svg:width="6.644cm" svg:height="1.832cm" svg:x="10.692cm" svg:y="10.946cm">
          <draw:image xlink:href="Pictures/100000010000012200000050F922DA25.png" xlink:type="simple" xlink:show="embed" xlink:actuate="onLoad" draw:mime-type="image/png">
            <text:p/>
          </draw:image>
        </draw:frame>
        <draw:frame draw:style-name="gr164" draw:text-style-name="P64" draw:layer="layout" svg:width="9.153cm" svg:height="1.883cm" svg:x="10.647cm" svg:y="13.701cm">
          <draw:image xlink:href="Pictures/10000001000001800000004F28348659.png" xlink:type="simple" xlink:show="embed" xlink:actuate="onLoad" draw:mime-type="image/png">
            <text:p/>
          </draw:image>
        </draw:frame>
        <draw:frame draw:style-name="gr165" draw:text-style-name="P32" draw:layer="layout" svg:width="8.617cm" svg:height="6.497cm" svg:x="1.621cm" svg:y="10.817cm">
          <draw:text-box>
            <text:p text:style-name="P1"><text:span text:style-name="T44">Per esempio </text:span><text:span text:style-name="T44">nella funzione </text:span><text:span text:style-name="T45"><text:a xlink:href="#caesar_sost" xlink:type="simple">caesar_sost</text:a></text:span><text:span text:style-name="T46"><text:s/></text:span><text:span text:style-name="T46">la sequenza di </text:span><text:span text:style-name="T46">codice dopo il </text:span><text:span text:style-name="T46">simbolo </text:span><text:span text:style-name="T46">"caesar_sost_l</text:span><text:span text:style-name="T46">oad_k" </text:span><text:span text:style-name="T44">è </text:span><text:span text:style-name="T44">compresa </text:span><text:span text:style-name="T44">intenzionalme</text:span><text:span text:style-name="T44">nte da due </text:span><text:span text:style-name="T44">azioni senza </text:span><text:span text:style-name="T44">effffetto, in </text:span><text:span text:style-name="T44">modo che </text:span><text:span text:style-name="T44">possa essere</text:span><text:span text:style-name="T46"> </text:span><text:span text:style-name="T46">sovrascritta </text:span><text:span text:style-name="T46">con una </text:span><text:span text:style-name="T46">sequenza che </text:span><text:span text:style-name="T46">carica il valore </text:span><text:span text:style-name="T46">di </text:span><text:span text:style-name="T47"><text:a xlink:href="#Parametri del programma" xlink:type="simple">sostK</text:a></text:span><text:span text:style-name="T46"><text:s/>nel </text:span><text:span text:style-name="T46">registro t1.</text:span><text:span text:style-name="T46"><text:line-break/></text:span><text:span text:style-name="T46">Questa </text:span><text:span text:style-name="T46">sequenza </text:span><text:span text:style-name="T46">spezza il </text:span><text:span text:style-name="T46">valore in una </text:span><text:span text:style-name="T46">parte </text:span><text:span text:style-name="T46">superiore di 20 </text:span><text:span text:style-name="T46">bit, e una </text:span><text:span text:style-name="T46">inferiore di 12 </text:span><text:span text:style-name="T46">e sfrutta le </text:span><text:span text:style-name="T46">istruzioni </text:span><text:span text:style-name="T46">immediate per </text:span><text:span text:style-name="T46">costruire il </text:span><text:span text:style-name="T46">valore nel </text:span><text:span text:style-name="T46">registro scelto</text:span></text:p>
            <text:p text:style-name="P1"><text:span text:style-name="T46"/></text:p>
          </draw:text-box>
        </draw:frame>
        <draw:frame draw:style-name="gr166" draw:text-style-name="P50" draw:layer="layout" svg:width="16.865cm" svg:height="9.652cm" svg:x="1.491cm" svg:y="17.223cm">
          <draw:text-box>
            <text:p>Pseudocodice:</text:p>
            <text:p/>
            <text:p>void curry_word(32bit_int valore, int registro, 32bit_int *indirizzo_destinazione)</text:p>
            <text:p>{</text:p>
            <text:p><text:tab/>bit bit_flip = leggi_nesimo_bit(valore, 12); <text:s/>→ * </text:p>
            <text:p/>
            <text:p><text:tab/>32bit_int lui_opcode = 0b0110111; </text:p>
            <text:p><text:tab/></text:p>
            <text:p><text:tab/>32bit_int istruzione_lui = ((valore &gt;&gt; 12) + bit_flip) &lt;&lt; 12;</text:p>
            <text:p><text:tab/>istruzione_lui |= registro &lt;&lt; 7; </text:p>
            <text:p><text:tab/>istruzione_lui |= lui_opcode;</text:p>
            <text:p/>
            <text:p><text:tab/>32bit_int addi_opcode = 0b0010011;</text:p>
            <text:p/>
            <text:p><text:tab/>32bit_int istruzione_addi = valore &lt;&lt; 20; </text:p>
            <text:p><text:tab/>istruzione_addi |= registro &lt;&lt; 7 | registro &lt;&lt; 15; </text:p>
            <text:p><text:tab/>istruzione_addi |= addi_opcode; </text:p>
            <text:p/>
            <text:p><text:tab/>indirizzo_destinazione[0] = istruizione_lui;</text:p>
            <text:p><text:tab/>indirizzo_destinazione[1] = istruzione_addi;</text:p>
            <text:p>}</text:p>
            <text:p/>
          </draw:text-box>
        </draw:frame>
        <draw:frame draw:style-name="gr167" draw:text-style-name="P33" draw:layer="layout" svg:width="17.768cm" svg:height="1.171cm" svg:x="1.522cm" svg:y="26.618cm">
          <draw:text-box>
            <text:p text:style-name="P1"><text:span text:style-name="T48">* dato che il bit più </text:span><text:span text:style-name="T48">significativo della </text:span><text:span text:style-name="T48">codifica di un </text:span><text:span text:style-name="T48">numero definisce il </text:span><text:span text:style-name="T48">suo segno, in caso </text:span><text:span text:style-name="T48">il 12esimo bit del </text:span><text:span text:style-name="T48">valore sia uno si </text:span><text:span text:style-name="T48">aggiunge 1 alla </text:span><text:span text:style-name="T48">porzione superiore </text:span><text:span text:style-name="T48">per bilanciare il </text:span><text:span text:style-name="T48">fatto che la </text:span><text:span text:style-name="T48">porzione inferiore </text:span><text:span text:style-name="T48">sarà interpretata </text:span><text:span text:style-name="T48">come negativa.</text:span></text:p>
          </draw:text-box>
        </draw:frame>
      </draw:page>
      <draw:page draw:name="page6" draw:style-name="dp1" draw:master-page-name="master-page64">
        <draw:frame draw:style-name="gr44" draw:text-style-name="P8" draw:layer="layout" svg:width="5.771cm" svg:height="0.543cm" svg:x="1.401cm" svg:y="2.026cm">
          <draw:text-box>
            <text:p text:style-name="P1"><text:span text:style-name="T7">Procedure notevoli: </text:span></text:p>
          </draw:text-box>
        </draw:frame>
        <draw:frame draw:style-name="gr168" draw:text-style-name="P50" draw:layer="layout" svg:width="16.392cm" svg:height="6.991cm" svg:x="1.548cm" svg:y="22.27cm">
          <draw:text-box>
            <text:p>Pseudocodice:</text:p>
            <text:p/>
            <text:p>(char [], int) block_encrypt(char [] src, int src_len, char [] blocKey)</text:p>
            <text:p>{</text:p>
            <text:p><text:tab/>int i = 0;</text:p>
            <text:p><text:tab/>return (str_map_alloc(src, src_len, curry(block_map, &amp;i, blockey, true));</text:p>
            <text:p>}</text:p>
            <text:p/>
            <text:p>(char [], int) block_decypher(char [] src, int src_len, char [] blocKey)</text:p>
            <text:p>{</text:p>
            <text:p><text:tab/>int i = 0;</text:p>
            <text:p><text:tab/>return (str_map_alloc(src, src_len, curry(block_map, &amp;i, blockey, false));</text:p>
            <text:p>}<text:line-break/></text:p>
          </draw:text-box>
        </draw:frame>
        <draw:frame draw:name="caesar_sost" draw:style-name="gr45" draw:text-style-name="P62" draw:layer="layout" svg:width="8.415cm" svg:height="0.543cm" svg:x="1.403cm" svg:y="12.326cm">
          <draw:text-box>
            <text:p text:style-name="P1"><text:span text:style-name="T25">cesar_sost: </text:span></text:p>
          </draw:text-box>
        </draw:frame>
        <draw:g draw:style-name="gr48" xml:id="id39" draw:id="id39">
          <draw:path draw:style-name="gr169" draw:text-style-name="P34" draw:layer="layout" svg:width="0.5cm" svg:height="0.5cm" svg:x="2.152cm" svg:y="16.291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custom-shape draw:style-name="gr170" draw:text-style-name="P35" draw:layer="layout" svg:width="0.25cm" svg:height="0.25cm" svg:x="2.277cm" svg:y="16.416cm">
            <text:p/>
            <draw:enhanced-geometry svg:viewBox="0 0 21600 21600" draw:type="rectangle" draw:enhanced-path="M 0 0 L 21600 0 21600 21600 0 21600 0 0 Z N"/>
          </draw:custom-shape>
        </draw:g>
        <draw:connector draw:style-name="gr171" draw:text-style-name="P36" draw:layer="layout" svg:x1="3.332cm" svg:y1="16.533cm" svg:x2="2.653cm" svg:y2="16.541cm" draw:start-shape="id38" draw:start-glue-point="3" draw:end-shape="id39" draw:end-glue-point="1" svg:d="M3332 16533h-346v8h-333" svg:viewBox="0 0 680 9">
          <text:p/>
        </draw:connector>
        <draw:custom-shape draw:style-name="gr172" draw:text-style-name="P66" xml:id="id41" draw:id="id41" draw:layer="layout" svg:width="2.26cm" svg:height="1.5cm" svg:x="14.915cm" svg:y="15.666cm">
          <text:p text:style-name="P65"><text:span text:style-name="T20">out: c</text:span></text:p>
          <draw:enhanced-geometry svg:viewBox="0 0 21600 21600" draw:text-areas="0 0 21600 21600" draw:type="pentagon-right" draw:modifiers="13240.866873065" draw:enhanced-path="M 0 0 L ?f0 0 21600 10800 ?f0 21600 0 21600 Z N">
            <draw:equation draw:name="f0" draw:formula="$0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73" draw:text-style-name="P42" xml:id="id40" draw:id="id40" draw:layer="layout" svg:width="1cm" svg:height="1cm" svg:x="9.825cm" svg:y="14.3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4" draw:text-style-name="P36" draw:layer="layout" draw:line-skew="-0.606cm" svg:x1="9.825cm" svg:y1="14.878cm" svg:x2="7.332cm" svg:y2="16.533cm" draw:start-shape="id40" draw:end-shape="id38" draw:end-glue-point="1" svg:d="M9825 14878h-1858v1655h-635" svg:viewBox="0 0 2494 1656">
          <text:p/>
        </draw:connector>
        <draw:connector draw:style-name="gr175" draw:text-style-name="P36" draw:layer="layout" svg:x1="14.915cm" svg:y1="16.416cm" svg:x2="14.147cm" svg:y2="16.466cm" draw:start-shape="id41" draw:start-glue-point="3" draw:end-shape="id42" draw:end-glue-point="7" svg:d="M14915 16416h-378v50h-390" svg:viewBox="0 0 769 51">
          <text:p/>
        </draw:connector>
        <draw:connector draw:style-name="gr176" draw:text-style-name="P36" draw:layer="layout" svg:x1="13.647cm" svg:y1="15.966cm" svg:x2="10.825cm" svg:y2="14.878cm" draw:start-shape="id42" draw:start-glue-point="4" draw:end-shape="id40" draw:end-glue-point="7" svg:d="M13647 15966v-1088h-2822" svg:viewBox="0 0 2823 1089">
          <text:p/>
        </draw:connector>
        <draw:connector draw:style-name="gr177" draw:text-style-name="P36" draw:layer="layout" svg:x1="18.261cm" svg:y1="16.398cm" svg:x2="17.175cm" svg:y2="16.416cm" draw:start-shape="id43" draw:start-glue-point="3" draw:end-shape="id41" svg:d="M18261 16398h-542v18h-544" svg:viewBox="0 0 1087 19">
          <text:p/>
        </draw:connector>
        <draw:custom-shape draw:style-name="gr178" draw:text-style-name="P42" xml:id="id42" draw:id="id42" draw:layer="layout" svg:width="1cm" svg:height="1cm" svg:x="13.147cm" svg:y="15.9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draw:style-name="gr78" xml:id="id43" draw:id="id43">
          <draw:path draw:style-name="gr179" draw:text-style-name="P49" draw:layer="layout" svg:width="0.5cm" svg:height="0.5cm" svg:x="18.261cm" svg:y="16.148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path draw:style-name="gr180" draw:text-style-name="P34" draw:layer="layout" svg:width="0.2cm" svg:height="0.2cm" svg:x="18.411cm" svg:y="16.298cm" svg:viewBox="0 0 201 201" svg:d="M201 101c0 17-5 34-13 50-9 15-22 28-37 37-16 8-33 13-50 13-18 0-35-5-51-13-15-9-28-22-37-37-8-16-13-33-13-50 0-18 5-35 13-51 9-15 22-28 37-37 16-8 33-13 51-13 17 0 34 5 50 13 15 9 28 22 37 37 8 16 13 33 13 51z">
            <text:p/>
          </draw:path>
        </draw:g>
        <draw:polygon draw:style-name="gr181" draw:text-style-name="P60" xml:id="id38" draw:id="id38" draw:layer="layout" svg:width="3.999cm" svg:height="1.499cm" svg:x="3.332cm" svg:y="15.783cm" svg:viewBox="0 0 4000 1500" draw:points="0,0 2499,0 3000,0 3999,0 3999,749 4000,750 3999,751 3999,1499 3000,1499 3000,1500 0,1500 1000,750">
          <text:p text:style-name="P67"><text:span text:style-name="T20">in: c, sostK</text:span></text:p>
        </draw:polygon>
        <draw:custom-shape draw:style-name="gr182" draw:text-style-name="P45" xml:id="id44" draw:id="id44" draw:layer="layout" svg:width="4.317cm" svg:height="1.5cm" svg:x="8.195cm" svg:y="16.436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4"><text:span text:style-name="T29">minuscolo = c &amp; 32;</text:span></text:p>
          <text:p text:style-name="P44"><text:span text:style-name="T29">c = (c – 'A' - minuscolo + sostk);</text:span></text:p>
          <text:p text:style-name="P44"><text:span text:style-name="T29">c = c % 26 + minuscolo + 'A'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83" draw:text-style-name="P36" draw:layer="layout" svg:x1="10.353cm" svg:y1="16.436cm" svg:x2="10.325cm" svg:y2="15.378cm" draw:start-shape="id44" draw:start-glue-point="0" draw:end-shape="id40" draw:end-glue-point="6" svg:d="M10353 16436v-523h-28v-535" svg:viewBox="0 0 29 1059">
          <text:p/>
        </draw:connector>
        <draw:connector draw:style-name="gr184" draw:text-style-name="P36" draw:layer="layout" svg:x1="13.147cm" svg:y1="16.466cm" svg:x2="12.512cm" svg:y2="17.186cm" draw:start-shape="id42" draw:start-glue-point="5" draw:end-shape="id44" draw:end-glue-point="1" svg:d="M13147 16466h-323v720h-312" svg:viewBox="0 0 636 721">
          <text:p/>
        </draw:connector>
        <draw:frame draw:style-name="gr185" draw:text-style-name="P48" draw:layer="layout" svg:width="2.553cm" svg:height="0.601cm" svg:x="7.479cm" svg:y="14.252cm">
          <draw:text-box>
            <text:p text:style-name="P68"><text:span text:style-name="T29">[</text:span><text:span text:style-name="T29">c</text:span><text:span text:style-name="T29"> </text:span><text:span text:style-name="T29">è</text:span><text:span text:style-name="T29"> </text:span><text:span text:style-name="T29">u</text:span><text:span text:style-name="T29">n</text:span><text:span text:style-name="T29">a</text:span><text:span text:style-name="T29"> </text:span><text:span text:style-name="T29">l</text:span><text:span text:style-name="T29">e</text:span><text:span text:style-name="T29">t</text:span><text:span text:style-name="T29">t</text:span><text:span text:style-name="T29">e</text:span><text:span text:style-name="T29">r</text:span><text:span text:style-name="T29">a</text:span><text:span text:style-name="T29">?</text:span><text:span text:style-name="T29">]</text:span></text:p>
          </draw:text-box>
        </draw:frame>
        <draw:frame draw:style-name="gr186" draw:text-style-name="P48" draw:layer="layout" svg:width="2.534cm" svg:height="0.601cm" svg:x="10.831cm" svg:y="14.36cm">
          <draw:text-box>
            <text:p text:style-name="P26"><text:span text:style-name="T29">[falso]</text:span></text:p>
          </draw:text-box>
        </draw:frame>
        <draw:frame draw:style-name="gr187" draw:text-style-name="P48" draw:layer="layout" svg:width="2.534cm" svg:height="0.601cm" svg:x="10.196cm" svg:y="15.196cm">
          <draw:text-box>
            <text:p text:style-name="P26"><text:span text:style-name="T29">[vero]</text:span></text:p>
          </draw:text-box>
        </draw:frame>
        <draw:frame draw:name="block_encrypt" draw:style-name="gr45" draw:text-style-name="P31" draw:layer="layout" svg:width="8.415cm" svg:height="0.543cm" svg:x="1.401cm" svg:y="18.425cm">
          <draw:text-box>
            <text:p text:style-name="P1"><text:span text:style-name="T25">block_encrypt: (Cifrario a blocchi)</text:span></text:p>
          </draw:text-box>
        </draw:frame>
        <draw:frame draw:style-name="gr188" draw:text-style-name="P70" draw:layer="layout" svg:width="18.237cm" svg:height="1.071cm" svg:x="1.455cm" svg:y="19.26cm">
          <draw:text-box>
            <text:p text:style-name="P69"><text:span text:style-name="T8">Semplice procedura che delega il processo alla procedura </text:span><text:span text:style-name="T34">str_map</text:span><text:span text:style-name="T8">, dopo aver effettuato il currying della funzione “</text:span><text:span text:style-name="T34"><text:a xlink:href="#block_map" xlink:type="simple">block_map</text:a></text:span><text:span text:style-name="T8">”</text:span></text:p>
          </draw:text-box>
        </draw:frame>
        <draw:frame draw:name="block_decypher" draw:style-name="gr189" draw:text-style-name="P31" draw:layer="layout" svg:width="8.588cm" svg:height="0.543cm" svg:x="1.402cm" svg:y="20.526cm">
          <draw:text-box>
            <text:p text:style-name="P1"><text:span text:style-name="T25">bloc</text:span><text:span text:style-name="T25">k_de</text:span><text:span text:style-name="T25">cyph</text:span><text:span text:style-name="T25">er: </text:span><text:span text:style-name="T25">(Cifr</text:span><text:span text:style-name="T25">ario </text:span><text:span text:style-name="T25">di </text:span><text:span text:style-name="T25">Cesa</text:span><text:span text:style-name="T25">re)</text:span></text:p>
          </draw:text-box>
        </draw:frame>
        <draw:frame draw:style-name="gr190" draw:text-style-name="P32" draw:layer="layout" svg:width="18.237cm" svg:height="0.68cm" svg:x="1.456cm" svg:y="21.261cm">
          <draw:text-box>
            <text:p text:style-name="P71"><text:span text:style-name="T49">Uguale alla procedura di cifratura, eccetto che cambia l'argomento booleano</text:span></text:p>
          </draw:text-box>
        </draw:frame>
        <draw:frame draw:style-name="gr191" draw:text-style-name="P32" draw:layer="layout" svg:width="18.237cm" svg:height="1.147cm" svg:x="1.456cm" svg:y="13.06cm">
          <draw:text-box>
            <text:p text:style-name="P1"><text:span text:style-name="T8">Semplice procedura che effettua la cifratura a sostituzione di un carattere in base all’input. </text:span></text:p>
            <text:p text:style-name="P1"><text:span text:style-name="T8">Lascia tutti I caratteri al di fuori delle lettere invariati.</text:span></text:p>
          </draw:text-box>
        </draw:frame>
        <draw:frame draw:style-name="gr15" draw:text-style-name="P15" draw:layer="layout" svg:width="0.943cm" svg:height="0.642cm" svg:x="1.476cm" svg:y="28.155cm">
          <draw:text-box>
            <text:p text:style-name="P1"><text:span text:style-name="T16">6</text:span></text:p>
          </draw:text-box>
        </draw:frame>
        <draw:frame draw:style-name="gr192" draw:text-style-name="P50" draw:layer="layout" svg:width="12.7cm" svg:height="5.593cm" svg:x="1.535cm" svg:y="7.246cm">
          <draw:text-box>
            <text:p>Pseudocodice:</text:p>
            <text:p/>
            <text:p>(char [], int) caesar_encrypt(char [] src, int src_len, int sostK)</text:p>
            <text:p>{</text:p>
            <text:p><text:tab/>return (str_map_alloc(src, src_len, curry(caesar_sost, sostK));</text:p>
            <text:p>}</text:p>
            <text:p/>
            <text:p>(char [], int) caesar_decypher(char [] src, int src_len, int sostK)</text:p>
            <text:p>{</text:p>
            <text:p><text:tab/>return (caesar_encrypt(src, src_len, 26 – sostK));</text:p>
            <text:p>}<text:line-break/></text:p>
          </draw:text-box>
        </draw:frame>
        <draw:frame draw:name="caesar_encrypt" draw:style-name="gr45" draw:text-style-name="P31" draw:layer="layout" svg:width="8.415cm" svg:height="0.543cm" svg:x="1.401cm" svg:y="2.927cm">
          <draw:text-box>
            <text:p text:style-name="P1"><text:span text:style-name="T25">cesar_encry</text:span><text:span text:style-name="T25">pt: (Cifrario </text:span><text:span text:style-name="T25">di Cesare)</text:span></text:p>
          </draw:text-box>
        </draw:frame>
        <draw:frame draw:style-name="gr188" draw:text-style-name="P32" draw:layer="layout" svg:width="18.237cm" svg:height="1.071cm" svg:x="1.455cm" svg:y="3.762cm">
          <draw:text-box>
            <text:p text:style-name="P1"><text:span text:style-name="T8">Semplice procedura </text:span><text:span text:style-name="T8">che delega il processo </text:span><text:span text:style-name="T8">alla procedura </text:span><text:span text:style-name="T34">str_map</text:span><text:span text:style-name="T8">, dopo aver </text:span><text:span text:style-name="T8">effettuato il currying </text:span><text:span text:style-name="T8">della funzione “</text:span><text:span text:style-name="T34"><text:a xlink:href="#caesar_sost" xlink:type="simple">caesar_sost</text:a></text:span><text:span text:style-name="T8">”</text:span></text:p>
          </draw:text-box>
        </draw:frame>
        <draw:frame draw:name="caesar_decypher" draw:style-name="gr193" draw:text-style-name="P31" draw:layer="layout" svg:width="8.601cm" svg:height="0.543cm" svg:x="1.402cm" svg:y="5.128cm">
          <draw:text-box>
            <text:p text:style-name="P1"><text:span text:style-name="T25">cesar_decypher: (Cifrario di Cesare)</text:span></text:p>
          </draw:text-box>
        </draw:frame>
        <draw:frame draw:style-name="gr188" draw:text-style-name="P72" draw:layer="layout" svg:width="18.237cm" svg:height="1.071cm" svg:x="1.493cm" svg:y="5.863cm">
          <draw:text-box>
            <text:p text:style-name="P71"><text:span text:style-name="T50">Fa rieferimento a </text:span><text:span text:style-name="T45"><text:a xlink:href="#caesar_encrypt" xlink:type="simple">caesar_encrypt</text:a></text:span><text:span text:style-name="T44">, infatti tutto ciò che fa è chiamare la stessa cambiando il terzo argomento da “</text:span><text:span text:style-name="T47"><text:a xlink:href="#Parametri del programma" xlink:type="simple">sostK</text:a></text:span><text:span text:style-name="T44">” a “26 - </text:span><text:span text:style-name="T47"><text:a xlink:href="#Parametri del programma" xlink:type="simple">sostK</text:a></text:span><text:span text:style-name="T44">”</text:span></text:p>
          </draw:text-box>
        </draw:frame>
      </draw:page>
      <draw:page draw:name="page7" draw:style-name="dp1" draw:master-page-name="master-page79">
        <draw:frame draw:name="block_map" draw:style-name="gr45" draw:text-style-name="P31" draw:layer="layout" svg:width="8.415cm" svg:height="0.543cm" svg:x="1.402cm" svg:y="2.924cm">
          <draw:text-box>
            <text:p text:style-name="P1"><text:span text:style-name="T25">block_map:</text:span></text:p>
          </draw:text-box>
        </draw:frame>
        <draw:frame draw:style-name="gr188" draw:text-style-name="P70" draw:layer="layout" svg:width="18.237cm" svg:height="1.071cm" svg:x="1.534cm" svg:y="3.721cm">
          <draw:text-box>
            <text:p text:style-name="P69"><text:span text:style-name="T50">Funzione che ad ogni chiamata avanza la stringa associata, prende un carattere di input e lo somma col carattere corrente della stringa, e ritorna il risultato.</text:span></text:p>
          </draw:text-box>
        </draw:frame>
        <draw:g draw:style-name="gr48" xml:id="id46" draw:id="id46">
          <draw:path draw:style-name="gr194" draw:text-style-name="P34" draw:layer="layout" svg:width="0.5cm" svg:height="0.5cm" svg:x="1.552cm" svg:y="5.754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custom-shape draw:style-name="gr195" draw:text-style-name="P35" draw:layer="layout" svg:width="0.25cm" svg:height="0.25cm" svg:x="1.677cm" svg:y="5.879cm">
            <text:p/>
            <draw:enhanced-geometry svg:viewBox="0 0 21600 21600" draw:type="rectangle" draw:enhanced-path="M 0 0 L 21600 0 21600 21600 0 21600 0 0 Z N"/>
          </draw:custom-shape>
        </draw:g>
        <draw:connector draw:style-name="gr196" draw:text-style-name="P36" draw:layer="layout" svg:x1="3.17cm" svg:y1="5.992cm" svg:x2="2.053cm" svg:y2="6.004cm" draw:start-shape="id45" draw:start-glue-point="3" draw:end-shape="id46" draw:end-glue-point="1" svg:d="M3170 5992h-565v12h-552" svg:viewBox="0 0 1118 13">
          <text:p/>
        </draw:connector>
        <draw:custom-shape draw:style-name="gr197" draw:text-style-name="P45" xml:id="id52" draw:id="id52" draw:layer="layout" svg:width="1.841cm" svg:height="0.631cm" svg:x="4.058cm" svg:y="9.176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4"><text:span text:style-name="T29">*</text:span><text:span text:style-name="T29">i</text:span><text:span text:style-name="T29"> </text:span><text:span text:style-name="T29">=</text:span><text:span text:style-name="T29"> </text:span><text:span text:style-name="T29">0</text:span><text:span text:style-name="T29">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olygon draw:style-name="gr198" draw:text-style-name="P60" xml:id="id45" draw:id="id45" draw:layer="layout" svg:width="3.631cm" svg:height="1.611cm" svg:x="3.17cm" svg:y="5.186cm" svg:viewBox="0 0 3632 1612" draw:points="0,0 2269,0 2724,0 3631,0 3631,805 3632,807 3631,807 3631,1611 2724,1611 2724,1612 0,1612 908,807">
          <text:p text:style-name="P54"><text:span text:style-name="T29">I</text:span><text:span text:style-name="T29">n</text:span><text:span text:style-name="T29">:</text:span><text:span text:style-name="T29"> </text:span><text:span text:style-name="T29">c</text:span><text:span text:style-name="T29">h</text:span><text:span text:style-name="T29">a</text:span><text:span text:style-name="T29">r</text:span><text:span text:style-name="T29"> </text:span><text:span text:style-name="T29">c</text:span><text:span text:style-name="T29">,</text:span></text:p>
          <text:p text:style-name="P54"><text:span text:style-name="T29"><text:s/></text:span><text:span text:style-name="T29">i</text:span><text:span text:style-name="T29">n</text:span><text:span text:style-name="T29">t</text:span><text:span text:style-name="T29"> </text:span><text:span text:style-name="T29">*</text:span><text:span text:style-name="T29">i</text:span><text:span text:style-name="T29">,</text:span></text:p>
          <text:p text:style-name="P54"><text:span text:style-name="T29"><text:s/></text:span><text:span text:style-name="T29">c</text:span><text:span text:style-name="T29">h</text:span><text:span text:style-name="T29">a</text:span><text:span text:style-name="T29">r</text:span><text:span text:style-name="T29"> </text:span><text:span text:style-name="T29">[</text:span><text:span text:style-name="T29">]</text:span><text:span text:style-name="T29"> </text:span><text:span text:style-name="T29">b</text:span><text:span text:style-name="T29">l</text:span><text:span text:style-name="T29">o</text:span><text:span text:style-name="T29">c</text:span><text:span text:style-name="T29">k</text:span><text:span text:style-name="T29">_</text:span><text:span text:style-name="T29">s</text:span><text:span text:style-name="T29">t</text:span><text:span text:style-name="T29">r</text:span><text:span text:style-name="T29">,</text:span></text:p>
          <text:p text:style-name="P54"><text:span text:style-name="T29">b</text:span><text:span text:style-name="T29">o</text:span><text:span text:style-name="T29">o</text:span><text:span text:style-name="T29">l</text:span><text:span text:style-name="T29">:</text:span><text:span text:style-name="T29"> </text:span><text:span text:style-name="T29">e</text:span><text:span text:style-name="T29">n</text:span><text:span text:style-name="T29">c</text:span><text:span text:style-name="T29">r</text:span><text:span text:style-name="T29">y</text:span><text:span text:style-name="T29">p</text:span><text:span text:style-name="T29">t</text:span></text:p>
        </draw:polygon>
        <draw:custom-shape draw:style-name="gr199" draw:text-style-name="P57" xml:id="id47" draw:id="id47" draw:layer="layout" svg:width="1.941cm" svg:height="1.27cm" svg:x="15.417cm" svg:y="7.966cm">
          <text:p text:style-name="P56"><text:span text:style-name="T29">out: c</text:span></text:p>
          <draw:enhanced-geometry svg:viewBox="0 0 21600 21600" draw:text-areas="0 0 21600 21600" draw:type="pentagon-right" draw:modifiers="11878.8877445932" draw:enhanced-path="M 0 0 L ?f0 0 21600 10800 ?f0 21600 0 21600 Z N">
            <draw:equation draw:name="f0" draw:formula="$0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200" draw:text-style-name="P42" xml:id="id50" draw:id="id50" draw:layer="layout" svg:width="1cm" svg:height="1cm" svg:x="4.475cm" svg:y="7.5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1" draw:text-style-name="P36" draw:layer="layout" svg:x1="15.417cm" svg:y1="8.601cm" svg:x2="14.42cm" svg:y2="8.567cm" draw:start-shape="id47" draw:start-glue-point="3" draw:end-shape="id48" draw:end-glue-point="7" svg:d="M15417 8601h-493v-34h-504" svg:viewBox="0 0 998 35">
          <text:p/>
        </draw:connector>
        <draw:connector draw:style-name="gr202" draw:text-style-name="P36" draw:layer="layout" svg:x1="6.769cm" svg:y1="8.063cm" svg:x2="5.475cm" svg:y2="8.046cm" draw:start-shape="id49" draw:end-shape="id50" draw:end-glue-point="7" svg:d="M6769 8063h-646v-17h-648" svg:viewBox="0 0 1295 18">
          <text:p/>
        </draw:connector>
        <draw:connector draw:style-name="gr203" draw:text-style-name="P36" draw:layer="layout" svg:x1="18.763cm" svg:y1="8.598cm" svg:x2="17.358cm" svg:y2="8.601cm" draw:start-shape="id51" draw:start-glue-point="3" draw:end-shape="id47" svg:d="M18763 8598h-702v3h-703" svg:viewBox="0 0 1406 4">
          <text:p/>
        </draw:connector>
        <draw:custom-shape draw:style-name="gr204" draw:text-style-name="P42" xml:id="id49" draw:id="id49" draw:layer="layout" svg:width="1cm" svg:height="1cm" svg:x="6.769cm" svg:y="7.5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draw:style-name="gr78" xml:id="id51" draw:id="id51">
          <draw:path draw:style-name="gr205" draw:text-style-name="P49" draw:layer="layout" svg:width="0.5cm" svg:height="0.5cm" svg:x="18.763cm" svg:y="8.348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path draw:style-name="gr206" draw:text-style-name="P34" draw:layer="layout" svg:width="0.2cm" svg:height="0.2cm" svg:x="18.913cm" svg:y="8.498cm" svg:viewBox="0 0 201 201" svg:d="M201 101c0 17-5 34-13 50-9 15-22 28-37 37-16 8-33 13-50 13-18 0-35-5-51-13-15-9-28-22-37-37-8-16-13-33-13-50 0-18 5-35 13-51 9-15 22-28 37-37 16-8 33-13 51-13 17 0 34 5 50 13 15 9 28 22 37 37 8 16 13 33 13 51z">
            <text:p/>
          </draw:path>
        </draw:g>
        <draw:connector draw:style-name="gr207" draw:text-style-name="P36" draw:layer="layout" svg:x1="4.978cm" svg:y1="9.176cm" svg:x2="4.975cm" svg:y2="8.546cm" draw:start-shape="id52" draw:start-glue-point="0" draw:end-shape="id50" draw:end-glue-point="6" svg:d="M4978 9176v-309h-3v-321" svg:viewBox="0 0 4 631">
          <text:p/>
        </draw:connector>
        <draw:connector draw:style-name="gr208" draw:text-style-name="P36" draw:layer="layout" svg:x1="11.365cm" svg:y1="6.348cm" svg:x2="10.399cm" svg:y2="6.299cm" draw:start-shape="id53" draw:start-glue-point="5" draw:end-shape="id54" draw:end-glue-point="1" svg:d="M11365 6348h-488v-49h-478" svg:viewBox="0 0 967 50">
          <text:p/>
        </draw:connector>
        <draw:frame draw:style-name="gr209" draw:text-style-name="P48" draw:layer="layout" svg:width="1.245cm" svg:height="0.601cm" svg:x="5.656cm" svg:y="7.445cm">
          <draw:text-box>
            <text:p text:style-name="P26"><text:span text:style-name="T29">[falso]</text:span></text:p>
          </draw:text-box>
        </draw:frame>
        <draw:frame draw:style-name="gr210" draw:text-style-name="P48" draw:layer="layout" svg:width="1.197cm" svg:height="0.601cm" svg:x="3.886cm" svg:y="8.375cm">
          <draw:text-box>
            <text:p text:style-name="P26"><text:span text:style-name="T29">[vero]</text:span></text:p>
          </draw:text-box>
        </draw:frame>
        <draw:connector draw:style-name="gr211" draw:text-style-name="P36" draw:layer="layout" svg:x1="4.975cm" svg:y1="7.546cm" svg:x2="4.986cm" svg:y2="6.798cm" draw:start-shape="id50" draw:start-glue-point="4" draw:end-shape="id45" draw:end-glue-point="2" svg:d="M4975 7546v-379h11v-369" svg:viewBox="0 0 12 749">
          <text:p/>
        </draw:connector>
        <draw:connector draw:style-name="gr212" draw:text-style-name="P36" draw:layer="layout" svg:x1="8.806cm" svg:y1="6.702cm" svg:x2="7.769cm" svg:y2="8.063cm" draw:start-shape="id54" draw:start-glue-point="2" draw:end-shape="id49" draw:end-glue-point="7" svg:d="M8806 6702v1361h-1037" svg:viewBox="0 0 1038 1362">
          <text:p/>
        </draw:connector>
        <draw:custom-shape draw:style-name="gr213" draw:text-style-name="P42" xml:id="id53" draw:id="id53" draw:layer="layout" svg:width="1cm" svg:height="1cm" svg:x="11.365cm" svg:y="5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4" draw:text-style-name="P36" draw:layer="layout" svg:x1="7.269cm" svg:y1="8.563cm" svg:x2="5.899cm" svg:y2="9.491cm" draw:start-shape="id49" draw:start-glue-point="6" draw:end-shape="id52" draw:end-glue-point="1" svg:d="M7269 8563v928h-1370" svg:viewBox="0 0 1371 929">
          <text:p/>
        </draw:connector>
        <draw:frame draw:style-name="gr215" draw:text-style-name="P48" draw:layer="layout" svg:width="1.245cm" svg:height="0.601cm" svg:x="10.789cm" svg:y="6.702cm">
          <draw:text-box>
            <text:p text:style-name="P26"><text:span text:style-name="T29">[falso]</text:span></text:p>
          </draw:text-box>
        </draw:frame>
        <draw:frame draw:style-name="gr216" draw:text-style-name="P48" draw:layer="layout" svg:width="3.102cm" svg:height="0.601cm" svg:x="1.433cm" svg:y="7.211cm">
          <draw:text-box>
            <text:p text:style-name="P26"><text:span text:style-name="T29">[block_str[*i] == '\0'?]</text:span></text:p>
          </draw:text-box>
        </draw:frame>
        <draw:custom-shape draw:style-name="gr217" draw:text-style-name="P45" xml:id="id55" draw:id="id55" draw:layer="layout" svg:width="4.623cm" svg:height="0.733cm" svg:x="15.121cm" svg:y="5.953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4"><text:span text:style-name="T29">c = (c + block_char) % 96 + 32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18" draw:text-style-name="P48" draw:layer="layout" svg:width="1.732cm" svg:height="0.601cm" svg:x="10.435cm" svg:y="5.247cm">
          <draw:text-box>
            <text:p text:style-name="P26"><text:span text:style-name="T29">[encrypt?]</text:span></text:p>
          </draw:text-box>
        </draw:frame>
        <draw:frame draw:style-name="gr219" draw:text-style-name="P48" draw:layer="layout" svg:width="1.197cm" svg:height="0.601cm" svg:x="12.727cm" svg:y="5.652cm">
          <draw:text-box>
            <text:p text:style-name="P26"><text:span text:style-name="T29">[vero]</text:span></text:p>
          </draw:text-box>
        </draw:frame>
        <draw:custom-shape draw:style-name="gr220" draw:text-style-name="P42" xml:id="id48" draw:id="id48" draw:layer="layout" svg:width="1cm" svg:height="1cm" svg:x="13.42cm" svg:y="8.0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1" draw:text-style-name="P36" draw:layer="layout" svg:x1="15.121cm" svg:y1="6.319cm" svg:x2="12.365cm" svg:y2="6.348cm" draw:start-shape="id55" draw:start-glue-point="3" draw:end-shape="id53" draw:end-glue-point="7" svg:d="M15121 6319h-1372v29h-1384" svg:viewBox="0 0 2757 30">
          <text:p/>
        </draw:connector>
        <draw:connector draw:style-name="gr222" draw:text-style-name="P36" draw:layer="layout" svg:x1="13.92cm" svg:y1="8.067cm" svg:x2="17.432cm" svg:y2="6.686cm" draw:start-shape="id48" draw:start-glue-point="4" draw:end-shape="id55" draw:end-glue-point="2" svg:d="M13920 8067v-696h3512v-685" svg:viewBox="0 0 3513 1382">
          <text:p/>
        </draw:connector>
        <draw:custom-shape draw:style-name="gr223" draw:text-style-name="P42" xml:id="id57" draw:id="id57" draw:layer="layout" svg:width="1cm" svg:height="1cm" svg:x="10.318cm" svg:y="9.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4" draw:text-style-name="P42" xml:id="id58" draw:id="id58" draw:layer="layout" svg:width="1cm" svg:height="1cm" svg:x="13.409cm" svg:y="9.8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5" draw:text-style-name="P45" xml:id="id56" draw:id="id56" draw:layer="layout" svg:width="3.491cm" svg:height="0.733cm" svg:x="9.076cm" svg:y="8.164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4"><text:span text:style-name="T29">c = c </text:span><text:span text:style-name="T29">- </text:span><text:span text:style-name="T29">block</text:span><text:span text:style-name="T29">_char </text:span><text:span text:style-name="T29">– 32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6" draw:text-style-name="P45" xml:id="id54" draw:id="id54" draw:layer="layout" svg:width="3.186cm" svg:height="0.806cm" svg:x="7.213cm" svg:y="5.896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4"><text:span text:style-name="T29">b</text:span><text:span text:style-name="T29">l</text:span><text:span text:style-name="T29">o</text:span><text:span text:style-name="T29">c</text:span><text:span text:style-name="T29">k</text:span><text:span text:style-name="T29">_</text:span><text:span text:style-name="T29">c</text:span><text:span text:style-name="T29">h</text:span><text:span text:style-name="T29">a</text:span><text:span text:style-name="T29">r</text:span><text:span text:style-name="T29"> </text:span><text:span text:style-name="T29">=</text:span><text:span text:style-name="T29"> </text:span><text:span text:style-name="T29">s</text:span><text:span text:style-name="T29">t</text:span><text:span text:style-name="T29">r</text:span><text:span text:style-name="T29">[</text:span><text:span text:style-name="T29">*</text:span><text:span text:style-name="T29">i</text:span><text:span text:style-name="T29">]</text:span><text:span text:style-name="T29">;</text:span></text:p>
          <text:p text:style-name="P44"><text:span text:style-name="T29">*</text:span><text:span text:style-name="T29">i</text:span><text:span text:style-name="T29"> </text:span><text:span text:style-name="T29">=</text:span><text:span text:style-name="T29"> </text:span><text:span text:style-name="T29">*</text:span><text:span text:style-name="T29">i</text:span><text:span text:style-name="T29"> </text:span><text:span text:style-name="T29">+</text:span><text:span text:style-name="T29"> </text:span><text:span text:style-name="T29">1</text:span><text:span text:style-name="T29">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27" draw:text-style-name="P36" draw:layer="layout" svg:x1="10.821cm" svg:y1="8.164cm" svg:x2="11.865cm" svg:y2="6.848cm" draw:start-shape="id56" draw:end-shape="id53" draw:end-glue-point="6" svg:d="M10821 8164v-652h1044v-664" svg:viewBox="0 0 1045 1317">
          <text:p/>
        </draw:connector>
        <draw:connector draw:style-name="gr228" draw:text-style-name="P36" draw:layer="layout" svg:x1="10.818cm" svg:y1="9.86cm" svg:x2="10.821cm" svg:y2="8.897cm" draw:start-shape="id57" draw:start-glue-point="4" draw:end-shape="id56" draw:end-glue-point="2" svg:d="M10818 9860v-487h3v-476" svg:viewBox="0 0 4 964">
          <text:p/>
        </draw:connector>
        <draw:custom-shape draw:style-name="gr229" draw:text-style-name="P45" xml:id="id59" draw:id="id59" draw:layer="layout" svg:width="3.37cm" svg:height="0.733cm" svg:x="9.15cm" svg:y="11.502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4"><text:span text:style-name="T29">c</text:span><text:span text:style-name="T29"> </text:span><text:span text:style-name="T29">=</text:span><text:span text:style-name="T29"> </text:span><text:span text:style-name="T29">c</text:span><text:span text:style-name="T29"> </text:span><text:span text:style-name="T29">+</text:span><text:span text:style-name="T29"> </text:span><text:span text:style-name="T29">9</text:span><text:span text:style-name="T29">6</text:span><text:span text:style-name="T29">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30" draw:text-style-name="P48" draw:layer="layout" svg:width="1.583cm" svg:height="0.601cm" svg:x="8.482cm" svg:y="9.735cm">
          <draw:text-box>
            <text:p text:style-name="P26"><text:span text:style-name="T29">[</text:span><text:span text:style-name="T29">c</text:span><text:span text:style-name="T29"> </text:span><text:span text:style-name="T29">&lt;</text:span><text:span text:style-name="T29"> </text:span><text:span text:style-name="T29">3</text:span><text:span text:style-name="T29">2</text:span><text:span text:style-name="T29">?</text:span><text:span text:style-name="T29">]</text:span></text:p>
          </draw:text-box>
        </draw:frame>
        <draw:connector draw:style-name="gr231" draw:text-style-name="P36" draw:layer="layout" svg:x1="13.92cm" svg:y1="9.067cm" svg:x2="13.909cm" svg:y2="9.856cm" draw:start-shape="id48" draw:start-glue-point="6" draw:end-shape="id58" draw:end-glue-point="4" svg:d="M13920 9067v395h-11v394" svg:viewBox="0 0 12 790">
          <text:p/>
        </draw:connector>
        <draw:connector draw:style-name="gr232" draw:text-style-name="P36" draw:layer="layout" svg:x1="13.409cm" svg:y1="10.356cm" svg:x2="11.318cm" svg:y2="10.36cm" draw:start-shape="id58" draw:start-glue-point="5" draw:end-shape="id57" draw:end-glue-point="7" svg:d="M13409 10356h-1045v4h-1046" svg:viewBox="0 0 2092 5">
          <text:p/>
        </draw:connector>
        <draw:connector draw:style-name="gr233" draw:text-style-name="P36" draw:layer="layout" svg:x1="10.318cm" svg:y1="10.36cm" svg:x2="9.15cm" svg:y2="11.868cm" draw:start-shape="id57" draw:start-glue-point="5" draw:end-shape="id59" draw:end-glue-point="3" svg:d="M10318 10360h-1695v1508h527" svg:viewBox="0 0 1696 1509">
          <text:p/>
        </draw:connector>
        <draw:connector draw:style-name="gr234" draw:text-style-name="P36" draw:layer="layout" svg:x1="10.835cm" svg:y1="11.502cm" svg:x2="10.818cm" svg:y2="10.86cm" draw:start-shape="id59" draw:start-glue-point="0" draw:end-shape="id57" draw:end-glue-point="6" svg:d="M10835 11502v-315h-17v-327" svg:viewBox="0 0 18 643">
          <text:p/>
        </draw:connector>
        <draw:frame draw:style-name="gr235" draw:text-style-name="P48" draw:layer="layout" svg:width="1.197cm" svg:height="0.601cm" svg:x="9.638cm" svg:y="10.86cm">
          <draw:text-box>
            <text:p text:style-name="P26"><text:span text:style-name="T29">[vero</text:span><text:span text:style-name="T29">]</text:span></text:p>
          </draw:text-box>
        </draw:frame>
        <draw:frame draw:style-name="gr236" draw:text-style-name="P48" draw:layer="layout" svg:width="1.245cm" svg:height="0.601cm" svg:x="11.318cm" svg:y="9.755cm">
          <draw:text-box>
            <text:p text:style-name="P26"><text:span text:style-name="T29">[falso]</text:span></text:p>
          </draw:text-box>
        </draw:frame>
        <draw:frame draw:style-name="gr15" draw:text-style-name="P15" draw:layer="layout" svg:width="0.943cm" svg:height="0.642cm" svg:x="1.477cm" svg:y="28.055cm">
          <draw:text-box>
            <text:p text:style-name="P1"><text:span text:style-name="T16">7</text:span></text:p>
          </draw:text-box>
        </draw:frame>
        <draw:frame draw:style-name="gr44" draw:text-style-name="P8" draw:layer="layout" svg:width="5.771cm" svg:height="0.543cm" svg:x="1.402cm" svg:y="2.027cm">
          <draw:text-box>
            <text:p text:style-name="P1"><text:span text:style-name="T7">Pr</text:span><text:span text:style-name="T7">oc</text:span><text:span text:style-name="T7">ed</text:span><text:span text:style-name="T7">ur</text:span><text:span text:style-name="T7">e </text:span><text:span text:style-name="T7">no</text:span><text:span text:style-name="T7">te</text:span><text:span text:style-name="T7">vo</text:span><text:span text:style-name="T7">li: </text:span></text:p>
          </draw:text-box>
        </draw:frame>
        <draw:frame draw:name="occurrence_encrypt" draw:style-name="gr45" draw:text-style-name="P31" draw:layer="layout" svg:width="8.415cm" svg:height="0.543cm" svg:x="1.403cm" svg:y="12.325cm">
          <draw:text-box>
            <text:p text:style-name="P1"><text:span text:style-name="T25">occurrence_en</text:span><text:span text:style-name="T25">crypt:</text:span></text:p>
          </draw:text-box>
        </draw:frame>
        <draw:frame draw:style-name="gr188" draw:text-style-name="P70" draw:layer="layout" svg:width="18.237cm" svg:height="4.867cm" svg:x="1.535cm" svg:y="13.122cm">
          <draw:text-box>
            <text:p text:style-name="P73"><text:span text:style-name="T51">Probabilmente la procedura pi</text:span><text:span text:style-name="T52">ù complessa del progetto, insieme alla procedura associata di decifrazione. La procedura </text:span><text:span text:style-name="T53">è divisa in tre passaggi: </text:span><text:span text:style-name="T54"><text:a xlink:href="#get_occurrence_map" xlink:type="simple">get_occurrence_map</text:a></text:span><text:span text:style-name="T55"><text:s/>in cui si itera sulla stringa in input per ricavarne una </text:span><text:span text:style-name="T56"><text:a xlink:href="#occurrence_map" xlink:type="simple">occurrence_map</text:a></text:span><text:span text:style-name="T55">, </text:span><text:span text:style-name="T54"><text:a xlink:href="#occurrence_dest_size" xlink:type="simple">occurrence_dest_size</text:a></text:span><text:span text:style-name="T54"><text:s/></text:span><text:span text:style-name="T55">in cui si sfrutta la mappa ottenuta per calcolare la lunghezza della stringa finale, e infine </text:span><text:span text:style-name="T55"><text:line-break/></text:span><text:span text:style-name="T54"><text:a xlink:href="#occurrence_construct_cypher_text" xlink:type="simple">occurrence_construct_cypher_text</text:a></text:span><text:span text:style-name="T55"> che sfrutta le informazioni ottenute precedentemente per allocare e costruire la stringa finale.</text:span></text:p>
            <text:p text:style-name="P73"><text:span text:style-name="T55">La mappa </text:span><text:span text:style-name="T53">è composta, un array di puntatory salvato sulla stack, e di </text:span><text:span text:style-name="T57">src_len</text:span><text:span text:style-name="T53"> nodi di lista concatenata sullo heap, divisi in tante liste diverse quanti sono i caratteri diversi in src.</text:span><text:span text:style-name="T58"><text:line-break/></text:span><text:span text:style-name="T58"/></text:p>
          </draw:text-box>
        </draw:frame>
        <draw:g draw:style-name="gr48" xml:id="id61" draw:id="id61">
          <draw:path draw:style-name="gr237" draw:text-style-name="P34" draw:layer="layout" svg:width="0.5cm" svg:height="0.5cm" svg:x="1.561cm" svg:y="18.875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custom-shape draw:style-name="gr238" draw:text-style-name="P35" draw:layer="layout" svg:width="0.25cm" svg:height="0.25cm" svg:x="1.686cm" svg:y="19cm">
            <text:p/>
            <draw:enhanced-geometry svg:viewBox="0 0 21600 21600" draw:type="rectangle" draw:enhanced-path="M 0 0 L 21600 0 21600 21600 0 21600 0 0 Z N"/>
          </draw:custom-shape>
        </draw:g>
        <draw:connector draw:style-name="gr239" draw:text-style-name="P36" draw:layer="layout" svg:x1="2.626cm" svg:y1="19.147cm" svg:x2="2.062cm" svg:y2="19.125cm" draw:start-shape="id60" draw:start-glue-point="3" draw:end-shape="id61" draw:end-glue-point="1" svg:d="M2626 19147h-288v-22h-276" svg:viewBox="0 0 565 23">
          <text:p/>
        </draw:connector>
        <draw:custom-shape draw:style-name="gr240" draw:text-style-name="P45" xml:id="id62" draw:id="id62" draw:layer="layout" svg:width="4.2cm" svg:height="1.5cm" svg:x="5.325cm" svg:y="20.107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4"><text:span text:style-name="T59"><text:a xlink:href="#occurrence_map" xlink:type="simple">occurrence_map</text:a></text:span><text:span text:style-name="T29"><text:s/>= </text:span><text:span text:style-name="T29"><text:line-break/></text:span><text:span text:style-name="T30"><text:a xlink:href="#get_occurrence_map" xlink:type="simple">get_occurrence_map</text:a></text:span><text:span text:style-name="T29">(src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1" draw:text-style-name="P45" xml:id="id63" draw:id="id63" draw:layer="layout" svg:width="5.189cm" svg:height="1.5cm" svg:x="8.015cm" svg:y="18.199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44"><text:span text:style-name="T29">dest</text:span><text:span text:style-name="T29">_len </text:span><text:span text:style-name="T29">= <text:s/></text:span><text:span text:style-name="T30"><text:a xlink:href="#occurrence_dest_size" xlink:type="simple">occurrence_dest_size
</text:a></text:span></text:p>
          <text:p text:style-name="P44"><text:span text:style-name="T29">(</text:span><text:span text:style-name="T59"><text:a xlink:href="#occurrence_map" xlink:type="simple">occurrence_map</text:a></text:span><text:span text:style-name="T29">, </text:span><text:span text:style-name="T29">src_l</text:span><text:span text:style-name="T29">en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2" draw:text-style-name="P75" xml:id="id64" draw:id="id64" draw:layer="layout" svg:width="6.346cm" svg:height="1.697cm" svg:x="11.63cm" svg:y="20.068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74"><text:span text:style-name="T29">d</text:span><text:span text:style-name="T29">e</text:span><text:span text:style-name="T29">s</text:span><text:span text:style-name="T29">t</text:span><text:span text:style-name="T29"> </text:span><text:span text:style-name="T29">=</text:span><text:span text:style-name="T29"> </text:span><text:span text:style-name="T29"><text:s/></text:span><text:span text:style-name="T60"><text:a xlink:href="#occurrence_construct_cypher_text" xlink:type="simple">occurrence_construct_cypher_text
</text:a></text:span><text:span text:style-name="T29">(</text:span><text:span text:style-name="T59"><text:a xlink:href="#occurrence_map" xlink:type="simple">occurrence_map</text:a></text:span><text:span text:style-name="T29">,</text:span><text:span text:style-name="T29"> </text:span><text:span text:style-name="T29">d</text:span><text:span text:style-name="T29">e</text:span><text:span text:style-name="T29">s</text:span><text:span text:style-name="T29">t</text:span><text:span text:style-name="T29">_</text:span><text:span text:style-name="T29">l</text:span><text:span text:style-name="T29">e</text:span><text:span text:style-name="T29">n</text:span><text:span text:style-name="T29">)</text:span><text:span text:style-name="T29">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3" draw:text-style-name="P57" xml:id="id65" draw:id="id65" draw:layer="layout" svg:width="2.458cm" svg:height="1.336cm" svg:x="15.639cm" svg:y="18.199cm">
          <text:p text:style-name="P56"><text:span text:style-name="T29">Out: dest, </text:span><text:span text:style-name="T29">dest_len</text:span></text:p>
          <draw:enhanced-geometry svg:viewBox="0 0 21600 21600" draw:text-areas="0 0 21600 21600" draw:mirror-horizontal="false" draw:mirror-vertical="false" draw:type="pentagon-right" draw:modifiers="13913.9487596584" draw:enhanced-path="M 0 0 L ?f0 0 21600 10800 ?f0 21600 0 21600 Z N">
            <draw:equation draw:name="f0" draw:formula="$0 "/>
            <draw:handle draw:handle-range-x-minimum="0" draw:handle-range-x-maximum="21600" draw:handle-position="$0 top" draw:handle-position-x="$0" draw:handle-position-y="top"/>
          </draw:enhanced-geometry>
        </draw:custom-shape>
        <draw:polygon draw:style-name="gr244" draw:text-style-name="P55" xml:id="id60" draw:id="id60" draw:layer="layout" svg:width="2.934cm" svg:height="1.034cm" svg:x="2.626cm" svg:y="18.63cm" svg:viewBox="0 0 2935 1035" draw:points="0,0 1834,0 2201,0 2934,0 2934,517 2935,518 2934,518 2934,1034 2201,1034 2201,1035 0,1035 734,518">
          <text:p text:style-name="P67"><text:span text:style-name="T29">In: char [] src,</text:span><text:span text:style-name="T29"><text:line-break/></text:span><text:span text:style-name="T29">src_len</text:span></text:p>
        </draw:polygon>
        <draw:connector draw:style-name="gr245" draw:text-style-name="P36" draw:layer="layout" svg:x1="5.325cm" svg:y1="20.857cm" svg:x2="4.093cm" svg:y2="19.665cm" draw:start-shape="id62" draw:start-glue-point="3" draw:end-shape="id60" draw:end-glue-point="2" svg:d="M5325 20857h-1232v-1192" svg:viewBox="0 0 1233 1193">
          <text:p/>
        </draw:connector>
        <draw:connector draw:style-name="gr246" draw:text-style-name="P36" draw:layer="layout" svg:x1="8.015cm" svg:y1="18.949cm" svg:x2="7.425cm" svg:y2="20.107cm" draw:start-shape="id63" draw:end-shape="id62" draw:end-glue-point="0" svg:d="M8015 18949h-590v1158" svg:viewBox="0 0 591 1159">
          <text:p/>
        </draw:connector>
        <draw:connector draw:style-name="gr247" draw:text-style-name="P36" draw:layer="layout" svg:x1="11.63cm" svg:y1="20.916cm" svg:x2="10.609cm" svg:y2="19.699cm" draw:start-shape="id64" draw:start-glue-point="3" draw:end-shape="id63" draw:end-glue-point="2" svg:d="M11630 20916h-1021v-1217" svg:viewBox="0 0 1022 1218">
          <text:p/>
        </draw:connector>
        <draw:connector draw:style-name="gr248" draw:text-style-name="P36" draw:layer="layout" svg:x1="15.639cm" svg:y1="18.867cm" svg:x2="14.803cm" svg:y2="20.068cm" draw:start-shape="id65" draw:end-shape="id64" draw:end-glue-point="0" svg:d="M15639 18867h-836v1201" svg:viewBox="0 0 837 1202">
          <text:p/>
        </draw:connector>
        <draw:g draw:style-name="gr78" xml:id="id66" draw:id="id66">
          <draw:path draw:style-name="gr249" draw:text-style-name="P49" draw:layer="layout" svg:width="0.5cm" svg:height="0.5cm" svg:x="18.865cm" svg:y="18.607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path draw:style-name="gr250" draw:text-style-name="P34" draw:layer="layout" svg:width="0.2cm" svg:height="0.2cm" svg:x="19.015cm" svg:y="18.757cm" svg:viewBox="0 0 201 201" svg:d="M201 101c0 17-5 34-13 50-9 15-22 28-37 37-16 8-33 13-50 13-18 0-35-5-51-13-15-9-28-22-37-37-8-16-13-33-13-50 0-18 5-35 13-51 9-15 22-28 37-37 16-8 33-13 51-13 17 0 34 5 50 13 15 9 28 22 37 37 8 16 13 33 13 51z">
            <text:p/>
          </draw:path>
        </draw:g>
        <draw:connector draw:style-name="gr251" draw:text-style-name="P36" draw:layer="layout" svg:x1="18.865cm" svg:y1="18.857cm" svg:x2="18.097cm" svg:y2="18.867cm" draw:start-shape="id66" draw:start-glue-point="3" draw:end-shape="id65" draw:end-glue-point="1" svg:d="M18865 18857h-383v10h-385" svg:viewBox="0 0 769 11">
          <text:p/>
        </draw:connector>
        <draw:frame draw:name="occurrence_encrypt 1" draw:style-name="gr45" draw:text-style-name="P31" draw:layer="layout" svg:width="10.763cm" svg:height="0.543cm" svg:x="1.404cm" svg:y="22.226cm">
          <draw:text-box>
            <text:p text:style-name="P1"><text:span text:style-name="T25">G</text:span><text:span text:style-name="T25">e</text:span><text:span text:style-name="T25">s</text:span><text:span text:style-name="T25">t</text:span><text:span text:style-name="T25">t</text:span><text:span text:style-name="T25">i</text:span><text:span text:style-name="T25">o</text:span><text:span text:style-name="T25">n</text:span><text:span text:style-name="T25">e</text:span><text:span text:style-name="T25"> </text:span><text:span text:style-name="T25">d</text:span><text:span text:style-name="T25">i</text:span><text:span text:style-name="T25"> </text:span><text:span text:style-name="T25">m</text:span><text:span text:style-name="T25">e</text:span><text:span text:style-name="T25">m</text:span><text:span text:style-name="T25">o</text:span><text:span text:style-name="T25">r</text:span><text:span text:style-name="T25">i</text:span><text:span text:style-name="T25">a</text:span><text:span text:style-name="T25"> </text:span><text:span text:style-name="T25">i</text:span><text:span text:style-name="T25">n</text:span><text:span text:style-name="T25"> </text:span><text:span text:style-name="T25">o</text:span><text:span text:style-name="T25">c</text:span><text:span text:style-name="T25">c</text:span><text:span text:style-name="T25">u</text:span><text:span text:style-name="T25">r</text:span><text:span text:style-name="T25">r</text:span><text:span text:style-name="T25">e</text:span><text:span text:style-name="T25">n</text:span><text:span text:style-name="T25">c</text:span><text:span text:style-name="T25">e</text:span><text:span text:style-name="T25">_</text:span><text:span text:style-name="T25">e</text:span><text:span text:style-name="T25">n</text:span><text:span text:style-name="T25">c</text:span><text:span text:style-name="T25">r</text:span><text:span text:style-name="T25">y</text:span><text:span text:style-name="T25">p</text:span><text:span text:style-name="T25">t</text:span><text:span text:style-name="T25">:</text:span></text:p>
          </draw:text-box>
        </draw:frame>
        <draw:frame draw:style-name="gr188" draw:text-style-name="P70" draw:layer="layout" svg:width="18.237cm" svg:height="4.816cm" svg:x="1.536cm" svg:y="23.023cm">
          <draw:text-box>
            <text:p text:style-name="P76"><text:span text:style-name="T61">D</text:span><text:span text:style-name="T61">a</text:span><text:span text:style-name="T61">t</text:span><text:span text:style-name="T61">o</text:span><text:span text:style-name="T61"> </text:span><text:span text:style-name="T61">c</text:span><text:span text:style-name="T61">h</text:span><text:span text:style-name="T61">e</text:span><text:span text:style-name="T61"> </text:span><text:span text:style-name="T61">l</text:span><text:span text:style-name="T61">a</text:span><text:span text:style-name="T61"> </text:span><text:span text:style-name="T61">p</text:span><text:span text:style-name="T61">r</text:span><text:span text:style-name="T61">o</text:span><text:span text:style-name="T61">c</text:span><text:span text:style-name="T61">e</text:span><text:span text:style-name="T61">d</text:span><text:span text:style-name="T61">u</text:span><text:span text:style-name="T61">r</text:span><text:span text:style-name="T61">a</text:span><text:span text:style-name="T61"> </text:span><text:span text:style-name="T61">p</text:span><text:span text:style-name="T61">r</text:span><text:span text:style-name="T61">o</text:span><text:span text:style-name="T61">d</text:span><text:span text:style-name="T61">u</text:span><text:span text:style-name="T61">c</text:span><text:span text:style-name="T61">e</text:span><text:span text:style-name="T61"> </text:span><text:span text:style-name="T61">u</text:span><text:span text:style-name="T61">n</text:span><text:span text:style-name="T61">a</text:span><text:span text:style-name="T61"> </text:span><text:span text:style-name="T61">s</text:span><text:span text:style-name="T61">t</text:span><text:span text:style-name="T61">r</text:span><text:span text:style-name="T61">i</text:span><text:span text:style-name="T61">n</text:span><text:span text:style-name="T61">g</text:span><text:span text:style-name="T61">a</text:span><text:span text:style-name="T61"> </text:span><text:span text:style-name="T61">d</text:span><text:span text:style-name="T61">a</text:span><text:span text:style-name="T61">l</text:span><text:span text:style-name="T61">l</text:span><text:span text:style-name="T61">a</text:span><text:span text:style-name="T61"> </text:span><text:span text:style-name="T61">l</text:span><text:span text:style-name="T61">u</text:span><text:span text:style-name="T61">n</text:span><text:span text:style-name="T61">g</text:span><text:span text:style-name="T61">e</text:span><text:span text:style-name="T61">z</text:span><text:span text:style-name="T61">z</text:span><text:span text:style-name="T61">a</text:span><text:span text:style-name="T61"> </text:span><text:span text:style-name="T61">m</text:span><text:span text:style-name="T61">a</text:span><text:span text:style-name="T61">g</text:span><text:span text:style-name="T61">g</text:span><text:span text:style-name="T61">i</text:span><text:span text:style-name="T61">o</text:span><text:span text:style-name="T61">r</text:span><text:span text:style-name="T61">e</text:span><text:span text:style-name="T61"> </text:span><text:span text:style-name="T61">d</text:span><text:span text:style-name="T61">a</text:span><text:span text:style-name="T61">l</text:span><text:span text:style-name="T61">l</text:span><text:span text:style-name="T61">a</text:span><text:span text:style-name="T61"> </text:span><text:span text:style-name="T61">s</text:span><text:span text:style-name="T61">t</text:span><text:span text:style-name="T61">r</text:span><text:span text:style-name="T61">i</text:span><text:span text:style-name="T61">n</text:span><text:span text:style-name="T61">g</text:span><text:span text:style-name="T61">a</text:span><text:span text:style-name="T61"> </text:span><text:span text:style-name="T61">d</text:span><text:span text:style-name="T61">i</text:span><text:span text:style-name="T61"> </text:span><text:span text:style-name="T61">p</text:span><text:span text:style-name="T61">a</text:span><text:span text:style-name="T61">r</text:span><text:span text:style-name="T61">t</text:span><text:span text:style-name="T61">e</text:span><text:span text:style-name="T61">n</text:span><text:span text:style-name="T61">z</text:span><text:span text:style-name="T61">a</text:span><text:span text:style-name="T61">,</text:span><text:span text:style-name="T61"> </text:span><text:span text:style-name="T61">h</text:span><text:span text:style-name="T61">o</text:span><text:span text:style-name="T61"> </text:span><text:span text:style-name="T61">r</text:span><text:span text:style-name="T61">i</text:span><text:span text:style-name="T61">t</text:span><text:span text:style-name="T61">e</text:span><text:span text:style-name="T61">n</text:span><text:span text:style-name="T61">u</text:span><text:span text:style-name="T61">t</text:span><text:span text:style-name="T61">o</text:span><text:span text:style-name="T61"> </text:span><text:span text:style-name="T61">c</text:span><text:span text:style-name="T61">h</text:span><text:span text:style-name="T61">e</text:span><text:span text:style-name="T61"> </text:span><text:span text:style-name="T61">s</text:span><text:span text:style-name="T61">a</text:span><text:span text:style-name="T61">r</text:span><text:span text:style-name="T61">e</text:span><text:span text:style-name="T61">b</text:span><text:span text:style-name="T61">b</text:span><text:span text:style-name="T61">e</text:span><text:span text:style-name="T61"> </text:span><text:span text:style-name="T61">s</text:span><text:span text:style-name="T61">t</text:span><text:span text:style-name="T61">a</text:span><text:span text:style-name="T61">t</text:span><text:span text:style-name="T61">o</text:span><text:span text:style-name="T61"> </text:span><text:span text:style-name="T61">u</text:span><text:span text:style-name="T61">t</text:span><text:span text:style-name="T61">i</text:span><text:span text:style-name="T61">l</text:span><text:span text:style-name="T61">e</text:span><text:span text:style-name="T61"> </text:span><text:span text:style-name="T61">c</text:span><text:span text:style-name="T61">o</text:span><text:span text:style-name="T61">s</text:span><text:span text:style-name="T61">t</text:span><text:span text:style-name="T61">r</text:span><text:span text:style-name="T61">u</text:span><text:span text:style-name="T61">i</text:span><text:span text:style-name="T61">r</text:span><text:span text:style-name="T61">e</text:span><text:span text:style-name="T61"> </text:span><text:span text:style-name="T61">u</text:span><text:span text:style-name="T61">n</text:span><text:span text:style-name="T61"> </text:span><text:span text:style-name="T61">s</text:span><text:span text:style-name="T61">i</text:span><text:span text:style-name="T61">s</text:span><text:span text:style-name="T61">t</text:span><text:span text:style-name="T61">e</text:span><text:span text:style-name="T61">m</text:span><text:span text:style-name="T61">a</text:span><text:span text:style-name="T61"> </text:span><text:span text:style-name="T61">p</text:span><text:span text:style-name="T61">e</text:span><text:span text:style-name="T61">r</text:span><text:span text:style-name="T61"> </text:span><text:span text:style-name="T61">a</text:span><text:span text:style-name="T61">l</text:span><text:span text:style-name="T61">l</text:span><text:span text:style-name="T61">o</text:span><text:span text:style-name="T61">c</text:span><text:span text:style-name="T61">a</text:span><text:span text:style-name="T61">r</text:span><text:span text:style-name="T61">e</text:span><text:span text:style-name="T61"> </text:span><text:span text:style-name="T61">m</text:span><text:span text:style-name="T61">e</text:span><text:span text:style-name="T61">m</text:span><text:span text:style-name="T61">o</text:span><text:span text:style-name="T61">r</text:span><text:span text:style-name="T61">i</text:span><text:span text:style-name="T61">a</text:span><text:span text:style-name="T61"> </text:span><text:span text:style-name="T61">d</text:span><text:span text:style-name="T61">i</text:span><text:span text:style-name="T61">n</text:span><text:span text:style-name="T61">a</text:span><text:span text:style-name="T61">m</text:span><text:span text:style-name="T61">i</text:span><text:span text:style-name="T61">c</text:span><text:span text:style-name="T61">a</text:span><text:span text:style-name="T61">m</text:span><text:span text:style-name="T61">e</text:span><text:span text:style-name="T61">n</text:span><text:span text:style-name="T61">t</text:span><text:span text:style-name="T61">e</text:span><text:span text:style-name="T61">,</text:span><text:span text:style-name="T61"> </text:span><text:span text:style-name="T61">i</text:span><text:span text:style-name="T61">n</text:span><text:span text:style-name="T61">f</text:span><text:span text:style-name="T61">a</text:span><text:span text:style-name="T61">t</text:span><text:span text:style-name="T61">t</text:span><text:span text:style-name="T61">i</text:span><text:span text:style-name="T61"> </text:span><text:span text:style-name="T61">i</text:span><text:span text:style-name="T61">l</text:span><text:span text:style-name="T61"> </text:span><text:span text:style-name="T61">p</text:span><text:span text:style-name="T61">r</text:span><text:span text:style-name="T61">o</text:span><text:span text:style-name="T61">g</text:span><text:span text:style-name="T61">r</text:span><text:span text:style-name="T61">a</text:span><text:span text:style-name="T61">m</text:span><text:span text:style-name="T61">m</text:span><text:span text:style-name="T61">a</text:span><text:span text:style-name="T61"> </text:span><text:span text:style-name="T53">è</text:span><text:span text:style-name="T53"> </text:span><text:span text:style-name="T53">s</text:span><text:span text:style-name="T53">u</text:span><text:span text:style-name="T53">p</text:span><text:span text:style-name="T53">p</text:span><text:span text:style-name="T53">o</text:span><text:span text:style-name="T53">r</text:span><text:span text:style-name="T53">t</text:span><text:span text:style-name="T53">a</text:span><text:span text:style-name="T53">t</text:span><text:span text:style-name="T53">o</text:span><text:span text:style-name="T53"> </text:span><text:span text:style-name="T53">d</text:span><text:span text:style-name="T53">a</text:span><text:span text:style-name="T53"> </text:span><text:span text:style-name="T53">u</text:span><text:span text:style-name="T53">n</text:span><text:span text:style-name="T53">a</text:span><text:span text:style-name="T53"> </text:span><text:span text:style-name="T53">i</text:span><text:span text:style-name="T53">m</text:span><text:span text:style-name="T53">p</text:span><text:span text:style-name="T53">l</text:span><text:span text:style-name="T53">e</text:span><text:span text:style-name="T53">m</text:span><text:span text:style-name="T53">e</text:span><text:span text:style-name="T53">n</text:span><text:span text:style-name="T53">t</text:span><text:span text:style-name="T53">a</text:span><text:span text:style-name="T53">z</text:span><text:span text:style-name="T53">i</text:span><text:span text:style-name="T53">o</text:span><text:span text:style-name="T53">n</text:span><text:span text:style-name="T53">e</text:span><text:span text:style-name="T53"> </text:span><text:span text:style-name="T53">d</text:span><text:span text:style-name="T53">e</text:span><text:span text:style-name="T53">l</text:span><text:span text:style-name="T53"> </text:span><text:span text:style-name="T53">p</text:span><text:span text:style-name="T53">a</text:span><text:span text:style-name="T53">t</text:span><text:span text:style-name="T53">t</text:span><text:span text:style-name="T53">e</text:span><text:span text:style-name="T53">r</text:span><text:span text:style-name="T53">n</text:span><text:span text:style-name="T53"> </text:span><text:span text:style-name="T62">m</text:span><text:span text:style-name="T62">a</text:span><text:span text:style-name="T62">l</text:span><text:span text:style-name="T62">l</text:span><text:span text:style-name="T62">o</text:span><text:span text:style-name="T62">c</text:span><text:span text:style-name="T62"> </text:span><text:span text:style-name="T62">/</text:span><text:span text:style-name="T62"> </text:span><text:span text:style-name="T62">f</text:span><text:span text:style-name="T62">r</text:span><text:span text:style-name="T62">e</text:span><text:span text:style-name="T62">e</text:span><text:span text:style-name="T53">,</text:span><text:span text:style-name="T53"> </text:span><text:span text:style-name="T53">i</text:span><text:span text:style-name="T53">n</text:span><text:span text:style-name="T53"> </text:span><text:span text:style-name="T53">c</text:span><text:span text:style-name="T53">u</text:span><text:span text:style-name="T53">i</text:span><text:span text:style-name="T53"> </text:span><text:span text:style-name="T53">s</text:span><text:span text:style-name="T53">i</text:span><text:span text:style-name="T53"> </text:span><text:span text:style-name="T53">è</text:span><text:span text:style-name="T53"> </text:span><text:span text:style-name="T53">p</text:span><text:span text:style-name="T53">o</text:span><text:span text:style-name="T53">s</text:span><text:span text:style-name="T53">s</text:span><text:span text:style-name="T53">i</text:span><text:span text:style-name="T53">b</text:span><text:span text:style-name="T53">i</text:span><text:span text:style-name="T53">l</text:span><text:span text:style-name="T53">e</text:span><text:span text:style-name="T53"> </text:span><text:span text:style-name="T53">r</text:span><text:span text:style-name="T53">i</text:span><text:span text:style-name="T53">c</text:span><text:span text:style-name="T53">h</text:span><text:span text:style-name="T53">i</text:span><text:span text:style-name="T53">e</text:span><text:span text:style-name="T53">d</text:span><text:span text:style-name="T53">e</text:span><text:span text:style-name="T53">r</text:span><text:span text:style-name="T53">e</text:span><text:span text:style-name="T53"> </text:span><text:span text:style-name="T53">m</text:span><text:span text:style-name="T53">e</text:span><text:span text:style-name="T53">m</text:span><text:span text:style-name="T53">o</text:span><text:span text:style-name="T53">r</text:span><text:span text:style-name="T53">i</text:span><text:span text:style-name="T53">a</text:span><text:span text:style-name="T53"> </text:span><text:span text:style-name="T53">d</text:span><text:span text:style-name="T53">i</text:span><text:span text:style-name="T53">n</text:span><text:span text:style-name="T53">a</text:span><text:span text:style-name="T53">m</text:span><text:span text:style-name="T53">i</text:span><text:span text:style-name="T53">c</text:span><text:span text:style-name="T53">a</text:span><text:span text:style-name="T53">m</text:span><text:span text:style-name="T53">e</text:span><text:span text:style-name="T53">n</text:span><text:span text:style-name="T53">t</text:span><text:span text:style-name="T53">e</text:span><text:span text:style-name="T53"> </text:span><text:span text:style-name="T53">d</text:span><text:span text:style-name="T53">e</text:span><text:span text:style-name="T53">l</text:span><text:span text:style-name="T53">l</text:span><text:span text:style-name="T53">o</text:span><text:span text:style-name="T53"> </text:span><text:span text:style-name="T53">h</text:span><text:span text:style-name="T53">e</text:span><text:span text:style-name="T53">a</text:span><text:span text:style-name="T53">p</text:span><text:span text:style-name="T53"> </text:span><text:span text:style-name="T53">c</text:span><text:span text:style-name="T53">o</text:span><text:span text:style-name="T53">n</text:span><text:span text:style-name="T53"> </text:span><text:span text:style-name="T54">m</text:span><text:span text:style-name="T54">a</text:span><text:span text:style-name="T54">l</text:span><text:span text:style-name="T54">l</text:span><text:span text:style-name="T54">o</text:span><text:span text:style-name="T54">c</text:span><text:span text:style-name="T53">,</text:span><text:span text:style-name="T53"> </text:span><text:span text:style-name="T53">e</text:span><text:span text:style-name="T53"> </text:span><text:span text:style-name="T53">r</text:span><text:span text:style-name="T53">e</text:span><text:span text:style-name="T53">s</text:span><text:span text:style-name="T53">t</text:span><text:span text:style-name="T53">i</text:span><text:span text:style-name="T53">t</text:span><text:span text:style-name="T53">u</text:span><text:span text:style-name="T53">i</text:span><text:span text:style-name="T53">r</text:span><text:span text:style-name="T53">l</text:span><text:span text:style-name="T53">a</text:span><text:span text:style-name="T53"> </text:span><text:span text:style-name="T53">c</text:span><text:span text:style-name="T53">o</text:span><text:span text:style-name="T53">n</text:span><text:span text:style-name="T53"> </text:span><text:span text:style-name="T54">f</text:span><text:span text:style-name="T54">r</text:span><text:span text:style-name="T54">e</text:span><text:span text:style-name="T54">e</text:span><text:span text:style-name="T53"> </text:span><text:span text:style-name="T53">q</text:span><text:span text:style-name="T53">u</text:span><text:span text:style-name="T53">a</text:span><text:span text:style-name="T53">n</text:span><text:span text:style-name="T53">d</text:span><text:span text:style-name="T53">o</text:span><text:span text:style-name="T53"> </text:span><text:span text:style-name="T53">n</text:span><text:span text:style-name="T53">o</text:span><text:span text:style-name="T53">n</text:span><text:span text:style-name="T53"> </text:span><text:span text:style-name="T53">p</text:span><text:span text:style-name="T53">i</text:span><text:span text:style-name="T63">ù</text:span><text:span text:style-name="T63"> </text:span><text:span text:style-name="T63">i</text:span><text:span text:style-name="T63">n</text:span><text:span text:style-name="T63"> </text:span><text:span text:style-name="T63">u</text:span><text:span text:style-name="T63">s</text:span><text:span text:style-name="T63">o</text:span><text:span text:style-name="T63">;</text:span><text:span text:style-name="T63"> </text:span><text:span text:style-name="T63">q</text:span><text:span text:style-name="T63">u</text:span><text:span text:style-name="T63">e</text:span><text:span text:style-name="T63">s</text:span><text:span text:style-name="T63">t</text:span><text:span text:style-name="T63">o</text:span><text:span text:style-name="T63"> </text:span><text:span text:style-name="T63">p</text:span><text:span text:style-name="T63">a</text:span><text:span text:style-name="T63">t</text:span><text:span text:style-name="T63">t</text:span><text:span text:style-name="T63">e</text:span><text:span text:style-name="T63">r</text:span><text:span text:style-name="T63">n</text:span><text:span text:style-name="T63"> </text:span><text:span text:style-name="T63">v</text:span><text:span text:style-name="T63">e</text:span><text:span text:style-name="T63">r</text:span><text:span text:style-name="T63">r</text:span><text:span text:style-name="T63">à</text:span><text:span text:style-name="T63"> </text:span><text:span text:style-name="T63">u</text:span><text:span text:style-name="T63">t</text:span><text:span text:style-name="T63">i</text:span><text:span text:style-name="T63">l</text:span><text:span text:style-name="T63">i</text:span><text:span text:style-name="T63">z</text:span><text:span text:style-name="T63">z</text:span><text:span text:style-name="T63">a</text:span><text:span text:style-name="T63">t</text:span><text:span text:style-name="T63">o</text:span><text:span text:style-name="T63"> </text:span><text:span text:style-name="T63">q</text:span><text:span text:style-name="T63">u</text:span><text:span text:style-name="T63">a</text:span><text:span text:style-name="T63">n</text:span><text:span text:style-name="T63">d</text:span><text:span text:style-name="T63">o</text:span><text:span text:style-name="T63"> </text:span><text:span text:style-name="T63">l</text:span><text:span text:style-name="T63">a</text:span><text:span text:style-name="T63"> </text:span><text:span text:style-name="T63">m</text:span><text:span text:style-name="T63">e</text:span><text:span text:style-name="T63">m</text:span><text:span text:style-name="T63">o</text:span><text:span text:style-name="T63">r</text:span><text:span text:style-name="T63">i</text:span><text:span text:style-name="T63">a</text:span><text:span text:style-name="T63"> </text:span><text:span text:style-name="T63">r</text:span><text:span text:style-name="T63">i</text:span><text:span text:style-name="T63">c</text:span><text:span text:style-name="T63">h</text:span><text:span text:style-name="T63">i</text:span><text:span text:style-name="T63">e</text:span><text:span text:style-name="T63">s</text:span><text:span text:style-name="T63">t</text:span><text:span text:style-name="T63">a</text:span><text:span text:style-name="T63"> </text:span><text:span text:style-name="T63">n</text:span><text:span text:style-name="T63">o</text:span><text:span text:style-name="T63">n</text:span><text:span text:style-name="T63"> </text:span><text:span text:style-name="T53">è</text:span><text:span text:style-name="T53"> </text:span><text:span text:style-name="T53">s</text:span><text:span text:style-name="T53">t</text:span><text:span text:style-name="T53">i</text:span><text:span text:style-name="T53">m</text:span><text:span text:style-name="T53">a</text:span><text:span text:style-name="T53">b</text:span><text:span text:style-name="T53">i</text:span><text:span text:style-name="T53">l</text:span><text:span text:style-name="T53">e</text:span><text:span text:style-name="T53"> </text:span><text:span text:style-name="T53">a</text:span><text:span text:style-name="T53"> </text:span><text:span text:style-name="T53">c</text:span><text:span text:style-name="T53">o</text:span><text:span text:style-name="T53">m</text:span><text:span text:style-name="T53">p</text:span><text:span text:style-name="T53">i</text:span><text:span text:style-name="T53">l</text:span><text:span text:style-name="T53">e</text:span><text:span text:style-name="T53"> </text:span><text:span text:style-name="T53">t</text:span><text:span text:style-name="T53">i</text:span><text:span text:style-name="T53">m</text:span><text:span text:style-name="T53">e</text:span><text:span text:style-name="T53">.</text:span><text:span text:style-name="T63"><text:line-break/></text:span><text:span text:style-name="T53">T</text:span><text:span text:style-name="T53">u</text:span><text:span text:style-name="T53">t</text:span><text:span text:style-name="T53">t</text:span><text:span text:style-name="T53">e</text:span><text:span text:style-name="T53"> </text:span><text:span text:style-name="T53">l</text:span><text:span text:style-name="T53">e</text:span><text:span text:style-name="T53"> </text:span><text:span text:style-name="T53">p</text:span><text:span text:style-name="T53">r</text:span><text:span text:style-name="T53">o</text:span><text:span text:style-name="T53">c</text:span><text:span text:style-name="T53">e</text:span><text:span text:style-name="T53">d</text:span><text:span text:style-name="T53">u</text:span><text:span text:style-name="T53">r</text:span><text:span text:style-name="T53">e</text:span><text:span text:style-name="T53"> </text:span><text:span text:style-name="T53">f</text:span><text:span text:style-name="T53">a</text:span><text:span text:style-name="T53">n</text:span><text:span text:style-name="T53">n</text:span><text:span text:style-name="T53">o</text:span><text:span text:style-name="T53"> </text:span><text:span text:style-name="T53">u</text:span><text:span text:style-name="T53">s</text:span><text:span text:style-name="T53">o</text:span><text:span text:style-name="T53"> </text:span><text:span text:style-name="T53">d</text:span><text:span text:style-name="T53">i</text:span><text:span text:style-name="T53"> </text:span><text:span text:style-name="T54">m</text:span><text:span text:style-name="T54">a</text:span><text:span text:style-name="T54">l</text:span><text:span text:style-name="T54">l</text:span><text:span text:style-name="T54">o</text:span><text:span text:style-name="T54">c</text:span><text:span text:style-name="T53"> </text:span><text:span text:style-name="T53">p</text:span><text:span text:style-name="T53">e</text:span><text:span text:style-name="T53">r</text:span><text:span text:style-name="T53"> </text:span><text:span text:style-name="T53">a</text:span><text:span text:style-name="T53">l</text:span><text:span text:style-name="T53">l</text:span><text:span text:style-name="T53">o</text:span><text:span text:style-name="T53">c</text:span><text:span text:style-name="T53">a</text:span><text:span text:style-name="T53">r</text:span><text:span text:style-name="T53">e</text:span><text:span text:style-name="T53"> </text:span><text:span text:style-name="T53">l</text:span><text:span text:style-name="T53">a</text:span><text:span text:style-name="T53"> </text:span><text:span text:style-name="T53">m</text:span><text:span text:style-name="T53">e</text:span><text:span text:style-name="T53">m</text:span><text:span text:style-name="T53">o</text:span><text:span text:style-name="T53">r</text:span><text:span text:style-name="T53">i</text:span><text:span text:style-name="T53">a</text:span><text:span text:style-name="T53">,</text:span><text:span text:style-name="T53"> </text:span><text:span text:style-name="T53">i</text:span><text:span text:style-name="T53">n</text:span><text:span text:style-name="T53"> </text:span><text:span text:style-name="T53">p</text:span><text:span text:style-name="T53">i</text:span><text:span text:style-name="T63">ù</text:span><text:span text:style-name="T63"> </text:span><text:span text:style-name="T63">n</text:span><text:span text:style-name="T63">e</text:span><text:span text:style-name="T63">l</text:span><text:span text:style-name="T53"> </text:span><text:span text:style-name="T53">c</text:span><text:span text:style-name="T53">a</text:span><text:span text:style-name="T53">s</text:span><text:span text:style-name="T53">o</text:span><text:span text:style-name="T53"> </text:span><text:span text:style-name="T53">d</text:span><text:span text:style-name="T53">i</text:span><text:span text:style-name="T53"> </text:span><text:span text:style-name="T54">o</text:span><text:span text:style-name="T54">c</text:span><text:span text:style-name="T54">c</text:span><text:span text:style-name="T54">u</text:span><text:span text:style-name="T54">r</text:span><text:span text:style-name="T54">r</text:span><text:span text:style-name="T54">e</text:span><text:span text:style-name="T54">n</text:span><text:span text:style-name="T54">c</text:span><text:span text:style-name="T54">e</text:span><text:span text:style-name="T54">_</text:span><text:span text:style-name="T54">e</text:span><text:span text:style-name="T54">n</text:span><text:span text:style-name="T54">c</text:span><text:span text:style-name="T54">r</text:span><text:span text:style-name="T54">y</text:span><text:span text:style-name="T54">p</text:span><text:span text:style-name="T54">t</text:span><text:span text:style-name="T55">,</text:span><text:span text:style-name="T55"> </text:span><text:span text:style-name="T55">v</text:span><text:span text:style-name="T55">i</text:span><text:span text:style-name="T55">e</text:span><text:span text:style-name="T55">n</text:span><text:span text:style-name="T55">e</text:span><text:span text:style-name="T55"> </text:span><text:span text:style-name="T55">a</text:span><text:span text:style-name="T55">l</text:span><text:span text:style-name="T55">l</text:span><text:span text:style-name="T55">o</text:span><text:span text:style-name="T55">c</text:span><text:span text:style-name="T55">a</text:span><text:span text:style-name="T55">t</text:span><text:span text:style-name="T55">a</text:span><text:span text:style-name="T55"> </text:span><text:span text:style-name="T55">c</text:span><text:span text:style-name="T55">o</text:span><text:span text:style-name="T55">n</text:span><text:span text:style-name="T55"> </text:span><text:span text:style-name="T54">m</text:span><text:span text:style-name="T54">a</text:span><text:span text:style-name="T54">l</text:span><text:span text:style-name="T54">l</text:span><text:span text:style-name="T54">o</text:span><text:span text:style-name="T54">c</text:span><text:span text:style-name="T54"> </text:span><text:span text:style-name="T55">u</text:span><text:span text:style-name="T55">n</text:span><text:span text:style-name="T55">a</text:span><text:span text:style-name="T55"> </text:span><text:span text:style-name="T64"><text:a xlink:href="#mem_arena" xlink:type="simple">mem_arena</text:a></text:span><text:span text:style-name="T65">,</text:span><text:span text:style-name="T65"> </text:span><text:span text:style-name="T65">c</text:span><text:span text:style-name="T65">h</text:span><text:span text:style-name="T65">e</text:span><text:span text:style-name="T65"> </text:span><text:span text:style-name="T65">p</text:span><text:span text:style-name="T65">e</text:span><text:span text:style-name="T65">r</text:span><text:span text:style-name="T65">m</text:span><text:span text:style-name="T65">e</text:span><text:span text:style-name="T65">t</text:span><text:span text:style-name="T65">t</text:span><text:span text:style-name="T65">e</text:span><text:span text:style-name="T65"> </text:span><text:span text:style-name="T65">d</text:span><text:span text:style-name="T65">i</text:span><text:span text:style-name="T65"> </text:span><text:span text:style-name="T65">e</text:span><text:span text:style-name="T65">s</text:span><text:span text:style-name="T65">e</text:span><text:span text:style-name="T65">g</text:span><text:span text:style-name="T65">u</text:span><text:span text:style-name="T65">i</text:span><text:span text:style-name="T65">r</text:span><text:span text:style-name="T65">e</text:span><text:span text:style-name="T65"> </text:span><text:span text:style-name="T65">u</text:span><text:span text:style-name="T65">n</text:span><text:span text:style-name="T65">a</text:span><text:span text:style-name="T65"> </text:span><text:span text:style-name="T65">r</text:span><text:span text:style-name="T65">i</text:span><text:span text:style-name="T65">c</text:span><text:span text:style-name="T65">h</text:span><text:span text:style-name="T65">i</text:span><text:span text:style-name="T65">e</text:span><text:span text:style-name="T65">s</text:span><text:span text:style-name="T65">t</text:span><text:span text:style-name="T65">a</text:span><text:span text:style-name="T65"> </text:span><text:span text:style-name="T65">d</text:span><text:span text:style-name="T65">i</text:span><text:span text:style-name="T65"> </text:span><text:span text:style-name="T65">m</text:span><text:span text:style-name="T65">e</text:span><text:span text:style-name="T65">m</text:span><text:span text:style-name="T65">o</text:span><text:span text:style-name="T65">r</text:span><text:span text:style-name="T65">i</text:span><text:span text:style-name="T65">a</text:span><text:span text:style-name="T65"> </text:span><text:span text:style-name="T65">i</text:span><text:span text:style-name="T65">n</text:span><text:span text:style-name="T65">i</text:span><text:span text:style-name="T65">z</text:span><text:span text:style-name="T65">i</text:span><text:span text:style-name="T65">a</text:span><text:span text:style-name="T65">l</text:span><text:span text:style-name="T65">e</text:span><text:span text:style-name="T65">,</text:span><text:span text:style-name="T65"> </text:span><text:span text:style-name="T65">e</text:span><text:span text:style-name="T65"> </text:span><text:span text:style-name="T65">s</text:span><text:span text:style-name="T65">p</text:span><text:span text:style-name="T65">a</text:span><text:span text:style-name="T65">r</text:span><text:span text:style-name="T65">t</text:span><text:span text:style-name="T65">i</text:span><text:span text:style-name="T65">r</text:span><text:span text:style-name="T65">e</text:span><text:span text:style-name="T65"> </text:span><text:span text:style-name="T65">i</text:span><text:span text:style-name="T65">n</text:span><text:span text:style-name="T65"> </text:span><text:span text:style-name="T65">m</text:span><text:span text:style-name="T65">a</text:span><text:span text:style-name="T65">n</text:span><text:span text:style-name="T65">i</text:span><text:span text:style-name="T65">e</text:span><text:span text:style-name="T65">r</text:span><text:span text:style-name="T65">a</text:span><text:span text:style-name="T65"> </text:span><text:span text:style-name="T65">c</text:span><text:span text:style-name="T65">o</text:span><text:span text:style-name="T65">m</text:span><text:span text:style-name="T65">p</text:span><text:span text:style-name="T65">a</text:span><text:span text:style-name="T65">t</text:span><text:span text:style-name="T65">t</text:span><text:span text:style-name="T65">a</text:span><text:span text:style-name="T65"> </text:span><text:span text:style-name="T65">d</text:span><text:span text:style-name="T65">i</text:span><text:span text:style-name="T65">v</text:span><text:span text:style-name="T65">e</text:span><text:span text:style-name="T65">r</text:span><text:span text:style-name="T65">s</text:span><text:span text:style-name="T65">e</text:span><text:span text:style-name="T65"> </text:span><text:span text:style-name="T65">p</text:span><text:span text:style-name="T65">o</text:span><text:span text:style-name="T65">r</text:span><text:span text:style-name="T65">z</text:span><text:span text:style-name="T65">i</text:span><text:span text:style-name="T65">o</text:span><text:span text:style-name="T65">n</text:span><text:span text:style-name="T65">i</text:span><text:span text:style-name="T65">,</text:span><text:span text:style-name="T65"> </text:span><text:span text:style-name="T65">a</text:span><text:span text:style-name="T65">s</text:span><text:span text:style-name="T65">s</text:span><text:span text:style-name="T65">o</text:span><text:span text:style-name="T65">c</text:span><text:span text:style-name="T65">i</text:span><text:span text:style-name="T65">a</text:span><text:span text:style-name="T65">n</text:span><text:span text:style-name="T65">d</text:span><text:span text:style-name="T65">o</text:span><text:span text:style-name="T65"> </text:span><text:span text:style-name="T65">g</text:span><text:span text:style-name="T65">l</text:span><text:span text:style-name="T65">i</text:span><text:span text:style-name="T65"> </text:span><text:span text:style-name="T65">o</text:span><text:span text:style-name="T65">g</text:span><text:span text:style-name="T65">g</text:span><text:span text:style-name="T65">e</text:span><text:span text:style-name="T65">t</text:span><text:span text:style-name="T65">t</text:span><text:span text:style-name="T65">i</text:span><text:span text:style-name="T65"> </text:span><text:span text:style-name="T65">c</text:span><text:span text:style-name="T65">h</text:span><text:span text:style-name="T65">e</text:span><text:span text:style-name="T65"> </text:span><text:span text:style-name="T65">i</text:span><text:span text:style-name="T65">n</text:span><text:span text:style-name="T65">f</text:span><text:span text:style-name="T65">i</text:span><text:span text:style-name="T65">n</text:span><text:span text:style-name="T65">e</text:span><text:span text:style-name="T65"> </text:span><text:span text:style-name="T65">p</text:span><text:span text:style-name="T65">o</text:span><text:span text:style-name="T65">s</text:span><text:span text:style-name="T65">s</text:span><text:span text:style-name="T65">o</text:span><text:span text:style-name="T65">n</text:span><text:span text:style-name="T65">o</text:span><text:span text:style-name="T65"> </text:span><text:span text:style-name="T65">e</text:span><text:span text:style-name="T65">s</text:span><text:span text:style-name="T65">s</text:span><text:span text:style-name="T65">e</text:span><text:span text:style-name="T65">r</text:span><text:span text:style-name="T65">e</text:span><text:span text:style-name="T65"> </text:span><text:span text:style-name="T65">t</text:span><text:span text:style-name="T65">u</text:span><text:span text:style-name="T65">t</text:span><text:span text:style-name="T65">t</text:span><text:span text:style-name="T65">i</text:span><text:span text:style-name="T65"> </text:span><text:span text:style-name="T65">l</text:span><text:span text:style-name="T65">i</text:span><text:span text:style-name="T65">b</text:span><text:span text:style-name="T65">e</text:span><text:span text:style-name="T65">r</text:span><text:span text:style-name="T65">a</text:span><text:span text:style-name="T65">t</text:span><text:span text:style-name="T65">i</text:span><text:span text:style-name="T65"> </text:span><text:span text:style-name="T65">c</text:span><text:span text:style-name="T65">o</text:span><text:span text:style-name="T65">n</text:span><text:span text:style-name="T65"> </text:span><text:span text:style-name="T65">u</text:span><text:span text:style-name="T65">n</text:span><text:span text:style-name="T65">a</text:span><text:span text:style-name="T65"> </text:span><text:span text:style-name="T65">s</text:span><text:span text:style-name="T65">i</text:span><text:span text:style-name="T65">n</text:span><text:span text:style-name="T65">g</text:span><text:span text:style-name="T65">o</text:span><text:span text:style-name="T65">l</text:span><text:span text:style-name="T65">a</text:span><text:span text:style-name="T65"> </text:span><text:span text:style-name="T65">c</text:span><text:span text:style-name="T65">h</text:span><text:span text:style-name="T65">i</text:span><text:span text:style-name="T65">a</text:span><text:span text:style-name="T65">m</text:span><text:span text:style-name="T65">a</text:span><text:span text:style-name="T65">t</text:span><text:span text:style-name="T65">a</text:span><text:span text:style-name="T65"> </text:span><text:span text:style-name="T65">d</text:span><text:span text:style-name="T65">i</text:span><text:span text:style-name="T65"> </text:span><text:span text:style-name="T54">f</text:span><text:span text:style-name="T54">r</text:span><text:span text:style-name="T54">e</text:span><text:span text:style-name="T54">e</text:span><text:span text:style-name="T55">.</text:span><text:span text:style-name="T55"> </text:span><text:span text:style-name="T55">Q</text:span><text:span text:style-name="T55">u</text:span><text:span text:style-name="T55">i</text:span><text:span text:style-name="T55"> </text:span><text:span text:style-name="T55">l</text:span><text:span text:style-name="T55">’</text:span><text:span text:style-name="T55">a</text:span><text:span text:style-name="T55">r</text:span><text:span text:style-name="T55">e</text:span><text:span text:style-name="T55">n</text:span><text:span text:style-name="T55">a</text:span><text:span text:style-name="T55"> </text:span><text:span text:style-name="T55">r</text:span><text:span text:style-name="T55">a</text:span><text:span text:style-name="T55">c</text:span><text:span text:style-name="T55">c</text:span><text:span text:style-name="T55">o</text:span><text:span text:style-name="T55">g</text:span><text:span text:style-name="T55">l</text:span><text:span text:style-name="T55">i</text:span><text:span text:style-name="T55">e</text:span><text:span text:style-name="T55"> </text:span><text:span text:style-name="T65">i</text:span><text:span text:style-name="T65"> </text:span><text:span text:style-name="T65"><text:tab/></text:span></text:p>
          </draw:text-box>
        </draw:frame>
        <draw:frame draw:style-name="gr252" draw:text-style-name="P77" draw:layer="layout" svg:width="18.237cm" svg:height="0.536cm" svg:x="0.637cm" svg:y="27.852cm">
          <draw:text-box>
            <text:p text:style-name="P76"><text:span text:style-name="T65"><text:tab/></text:span><text:span text:style-name="T66">src_len</text:span><text:span text:style-name="T67"> </text:span><text:span text:style-name="T67"><text:a xlink:href="#list_node" xlink:type="simple">list_node</text:a></text:span><text:span text:style-name="T64"><text:s/></text:span><text:span text:style-name="T65">puntati da </text:span><text:span text:style-name="T56"><text:a xlink:href="#occurrence_map" xlink:type="simple">occurrence_map</text:a></text:span><text:span text:style-name="T55">.</text:span></text:p>
          </draw:text-box>
        </draw:frame>
      </draw:page>
      <draw:page draw:name="page8" draw:style-name="dp1" draw:master-page-name="master-page79">
        <draw:frame draw:name="get_occurrence_map" draw:style-name="gr45" draw:text-style-name="P31" draw:layer="layout" svg:width="8.415cm" svg:height="0.543cm" svg:x="1.404cm" svg:y="2.826cm">
          <draw:text-box>
            <text:p text:style-name="P1"><text:span text:style-name="T25">g</text:span><text:span text:style-name="T25">e</text:span><text:span text:style-name="T25">t</text:span><text:span text:style-name="T25">_</text:span><text:span text:style-name="T25">o</text:span><text:span text:style-name="T25">c</text:span><text:span text:style-name="T25">c</text:span><text:span text:style-name="T25">u</text:span><text:span text:style-name="T25">r</text:span><text:span text:style-name="T25">r</text:span><text:span text:style-name="T25">e</text:span><text:span text:style-name="T25">n</text:span><text:span text:style-name="T25">c</text:span><text:span text:style-name="T25">e</text:span><text:span text:style-name="T25">_</text:span><text:span text:style-name="T25">m</text:span><text:span text:style-name="T25">a</text:span><text:span text:style-name="T25">p</text:span><text:span text:style-name="T25">:</text:span></text:p>
          </draw:text-box>
        </draw:frame>
        <draw:frame draw:style-name="gr15" draw:text-style-name="P15" draw:layer="layout" svg:width="0.943cm" svg:height="0.642cm" svg:x="1.478cm" svg:y="28.055cm">
          <draw:text-box>
            <text:p text:style-name="P1"><text:span text:style-name="T16">8</text:span></text:p>
          </draw:text-box>
        </draw:frame>
        <draw:frame draw:style-name="gr44" draw:text-style-name="P8" draw:layer="layout" svg:width="5.771cm" svg:height="0.543cm" svg:x="1.403cm" svg:y="2.028cm">
          <draw:text-box>
            <text:p text:style-name="P1"><text:span text:style-name="T7">P</text:span><text:span text:style-name="T7">r</text:span><text:span text:style-name="T7">o</text:span><text:span text:style-name="T7">c</text:span><text:span text:style-name="T7">e</text:span><text:span text:style-name="T7">d</text:span><text:span text:style-name="T7">u</text:span><text:span text:style-name="T7">r</text:span><text:span text:style-name="T7">e</text:span><text:span text:style-name="T7"> </text:span><text:span text:style-name="T7">n</text:span><text:span text:style-name="T7">o</text:span><text:span text:style-name="T7">t</text:span><text:span text:style-name="T7">e</text:span><text:span text:style-name="T7">v</text:span><text:span text:style-name="T7">o</text:span><text:span text:style-name="T7">l</text:span><text:span text:style-name="T7">i</text:span><text:span text:style-name="T7">:</text:span><text:span text:style-name="T7"> </text:span></text:p>
          </draw:text-box>
        </draw:frame>
        <draw:frame draw:style-name="gr188" draw:text-style-name="P70" draw:layer="layout" svg:width="18.237cm" svg:height="3.313cm" svg:x="1.536cm" svg:y="3.623cm">
          <draw:text-box>
            <text:p text:style-name="P73"><text:span text:style-name="T61">Questa </text:span><text:span text:style-name="T61">procedura </text:span><text:span text:style-name="T61">itera su una </text:span><text:span text:style-name="T61">stringa, e </text:span><text:span text:style-name="T61">crea un </text:span><text:span text:style-name="T61">nodo di una </text:span><text:span text:style-name="T61">lista </text:span><text:span text:style-name="T61">concatenat</text:span><text:span text:style-name="T61">a per ogni </text:span><text:span text:style-name="T61">carattere c, </text:span><text:span text:style-name="T61">il </text:span><text:span text:style-name="T68"><text:a xlink:href="#list_node" xlink:type="simple">nodo</text:a></text:span><text:span text:style-name="T61"><text:s/></text:span><text:span text:style-name="T61">contiene </text:span><text:span text:style-name="T61">l’indice </text:span><text:span text:style-name="T61">numerico in </text:span><text:span text:style-name="T61">cui il </text:span><text:span text:style-name="T61">carattere si </text:span><text:span text:style-name="T61">trova nella </text:span><text:span text:style-name="T61">stringa, e </text:span><text:span text:style-name="T61">l’indirizzo </text:span><text:span text:style-name="T61">della </text:span><text:span text:style-name="T61">memoria </text:span><text:span text:style-name="T61">del </text:span><text:span text:style-name="T61">prossimo </text:span><text:span text:style-name="T61">nodo, 0 in </text:span><text:span text:style-name="T61">caso sia </text:span><text:span text:style-name="T61">l’ultimo.</text:span></text:p>
            <text:p text:style-name="P73"><text:span text:style-name="T61">Il nodo poi </text:span><text:span text:style-name="T61">viene </text:span><text:span text:style-name="T61">inserito </text:span><text:span text:style-name="T61">nella lista </text:span><text:span text:style-name="T61">puntata </text:span><text:span text:style-name="T61">dall’array </text:span><text:span text:style-name="T61">passato in </text:span><text:span text:style-name="T61">input, nella </text:span><text:span text:style-name="T61">posizione ‘c </text:span><text:span text:style-name="T61">– 32’.</text:span></text:p>
            <text:p text:style-name="P73"><text:span text:style-name="T61">Inifine, </text:span><text:span text:style-name="T61">quando si </text:span><text:span text:style-name="T61">raggiunge il </text:span><text:span text:style-name="T61">termine </text:span><text:span text:style-name="T61">della </text:span><text:span text:style-name="T61">stringa, </text:span><text:span text:style-name="T61">viene </text:span><text:span text:style-name="T61">restituito </text:span><text:span text:style-name="T61">l’array </text:span><text:span text:style-name="T61">popolato.</text:span><text:span text:style-name="T61"><text:line-break/></text:span><text:span text:style-name="T61">L’uso di </text:span><text:span text:style-name="T61">questa </text:span><text:span text:style-name="T61">struttura </text:span><text:span text:style-name="T61">permette di </text:span><text:span text:style-name="T61">mantenere </text:span><text:span text:style-name="T61">una </text:span><text:span text:style-name="T61">complessita </text:span><text:span text:style-name="T61">lineare.</text:span></text:p>
          </draw:text-box>
        </draw:frame>
        <draw:g draw:style-name="gr48" xml:id="id68" draw:id="id68">
          <draw:path draw:style-name="gr253" draw:text-style-name="P34" draw:layer="layout" svg:width="0.5cm" svg:height="0.5cm" svg:x="2.299cm" svg:y="7.6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custom-shape draw:style-name="gr254" draw:text-style-name="P35" draw:layer="layout" svg:width="0.25cm" svg:height="0.25cm" svg:x="2.424cm" svg:y="7.725cm">
            <text:p/>
            <draw:enhanced-geometry svg:viewBox="0 0 21600 21600" draw:type="rectangle" draw:enhanced-path="M 0 0 L 21600 0 21600 21600 0 21600 0 0 Z N"/>
          </draw:custom-shape>
        </draw:g>
        <draw:connector draw:style-name="gr255" draw:text-style-name="P59" draw:layer="layout" svg:x1="4.219cm" svg:y1="7.836cm" svg:x2="2.8cm" svg:y2="7.85cm" draw:start-shape="id67" draw:start-glue-point="3" draw:end-shape="id68" draw:end-glue-point="1" svg:d="M4219 7836h-716v14h-703" svg:viewBox="0 0 1420 15">
          <text:p/>
        </draw:connector>
        <draw:polygon draw:style-name="gr256" draw:text-style-name="P60" xml:id="id67" draw:id="id67" draw:layer="layout" svg:width="3.791cm" svg:height="1.422cm" svg:x="4.219cm" svg:y="7.125cm" svg:viewBox="0 0 3792 1423" draw:points="0,0 2369,0 2844,0 3791,0 3791,711 3792,712 3791,712 3791,1422 2844,1422 2844,1423 0,1423 948,712">
          <text:p text:style-name="P54"><text:span text:style-name="T29">In: char [] src, </text:span></text:p>
          <text:p text:style-name="P54"><text:span text:style-name="T59"><text:a xlink:href="#list_node" xlink:type="simple">list_node</text:a></text:span><text:span text:style-name="T69"><text:s/></text:span><text:span text:style-name="T29">[96] </text:span><text:span text:style-name="T59"><text:a xlink:href="#occurrence_map" xlink:type="simple">map</text:a></text:span></text:p>
        </draw:polygon>
        <draw:custom-shape draw:style-name="gr257" draw:text-style-name="P45" xml:id="id69" draw:id="id69" draw:layer="layout" svg:width="3.451cm" svg:height="1.062cm" draw:transform="skewX (0.00663225115757845) translate (9.229cm 7.314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chiama bzero(map);**</text:span></text:p>
          <text:p text:style-name="P44"><text:span text:style-name="T29">i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58" draw:text-style-name="P36" draw:layer="layout" svg:x1="9.222cm" svg:y1="7.845cm" svg:x2="8.011cm" svg:y2="7.836cm" draw:start-shape="id69" draw:start-glue-point="3" draw:end-shape="id67" draw:end-glue-point="1" svg:d="M9222 7845h-605v-9h-606" svg:viewBox="0 0 1212 10">
          <text:p/>
        </draw:connector>
        <draw:custom-shape draw:style-name="gr259" draw:text-style-name="P42" xml:id="id70" draw:id="id70" draw:layer="layout" svg:width="1cm" svg:height="1cm" svg:x="10.437cm" svg:y="9.8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draw:style-name="gr19">
          <draw:custom-shape draw:style-name="gr260" draw:text-style-name="P40" draw:layer="layout" svg:width="16.581cm" svg:height="6.683cm" svg:x="2.428cm" svg:y="8.916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1" draw:text-style-name="P61" draw:layer="layout" svg:width="4.058cm" svg:height="0.614cm" svg:x="2.428cm" svg:y="8.916cm">
            <text:p text:style-name="P44"><text:span text:style-name="T29">get_occurrence_map_loop</text:span></text:p>
            <draw:enhanced-geometry svg:viewBox="0 0 21600 21600" draw:type="non-primitve" draw:enhanced-path="M 0 0 L 21600 0 19000 21600 0 21600 0 0 Z N"/>
          </draw:custom-shape>
        </draw:g>
        <draw:connector draw:style-name="gr262" draw:text-style-name="P36" draw:layer="layout" svg:x1="10.937cm" svg:y1="9.826cm" svg:x2="10.947cm" svg:y2="8.376cm" draw:start-shape="id70" draw:start-glue-point="4" draw:end-shape="id69" draw:end-glue-point="2" svg:d="M10937 9826v-730h10v-720" svg:viewBox="0 0 11 1451">
          <text:p/>
        </draw:connector>
        <draw:custom-shape draw:style-name="gr263" draw:text-style-name="P42" xml:id="id73" draw:id="id73" draw:layer="layout" svg:width="1cm" svg:height="1cm" svg:x="10.437cm" svg:y="14.4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64" draw:text-style-name="P48" draw:layer="layout" svg:width="1.245cm" svg:height="0.601cm" svg:x="11.215cm" svg:y="9.576cm">
          <draw:text-box>
            <text:p text:style-name="P26"><text:span text:style-name="T29">[falso]</text:span></text:p>
          </draw:text-box>
        </draw:frame>
        <draw:custom-shape draw:style-name="gr265" draw:text-style-name="P45" xml:id="id71" draw:id="id71" draw:layer="layout" svg:width="3.38cm" svg:height="0.9cm" draw:transform="skewX (0.00663225115757845) translate (3.019cm 9.898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pos = src[i] – 32;</text:span></text:p>
          <text:p text:style-name="P44"><text:span text:style-name="T29">nodo = nuovo nodo(i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66" draw:text-style-name="P36" draw:layer="layout" svg:x1="6.399cm" svg:y1="10.348cm" svg:x2="10.437cm" svg:y2="10.326cm" draw:start-shape="id71" draw:start-glue-point="1" draw:end-shape="id70" draw:end-glue-point="5" svg:d="M6399 10348h2014v-22h2024" svg:viewBox="0 0 4039 23">
          <text:p/>
        </draw:connector>
        <draw:connector draw:style-name="gr267" draw:text-style-name="P36" draw:layer="layout" svg:x1="4.737cm" svg:y1="11.626cm" svg:x2="4.703cm" svg:y2="10.798cm" draw:start-shape="id72" draw:start-glue-point="4" draw:end-shape="id71" draw:end-glue-point="2" svg:d="M4737 11626v-419h-34v-409" svg:viewBox="0 0 35 829">
          <text:p/>
        </draw:connector>
        <draw:frame draw:style-name="gr268" draw:text-style-name="P48" draw:layer="layout" svg:width="2.558cm" svg:height="0.601cm" svg:x="8.657cm" svg:y="9.025cm">
          <draw:text-box>
            <text:p text:style-name="P26"><text:span text:style-name="T29">[src[i] != ‘\0’]</text:span></text:p>
          </draw:text-box>
        </draw:frame>
        <draw:frame draw:style-name="gr269" draw:text-style-name="P48" draw:layer="layout" svg:width="1.197cm" svg:height="0.668cm" svg:x="9.366cm" svg:y="10.146cm">
          <draw:text-box>
            <text:p text:style-name="P26"><text:span text:style-name="T29">[vero]</text:span></text:p>
          </draw:text-box>
        </draw:frame>
        <draw:connector draw:style-name="gr270" draw:text-style-name="P36" draw:layer="layout" draw:line-skew="6.853cm" svg:x1="11.437cm" svg:y1="14.926cm" svg:x2="11.437cm" svg:y2="10.326cm" draw:start-shape="id73" draw:start-glue-point="7" draw:end-shape="id70" draw:end-glue-point="7" svg:d="M11437 14926h7392v-4600h-7392" svg:viewBox="0 0 7393 4601">
          <text:p/>
        </draw:connector>
        <draw:connector draw:style-name="gr271" draw:text-style-name="P36" draw:layer="layout" svg:x1="10.929cm" svg:y1="15.975cm" svg:x2="10.937cm" svg:y2="15.426cm" draw:start-shape="id74" draw:start-glue-point="0" draw:end-shape="id73" draw:end-glue-point="6" svg:d="M10929 15975v-269h8v-280" svg:viewBox="0 0 9 550">
          <text:p/>
        </draw:connector>
        <draw:frame draw:style-name="gr272" draw:text-style-name="P48" draw:layer="layout" svg:width="1.715cm" svg:height="0.601cm" svg:x="11.484cm" svg:y="14.265cm">
          <draw:text-box>
            <text:p text:style-name="P26"><text:span text:style-name="T29">[</text:span><text:span text:style-name="T29">e</text:span><text:span text:style-name="T29">n</text:span><text:span text:style-name="T29">d</text:span><text:span text:style-name="T29"> </text:span><text:span text:style-name="T29">l</text:span><text:span text:style-name="T29">o</text:span><text:span text:style-name="T29">o</text:span><text:span text:style-name="T29">p</text:span><text:span text:style-name="T29">]</text:span></text:p>
          </draw:text-box>
        </draw:frame>
        <draw:custom-shape draw:style-name="gr273" draw:text-style-name="P45" xml:id="id74" draw:id="id74" draw:layer="layout" svg:width="2.757cm" svg:height="0.887cm" svg:x="9.551cm" svg:y="15.975cm">
          <text:p text:style-name="P44"><text:span text:style-name="T29">Out: </text:span><text:span text:style-name="T59"><text:a xlink:href="#occurrence_map" xlink:type="simple">map</text:a></text:span></text:p>
          <draw:enhanced-geometry svg:viewBox="0 0 21600 21600" draw:text-areas="0 0 21600 21600" draw:type="pentagon-right" draw:modifiers="14755.0398839739" draw:enhanced-path="M 0 0 L ?f0 0 21600 10800 ?f0 21600 0 21600 Z N">
            <draw:equation draw:name="f0" draw:formula="$0 "/>
            <draw:handle draw:handle-range-x-minimum="0" draw:handle-range-x-maximum="21600" draw:handle-position="$0 top" draw:handle-position-x="$0" draw:handle-position-y="top"/>
          </draw:enhanced-geometry>
        </draw:custom-shape>
        <draw:g draw:style-name="gr78" xml:id="id75" draw:id="id75">
          <draw:path draw:style-name="gr274" draw:text-style-name="P49" draw:layer="layout" svg:width="0.5cm" svg:height="0.5cm" svg:x="13.799cm" svg:y="16.147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path draw:style-name="gr275" draw:text-style-name="P34" draw:layer="layout" svg:width="0.2cm" svg:height="0.2cm" svg:x="13.949cm" svg:y="16.297cm" svg:viewBox="0 0 201 201" svg:d="M201 101c0 17-5 34-13 50-9 15-22 28-37 37-16 8-33 13-50 13-18 0-35-5-51-13-15-9-28-22-37-37-8-16-13-33-13-50 0-18 5-35 13-51 9-15 22-28 37-37 16-8 33-13 51-13 17 0 34 5 50 13 15 9 28 22 37 37 8 16 13 33 13 51z">
            <text:p/>
          </draw:path>
        </draw:g>
        <draw:connector draw:style-name="gr276" draw:text-style-name="P36" draw:layer="layout" svg:x1="13.799cm" svg:y1="16.397cm" svg:x2="12.308cm" svg:y2="16.418cm" draw:start-shape="id75" draw:start-glue-point="3" draw:end-shape="id74" draw:end-glue-point="1" svg:d="M13799 16397h-745v21h-746" svg:viewBox="0 0 1492 22">
          <text:p/>
        </draw:connector>
        <draw:custom-shape draw:style-name="gr277" draw:text-style-name="P42" xml:id="id72" draw:id="id72" draw:layer="layout" svg:width="1cm" svg:height="1cm" svg:x="4.237cm" svg:y="11.6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78" draw:text-style-name="P48" draw:layer="layout" svg:width="2.598cm" svg:height="0.601cm" svg:x="2.305cm" svg:y="11.294cm">
          <draw:text-box>
            <text:p text:style-name="P26"><text:span text:style-name="T29">[map[pos] == 0?]</text:span></text:p>
          </draw:text-box>
        </draw:frame>
        <draw:custom-shape draw:style-name="gr279" draw:text-style-name="P45" xml:id="id76" draw:id="id76" draw:layer="layout" svg:width="1.376cm" svg:height="0.764cm" draw:transform="skewX (0.00663225115757845) translate (17.216cm 12.239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i++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80" draw:text-style-name="P36" draw:layer="layout" draw:line-skew="-0.713cm" svg:x1="10.937cm" svg:y1="10.826cm" svg:x2="17.904cm" svg:y2="12.239cm" draw:start-shape="id70" draw:start-glue-point="6" draw:end-shape="id76" draw:end-glue-point="0" svg:d="M10937 10826h6967v1413" svg:viewBox="0 0 6968 1414">
          <text:p/>
        </draw:connector>
        <draw:custom-shape draw:style-name="gr281" draw:text-style-name="P45" xml:id="id78" draw:id="id78" draw:layer="layout" svg:width="2.783cm" svg:height="0.764cm" draw:transform="skewX (0.00663225115757845) translate (5.942cm 13.539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map[pos] = nodo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2" draw:text-style-name="P42" xml:id="id77" draw:id="id77" draw:layer="layout" svg:width="1cm" svg:height="1cm" svg:x="15.207cm" svg:y="13.4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83" draw:text-style-name="P36" draw:layer="layout" svg:x1="17.899cm" svg:y1="13.003cm" svg:x2="16.207cm" svg:y2="13.904cm" draw:start-shape="id76" draw:start-glue-point="2" draw:end-shape="id77" draw:end-glue-point="7" svg:d="M17899 13003v901h-1692" svg:viewBox="0 0 1693 902">
          <text:p/>
        </draw:connector>
        <draw:connector draw:style-name="gr284" draw:text-style-name="P36" draw:layer="layout" svg:x1="15.207cm" svg:y1="13.904cm" svg:x2="8.725cm" svg:y2="13.921cm" draw:start-shape="id77" draw:start-glue-point="5" draw:end-shape="id78" draw:end-glue-point="1" svg:d="M15207 13904h-3246v17h-3236" svg:viewBox="0 0 6483 18">
          <text:p/>
        </draw:connector>
        <draw:custom-shape draw:style-name="gr285" draw:text-style-name="P45" xml:id="id79" draw:id="id79" draw:layer="layout" svg:width="4.58cm" svg:height="0.764cm" draw:transform="skewX (0.00663225115757845) translate (11.819cm 11.758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nodo_prec.prossimo </text:span><text:span text:style-name="T29">= nodo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86" draw:text-style-name="P36" draw:layer="layout" draw:line-skew="-0.134cm" svg:x1="15.707cm" svg:y1="13.404cm" svg:x2="14.104cm" svg:y2="12.522cm" draw:start-shape="id77" draw:start-glue-point="4" draw:end-shape="id79" draw:end-glue-point="2" svg:d="M15707 13404v-580h-1603v-302" svg:viewBox="0 0 1604 883">
          <text:p/>
        </draw:connector>
        <draw:connector draw:style-name="gr287" draw:text-style-name="P36" draw:layer="layout" svg:x1="5.937cm" svg:y1="13.921cm" svg:x2="4.737cm" svg:y2="12.626cm" draw:start-shape="id78" draw:start-glue-point="3" draw:end-shape="id72" draw:end-glue-point="6" svg:d="M5937 13921h-1200v-1295" svg:viewBox="0 0 1201 1296">
          <text:p/>
        </draw:connector>
        <draw:frame draw:style-name="gr288" draw:text-style-name="P48" draw:layer="layout" svg:width="1.197cm" svg:height="0.668cm" svg:x="4.567cm" svg:y="13.246cm">
          <draw:text-box>
            <text:p text:style-name="P26"><text:span text:style-name="T29">[</text:span><text:span text:style-name="T29">v</text:span><text:span text:style-name="T29">e</text:span><text:span text:style-name="T29">r</text:span><text:span text:style-name="T29">o</text:span><text:span text:style-name="T29">]</text:span></text:p>
          </draw:text-box>
        </draw:frame>
        <draw:frame draw:style-name="gr289" draw:text-style-name="P48" draw:layer="layout" svg:width="1.245cm" svg:height="0.601cm" svg:x="5.116cm" svg:y="11.377cm">
          <draw:text-box>
            <text:p text:style-name="P26"><text:span text:style-name="T29">[falso]</text:span></text:p>
          </draw:text-box>
        </draw:frame>
        <draw:custom-shape draw:style-name="gr290" draw:text-style-name="P45" xml:id="id80" draw:id="id80" draw:layer="layout" svg:width="3.856cm" svg:height="0.906cm" draw:transform="skewX (0.00663225115757845) translate (6.474cm 11.658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nodo_prec = map[pos].ultimo_nodo();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1" draw:text-style-name="P36" draw:layer="layout" svg:x1="6.468cm" svg:y1="12.111cm" svg:x2="5.237cm" svg:y2="12.126cm" draw:start-shape="id80" draw:start-glue-point="3" draw:end-shape="id72" draw:end-glue-point="7" svg:d="M6468 12111h-609v15h-622" svg:viewBox="0 0 1232 16">
          <text:p/>
        </draw:connector>
        <draw:connector draw:style-name="gr292" draw:text-style-name="P36" draw:layer="layout" svg:x1="11.814cm" svg:y1="12.14cm" svg:x2="10.33cm" svg:y2="12.111cm" draw:start-shape="id79" draw:start-glue-point="3" draw:end-shape="id80" draw:end-glue-point="1" svg:d="M11814 12140h-742v-29h-742" svg:viewBox="0 0 1485 30">
          <text:p/>
        </draw:connector>
        <draw:frame draw:style-name="gr293" draw:text-style-name="P50" draw:layer="layout" svg:width="17.084cm" svg:height="1.315cm" svg:x="2.475cm" svg:y="17.089cm">
          <draw:text-box>
            <text:p>*: list.utlimo_nodo() in realta si tratta di un semplice ciclo che itera fino alla fine della stringa <text:line-break/>**: bzero(generic *ptr, int size): azzera la zona di memoria da ptr a ptr + size</text:p>
          </draw:text-box>
        </draw:frame>
        <draw:frame draw:name="occurrence_dest_size" draw:style-name="gr45" draw:text-style-name="P31" draw:layer="layout" svg:width="8.415cm" svg:height="0.543cm" svg:x="1.405cm" svg:y="18.127cm">
          <draw:text-box>
            <text:p text:style-name="P1"><text:span text:style-name="T25">occurrence_dest_size:</text:span></text:p>
          </draw:text-box>
        </draw:frame>
        <draw:frame draw:style-name="gr188" draw:text-style-name="P70" draw:layer="layout" svg:width="18.237cm" svg:height="7.605cm" svg:x="1.537cm" svg:y="18.923cm">
          <draw:text-box>
            <text:p text:style-name="P73"><text:span text:style-name="T61">Procedur</text:span><text:span text:style-name="T61">a per </text:span><text:span text:style-name="T61">calcolare </text:span><text:span text:style-name="T61">la </text:span><text:span text:style-name="T61">lunghezza </text:span><text:span text:style-name="T61">della </text:span><text:span text:style-name="T61">stringa </text:span><text:span text:style-name="T61">cifrata, </text:span><text:span text:style-name="T61">serve per </text:span><text:span text:style-name="T61">allocare </text:span><text:span text:style-name="T61">memoria </text:span><text:span text:style-name="T61">in </text:span><text:span text:style-name="T61">anticipo.</text:span><text:span text:style-name="T61"><text:line-break/></text:span><text:span text:style-name="T61">Dopo </text:span><text:span text:style-name="T61">aver </text:span><text:span text:style-name="T61">iterato </text:span><text:span text:style-name="T61">sulla </text:span><text:span text:style-name="T61">mappa </text:span><text:span text:style-name="T61">per </text:span><text:span text:style-name="T61">contare il </text:span><text:span text:style-name="T61">numero di </text:span><text:span text:style-name="T61">caratteri </text:span><text:span text:style-name="T61">diversi, </text:span><text:span text:style-name="T61">applica </text:span><text:span text:style-name="T61">una </text:span><text:span text:style-name="T61">formula </text:span><text:span text:style-name="T61">per </text:span><text:span text:style-name="T61">calcolare </text:span><text:span text:style-name="T61">la </text:span><text:span text:style-name="T61">grandezz</text:span><text:span text:style-name="T61">a finale, la </text:span><text:span text:style-name="T61">formula </text:span><text:span text:style-name="T61">deriva da </text:span><text:span text:style-name="T61">questa </text:span><text:span text:style-name="T61">intuizione: </text:span><text:span text:style-name="T61"><text:line-break/></text:span><text:span text:style-name="T61"><text:line-break/></text:span><text:span text:style-name="T70">1 </text:span><text:span text:style-name="T70">carattere </text:span><text:span text:style-name="T70">+ 1 </text:span><text:span text:style-name="T70">spazio </text:span><text:span text:style-name="T71">(2)</text:span><text:span text:style-name="T61"> </text:span><text:span text:style-name="T61">per ogni </text:span><text:span text:style-name="T72">carattere </text:span><text:span text:style-name="T72">unico</text:span><text:span text:style-name="T61"><text:line-break/></text:span><text:span text:style-name="T73">1</text:span><text:span text:style-name="T74"> '-' per </text:span><text:span text:style-name="T75">ogni </text:span><text:span text:style-name="T75">carattere</text:span><text:span text:style-name="T74"> </text:span><text:span text:style-name="T74">della </text:span><text:span text:style-name="T74">stringa </text:span><text:span text:style-name="T74">(</text:span><text:span text:style-name="T76">eccetto il </text:span><text:span text:style-name="T76">primo</text:span><text:span text:style-name="T74">)</text:span></text:p>
            <text:p text:style-name="P73"><text:span text:style-name="T74">1 stringa </text:span><text:span text:style-name="T74">numerica </text:span><text:span text:style-name="T74">per ogni </text:span><text:span text:style-name="T74">carattere </text:span><text:span text:style-name="T74">delal </text:span><text:span text:style-name="T74">stringa -&gt; </text:span><text:span text:style-name="T74">somma di </text:span><text:span text:style-name="T74">lunghezza </text:span><text:span text:style-name="T74">di ogni </text:span><text:span text:style-name="T74">stringa </text:span><text:span text:style-name="T74">numerica </text:span><text:span text:style-name="T74">da 1 a </text:span><text:span text:style-name="T74">src_len:</text:span></text:p>
            <text:p text:style-name="P78"><text:span text:style-name="T74">num</text:span><text:span text:style-name="T74">str_l</text:span><text:span text:style-name="T74">en(9</text:span><text:span text:style-name="T74">) = </text:span><text:span text:style-name="T74">(strl</text:span><text:span text:style-name="T74">en("</text:span><text:span text:style-name="T74">1") = </text:span><text:span text:style-name="T74">1) + </text:span><text:span text:style-name="T74">(strl</text:span><text:span text:style-name="T74">en("</text:span><text:span text:style-name="T74">2") = </text:span><text:span text:style-name="T74">1)</text:span><text:span text:style-name="T74"> </text:span><text:span text:style-name="T74">+ ... </text:span><text:span text:style-name="T74">+ </text:span><text:span text:style-name="T74">(strl</text:span><text:span text:style-name="T74">en("</text:span><text:span text:style-name="T74">9") = </text:span><text:span text:style-name="T74">1)</text:span><text:span text:style-name="T74"> = </text:span><text:span text:style-name="T74">1 * 9</text:span></text:p>
            <text:p text:style-name="P78"><text:span text:style-name="T74">num</text:span><text:span text:style-name="T74">str_l</text:span><text:span text:style-name="T74">en(1</text:span><text:span text:style-name="T74">0) = </text:span><text:span text:style-name="T74">2 * 1 </text:span><text:span text:style-name="T74">+ </text:span><text:span text:style-name="T74">num</text:span><text:span text:style-name="T74">str_l</text:span><text:span text:style-name="T74">en(9</text:span><text:span text:style-name="T74">)</text:span></text:p>
            <text:p text:style-name="P78"><text:span text:style-name="T74">num</text:span><text:span text:style-name="T74">str_l</text:span><text:span text:style-name="T74">en(1</text:span><text:span text:style-name="T74">1) = </text:span><text:span text:style-name="T74">2 * </text:span><text:span text:style-name="T74">(11 </text:span><text:span text:style-name="T74">– 9) </text:span><text:span text:style-name="T74">+ </text:span><text:span text:style-name="T74">num</text:span><text:span text:style-name="T74">str_l</text:span><text:span text:style-name="T74">en(9</text:span><text:span text:style-name="T74">)</text:span><text:span text:style-name="T74"><text:line-break/></text:span><text:span text:style-name="T74">num</text:span><text:span text:style-name="T74">str_l</text:span><text:span text:style-name="T74">en(1</text:span><text:span text:style-name="T74">00) </text:span><text:span text:style-name="T74">= 3 * </text:span><text:span text:style-name="T74">(100 </text:span><text:span text:style-name="T74">– </text:span><text:span text:style-name="T74">99) </text:span><text:span text:style-name="T74">+ 2 * </text:span><text:span text:style-name="T74">(100 </text:span><text:span text:style-name="T74">– </text:span><text:span text:style-name="T74">10) </text:span><text:span text:style-name="T74">+ 1 * </text:span><text:span text:style-name="T74">(10 </text:span><text:span text:style-name="T74">– 1)</text:span></text:p>
            <text:p text:style-name="P79"><text:span text:style-name="T74">num</text:span><text:span text:style-name="T74">str_l</text:span><text:span text:style-name="T74">en(x</text:span><text:span text:style-name="T74">): <text:s/></text:span><text:span text:style-name="T74">(</text:span><text:span text:style-name="T77">p+</text:span><text:span text:style-name="T77">1) × </text:span><text:span text:style-name="T77">(x − </text:span><text:span text:style-name="T77">(10</text:span><text:span text:style-name="T78">p </text:span><text:span text:style-name="T77">-1)) </text:span><text:span text:style-name="T77">+</text:span><text:span text:style-name="T74"> </text:span><text:span text:style-name="T79">∑</text:span><text:span text:style-name="T80">k=1</text:span><text:span text:style-name="T81"> p</text:span><text:span text:style-name="T78"> <text:s text:c="8"/></text:span><text:span text:style-name="T77">(k*(</text:span><text:span text:style-name="T77">10</text:span><text:span text:style-name="T78">k</text:span><text:span text:style-name="T77">−</text:span><text:span text:style-name="T77">10</text:span><text:span text:style-name="T78">k − </text:span><text:span text:style-name="T78">1</text:span><text:span text:style-name="T77">)), <text:s/></text:span><text:span text:style-name="T77">con </text:span><text:span text:style-name="T77">p = </text:span><text:span text:style-name="T82">⌋</text:span><text:span text:style-name="T82">log</text:span><text:span text:style-name="T83">10</text:span><text:span text:style-name="T82">(x)⌊</text:span></text:p>
          </draw:text-box>
        </draw:frame>
        <draw:frame draw:style-name="gr294" draw:text-style-name="P81" draw:layer="layout" svg:width="14.969cm" svg:height="1.433cm" svg:x="5.307cm" svg:y="27.226cm">
          <draw:text-box>
            <text:p text:style-name="P80"><text:span text:style-name="T84">x =</text:span><text:span text:style-name="T85"> 2 *c </text:span><text:span text:style-name="T84">+ </text:span><text:span text:style-name="T86">l</text:span><text:span text:style-name="T84"> <text:s/>+ (</text:span><text:span text:style-name="T87">- 1</text:span><text:span text:style-name="T88">)</text:span><text:span text:style-name="T84">+ ∑</text:span><text:span text:style-name="T89">k=1</text:span><text:span text:style-name="T90"> p</text:span><text:span text:style-name="T91">(k*(10</text:span><text:span text:style-name="T92">k</text:span><text:span text:style-name="T91">−10</text:span><text:span text:style-name="T92">k − 1</text:span><text:span text:style-name="T91">)) + p × (l + 1 − <text:s/>10</text:span><text:span text:style-name="T92">p − 1</text:span><text:span text:style-name="T91">)</text:span></text:p>
          </draw:text-box>
        </draw:frame>
        <draw:frame draw:style-name="gr295" draw:text-style-name="P82" draw:layer="layout" svg:width="3.531cm" svg:height="1.337cm" svg:x="1.294cm" svg:y="26.966cm">
          <draw:text-box>
            <text:p text:style-name="P79"><text:span text:style-name="T93">c=caratteri diversi</text:span><text:span text:style-name="T93"><text:line-break/></text:span><text:span text:style-name="T94">l=lunghezza(src)</text:span><text:span text:style-name="T94"><text:line-break/></text:span><text:span text:style-name="T94">p= </text:span><text:span text:style-name="T95">⌋log</text:span><text:span text:style-name="T96">10</text:span><text:span text:style-name="T95">(x)⌊</text:span><text:span text:style-name="T95"><text:line-break/></text:span><text:span text:style-name="T95">P=⌈log</text:span><text:span text:style-name="T96">10</text:span><text:span text:style-name="T95">(x)⌉</text:span></text:p>
          </draw:text-box>
        </draw:frame>
      </draw:page>
      <draw:page draw:name="page9" draw:style-name="dp1" draw:master-page-name="master-page79">
        <draw:frame draw:name="occurrence_construct_cypher_text" draw:style-name="gr45" draw:text-style-name="P84" draw:layer="layout" svg:width="8.46cm" svg:height="0.624cm" svg:x="1.404cm" svg:y="2.826cm">
          <draw:text-box>
            <text:p text:style-name="P83"><text:span text:style-name="T97">oc</text:span><text:span text:style-name="T97">cu</text:span><text:span text:style-name="T97">rre</text:span><text:span text:style-name="T97">nc</text:span><text:span text:style-name="T97">e_</text:span><text:span text:style-name="T97">co</text:span><text:span text:style-name="T97">ns</text:span><text:span text:style-name="T97">tru</text:span><text:span text:style-name="T97">ct_</text:span><text:span text:style-name="T97">cy</text:span><text:span text:style-name="T97">ph</text:span><text:span text:style-name="T97">er</text:span><text:span text:style-name="T97">_te</text:span><text:span text:style-name="T97">xt:</text:span></text:p>
          </draw:text-box>
        </draw:frame>
        <draw:frame draw:style-name="gr15" draw:text-style-name="P15" draw:layer="layout" svg:width="0.943cm" svg:height="0.642cm" svg:x="1.478cm" svg:y="28.055cm">
          <draw:text-box>
            <text:p text:style-name="P1"><text:span text:style-name="T16">9</text:span></text:p>
          </draw:text-box>
        </draw:frame>
        <draw:frame draw:style-name="gr44" draw:text-style-name="P8" draw:layer="layout" svg:width="5.771cm" svg:height="0.543cm" svg:x="1.403cm" svg:y="2.028cm">
          <draw:text-box>
            <text:p text:style-name="P1"><text:span text:style-name="T7">Pr</text:span><text:span text:style-name="T7">oc</text:span><text:span text:style-name="T7">ed</text:span><text:span text:style-name="T7">ur</text:span><text:span text:style-name="T7">e </text:span><text:span text:style-name="T7">no</text:span><text:span text:style-name="T7">te</text:span><text:span text:style-name="T7">vo</text:span><text:span text:style-name="T7">li: </text:span></text:p>
          </draw:text-box>
        </draw:frame>
        <draw:frame draw:style-name="gr188" draw:text-style-name="P70" draw:layer="layout" svg:width="18.237cm" svg:height="2.141cm" svg:x="1.537cm" svg:y="3.623cm">
          <draw:text-box>
            <text:p text:style-name="P73"><text:span text:style-name="T61">U</text:span><text:span text:style-name="T61">n</text:span><text:span text:style-name="T61">a</text:span><text:span text:style-name="T61"> </text:span><text:span text:style-name="T61">v</text:span><text:span text:style-name="T61">o</text:span><text:span text:style-name="T61">l</text:span><text:span text:style-name="T61">t</text:span><text:span text:style-name="T61">a</text:span><text:span text:style-name="T61"> </text:span><text:span text:style-name="T61">p</text:span><text:span text:style-name="T61">r</text:span><text:span text:style-name="T61">e</text:span><text:span text:style-name="T61">s</text:span><text:span text:style-name="T61">a</text:span><text:span text:style-name="T61"> </text:span><text:span text:style-name="T61">l</text:span><text:span text:style-name="T61">a</text:span><text:span text:style-name="T61"> </text:span><text:span text:style-name="T56"><text:a xlink:href="#occurrence_map" xlink:type="simple">occurrence_map</text:a></text:span><text:span text:style-name="T55"><text:s/></text:span><text:span text:style-name="T55">c</text:span><text:span text:style-name="T55">a</text:span><text:span text:style-name="T55">l</text:span><text:span text:style-name="T55">c</text:span><text:span text:style-name="T55">o</text:span><text:span text:style-name="T55">l</text:span><text:span text:style-name="T55">a</text:span><text:span text:style-name="T55">t</text:span><text:span text:style-name="T55">a</text:span><text:span text:style-name="T55"> </text:span><text:span text:style-name="T55">p</text:span><text:span text:style-name="T55">r</text:span><text:span text:style-name="T55">e</text:span><text:span text:style-name="T55">c</text:span><text:span text:style-name="T55">e</text:span><text:span text:style-name="T55">d</text:span><text:span text:style-name="T55">e</text:span><text:span text:style-name="T55">n</text:span><text:span text:style-name="T55">t</text:span><text:span text:style-name="T55">e</text:span><text:span text:style-name="T55">m</text:span><text:span text:style-name="T55">e</text:span><text:span text:style-name="T55">n</text:span><text:span text:style-name="T55">t</text:span><text:span text:style-name="T55">e</text:span><text:span text:style-name="T55">,</text:span><text:span text:style-name="T55"> </text:span><text:span text:style-name="T55">i</text:span><text:span text:style-name="T55">t</text:span><text:span text:style-name="T55">e</text:span><text:span text:style-name="T55">r</text:span><text:span text:style-name="T55">a</text:span><text:span text:style-name="T55">r</text:span><text:span text:style-name="T55">e</text:span><text:span text:style-name="T55"> </text:span><text:span text:style-name="T55">s</text:span><text:span text:style-name="T55">u</text:span><text:span text:style-name="T55"> </text:span><text:span text:style-name="T55">e</text:span><text:span text:style-name="T55">s</text:span><text:span text:style-name="T55">s</text:span><text:span text:style-name="T55">a</text:span><text:span text:style-name="T55">:</text:span><text:span text:style-name="T55"><text:line-break/></text:span><text:span text:style-name="T55">P</text:span><text:span text:style-name="T55">e</text:span><text:span text:style-name="T55">r</text:span><text:span text:style-name="T55"> </text:span><text:span text:style-name="T55">o</text:span><text:span text:style-name="T55">g</text:span><text:span text:style-name="T55">n</text:span><text:span text:style-name="T55">i</text:span><text:span text:style-name="T55"> </text:span><text:span text:style-name="T55">l</text:span><text:span text:style-name="T55">i</text:span><text:span text:style-name="T55">s</text:span><text:span text:style-name="T55">t</text:span><text:span text:style-name="T55">a</text:span><text:span text:style-name="T55"> </text:span><text:span text:style-name="T55">n</text:span><text:span text:style-name="T55">o</text:span><text:span text:style-name="T55">n</text:span><text:span text:style-name="T55"> </text:span><text:span text:style-name="T55">n</text:span><text:span text:style-name="T55">u</text:span><text:span text:style-name="T55">l</text:span><text:span text:style-name="T55">l</text:span><text:span text:style-name="T55">a</text:span><text:span text:style-name="T55"> </text:span><text:span text:style-name="T55">i</text:span><text:span text:style-name="T55">n</text:span><text:span text:style-name="T55"> </text:span><text:span text:style-name="T55">i</text:span><text:span text:style-name="T55">n</text:span><text:span text:style-name="T55">d</text:span><text:span text:style-name="T55">i</text:span><text:span text:style-name="T55">c</text:span><text:span text:style-name="T55">e</text:span><text:span text:style-name="T55"> </text:span><text:span text:style-name="T55">i</text:span><text:span text:style-name="T55">:</text:span><text:span text:style-name="T55"> </text:span><text:span text:style-name="T55">s</text:span><text:span text:style-name="T55">i</text:span><text:span text:style-name="T55"> </text:span><text:span text:style-name="T55">a</text:span><text:span text:style-name="T55">g</text:span><text:span text:style-name="T55">g</text:span><text:span text:style-name="T55">i</text:span><text:span text:style-name="T55">u</text:span><text:span text:style-name="T55">n</text:span><text:span text:style-name="T55">g</text:span><text:span text:style-name="T55">e</text:span><text:span text:style-name="T55"> </text:span><text:span text:style-name="T55">i</text:span><text:span text:style-name="T55">l</text:span><text:span text:style-name="T55"> </text:span><text:span text:style-name="T55">c</text:span><text:span text:style-name="T55">a</text:span><text:span text:style-name="T55">r</text:span><text:span text:style-name="T55">a</text:span><text:span text:style-name="T55">t</text:span><text:span text:style-name="T55">t</text:span><text:span text:style-name="T55">e</text:span><text:span text:style-name="T55">r</text:span><text:span text:style-name="T55">e</text:span><text:span text:style-name="T55"> </text:span><text:span text:style-name="T55">i</text:span><text:span text:style-name="T55">n</text:span><text:span text:style-name="T55"> </text:span><text:span text:style-name="T55">c</text:span><text:span text:style-name="T55">o</text:span><text:span text:style-name="T55">d</text:span><text:span text:style-name="T55">i</text:span><text:span text:style-name="T55">f</text:span><text:span text:style-name="T55">i</text:span><text:span text:style-name="T55">c</text:span><text:span text:style-name="T55">a</text:span><text:span text:style-name="T55"> </text:span><text:span text:style-name="T55">a</text:span><text:span text:style-name="T55">s</text:span><text:span text:style-name="T55">c</text:span><text:span text:style-name="T55">i</text:span><text:span text:style-name="T55">i</text:span><text:span text:style-name="T55"> </text:span><text:span text:style-name="T55">i</text:span><text:span text:style-name="T55"> </text:span><text:span text:style-name="T55">+</text:span><text:span text:style-name="T55"> </text:span><text:span text:style-name="T55">3</text:span><text:span text:style-name="T55">2</text:span><text:span text:style-name="T55">,</text:span><text:span text:style-name="T55"> </text:span><text:span text:style-name="T55">p</text:span><text:span text:style-name="T55">o</text:span><text:span text:style-name="T55">i</text:span><text:span text:style-name="T55"> </text:span><text:span text:style-name="T55">p</text:span><text:span text:style-name="T55">e</text:span><text:span text:style-name="T55">r</text:span><text:span text:style-name="T55"> </text:span><text:span text:style-name="T55">o</text:span><text:span text:style-name="T55">g</text:span><text:span text:style-name="T55">n</text:span><text:span text:style-name="T55">i</text:span><text:span text:style-name="T55"> </text:span><text:span text:style-name="T55">n</text:span><text:span text:style-name="T55">o</text:span><text:span text:style-name="T55">d</text:span><text:span text:style-name="T55">o</text:span><text:span text:style-name="T55"> </text:span><text:span text:style-name="T55">n</text:span><text:span text:style-name="T55">e</text:span><text:span text:style-name="T55">l</text:span><text:span text:style-name="T55">l</text:span><text:span text:style-name="T55">a</text:span><text:span text:style-name="T55"> </text:span><text:span text:style-name="T55">l</text:span><text:span text:style-name="T55">i</text:span><text:span text:style-name="T55">s</text:span><text:span text:style-name="T55">t</text:span><text:span text:style-name="T55">a</text:span><text:span text:style-name="T55"> </text:span><text:span text:style-name="T55">s</text:span><text:span text:style-name="T55">i</text:span><text:span text:style-name="T55"> </text:span><text:span text:style-name="T55">a</text:span><text:span text:style-name="T55">p</text:span><text:span text:style-name="T55">p</text:span><text:span text:style-name="T55">e</text:span><text:span text:style-name="T55">n</text:span><text:span text:style-name="T55">d</text:span><text:span text:style-name="T55">e</text:span><text:span text:style-name="T55"> </text:span><text:span text:style-name="T55">‘</text:span><text:span text:style-name="T55">-</text:span><text:span text:style-name="T55">’</text:span><text:span text:style-name="T55"> </text:span><text:span text:style-name="T55">e</text:span><text:span text:style-name="T55"> </text:span><text:span text:style-name="T55">i</text:span><text:span text:style-name="T55">l</text:span><text:span text:style-name="T55"> </text:span><text:span text:style-name="T55">n</text:span><text:span text:style-name="T55">u</text:span><text:span text:style-name="T55">m</text:span><text:span text:style-name="T55">e</text:span><text:span text:style-name="T55">r</text:span><text:span text:style-name="T55">o</text:span><text:span text:style-name="T55"> </text:span><text:span text:style-name="T55">s</text:span><text:span text:style-name="T55">a</text:span><text:span text:style-name="T55">l</text:span><text:span text:style-name="T55">v</text:span><text:span text:style-name="T55">a</text:span><text:span text:style-name="T55">t</text:span><text:span text:style-name="T55">o</text:span><text:span text:style-name="T55"> </text:span><text:span text:style-name="T55">n</text:span><text:span text:style-name="T55">e</text:span><text:span text:style-name="T55">l</text:span><text:span text:style-name="T55"> </text:span><text:span text:style-name="T55">n</text:span><text:span text:style-name="T55">o</text:span><text:span text:style-name="T55">d</text:span><text:span text:style-name="T55">o</text:span><text:span text:style-name="T55"> </text:span><text:span text:style-name="T55">i</text:span><text:span text:style-name="T55">n</text:span><text:span text:style-name="T55"> </text:span><text:span text:style-name="T55">f</text:span><text:span text:style-name="T55">o</text:span><text:span text:style-name="T55">r</text:span><text:span text:style-name="T55">m</text:span><text:span text:style-name="T55">a</text:span><text:span text:style-name="T55">t</text:span><text:span text:style-name="T55">o</text:span><text:span text:style-name="T55"> </text:span><text:span text:style-name="T55">d</text:span><text:span text:style-name="T55">i</text:span><text:span text:style-name="T55"> </text:span><text:span text:style-name="T55">s</text:span><text:span text:style-name="T55">t</text:span><text:span text:style-name="T55">r</text:span><text:span text:style-name="T55">i</text:span><text:span text:style-name="T55">n</text:span><text:span text:style-name="T55">g</text:span><text:span text:style-name="T55">a</text:span><text:span text:style-name="T55">,</text:span><text:span text:style-name="T55"> </text:span><text:span text:style-name="T55">i</text:span><text:span text:style-name="T55">n</text:span><text:span text:style-name="T55">f</text:span><text:span text:style-name="T55">i</text:span><text:span text:style-name="T55">n</text:span><text:span text:style-name="T55">e</text:span><text:span text:style-name="T55"> </text:span><text:span text:style-name="T55">s</text:span><text:span text:style-name="T55">i</text:span><text:span text:style-name="T55"> </text:span><text:span text:style-name="T55">s</text:span><text:span text:style-name="T55">e</text:span><text:span text:style-name="T55">p</text:span><text:span text:style-name="T55">a</text:span><text:span text:style-name="T55">r</text:span><text:span text:style-name="T55">a</text:span><text:span text:style-name="T55"> </text:span><text:span text:style-name="T55">c</text:span><text:span text:style-name="T55">o</text:span><text:span text:style-name="T55">n</text:span><text:span text:style-name="T55"> </text:span><text:span text:style-name="T55">u</text:span><text:span text:style-name="T55">n</text:span><text:span text:style-name="T55">o</text:span><text:span text:style-name="T55"> </text:span><text:span text:style-name="T55">s</text:span><text:span text:style-name="T55">p</text:span><text:span text:style-name="T55">a</text:span><text:span text:style-name="T55">z</text:span><text:span text:style-name="T55">i</text:span><text:span text:style-name="T55">o</text:span><text:span text:style-name="T55">.</text:span></text:p>
          </draw:text-box>
        </draw:frame>
        <draw:g draw:style-name="gr48" xml:id="id82" draw:id="id82">
          <draw:path draw:style-name="gr296" draw:text-style-name="P34" draw:layer="layout" svg:width="0.5cm" svg:height="0.5cm" svg:x="2.299cm" svg:y="6.401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custom-shape draw:style-name="gr297" draw:text-style-name="P35" draw:layer="layout" svg:width="0.25cm" svg:height="0.25cm" svg:x="2.424cm" svg:y="6.526cm">
            <text:p/>
            <draw:enhanced-geometry svg:viewBox="0 0 21600 21600" draw:type="rectangle" draw:enhanced-path="M 0 0 L 21600 0 21600 21600 0 21600 0 0 Z N"/>
          </draw:custom-shape>
        </draw:g>
        <draw:connector draw:style-name="gr298" draw:text-style-name="P59" draw:layer="layout" svg:x1="3.619cm" svg:y1="6.637cm" svg:x2="2.8cm" svg:y2="6.651cm" draw:start-shape="id81" draw:start-glue-point="3" draw:end-shape="id82" draw:end-glue-point="1" svg:d="M3619 6637h-416v14h-403" svg:viewBox="0 0 820 15">
          <text:p/>
        </draw:connector>
        <draw:polygon draw:style-name="gr299" draw:text-style-name="P60" xml:id="id81" draw:id="id81" draw:layer="layout" svg:width="3.791cm" svg:height="1.422cm" svg:x="3.619cm" svg:y="5.926cm" svg:viewBox="0 0 3792 1423" draw:points="0,0 2369,0 2844,0 3791,0 3791,711 3792,712 3791,712 3791,1422 2844,1422 2844,1423 0,1423 948,712">
          <text:p text:style-name="P54"><text:span text:style-name="T29">In: dest_len, </text:span></text:p>
          <text:p text:style-name="P54"><text:span text:style-name="T59"><text:a xlink:href="#list_node" xlink:type="simple">list_node</text:a></text:span><text:span text:style-name="T69"><text:s/></text:span><text:span text:style-name="T29">[96] </text:span><text:span text:style-name="T59"><text:a xlink:href="#occurrence_map" xlink:type="simple">map</text:a></text:span></text:p>
        </draw:polygon>
        <draw:custom-shape draw:style-name="gr300" draw:text-style-name="P45" xml:id="id83" draw:id="id83" draw:layer="layout" svg:width="5.062cm" svg:height="1.265cm" draw:transform="skewX (0.00663225115757845) translate (8.43cm 6.012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I = 0;</text:span></text:p>
          <text:p text:style-name="P44"><text:span text:style-name="T29">dest = nuovo char [dest_len + 1];</text:span></text:p>
          <text:p text:style-name="P44"><text:span text:style-name="T29">caratteri_scritti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01" draw:text-style-name="P36" draw:layer="layout" svg:x1="8.422cm" svg:y1="6.644cm" svg:x2="7.411cm" svg:y2="6.637cm" draw:start-shape="id83" draw:start-glue-point="3" draw:end-shape="id81" draw:end-glue-point="1" svg:d="M8422 6644h-505v-7h-506" svg:viewBox="0 0 1012 8">
          <text:p/>
        </draw:connector>
        <draw:custom-shape draw:style-name="gr302" draw:text-style-name="P42" xml:id="id84" draw:id="id84" draw:layer="layout" svg:width="1cm" svg:height="1cm" svg:x="10.437cm" svg:y="8.0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draw:style-name="gr19">
          <draw:custom-shape draw:style-name="gr303" draw:text-style-name="P40" draw:layer="layout" svg:width="18.017cm" svg:height="7.063cm" svg:x="1.676cm" svg:y="7.694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4" draw:text-style-name="P61" draw:layer="layout" svg:width="5.702cm" svg:height="0.614cm" svg:x="1.676cm" svg:y="7.694cm">
            <text:p text:style-name="P44"><text:span text:style-name="T29">occurrence_con</text:span><text:span text:style-name="T29">struct_cypher_t</text:span><text:span text:style-name="T29">ext_loop</text:span></text:p>
            <draw:enhanced-geometry svg:viewBox="0 0 21600 21600" draw:mirror-horizontal="false" draw:mirror-vertical="false" draw:type="non-primitve" draw:enhanced-path="M 0 0 L 21600 0 19000 21600 0 21600 0 0 Z N"/>
          </draw:custom-shape>
        </draw:g>
        <draw:connector draw:style-name="gr305" draw:text-style-name="P36" draw:layer="layout" svg:x1="10.937cm" svg:y1="8.027cm" svg:x2="10.952cm" svg:y2="7.277cm" draw:start-shape="id84" draw:start-glue-point="4" draw:end-shape="id83" draw:end-glue-point="2" svg:d="M10937 8027v-380h15v-370" svg:viewBox="0 0 16 751">
          <text:p/>
        </draw:connector>
        <draw:custom-shape draw:style-name="gr306" draw:text-style-name="P42" xml:id="id86" draw:id="id86" draw:layer="layout" svg:width="1cm" svg:height="1cm" svg:x="10.437cm" svg:y="14.0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07" draw:text-style-name="P48" draw:layer="layout" svg:width="1.245cm" svg:height="0.601cm" svg:x="11.215cm" svg:y="8.377cm">
          <draw:text-box>
            <text:p text:style-name="P26"><text:span text:style-name="T29">[falso]</text:span></text:p>
          </draw:text-box>
        </draw:frame>
        <draw:connector draw:style-name="gr308" draw:text-style-name="P36" draw:layer="layout" svg:x1="2.337cm" svg:y1="9.527cm" svg:x2="10.437cm" svg:y2="8.527cm" draw:start-shape="id85" draw:start-glue-point="4" draw:end-shape="id84" draw:end-glue-point="5" svg:d="M2337 9527v-1000h8100" svg:viewBox="0 0 8101 1001">
          <text:p/>
        </draw:connector>
        <draw:frame draw:style-name="gr309" draw:text-style-name="P48" draw:layer="layout" svg:width="2.558cm" svg:height="0.601cm" svg:x="9.568cm" svg:y="7.694cm">
          <draw:text-box>
            <text:p text:style-name="P26"><text:span text:style-name="T29">[</text:span><text:span text:style-name="T29">i</text:span><text:span text:style-name="T29"> </text:span><text:span text:style-name="T29">&lt;</text:span><text:span text:style-name="T29"> </text:span><text:span text:style-name="T29">9</text:span><text:span text:style-name="T29">6</text:span><text:span text:style-name="T29">?</text:span><text:span text:style-name="T29">]</text:span></text:p>
          </draw:text-box>
        </draw:frame>
        <draw:frame draw:style-name="gr310" draw:text-style-name="P48" draw:layer="layout" svg:width="1.197cm" svg:height="0.668cm" svg:x="9.366cm" svg:y="8.427cm">
          <draw:text-box>
            <text:p text:style-name="P26"><text:span text:style-name="T29">[vero]</text:span></text:p>
          </draw:text-box>
        </draw:frame>
        <draw:connector draw:style-name="gr311" draw:text-style-name="P36" draw:layer="layout" draw:line-skew="7.371cm" svg:x1="11.437cm" svg:y1="14.527cm" svg:x2="11.437cm" svg:y2="8.527cm" draw:start-shape="id86" draw:start-glue-point="7" draw:end-shape="id84" draw:end-glue-point="7" svg:d="M11437 14527h7910v-6000h-7910" svg:viewBox="0 0 7911 6001">
          <text:p/>
        </draw:connector>
        <draw:connector draw:style-name="gr312" draw:text-style-name="P36" draw:layer="layout" svg:x1="10.927cm" svg:y1="15.685cm" svg:x2="10.937cm" svg:y2="15.027cm" draw:start-shape="id87" draw:start-glue-point="0" draw:end-shape="id86" draw:end-glue-point="6" svg:d="M10927 15685v-323h10v-335" svg:viewBox="0 0 11 659">
          <text:p/>
        </draw:connector>
        <draw:frame draw:style-name="gr313" draw:text-style-name="P48" draw:layer="layout" svg:width="1.715cm" svg:height="0.601cm" svg:x="9.036cm" svg:y="14.185cm">
          <draw:text-box>
            <text:p text:style-name="P26"><text:span text:style-name="T29">[end loop]</text:span></text:p>
          </draw:text-box>
        </draw:frame>
        <draw:custom-shape draw:style-name="gr314" draw:text-style-name="P45" xml:id="id89" draw:id="id89" draw:layer="layout" svg:width="2.757cm" svg:height="0.974cm" svg:x="13.751cm" svg:y="15.689cm">
          <text:p text:style-name="P44"><text:span text:style-name="T29">Out: dest</text:span></text:p>
          <draw:enhanced-geometry svg:viewBox="0 0 21600 21600" draw:text-areas="0 0 21600 21600" draw:type="pentagon-right" draw:modifiers="14755.0398839739" draw:enhanced-path="M 0 0 L ?f0 0 21600 10800 ?f0 21600 0 21600 Z N">
            <draw:equation draw:name="f0" draw:formula="$0 "/>
            <draw:handle draw:handle-range-x-minimum="0" draw:handle-range-x-maximum="21600" draw:handle-position="$0 top" draw:handle-position-x="$0" draw:handle-position-y="top"/>
          </draw:enhanced-geometry>
        </draw:custom-shape>
        <draw:g draw:style-name="gr78" xml:id="id88" draw:id="id88">
          <draw:path draw:style-name="gr315" draw:text-style-name="P49" draw:layer="layout" svg:width="0.5cm" svg:height="0.5cm" svg:x="17.499cm" svg:y="15.948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path draw:style-name="gr316" draw:text-style-name="P34" draw:layer="layout" svg:width="0.2cm" svg:height="0.2cm" svg:x="17.649cm" svg:y="16.098cm" svg:viewBox="0 0 201 201" svg:d="M201 101c0 17-5 34-13 50-9 15-22 28-37 37-16 8-33 13-50 13-18 0-35-5-51-13-15-9-28-22-37-37-8-16-13-33-13-50 0-18 5-35 13-51 9-15 22-28 37-37 16-8 33-13 51-13 17 0 34 5 50 13 15 9 28 22 37 37 8 16 13 33 13 51z">
            <text:p/>
          </draw:path>
        </draw:g>
        <draw:connector draw:style-name="gr317" draw:text-style-name="P36" draw:layer="layout" svg:x1="17.499cm" svg:y1="16.198cm" svg:x2="16.508cm" svg:y2="16.176cm" draw:start-shape="id88" draw:start-glue-point="3" draw:end-shape="id89" draw:end-glue-point="1" svg:d="M17499 16198h-495v-22h-496" svg:viewBox="0 0 992 23">
          <text:p/>
        </draw:connector>
        <draw:custom-shape draw:style-name="gr318" draw:text-style-name="P42" xml:id="id85" draw:id="id85" draw:layer="layout" svg:width="1cm" svg:height="1cm" svg:x="1.837cm" svg:y="9.5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9" draw:text-style-name="P45" xml:id="id90" draw:id="id90" draw:layer="layout" svg:width="1.376cm" svg:height="0.764cm" draw:transform="skewX (0.00663225115757845) translate (17.816cm 8.84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i</text:span><text:span text:style-name="T29">+</text:span><text:span text:style-name="T29">+</text:span><text:span text:style-name="T29">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20" draw:text-style-name="P36" draw:layer="layout" draw:line-skew="-0.344cm" svg:x1="10.937cm" svg:y1="9.027cm" svg:x2="17.811cm" svg:y2="9.222cm" draw:start-shape="id84" draw:start-glue-point="6" draw:end-shape="id90" draw:end-glue-point="3" svg:d="M10937 9027v195h3693 3181" svg:viewBox="0 0 6875 196">
          <text:p/>
        </draw:connector>
        <draw:custom-shape draw:style-name="gr321" draw:text-style-name="P42" xml:id="id91" draw:id="id91" draw:layer="layout" svg:width="1cm" svg:height="1cm" svg:x="18.024cm" svg:y="12.4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22" draw:text-style-name="P36" draw:layer="layout" svg:x1="18.499cm" svg:y1="9.604cm" svg:x2="18.524cm" svg:y2="12.441cm" draw:start-shape="id90" draw:start-glue-point="2" draw:end-shape="id91" draw:end-glue-point="4" svg:d="M18499 9604v1414h25v1423" svg:viewBox="0 0 26 2838">
          <text:p/>
        </draw:connector>
        <draw:connector draw:style-name="gr323" draw:text-style-name="P36" draw:layer="layout" draw:line-skew="0cm 0.261cm" svg:x1="12.771cm" svg:y1="12.199cm" svg:x2="16.805cm" svg:y2="12.476cm" draw:start-shape="id92" draw:start-glue-point="1" draw:end-shape="id93" draw:end-glue-point="4" svg:d="M12771 12199h1761 2273v277" svg:viewBox="0 0 4035 278">
          <text:p/>
        </draw:connector>
        <draw:connector draw:style-name="gr324" draw:text-style-name="P36" draw:layer="layout" svg:x1="18.024cm" svg:y1="12.941cm" svg:x2="17.305cm" svg:y2="12.976cm" draw:start-shape="id91" draw:start-glue-point="5" draw:end-shape="id93" draw:end-glue-point="7" svg:d="M18024 12941h-359v35h-360" svg:viewBox="0 0 720 36">
          <text:p/>
        </draw:connector>
        <draw:connector draw:style-name="gr325" draw:text-style-name="P36" draw:layer="layout" svg:x1="18.524cm" svg:y1="13.441cm" svg:x2="2.337cm" svg:y2="10.527cm" draw:start-shape="id91" draw:start-glue-point="6" draw:end-shape="id85" draw:end-glue-point="6" svg:d="M18524 13441v539h-16187v-3453" svg:viewBox="0 0 16188 3454">
          <text:p/>
        </draw:connector>
        <draw:frame draw:style-name="gr326" draw:text-style-name="P48" draw:layer="layout" svg:width="1.197cm" svg:height="0.668cm" svg:x="2.191cm" svg:y="13.312cm">
          <draw:text-box>
            <text:p text:style-name="P26"><text:span text:style-name="T29">[vero]</text:span></text:p>
          </draw:text-box>
        </draw:frame>
        <draw:frame draw:style-name="gr327" draw:text-style-name="P48" draw:layer="layout" svg:width="1.245cm" svg:height="0.601cm" svg:x="2.75cm" svg:y="9.926cm">
          <draw:text-box>
            <text:p text:style-name="P26"><text:span text:style-name="T29">[falso]</text:span></text:p>
          </draw:text-box>
        </draw:frame>
        <draw:custom-shape draw:style-name="gr328" draw:text-style-name="P45" xml:id="id95" draw:id="id95" draw:layer="layout" svg:width="4.447cm" svg:height="1.073cm" draw:transform="skewX (0.00663225115757845) translate (8.036cm 9.454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nodo = map[i]</text:span></text:p>
          <text:p text:style-name="P44"><text:span text:style-name="T29">dest[caratteri_scritti] = i + 32;</text:span></text:p>
          <text:p text:style-name="P44"><text:span text:style-name="T29">caratteri_scritti++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29" draw:text-style-name="P36" draw:layer="layout" svg:x1="4.262cm" svg:y1="10.015cm" svg:x2="2.837cm" svg:y2="10.027cm" draw:start-shape="id94" draw:start-glue-point="5" draw:end-shape="id85" draw:end-glue-point="7" svg:d="M4262 10015h-712v12h-713" svg:viewBox="0 0 1426 13">
          <text:p/>
        </draw:connector>
        <draw:connector draw:style-name="gr330" draw:text-style-name="P36" draw:layer="layout" svg:x1="10.303cm" svg:y1="11.291cm" svg:x2="10.252cm" svg:y2="10.527cm" draw:start-shape="id92" draw:start-glue-point="0" draw:end-shape="id95" draw:end-glue-point="2" svg:d="M10303 11291v-382h-51v-382" svg:viewBox="0 0 52 765">
          <text:p/>
        </draw:connector>
        <draw:frame draw:style-name="gr331" draw:text-style-name="P48" draw:layer="layout" svg:width="2.558cm" svg:height="0.601cm" svg:x="2.162cm" svg:y="8.425cm">
          <draw:text-box>
            <text:p text:style-name="P26"><text:span text:style-name="T29">[map[i] </text:span><text:span text:style-name="T29">== 0?]</text:span></text:p>
          </draw:text-box>
        </draw:frame>
        <draw:custom-shape draw:style-name="gr332" draw:text-style-name="P42" xml:id="id94" draw:id="id94" draw:layer="layout" svg:width="1cm" svg:height="1cm" svg:x="4.262cm" svg:y="9.5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3" draw:text-style-name="P36" draw:layer="layout" svg:x1="6.408cm" svg:y1="9.964cm" svg:x2="5.262cm" svg:y2="10.015cm" draw:start-shape="id96" draw:start-glue-point="5" draw:end-shape="id94" draw:end-glue-point="7" svg:d="M6408 9964h-572v51h-574" svg:viewBox="0 0 1147 52">
          <text:p/>
        </draw:connector>
        <draw:connector draw:style-name="gr334" draw:text-style-name="P36" draw:layer="layout" draw:line-skew="0cm -0.244cm" svg:x1="6.908cm" svg:y1="10.464cm" svg:x2="6.626cm" svg:y2="12.158cm" draw:start-shape="id96" draw:start-glue-point="6" draw:end-shape="id97" draw:end-glue-point="1" svg:d="M6908 10464v616 1078h-282" svg:viewBox="0 0 283 1695">
          <text:p/>
        </draw:connector>
        <draw:frame draw:style-name="gr335" draw:text-style-name="P48" draw:layer="layout" svg:width="1.245cm" svg:height="0.668cm" svg:x="3.549cm" svg:y="11.116cm">
          <draw:text-box>
            <text:p text:style-name="P26"><text:span text:style-name="T29">[falso]</text:span></text:p>
          </draw:text-box>
        </draw:frame>
        <draw:custom-shape draw:style-name="gr336" draw:text-style-name="P45" xml:id="id97" draw:id="id97" draw:layer="layout" svg:width="3.799cm" svg:height="0.949cm" draw:transform="skewX (0.00663225115757845) translate (2.827cm 11.684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dest[caratteri_scritti] = ' ';</text:span></text:p>
          <text:p text:style-name="P44"><text:span text:style-name="T29">caratteri_scritti++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37" draw:text-style-name="P36" draw:layer="layout" svg:x1="4.726cm" svg:y1="11.684cm" svg:x2="4.762cm" svg:y2="10.515cm" draw:start-shape="id97" draw:start-glue-point="0" draw:end-shape="id94" draw:end-glue-point="6" svg:d="M4726 11684v-579h36v-590" svg:viewBox="0 0 37 1170">
          <text:p/>
        </draw:connector>
        <draw:frame draw:style-name="gr338" draw:text-style-name="P48" draw:layer="layout" svg:width="1.245cm" svg:height="0.601cm" svg:x="5.533cm" svg:y="8.956cm">
          <draw:text-box>
            <text:p text:style-name="P26"><text:span text:style-name="T29">[vero]</text:span></text:p>
          </draw:text-box>
        </draw:frame>
        <draw:frame draw:style-name="gr339" draw:text-style-name="P48" draw:layer="layout" svg:width="2.487cm" svg:height="0.545cm" svg:x="3.088cm" svg:y="9.112cm">
          <draw:text-box>
            <text:p text:style-name="P26"><text:span text:style-name="T29">[c..scritti == 0?]</text:span></text:p>
          </draw:text-box>
        </draw:frame>
        <draw:custom-shape draw:style-name="gr340" draw:text-style-name="P42" xml:id="id96" draw:id="id96" draw:layer="layout" svg:width="1cm" svg:height="1cm" svg:x="6.408cm" svg:y="9.4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41" draw:text-style-name="P36" draw:layer="layout" svg:x1="8.029cm" svg:y1="9.99cm" svg:x2="7.408cm" svg:y2="9.964cm" draw:start-shape="id95" draw:start-glue-point="3" draw:end-shape="id96" draw:end-glue-point="7" svg:d="M8029 9990h-304v-26h-317" svg:viewBox="0 0 622 27">
          <text:p/>
        </draw:connector>
        <draw:custom-shape draw:style-name="gr342" draw:text-style-name="P42" xml:id="id93" draw:id="id93" draw:layer="layout" svg:width="1cm" svg:height="1cm" svg:x="16.305cm" svg:y="12.4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3" draw:text-style-name="P45" xml:id="id92" draw:id="id92" draw:layer="layout" svg:width="4.935cm" svg:height="1.817cm" draw:transform="skewX (0.00663225115757845) translate (7.836cm 11.291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numstr = "-" + uitoa(nodo.val)*;</text:span><text:span text:style-name="T29"><text:line-break/></text:span><text:span text:style-name="T29">caratteri_scritti += </text:span><text:span text:style-name="T29"><text:line-break/></text:span><text:span text:style-name="T29">strnlcpy(dest + c..scritti, numstr)**;</text:span></text:p>
          <text:p text:style-name="P44"><text:span text:style-name="T29">nodo = nodo.prossimo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44" draw:text-style-name="P36" draw:layer="layout" draw:line-skew="-0.539cm" svg:x1="16.805cm" svg:y1="13.476cm" svg:x2="10.291cm" svg:y2="13.108cm" draw:start-shape="id93" draw:start-glue-point="6" draw:end-shape="id92" draw:end-glue-point="2" svg:d="M16805 13476h-6514v-368" svg:viewBox="0 0 6515 369">
          <text:p/>
        </draw:connector>
        <draw:frame draw:style-name="gr345" draw:text-style-name="P48" draw:layer="layout" svg:width="2.535cm" svg:height="0.601cm" svg:x="13.975cm" svg:y="12.65cm">
          <draw:text-box>
            <text:p text:style-name="P26"><text:span text:style-name="T29">[while nodo != 0]</text:span></text:p>
          </draw:text-box>
        </draw:frame>
        <draw:custom-shape draw:style-name="gr346" draw:text-style-name="P45" xml:id="id87" draw:id="id87" draw:layer="layout" svg:width="3.799cm" svg:height="0.949cm" draw:transform="skewX (0.00663225115757845) translate (9.028cm 15.685cm)">
          <draw:glue-point draw:id="4" svg:x="1.685cm" svg:y="-4.994cm"/>
          <draw:glue-point draw:id="5" svg:x="-1.622cm" svg:y="-4.994cm"/>
          <draw:glue-point draw:id="6" svg:x="-3.336cm" svg:y="4.994cm"/>
          <draw:glue-point draw:id="7" svg:x="3.281cm" svg:y="4.994cm"/>
          <draw:glue-point draw:id="8" svg:x="1.624cm" svg:y="4.994cm"/>
          <draw:glue-point draw:id="9" svg:x="-1.682cm" svg:y="4.994cm"/>
          <draw:glue-point draw:id="10" svg:x="-3.278cm" svg:y="-4.994cm"/>
          <draw:glue-point draw:id="11" svg:x="3.339cm" svg:y="-4.994cm"/>
          <draw:glue-point draw:id="12" svg:x="-4.943cm" svg:y="-3.326cm"/>
          <draw:glue-point draw:id="13" svg:x="-4.987cm" svg:y="3.326cm"/>
          <draw:glue-point draw:id="14" svg:x="4.946cm" svg:y="3.326cm"/>
          <draw:glue-point draw:id="15" svg:x="4.989cm" svg:y="-3.326cm"/>
          <text:p text:style-name="P44"><text:span text:style-name="T29">dest[caratteri_scritti]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47" draw:text-style-name="P36" draw:layer="layout" svg:x1="13.751cm" svg:y1="16.176cm" svg:x2="12.827cm" svg:y2="16.159cm" draw:start-shape="id89" draw:start-glue-point="3" draw:end-shape="id87" draw:end-glue-point="1" svg:d="M13751 16176h-463v-17h-461" svg:viewBox="0 0 925 18">
          <text:p/>
        </draw:connector>
      </draw:page>
      <draw:page draw:name="page10" draw:style-name="dp1" draw:master-page-name="master-page79">
        <draw:frame draw:name="get_occurrence_map 2" draw:style-name="gr45" draw:text-style-name="P31" draw:layer="layout" svg:width="8.415cm" svg:height="0.543cm" svg:x="1.404cm" svg:y="2.826cm">
          <draw:text-box>
            <text:p text:style-name="P73"><text:span text:style-name="T54">occurrence_construct_cypher_text:</text:span></text:p>
          </draw:text-box>
        </draw:frame>
        <draw:frame draw:style-name="gr15" draw:text-style-name="P15" draw:layer="layout" svg:width="0.943cm" svg:height="0.642cm" svg:x="1.478cm" svg:y="28.055cm">
          <draw:text-box>
            <text:p text:style-name="P1"><text:span text:style-name="T16">9</text:span></text:p>
          </draw:text-box>
        </draw:frame>
        <draw:frame draw:style-name="gr44" draw:text-style-name="P8" draw:layer="layout" svg:width="5.771cm" svg:height="0.543cm" svg:x="1.403cm" svg:y="2.028cm">
          <draw:text-box>
            <text:p text:style-name="P1"><text:span text:style-name="T7">Procedure notevoli: </text:span></text:p>
          </draw:text-box>
        </draw:frame>
      </draw:page>
      <draw:page draw:name="page11" draw:style-name="dp1" draw:master-page-name="master-page79">
        <draw:frame draw:style-name="gr8" draw:text-style-name="P7" draw:layer="layout" svg:width="0.388cm" svg:height="0.437cm" svg:x="10.401cm" svg:y="27.996cm">
          <draw:text-box>
            <text:p text:style-name="P1"><text:span text:style-name="T16">8 </text:span></text:p>
          </draw:text-box>
        </draw:frame>
        <draw:frame draw:style-name="gr348" draw:text-style-name="P85" draw:layer="layout" svg:width="6.257cm" svg:height="0.543cm" svg:x="1.401cm" svg:y="2.026cm">
          <draw:text-box>
            <text:p text:style-name="P1"><text:span text:style-name="T98">Note </text:span><text:span text:style-name="T98">e </text:span><text:span text:style-name="T98">Moda</text:span><text:span text:style-name="T98">lità di </text:span><text:span text:style-name="T98">Conse</text:span><text:span text:style-name="T98">gna </text:span></text:p>
          </draw:text-box>
        </draw:frame>
        <draw:frame draw:style-name="gr349" draw:text-style-name="P86" draw:layer="layout" svg:width="1.147cm" svg:height="0.501cm" svg:x="1.401cm" svg:y="3.043cm">
          <draw:text-box>
            <text:p text:style-name="P1"><text:span text:style-name="T99">Note <text:s/></text:span></text:p>
          </draw:text-box>
        </draw:frame>
        <draw:frame draw:style-name="gr350" draw:text-style-name="P87" draw:layer="layout" svg:width="0.422cm" svg:height="0.422cm" svg:x="1.401cm" svg:y="3.771cm">
          <draw:text-box>
            <text:p text:style-name="P1"><text:span text:style-name="T100">•</text:span></text:p>
          </draw:text-box>
        </draw:frame>
        <draw:frame draw:style-name="gr351" draw:text-style-name="P87" draw:layer="layout" svg:width="0.422cm" svg:height="0.467cm" svg:x="1.596cm" svg:y="3.683cm">
          <draw:text-box>
            <text:p text:style-name="P1"><text:span text:style-name="T101"><text:s/></text:span></text:p>
          </draw:text-box>
        </draw:frame>
        <draw:frame draw:style-name="gr352" draw:text-style-name="P87" draw:layer="layout" svg:width="18.315cm" svg:height="0.467cm" svg:x="2.036cm" svg:y="3.683cm">
          <draw:text-box>
            <text:p text:style-name="P1"><text:span text:style-name="T102">S</text:span><text:span text:style-name="T102">eg</text:span><text:span text:style-name="T102">uir</text:span><text:span text:style-name="T102">e </text:span><text:span text:style-name="T102">fe</text:span><text:span text:style-name="T102">de</text:span><text:span text:style-name="T102">lm</text:span><text:span text:style-name="T102">en</text:span><text:span text:style-name="T102">te </text:span><text:span text:style-name="T102">tut</text:span><text:span text:style-name="T102">te </text:span><text:span text:style-name="T102">le </text:span><text:span text:style-name="T102">sp</text:span><text:span text:style-name="T102">ec</text:span><text:span text:style-name="T102">ifi</text:span><text:span text:style-name="T102">ch</text:span><text:span text:style-name="T102">e </text:span><text:span text:style-name="T102">de</text:span><text:span text:style-name="T102">ll’</text:span><text:span text:style-name="T102">es</text:span><text:span text:style-name="T102">er</text:span><text:span text:style-name="T102">ci</text:span><text:span text:style-name="T102">zi</text:span><text:span text:style-name="T102">o </text:span><text:span text:style-name="T102">(in</text:span><text:span text:style-name="T102">cl</text:span><text:span text:style-name="T102">us</text:span><text:span text:style-name="T102">e </text:span><text:span text:style-name="T102">qu</text:span><text:span text:style-name="T102">ell</text:span><text:span text:style-name="T102">e </text:span><text:span text:style-name="T102">rel</text:span><text:span text:style-name="T102">ati</text:span><text:span text:style-name="T102">ve </text:span><text:span text:style-name="T102">ai </text:span><text:span text:style-name="T102">no</text:span><text:span text:style-name="T102">mi </text:span><text:span text:style-name="T102">de</text:span><text:span text:style-name="T102">lle </text:span><text:span text:style-name="T102">va</text:span><text:span text:style-name="T102">ria</text:span><text:span text:style-name="T102">bil</text:span><text:span text:style-name="T102">i e </text:span><text:span text:style-name="T102">al </text:span></text:p>
          </draw:text-box>
        </draw:frame>
        <draw:frame draw:style-name="gr353" draw:text-style-name="P87" draw:layer="layout" svg:width="5.228cm" svg:height="0.467cm" svg:x="2.036cm" svg:y="4.276cm">
          <draw:text-box>
            <text:p text:style-name="P1"><text:span text:style-name="T102">for</text:span><text:span text:style-name="T102">mat</text:span><text:span text:style-name="T102">o </text:span><text:span text:style-name="T102">del </text:span><text:span text:style-name="T102">loro </text:span><text:span text:style-name="T102">con</text:span><text:span text:style-name="T102">ten</text:span><text:span text:style-name="T102">uto)</text:span><text:span text:style-name="T102">. <text:s/></text:span></text:p>
          </draw:text-box>
        </draw:frame>
        <draw:frame draw:style-name="gr350" draw:text-style-name="P87" draw:layer="layout" svg:width="0.422cm" svg:height="0.422cm" svg:x="1.401cm" svg:y="4.981cm">
          <draw:text-box>
            <text:p text:style-name="P1"><text:span text:style-name="T100">•</text:span></text:p>
          </draw:text-box>
        </draw:frame>
        <draw:frame draw:style-name="gr351" draw:text-style-name="P87" draw:layer="layout" svg:width="0.422cm" svg:height="0.467cm" svg:x="1.596cm" svg:y="4.894cm">
          <draw:text-box>
            <text:p text:style-name="P1"><text:span text:style-name="T101"><text:s/></text:span></text:p>
          </draw:text-box>
        </draw:frame>
        <draw:polygon draw:style-name="gr354" draw:text-style-name="P88" draw:layer="layout" svg:width="16.175cm" svg:height="0.029cm" svg:x="2.036cm" svg:y="5.321cm" svg:viewBox="0 0 16176 30" draw:points="0,0 16176,0 16176,30 0,30">
          <text:p/>
        </draw:polygon>
        <draw:frame draw:style-name="gr355" draw:text-style-name="P87" draw:layer="layout" svg:width="17.964cm" svg:height="0.467cm" svg:x="2.036cm" svg:y="4.894cm">
          <draw:text-box>
            <text:p text:style-name="P1"><text:span text:style-name="T102">Rendere il </text:span><text:span text:style-name="T102">codice </text:span><text:span text:style-name="T103">modulare </text:span><text:span text:style-name="T102">utilizzando </text:span><text:span text:style-name="T102">ove </text:span><text:span text:style-name="T102">opportuno </text:span><text:span text:style-name="T103">chiamate a </text:span><text:span text:style-name="T103">procedure </text:span><text:span text:style-name="T102">e </text:span><text:span text:style-name="T103">rispettando </text:span><text:span text:style-name="T103">le </text:span></text:p>
          </draw:text-box>
        </draw:frame>
        <draw:polygon draw:style-name="gr354" draw:text-style-name="P88" draw:layer="layout" svg:width="8.462cm" svg:height="0.03cm" svg:x="2.036cm" svg:y="5.913cm" svg:viewBox="0 0 8463 31" draw:points="0,0 8463,0 8463,31 0,31">
          <text:p/>
        </draw:polygon>
        <draw:frame draw:style-name="gr356" draw:text-style-name="P87" draw:layer="layout" svg:width="17.666cm" svg:height="0.467cm" svg:x="2.036cm" svg:y="5.486cm">
          <draw:text-box>
            <text:p text:style-name="P1"><text:span text:style-name="T103">convenzioni fra procedura chiamante/chiamata</text:span><text:span text:style-name="T102">. La modularità del codice ed il rispetto delle </text:span></text:p>
          </draw:text-box>
        </draw:frame>
        <draw:frame draw:style-name="gr357" draw:text-style-name="P87" draw:layer="layout" svg:width="16.88cm" svg:height="0.467cm" svg:x="2.036cm" svg:y="6.079cm">
          <draw:text-box>
            <text:p text:style-name="P1"><text:span text:style-name="T102">c</text:span><text:span text:style-name="T102">o</text:span><text:span text:style-name="T102">n</text:span><text:span text:style-name="T102">v</text:span><text:span text:style-name="T102">e</text:span><text:span text:style-name="T102">n</text:span><text:span text:style-name="T102">z</text:span><text:span text:style-name="T102">i</text:span><text:span text:style-name="T102">o</text:span><text:span text:style-name="T102">n</text:span><text:span text:style-name="T102">i</text:span><text:span text:style-name="T102"> </text:span><text:span text:style-name="T102">s</text:span><text:span text:style-name="T102">a</text:span><text:span text:style-name="T102">r</text:span><text:span text:style-name="T102">a</text:span><text:span text:style-name="T102">n</text:span><text:span text:style-name="T102">n</text:span><text:span text:style-name="T102">o</text:span><text:span text:style-name="T102"> </text:span><text:span text:style-name="T102">a</text:span><text:span text:style-name="T102">s</text:span><text:span text:style-name="T102">p</text:span><text:span text:style-name="T102">e</text:span><text:span text:style-name="T102">t</text:span><text:span text:style-name="T102">t</text:span><text:span text:style-name="T102">i</text:span><text:span text:style-name="T102"> </text:span><text:span text:style-name="T102">f</text:span><text:span text:style-name="T102">o</text:span><text:span text:style-name="T102">n</text:span><text:span text:style-name="T102">d</text:span><text:span text:style-name="T102">a</text:span><text:span text:style-name="T102">m</text:span><text:span text:style-name="T102">e</text:span><text:span text:style-name="T102">n</text:span><text:span text:style-name="T102">t</text:span><text:span text:style-name="T102">a</text:span><text:span text:style-name="T102">l</text:span><text:span text:style-name="T102">i</text:span><text:span text:style-name="T102"> </text:span><text:span text:style-name="T102">p</text:span><text:span text:style-name="T102">e</text:span><text:span text:style-name="T102">r</text:span><text:span text:style-name="T102"> </text:span><text:span text:style-name="T102">o</text:span><text:span text:style-name="T102">t</text:span><text:span text:style-name="T102">t</text:span><text:span text:style-name="T102">e</text:span><text:span text:style-name="T102">n</text:span><text:span text:style-name="T102">e</text:span><text:span text:style-name="T102">r</text:span><text:span text:style-name="T102">e</text:span><text:span text:style-name="T102"> </text:span><text:span text:style-name="T102">u</text:span><text:span text:style-name="T102">n</text:span><text:span text:style-name="T102">’</text:span><text:span text:style-name="T102">o</text:span><text:span text:style-name="T102">t</text:span><text:span text:style-name="T102">t</text:span><text:span text:style-name="T102">i</text:span><text:span text:style-name="T102">m</text:span><text:span text:style-name="T102">a</text:span><text:span text:style-name="T102"> </text:span><text:span text:style-name="T102">v</text:span><text:span text:style-name="T102">a</text:span><text:span text:style-name="T102">l</text:span><text:span text:style-name="T102">u</text:span><text:span text:style-name="T102">t</text:span><text:span text:style-name="T102">a</text:span><text:span text:style-name="T102">z</text:span><text:span text:style-name="T102">i</text:span><text:span text:style-name="T102">o</text:span><text:span text:style-name="T102">n</text:span><text:span text:style-name="T102">e</text:span><text:span text:style-name="T102"> </text:span><text:span text:style-name="T102">d</text:span><text:span text:style-name="T102">e</text:span><text:span text:style-name="T102">l</text:span><text:span text:style-name="T102"> </text:span><text:span text:style-name="T102">p</text:span><text:span text:style-name="T102">r</text:span><text:span text:style-name="T102">o</text:span><text:span text:style-name="T102">g</text:span><text:span text:style-name="T102">e</text:span><text:span text:style-name="T102">t</text:span><text:span text:style-name="T102">t</text:span><text:span text:style-name="T102">o</text:span><text:span text:style-name="T102">.</text:span><text:span text:style-name="T102"> </text:span><text:span text:style-name="T102">S</text:span><text:span text:style-name="T102">i</text:span><text:span text:style-name="T102"> </text:span></text:p>
          </draw:text-box>
        </draw:frame>
        <draw:frame draw:style-name="gr358" draw:text-style-name="P87" draw:layer="layout" svg:width="18.675cm" svg:height="0.467cm" svg:x="2.036cm" svg:y="6.676cm">
          <draw:text-box>
            <text:p text:style-name="P1"><text:span text:style-name="T102">richiede in particolare di </text:span><text:span text:style-name="T104">implementare ogni cifrario (ciascun algoritmo A-B-C-D-E, e le loro inversioni </text:span></text:p>
          </draw:text-box>
        </draw:frame>
        <draw:frame draw:style-name="gr359" draw:text-style-name="P87" draw:layer="layout" svg:width="16.827cm" svg:height="0.467cm" svg:x="2.036cm" svg:y="7.269cm">
          <draw:text-box>
            <text:p text:style-name="P1"><text:span text:style-name="T104">p</text:span><text:span text:style-name="T104">e</text:span><text:span text:style-name="T104">r</text:span><text:span text:style-name="T104"> </text:span><text:span text:style-name="T104">l</text:span><text:span text:style-name="T104">a</text:span><text:span text:style-name="T104"> </text:span><text:span text:style-name="T104">d</text:span><text:span text:style-name="T104">e</text:span><text:span text:style-name="T104">c</text:span><text:span text:style-name="T104">i</text:span><text:span text:style-name="T104">f</text:span><text:span text:style-name="T104">r</text:span><text:span text:style-name="T104">a</text:span><text:span text:style-name="T104">t</text:span><text:span text:style-name="T104">u</text:span><text:span text:style-name="T104">r</text:span><text:span text:style-name="T104">a</text:span><text:span text:style-name="T104">)</text:span><text:span text:style-name="T104"> </text:span><text:span text:style-name="T104">c</text:span><text:span text:style-name="T104">o</text:span><text:span text:style-name="T104">m</text:span><text:span text:style-name="T104">e</text:span><text:span text:style-name="T104"> </text:span><text:span text:style-name="T104">u</text:span><text:span text:style-name="T104">n</text:span><text:span text:style-name="T104">a</text:span><text:span text:style-name="T104"> </text:span><text:span text:style-name="T104">p</text:span><text:span text:style-name="T104">r</text:span><text:span text:style-name="T104">o</text:span><text:span text:style-name="T104">c</text:span><text:span text:style-name="T104">e</text:span><text:span text:style-name="T104">d</text:span><text:span text:style-name="T104">u</text:span><text:span text:style-name="T104">r</text:span><text:span text:style-name="T104">a</text:span><text:span text:style-name="T104"> </text:span><text:span text:style-name="T104">s</text:span><text:span text:style-name="T104">e</text:span><text:span text:style-name="T104">p</text:span><text:span text:style-name="T104">a</text:span><text:span text:style-name="T104">r</text:span><text:span text:style-name="T104">a</text:span><text:span text:style-name="T104">t</text:span><text:span text:style-name="T104">a</text:span><text:span text:style-name="T104"> </text:span><text:span text:style-name="T104">(</text:span><text:span text:style-name="T104">c</text:span><text:span text:style-name="T104">h</text:span><text:span text:style-name="T104">i</text:span><text:span text:style-name="T104">a</text:span><text:span text:style-name="T104">m</text:span><text:span text:style-name="T104">a</text:span><text:span text:style-name="T104">t</text:span><text:span text:style-name="T104">e</text:span><text:span text:style-name="T104"> </text:span><text:span text:style-name="T104">c</text:span><text:span text:style-name="T104">o</text:span><text:span text:style-name="T104">n</text:span><text:span text:style-name="T104"> </text:span><text:span text:style-name="T104">j</text:span><text:span text:style-name="T104">a</text:span><text:span text:style-name="T104">l</text:span><text:span text:style-name="T104">,</text:span><text:span text:style-name="T104"> </text:span><text:span text:style-name="T104">n</text:span><text:span text:style-name="T104">o</text:span><text:span text:style-name="T104">n</text:span><text:span text:style-name="T104"> </text:span><text:span text:style-name="T104">c</text:span><text:span text:style-name="T104">o</text:span><text:span text:style-name="T104">n</text:span><text:span text:style-name="T104"> </text:span><text:span text:style-name="T104">d</text:span><text:span text:style-name="T104">e</text:span><text:span text:style-name="T104">l</text:span><text:span text:style-name="T104">l</text:span><text:span text:style-name="T104">e</text:span><text:span text:style-name="T104"> </text:span><text:span text:style-name="T104">b</text:span><text:span text:style-name="T104">r</text:span><text:span text:style-name="T104">a</text:span><text:span text:style-name="T104">n</text:span><text:span text:style-name="T104">c</text:span><text:span text:style-name="T104">h</text:span><text:span text:style-name="T104">)</text:span><text:span text:style-name="T104">.</text:span><text:span text:style-name="T104"> </text:span></text:p>
          </draw:text-box>
        </draw:frame>
        <draw:frame draw:style-name="gr350" draw:text-style-name="P87" draw:layer="layout" svg:width="0.422cm" svg:height="0.422cm" svg:x="1.401cm" svg:y="7.974cm">
          <draw:text-box>
            <text:p text:style-name="P1"><text:span text:style-name="T100">•</text:span></text:p>
          </draw:text-box>
        </draw:frame>
        <draw:frame draw:style-name="gr351" draw:text-style-name="P87" draw:layer="layout" svg:width="0.422cm" svg:height="0.467cm" svg:x="1.596cm" svg:y="7.887cm">
          <draw:text-box>
            <text:p text:style-name="P1"><text:span text:style-name="T101"><text:s/></text:span></text:p>
          </draw:text-box>
        </draw:frame>
        <draw:frame draw:style-name="gr360" draw:text-style-name="P87" draw:layer="layout" svg:width="17.521cm" svg:height="0.467cm" svg:x="2.036cm" svg:y="7.887cm">
          <draw:text-box>
            <text:p text:style-name="P1"><text:span text:style-name="T102">Co</text:span><text:span text:style-name="T102">mm</text:span><text:span text:style-name="T102">ent</text:span><text:span text:style-name="T102">are </text:span><text:span text:style-name="T102">in </text:span><text:span text:style-name="T102">mo</text:span><text:span text:style-name="T102">do </text:span><text:span text:style-name="T102">sig</text:span><text:span text:style-name="T102">nific</text:span><text:span text:style-name="T102">ativ</text:span><text:span text:style-name="T102">o </text:span><text:span text:style-name="T102">(no</text:span><text:span text:style-name="T102">n </text:span><text:span text:style-name="T102">co</text:span><text:span text:style-name="T102">mm</text:span><text:span text:style-name="T102">ent</text:span><text:span text:style-name="T102">are </text:span><text:span text:style-name="T104">add</text:span><text:span text:style-name="T104">i </text:span><text:span text:style-name="T104">s3, </text:span><text:span text:style-name="T104">s3, </text:span><text:span text:style-name="T104">1 </text:span><text:span text:style-name="T102">con </text:span><text:span text:style-name="T102">“so</text:span><text:span text:style-name="T102">mm</text:span><text:span text:style-name="T102">o </text:span><text:span text:style-name="T102">uno </text:span><text:span text:style-name="T102">ad </text:span><text:span text:style-name="T102">s3”.</text:span><text:span text:style-name="T102">... ). </text:span></text:p>
          </draw:text-box>
        </draw:frame>
        <draw:frame draw:style-name="gr361" draw:text-style-name="P86" draw:layer="layout" svg:width="4.625cm" svg:height="0.501cm" svg:x="1.401cm" svg:y="8.838cm">
          <draw:text-box>
            <text:p text:style-name="P1"><text:span text:style-name="T99">Dettagli sulla </text:span><text:span text:style-name="T99">Consegna</text:span></text:p>
          </draw:text-box>
        </draw:frame>
        <draw:frame draw:style-name="gr13" draw:text-style-name="P13" draw:layer="layout" svg:width="0.35cm" svg:height="0.391cm" svg:x="6.303cm" svg:y="8.934cm">
          <draw:text-box>
            <text:p text:style-name="P1"><text:span text:style-name="T105"><text:s/></text:span></text:p>
          </draw:text-box>
        </draw:frame>
        <draw:frame draw:style-name="gr350" draw:text-style-name="P87" draw:layer="layout" svg:width="0.422cm" svg:height="0.422cm" svg:x="1.405cm" svg:y="9.566cm">
          <draw:text-box>
            <text:p text:style-name="P1"><text:span text:style-name="T100">•</text:span></text:p>
          </draw:text-box>
        </draw:frame>
        <draw:frame draw:style-name="gr351" draw:text-style-name="P87" draw:layer="layout" svg:width="0.422cm" svg:height="0.467cm" svg:x="1.6cm" svg:y="9.478cm">
          <draw:text-box>
            <text:p text:style-name="P1"><text:span text:style-name="T101"><text:s/></text:span></text:p>
          </draw:text-box>
        </draw:frame>
        <draw:frame draw:style-name="gr362" draw:text-style-name="P87" draw:layer="layout" svg:width="18.708cm" svg:height="0.467cm" svg:x="2.036cm" svg:y="9.478cm">
          <draw:text-box>
            <text:p text:style-name="P1"><text:span text:style-name="T102">Per </text:span><text:span text:style-name="T102">sostenere </text:span><text:span text:style-name="T102">l'esame è </text:span><text:span text:style-name="T102">necessari</text:span><text:span text:style-name="T102">o </text:span><text:span text:style-name="T102">consegna</text:span><text:span text:style-name="T102">re il </text:span><text:span text:style-name="T102">codice e </text:span><text:span text:style-name="T102">una </text:span><text:span text:style-name="T102">relazione </text:span><text:span text:style-name="T102">PDF sul </text:span><text:span text:style-name="T102">progetto </text:span><text:span text:style-name="T102">assegnat</text:span><text:span text:style-name="T102">o, </text:span></text:p>
          </draw:text-box>
        </draw:frame>
        <draw:frame draw:style-name="gr363" draw:text-style-name="P87" draw:layer="layout" svg:width="11.762cm" svg:height="0.467cm" svg:x="2.036cm" svg:y="10.067cm">
          <draw:text-box>
            <text:p text:style-name="P1"><text:span text:style-name="T102">oltre ad un breve video che spieghi il funzionamento del codice. <text:s/></text:span></text:p>
          </draw:text-box>
        </draw:frame>
        <draw:frame draw:style-name="gr350" draw:text-style-name="P87" draw:layer="layout" svg:width="0.422cm" svg:height="0.422cm" svg:x="1.405cm" svg:y="10.988cm">
          <draw:text-box>
            <text:p text:style-name="P1"><text:span text:style-name="T100">•</text:span></text:p>
          </draw:text-box>
        </draw:frame>
        <draw:frame draw:style-name="gr351" draw:text-style-name="P87" draw:layer="layout" svg:width="0.422cm" svg:height="0.467cm" svg:x="1.6cm" svg:y="10.901cm">
          <draw:text-box>
            <text:p text:style-name="P1"><text:span text:style-name="T101"><text:s/></text:span></text:p>
          </draw:text-box>
        </draw:frame>
        <draw:frame draw:style-name="gr364" draw:text-style-name="P87" draw:layer="layout" svg:width="16.991cm" svg:height="0.467cm" svg:x="2.036cm" svg:y="10.901cm">
          <draw:text-box>
            <text:p text:style-name="P1"><text:span text:style-name="T102">Il codice </text:span><text:span text:style-name="T102">consegnat</text:span><text:span text:style-name="T102">o deve </text:span><text:span text:style-name="T102">essere </text:span><text:span text:style-name="T102">funzionant</text:span><text:span text:style-name="T102">e sul </text:span><text:span text:style-name="T102">simulatore </text:span><text:span text:style-name="T102">RIPES, </text:span><text:span text:style-name="T102">usato </text:span><text:span text:style-name="T102">durante le </text:span><text:span text:style-name="T102">lezioni. </text:span></text:p>
          </draw:text-box>
        </draw:frame>
        <draw:frame draw:style-name="gr350" draw:text-style-name="P87" draw:layer="layout" svg:width="0.422cm" svg:height="0.422cm" svg:x="1.405cm" svg:y="11.814cm">
          <draw:text-box>
            <text:p text:style-name="P1"><text:span text:style-name="T100">•</text:span></text:p>
          </draw:text-box>
        </draw:frame>
        <draw:frame draw:style-name="gr351" draw:text-style-name="P87" draw:layer="layout" svg:width="0.422cm" svg:height="0.467cm" svg:x="1.6cm" svg:y="11.726cm">
          <draw:text-box>
            <text:p text:style-name="P1"><text:span text:style-name="T101"><text:s/></text:span></text:p>
          </draw:text-box>
        </draw:frame>
        <draw:frame draw:style-name="gr365" draw:text-style-name="P87" draw:layer="layout" svg:width="17.777cm" svg:height="0.467cm" svg:x="2.036cm" svg:y="11.726cm">
          <draw:text-box>
            <text:p text:style-name="P1"><text:span text:style-name="T102">L</text:span><text:span text:style-name="T102">a</text:span><text:span text:style-name="T102"> </text:span><text:span text:style-name="T102">s</text:span><text:span text:style-name="T102">c</text:span><text:span text:style-name="T102">a</text:span><text:span text:style-name="T102">d</text:span><text:span text:style-name="T102">e</text:span><text:span text:style-name="T102">n</text:span><text:span text:style-name="T102">z</text:span><text:span text:style-name="T102">a</text:span><text:span text:style-name="T102"> </text:span><text:span text:style-name="T102">e</text:span><text:span text:style-name="T102">s</text:span><text:span text:style-name="T102">a</text:span><text:span text:style-name="T102">t</text:span><text:span text:style-name="T102">t</text:span><text:span text:style-name="T102">a</text:span><text:span text:style-name="T102"> </text:span><text:span text:style-name="T102">d</text:span><text:span text:style-name="T102">e</text:span><text:span text:style-name="T102">l</text:span><text:span text:style-name="T102">l</text:span><text:span text:style-name="T102">a</text:span><text:span text:style-name="T102"> </text:span><text:span text:style-name="T102">c</text:span><text:span text:style-name="T102">o</text:span><text:span text:style-name="T102">n</text:span><text:span text:style-name="T102">s</text:span><text:span text:style-name="T102">e</text:span><text:span text:style-name="T102">g</text:span><text:span text:style-name="T102">n</text:span><text:span text:style-name="T102">a</text:span><text:span text:style-name="T102"> </text:span><text:span text:style-name="T102">v</text:span><text:span text:style-name="T102">e</text:span><text:span text:style-name="T102">r</text:span><text:span text:style-name="T102">r</text:span><text:span text:style-name="T102">à</text:span><text:span text:style-name="T102"> </text:span><text:span text:style-name="T102">r</text:span><text:span text:style-name="T102">e</text:span><text:span text:style-name="T102">s</text:span><text:span text:style-name="T102">a</text:span><text:span text:style-name="T102"> </text:span><text:span text:style-name="T102">n</text:span><text:span text:style-name="T102">o</text:span><text:span text:style-name="T102">t</text:span><text:span text:style-name="T102">a</text:span><text:span text:style-name="T102"> </text:span><text:span text:style-name="T102">d</text:span><text:span text:style-name="T102">i</text:span><text:span text:style-name="T102"> </text:span><text:span text:style-name="T102">v</text:span><text:span text:style-name="T102">o</text:span><text:span text:style-name="T102">l</text:span><text:span text:style-name="T102">t</text:span><text:span text:style-name="T102">a</text:span><text:span text:style-name="T102"> </text:span><text:span text:style-name="T102">i</text:span><text:span text:style-name="T102">n</text:span><text:span text:style-name="T102"> </text:span><text:span text:style-name="T102">v</text:span><text:span text:style-name="T102">o</text:span><text:span text:style-name="T102">l</text:span><text:span text:style-name="T102">t</text:span><text:span text:style-name="T102">a</text:span><text:span text:style-name="T102">,</text:span><text:span text:style-name="T102"> </text:span><text:span text:style-name="T102">i</text:span><text:span text:style-name="T102">n</text:span><text:span text:style-name="T102"> </text:span><text:span text:style-name="T102">b</text:span><text:span text:style-name="T102">a</text:span><text:span text:style-name="T102">s</text:span><text:span text:style-name="T102">e</text:span><text:span text:style-name="T102"> </text:span><text:span text:style-name="T102">a</text:span><text:span text:style-name="T102">l</text:span><text:span text:style-name="T102">l</text:span><text:span text:style-name="T102">e</text:span><text:span text:style-name="T102"> </text:span><text:span text:style-name="T102">d</text:span><text:span text:style-name="T102">a</text:span><text:span text:style-name="T102">t</text:span><text:span text:style-name="T102">e</text:span><text:span text:style-name="T102"> </text:span><text:span text:style-name="T102">d</text:span><text:span text:style-name="T102">e</text:span><text:span text:style-name="T102">l</text:span><text:span text:style-name="T102">l</text:span><text:span text:style-name="T102">’</text:span><text:span text:style-name="T102">a</text:span><text:span text:style-name="T102">p</text:span><text:span text:style-name="T102">p</text:span><text:span text:style-name="T102">e</text:span><text:span text:style-name="T102">l</text:span><text:span text:style-name="T102">l</text:span><text:span text:style-name="T102">o</text:span><text:span text:style-name="T102">.</text:span><text:span text:style-name="T102"> </text:span></text:p>
          </draw:text-box>
        </draw:frame>
        <draw:frame draw:style-name="gr350" draw:text-style-name="P87" draw:layer="layout" svg:width="0.422cm" svg:height="0.422cm" svg:x="1.405cm" svg:y="12.644cm">
          <draw:text-box>
            <text:p text:style-name="P1"><text:span text:style-name="T100">•</text:span></text:p>
          </draw:text-box>
        </draw:frame>
        <draw:frame draw:style-name="gr351" draw:text-style-name="P87" draw:layer="layout" svg:width="0.422cm" svg:height="0.467cm" svg:x="1.6cm" svg:y="12.556cm">
          <draw:text-box>
            <text:p text:style-name="P1"><text:span text:style-name="T101"><text:s/></text:span></text:p>
          </draw:text-box>
        </draw:frame>
        <draw:frame draw:style-name="gr366" draw:text-style-name="P87" draw:layer="layout" svg:width="18.185cm" svg:height="0.467cm" svg:x="2.036cm" svg:y="12.556cm">
          <draw:text-box>
            <text:p text:style-name="P1"><text:span text:style-name="T102">D</text:span><text:span text:style-name="T102">i</text:span><text:span text:style-name="T102">s</text:span><text:span text:style-name="T102">c</text:span><text:span text:style-name="T102">u</text:span><text:span text:style-name="T102">s</text:span><text:span text:style-name="T102">s</text:span><text:span text:style-name="T102">i</text:span><text:span text:style-name="T102">o</text:span><text:span text:style-name="T102">n</text:span><text:span text:style-name="T102">e</text:span><text:span text:style-name="T102"> </text:span><text:span text:style-name="T102">e</text:span><text:span text:style-name="T102"> </text:span><text:span text:style-name="T102">v</text:span><text:span text:style-name="T102">a</text:span><text:span text:style-name="T102">l</text:span><text:span text:style-name="T102">u</text:span><text:span text:style-name="T102">t</text:span><text:span text:style-name="T102">a</text:span><text:span text:style-name="T102">z</text:span><text:span text:style-name="T102">i</text:span><text:span text:style-name="T102">o</text:span><text:span text:style-name="T102">n</text:span><text:span text:style-name="T102">e</text:span><text:span text:style-name="T102">:</text:span><text:span text:style-name="T102"> </text:span><text:span text:style-name="T102">l</text:span><text:span text:style-name="T102">a</text:span><text:span text:style-name="T102"> </text:span><text:span text:style-name="T102">d</text:span><text:span text:style-name="T102">i</text:span><text:span text:style-name="T102">s</text:span><text:span text:style-name="T102">c</text:span><text:span text:style-name="T102">u</text:span><text:span text:style-name="T102">s</text:span><text:span text:style-name="T102">s</text:span><text:span text:style-name="T102">i</text:span><text:span text:style-name="T102">o</text:span><text:span text:style-name="T102">n</text:span><text:span text:style-name="T102">e</text:span><text:span text:style-name="T102"> </text:span><text:span text:style-name="T102">d</text:span><text:span text:style-name="T102">e</text:span><text:span text:style-name="T102">g</text:span><text:span text:style-name="T102">l</text:span><text:span text:style-name="T102">i</text:span><text:span text:style-name="T102"> </text:span><text:span text:style-name="T102">e</text:span><text:span text:style-name="T102">l</text:span><text:span text:style-name="T102">a</text:span><text:span text:style-name="T102">b</text:span><text:span text:style-name="T102">o</text:span><text:span text:style-name="T102">r</text:span><text:span text:style-name="T102">a</text:span><text:span text:style-name="T102">t</text:span><text:span text:style-name="T102">i</text:span><text:span text:style-name="T102"> </text:span><text:span text:style-name="T102">a</text:span><text:span text:style-name="T102">v</text:span><text:span text:style-name="T102">v</text:span><text:span text:style-name="T102">e</text:span><text:span text:style-name="T102">r</text:span><text:span text:style-name="T102">r</text:span><text:span text:style-name="T102">à</text:span><text:span text:style-name="T102"> </text:span><text:span text:style-name="T102">c</text:span><text:span text:style-name="T102">o</text:span><text:span text:style-name="T102">n</text:span><text:span text:style-name="T102">t</text:span><text:span text:style-name="T102">e</text:span><text:span text:style-name="T102">s</text:span><text:span text:style-name="T102">t</text:span><text:span text:style-name="T102">u</text:span><text:span text:style-name="T102">a</text:span><text:span text:style-name="T102">l</text:span><text:span text:style-name="T102">m</text:span><text:span text:style-name="T102">e</text:span><text:span text:style-name="T102">n</text:span><text:span text:style-name="T102">t</text:span><text:span text:style-name="T102">e</text:span><text:span text:style-name="T102"> </text:span><text:span text:style-name="T102">a</text:span><text:span text:style-name="T102">l</text:span><text:span text:style-name="T102">l</text:span><text:span text:style-name="T102">’</text:span><text:span text:style-name="T102">e</text:span><text:span text:style-name="T102">s</text:span><text:span text:style-name="T102">a</text:span><text:span text:style-name="T102">m</text:span><text:span text:style-name="T102">e</text:span><text:span text:style-name="T102"> </text:span><text:span text:style-name="T102">o</text:span><text:span text:style-name="T102">r</text:span><text:span text:style-name="T102">a</text:span><text:span text:style-name="T102">l</text:span><text:span text:style-name="T102">e</text:span><text:span text:style-name="T102"> </text:span><text:span text:style-name="T102">e</text:span><text:span text:style-name="T102"> </text:span></text:p>
          </draw:text-box>
        </draw:frame>
        <draw:polygon draw:style-name="gr354" draw:text-style-name="P88" draw:layer="layout" svg:width="13.669cm" svg:height="0.029cm" svg:x="2.036cm" svg:y="13.576cm" svg:viewBox="0 0 13670 30" draw:points="0,0 13670,0 13670,30 0,30">
          <text:p/>
        </draw:polygon>
        <draw:frame draw:style-name="gr367" draw:text-style-name="P87" draw:layer="layout" svg:width="15.936cm" svg:height="0.467cm" svg:x="2.036cm" svg:y="13.149cm">
          <draw:text-box>
            <text:p text:style-name="P1"><text:span text:style-name="T103">prevede anche </text:span><text:span text:style-name="T103">domande su tutti gli </text:span><text:span text:style-name="T103">argomenti di </text:span><text:span text:style-name="T103">laboratorio trattati a </text:span><text:span text:style-name="T103">lezione</text:span><text:span text:style-name="T102">. <text:s/></text:span></text:p>
          </draw:text-box>
        </draw:frame>
        <draw:frame draw:style-name="gr368" draw:text-style-name="P86" draw:layer="layout" svg:width="5.041cm" svg:height="0.501cm" svg:x="1.401cm" svg:y="14.096cm">
          <draw:text-box>
            <text:p text:style-name="P1"><text:span text:style-name="T99">Struttura della Consegna </text:span></text:p>
          </draw:text-box>
        </draw:frame>
        <draw:frame draw:style-name="gr369" draw:text-style-name="P87" draw:layer="layout" svg:width="18.32cm" svg:height="0.467cm" svg:x="1.401cm" svg:y="14.715cm">
          <draw:text-box>
            <text:p text:style-name="P1"><text:span text:style-name="T102">La consegna dovrà consistere di un unico achivio contenente 3 componenti. L’archivio dovrà essere </text:span></text:p>
          </draw:text-box>
        </draw:frame>
        <draw:frame draw:style-name="gr370" draw:text-style-name="P87" draw:layer="layout" svg:width="17.934cm" svg:height="0.467cm" svg:x="1.401cm" svg:y="15.308cm">
          <draw:text-box>
            <text:p text:style-name="P1"><text:span text:style-name="T102">caricato sul sito moodle del corso seguendo il link che verrà reso disponibile alla pagina del corso. </text:span></text:p>
          </draw:text-box>
        </draw:frame>
        <draw:frame draw:style-name="gr350" draw:text-style-name="P87" draw:layer="layout" svg:width="0.422cm" svg:height="0.422cm" svg:x="1.405cm" svg:y="16.225cm">
          <draw:text-box>
            <text:p text:style-name="P1"><text:span text:style-name="T100">•</text:span></text:p>
          </draw:text-box>
        </draw:frame>
        <draw:frame draw:style-name="gr351" draw:text-style-name="P87" draw:layer="layout" svg:width="0.422cm" svg:height="0.467cm" svg:x="1.6cm" svg:y="16.137cm">
          <draw:text-box>
            <text:p text:style-name="P1"><text:span text:style-name="T101"><text:s/></text:span></text:p>
          </draw:text-box>
        </draw:frame>
        <draw:frame draw:style-name="gr371" draw:text-style-name="P87" draw:layer="layout" svg:width="7.44cm" svg:height="0.467cm" svg:x="2.036cm" svg:y="16.137cm">
          <draw:text-box>
            <text:p text:style-name="P1"><text:span text:style-name="T102">Un file </text:span><text:span text:style-name="T102">.s </text:span><text:span text:style-name="T102">conte</text:span><text:span text:style-name="T102">nente </text:span><text:span text:style-name="T102">il </text:span><text:span text:style-name="T103">codic</text:span><text:span text:style-name="T103">e </text:span><text:span text:style-name="T102">asse</text:span><text:span text:style-name="T102">mbly </text:span></text:p>
          </draw:text-box>
        </draw:frame>
        <draw:frame draw:style-name="gr350" draw:text-style-name="P87" draw:layer="layout" svg:width="0.422cm" svg:height="0.422cm" svg:x="1.405cm" svg:y="17.055cm">
          <draw:text-box>
            <text:p text:style-name="P1"><text:span text:style-name="T100">•</text:span></text:p>
          </draw:text-box>
        </draw:frame>
        <draw:frame draw:style-name="gr351" draw:text-style-name="P87" draw:layer="layout" svg:width="0.422cm" svg:height="0.467cm" svg:x="1.6cm" svg:y="16.967cm">
          <draw:text-box>
            <text:p text:style-name="P1"><text:span text:style-name="T101"><text:s/></text:span></text:p>
          </draw:text-box>
        </draw:frame>
        <draw:frame draw:style-name="gr372" draw:text-style-name="P87" draw:layer="layout" svg:width="17.836cm" svg:height="0.467cm" svg:x="2.036cm" svg:y="16.967cm">
          <draw:text-box>
            <text:p text:style-name="P1"><text:span text:style-name="T102">un </text:span><text:span text:style-name="T103">breve video </text:span><text:span text:style-name="T102">(max 5 minuti) dove si registra lo schermo del dispositivo che avete utilizzato per </text:span></text:p>
          </draw:text-box>
        </draw:frame>
        <draw:frame draw:style-name="gr373" draw:text-style-name="P87" draw:layer="layout" svg:width="18.36cm" svg:height="0.467cm" svg:x="2.036cm" svg:y="17.56cm">
          <draw:text-box>
            <text:p text:style-name="P1"><text:span text:style-name="T102">l’implementazione durante l’esecuzione del programma, commentandone il funzionamento in base a </text:span></text:p>
          </draw:text-box>
        </draw:frame>
        <draw:frame draw:style-name="gr374" draw:text-style-name="P87" draw:layer="layout" svg:width="6.137cm" svg:height="0.467cm" svg:x="2.036cm" svg:y="18.153cm">
          <draw:text-box>
            <text:p text:style-name="P1"><text:span text:style-name="T102">2-3 combinazioni di input diverse </text:span></text:p>
          </draw:text-box>
        </draw:frame>
        <draw:frame draw:style-name="gr350" draw:text-style-name="P87" draw:layer="layout" svg:width="0.422cm" svg:height="0.422cm" svg:x="1.405cm" svg:y="19.07cm">
          <draw:text-box>
            <text:p text:style-name="P1"><text:span text:style-name="T100">•</text:span></text:p>
          </draw:text-box>
        </draw:frame>
        <draw:frame draw:style-name="gr351" draw:text-style-name="P87" draw:layer="layout" svg:width="0.422cm" svg:height="0.467cm" svg:x="1.6cm" svg:y="18.982cm">
          <draw:text-box>
            <text:p text:style-name="P1"><text:span text:style-name="T101"><text:s/></text:span></text:p>
          </draw:text-box>
        </draw:frame>
        <draw:frame draw:style-name="gr375" draw:text-style-name="P87" draw:layer="layout" svg:width="9.83cm" svg:height="0.467cm" svg:x="2.036cm" svg:y="18.982cm">
          <draw:text-box>
            <text:p text:style-name="P1"><text:span text:style-name="T102">la </text:span><text:span text:style-name="T103">relazione </text:span><text:span text:style-name="T102">in formato PDF, strutturata come segue. </text:span></text:p>
          </draw:text-box>
        </draw:frame>
        <draw:frame draw:style-name="gr376" draw:text-style-name="P87" draw:layer="layout" svg:width="0.449cm" svg:height="0.467cm" svg:x="2.036cm" svg:y="19.787cm">
          <draw:text-box>
            <text:p text:style-name="P1"><text:span text:style-name="T102">1. </text:span></text:p>
          </draw:text-box>
        </draw:frame>
        <draw:frame draw:style-name="gr377" draw:text-style-name="P87" draw:layer="layout" svg:width="12.596cm" svg:height="0.467cm" svg:x="2.671cm" svg:y="19.787cm">
          <draw:text-box>
            <text:p text:style-name="P1"><text:span text:style-name="T103">Informazioni </text:span><text:span text:style-name="T102">su autore, indirizzo mail, matricola e data di consegna </text:span></text:p>
          </draw:text-box>
        </draw:frame>
        <draw:frame draw:style-name="gr376" draw:text-style-name="P87" draw:layer="layout" svg:width="0.449cm" svg:height="0.467cm" svg:x="2.036cm" svg:y="20.595cm">
          <draw:text-box>
            <text:p text:style-name="P1"><text:span text:style-name="T102">2. </text:span></text:p>
          </draw:text-box>
        </draw:frame>
        <draw:frame draw:style-name="gr378" draw:text-style-name="P87" draw:layer="layout" svg:width="14.619cm" svg:height="0.467cm" svg:x="2.671cm" svg:y="20.595cm">
          <draw:text-box>
            <text:p text:style-name="P1"><text:span text:style-name="T103">Descrizione </text:span><text:span text:style-name="T102">della soluzione adottata, trattando principalmente i seguenti punti: </text:span></text:p>
          </draw:text-box>
        </draw:frame>
        <draw:frame draw:style-name="gr379" draw:text-style-name="P87" draw:layer="layout" svg:width="0.444cm" svg:height="0.467cm" svg:x="3.306cm" svg:y="21.4cm">
          <draw:text-box>
            <text:p text:style-name="P1"><text:span text:style-name="T102">a. </text:span></text:p>
          </draw:text-box>
        </draw:frame>
        <draw:frame draw:style-name="gr380" draw:text-style-name="P87" draw:layer="layout" svg:width="13.652cm" svg:height="0.467cm" svg:x="3.941cm" svg:y="21.4cm">
          <draw:text-box>
            <text:p text:style-name="P1"><text:span text:style-name="T102">Descrizione ad alto livello della struttura del codice, di ciascun algoritmo di </text:span></text:p>
          </draw:text-box>
        </draw:frame>
        <draw:frame draw:style-name="gr381" draw:text-style-name="P87" draw:layer="layout" svg:width="15.929cm" svg:height="0.467cm" svg:x="3.941cm" svg:y="21.992cm">
          <draw:text-box>
            <text:p text:style-name="P1"><text:span text:style-name="T102">cifratura/decifratura, di altre eventuali procedure e del main, in linguaggio naturale, con </text:span></text:p>
          </draw:text-box>
        </draw:frame>
        <draw:frame draw:style-name="gr382" draw:text-style-name="P87" draw:layer="layout" svg:width="6.73cm" svg:height="0.467cm" svg:x="3.941cm" svg:y="22.589cm">
          <draw:text-box>
            <text:p text:style-name="P1"><text:span text:style-name="T102">flow-chart, in pseudo-linguaggio, etc </text:span></text:p>
          </draw:text-box>
        </draw:frame>
        <draw:frame draw:style-name="gr383" draw:text-style-name="P87" draw:layer="layout" svg:width="0.45cm" svg:height="0.467cm" svg:x="3.306cm" svg:y="23.393cm">
          <draw:text-box>
            <text:p text:style-name="P1"><text:span text:style-name="T102">b. </text:span></text:p>
          </draw:text-box>
        </draw:frame>
        <draw:frame draw:style-name="gr384" draw:text-style-name="P87" draw:layer="layout" svg:width="14.1cm" svg:height="0.467cm" svg:x="3.941cm" svg:y="23.393cm">
          <draw:text-box>
            <text:p text:style-name="P1"><text:span text:style-name="T102">Uso dei registri e memoria (stack, piuttosto che memoria statica o dinamica) <text:s/></text:span></text:p>
          </draw:text-box>
        </draw:frame>
        <draw:frame draw:style-name="gr376" draw:text-style-name="P87" draw:layer="layout" svg:width="0.449cm" svg:height="0.467cm" svg:x="2.036cm" svg:y="24.198cm">
          <draw:text-box>
            <text:p text:style-name="P1"><text:span text:style-name="T102">3. </text:span></text:p>
          </draw:text-box>
        </draw:frame>
        <draw:frame draw:style-name="gr385" draw:text-style-name="P87" draw:layer="layout" svg:width="18.251cm" svg:height="0.467cm" svg:x="2.671cm" svg:y="24.198cm">
          <draw:text-box>
            <text:p text:style-name="P1"><text:span text:style-name="T103">Test di corretto funzionamento</text:span><text:span text:style-name="T102">, per fornire evidenze del corretto funzionamento del programma, </text:span></text:p>
          </draw:text-box>
        </draw:frame>
        <draw:frame draw:style-name="gr386" draw:text-style-name="P87" draw:layer="layout" svg:width="3.895cm" svg:height="0.467cm" svg:x="2.671cm" svg:y="24.795cm">
          <draw:text-box>
            <text:p text:style-name="P1"><text:span text:style-name="T102">usando diversi input.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Arial" svg:font-family="Arial"/>
    <style:font-face style:name="Calibri" svg:font-family="Calibri"/>
    <style:font-face style:name="Cambria" svg:font-family="Cambria"/>
    <style:font-face style:name="FreeSans" svg:font-family="FreeSans" style:font-family-generic="roman" style:font-pitch="variable"/>
    <style:font-face style:name="FreeSans1" svg:font-family="FreeSans" style:font-adornments="Regular" style:font-family-generic="swis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FreeSans4" svg:font-family="FreeSans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family-generic="roman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TexMaths Symbols" svg:font-family="'TexMaths Symbols'" style:font-pitch="variable"/>
    <style:font-face style:name="TexMaths Symbols1" svg:font-family="'TexMaths Symbols'"/>
    <style:font-face style:name="Unifont" svg:font-family="Unifont" style:font-family-generic="system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Navigation" svg:viewBox="0 0 786 1228" svg:d="M151 1228l-76-25-75-25 318-952 76-226 75 226 317 952-76 25-75 25-162-486v462h-80-79v-464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UML_20_Arrow" draw:display-name="UML Arrow" svg:viewBox="-0.0901699437494742 0 406.180339887499 756.090169943749" svg:d="M105 715c-2 9-7 17-13 24-7 7-15 12-23 15-9 2-19 3-28 1s-17-7-24-13c-7-7-12-15-15-23-2-9-3-19-1-28l150-650c2-5 3-10 6-14 5-9 11-15 20-20 8-5 17-7 26-7s18 2 27 7c8 5 14 11 19 20 3 4 4 9 6 14l150 650c2 9 1 19-1 28-3 8-8 16-15 23-7 6-15 11-24 13s-19 1-28-1c-8-3-16-8-23-15-6-7-11-15-13-24l-44-194v232h-53-53v-237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FreeSerif" fo:font-size="24pt" fo:language="en" fo:country="US" style:font-name-asian="Adwaita Sans" style:font-size-asian="24pt" style:language-asian="zh" style:country-asian="CN" style:font-name-complex="FreeSans4" style:font-size-complex="24pt" style:language-complex="hi" style:country-complex="IN"/>
    </style:default-style>
    <style:style style:name="standard" style:family="graphic">
      <style:graphic-properties draw:stroke-dash="Dashed_20__28_var_29__20_4" draw:fill="solid" draw:fill-color="#729fcf" draw:shadow-color="#000000"/>
      <style:text-properties style:font-name="FreeSans1" fo:font-family="FreeSans" style:font-style-name="Regular" style:font-family-generic="swiss" style:font-pitch="variable" fo:font-size="10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graphic-properties draw:fill="none" draw:fill-color="#ffffff" loext:fill-use-slide-background="false" draw:shadow-color="#000000"/>
      <style:paragraph-properties fo:margin-top="0cm" fo:margin-bottom="0.076cm" fo:line-height="115%" style:text-autospace="none"/>
      <style:text-properties style:font-name="FreeSans1" fo:font-family="FreeSans" style:font-style-name="Regular" style:font-family-generic="swiss" style:font-pitch="variable" fo:font-size="12pt"/>
    </style:style>
    <style:style style:name="Endnote_20_Characters" style:display-name="Endnote Character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Heading" style:family="graphic">
      <style:paragraph-properties fo:margin-top="0.746cm" fo:margin-bottom="0.374cm" style:text-autospace="none"/>
      <style:text-properties style:font-name="FreeSans2" fo:font-family="FreeSans" style:font-family-generic="swiss" style:font-pitch="variable" fo:font-size="14pt" style:font-name-asian="WenQuanYi Micro Hei" style:font-family-asian="'WenQuanYi Micro Hei'" style:font-pitch-asian="variable" style:font-name-complex="FreeSans2" style:font-family-complex="FreeSans" style:font-family-generic-complex="swiss" style:font-pitch-complex="variable" style:font-size-complex="14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FreeSans3" style:font-family-complex="FreeSans" style:font-family-generic-complex="swiss"/>
    </style:style>
    <style:style style:name="List" style:family="graphic">
      <style:paragraph-properties style:text-autospace="none"/>
      <style:text-properties style:font-name-complex="FreeSans3" style:font-family-complex="FreeSans" style:font-family-generic-complex="swiss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Normal" style:family="graphic">
      <style:graphic-properties style:writing-mode="lr-tb"/>
      <style:paragraph-properties style:text-autospace="none"/>
      <style:text-properties style:use-window-font-color="true" loext:opacity="0%" style:font-name="FreeSerif" fo:font-family="FreeSerif" style:font-family-generic="roman" style:font-pitch="variable" fo:font-size="12pt" fo:language="en" fo:country="US" style:letter-kerning="true" style:font-name-asian="WenQuanYi Micro Hei" style:font-family-asian="'WenQuanYi Micro Hei'" style:font-pitch-asian="variable" style:language-asian="zh" style:country-asian="CN" style:font-name-complex="FreeSerif" style:font-family-complex="FreeSerif" style:font-family-generic-complex="roman" style:font-pitch-complex="variable" style:font-size-complex="12pt" style:language-complex="en" style:country-complex="US"/>
    </style:style>
    <style:style style:name="caption" style:family="graphic">
      <style:paragraph-properties fo:margin-top="0.051cm" fo:margin-bottom="0.051cm" style:text-autospace="none"/>
      <style:text-properties style:font-name="FreeSans1" fo:font-family="FreeSans" style:font-style-name="Regular" style:font-family-generic="swiss" style:font-pitch="variable" fo:font-size="10pt" fo:font-style="normal" style:font-size-asian="12pt" style:font-style-asian="italic" style:font-name-complex="FreeSans3" style:font-family-complex="FreeSans" style:font-family-generic-complex="swiss" style:font-size-complex="12pt" style:font-style-complex="italic"/>
    </style:style>
  </office:styles>
  <office:automatic-styles>
    <style:page-layout style:name="PM0">
      <style:page-layout-properties fo:margin-top="2cm" fo:margin-bottom="1cm" fo:margin-left="1.3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4.2$Linux_X86_64 LibreOffice_project/620$Build-2</meta:generator>
    <meta:document-statistic meta:object-count="479"/>
  </office:meta>
</office:document-meta>
</file>