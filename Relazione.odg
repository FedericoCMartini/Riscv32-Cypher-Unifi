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D400000073BC87C6F6.png" manifest:media-type="image/png"/>
  <manifest:file-entry manifest:full-path="Pictures/10000001000001AC000000731F0ACCE0.png" manifest:media-type="image/png"/>
  <manifest:file-entry manifest:full-path="Pictures/10000001000001800000004F28348659.png" manifest:media-type="image/png"/>
  <manifest:file-entry manifest:full-path="Pictures/100000010000012200000050F922DA2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Arial" svg:font-family="Arial"/>
    <style:font-face style:name="Calibri" svg:font-family="Calibri"/>
    <style:font-face style:name="Cambria" svg:font-family="Cambria"/>
    <style:font-face style:name="FreeSans" svg:font-family="FreeSans" style:font-adornments="Regular" style:font-family-generic="swiss" style:font-pitch="variable"/>
    <style:font-face style:name="FreeSans1" svg:font-family="FreeSans" style:font-family-generic="swiss"/>
    <style:font-face style:name="FreeSans2" svg:font-family="FreeSans" style:font-family-generic="swiss" style:font-pitch="variable"/>
    <style:font-face style:name="FreeSans3" svg:font-family="FreeSans" style:font-family-generic="roman" style:font-pitch="variable"/>
    <style:font-face style:name="FreeSans4" svg:font-family="FreeSans" style:font-family-generic="system" style:font-pitch="variable"/>
    <style:font-face style:name="FreeSerif" svg:font-family="FreeSerif" style:font-family-generic="roman" style:font-pitch="variable"/>
    <style:font-face style:name="FreeSerif1" svg:font-family="FreeSerif" style:font-family-generic="roman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ymbol" svg:font-family="Symbol"/>
    <style:font-face style:name="TexMaths Symbols" svg:font-family="'TexMaths Symbols'"/>
    <style:font-face style:name="TexMaths Symbols1" svg:font-family="'TexMaths Symbols'" style:font-pitch="variable"/>
    <style:font-face style:name="Unifont" svg:font-family="Unifont" style:font-family-generic="system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932cm" fo:min-width="11.644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932cm" fo:min-width="13.478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932cm" fo:min-width="7.189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932cm" fo:min-width="0.846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158cm" fo:min-width="0.139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4f81bd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089cm" fo:min-width="7.941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88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Heading">
      <style:graphic-properties draw:stroke="none" draw:fill="none" draw:textarea-horizontal-align="left" draw:textarea-vertical-align="top" draw:auto-grow-height="true" draw:auto-grow-width="true" fo:min-height="0.543cm" fo:min-width="5.175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Body_20_Text">
      <style:graphic-properties draw:stroke="none" draw:textarea-horizontal-align="left" draw:textarea-vertical-align="top" draw:auto-grow-height="false" draw:auto-grow-width="false" fo:min-height="3.308cm" fo:min-width="14.821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solid" svg:stroke-width="0.026cm" svg:stroke-color="#000000" draw:stroke-linejoin="miter" svg:stroke-linecap="butt" draw:fill="solid" draw:fill-color="#ffffff" fo:padding-top="0.013cm" fo:padding-bottom="0.013cm" fo:padding-left="0.013cm" fo:padding-right="0.013cm" loext:decorative="false"/>
    </style:style>
    <style:style style:name="gr12" style:family="graphic" style:parent-style-name="standard">
      <style:graphic-properties draw:stroke="none" draw:fill="none" draw:textarea-horizontal-align="justify" draw:textarea-vertical-align="middle" draw:auto-grow-height="false" draw:auto-grow-width="true" fo:min-height="0.551cm" fo:min-width="17.094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35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5.858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42cm" fo:min-width="0.943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Body_20_Text">
      <style:graphic-properties draw:stroke="none" draw:textarea-horizontal-align="left" draw:textarea-vertical-align="top" draw:auto-grow-height="true" draw:auto-grow-width="true" fo:min-height="0.536cm" fo:min-width="0.139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Body_20_Text">
      <style:graphic-properties draw:stroke="none" draw:textarea-horizontal-align="left" draw:textarea-vertical-align="top" draw:auto-grow-height="true" draw:auto-grow-width="true" fo:min-height="0.536cm" fo:min-width="0.35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Heading">
      <style:graphic-properties draw:stroke="none" draw:fill="none" draw:textarea-horizontal-align="left" draw:textarea-vertical-align="top" draw:auto-grow-height="true" draw:auto-grow-width="true" fo:min-height="0.543cm" fo:min-width="15.939cm" fo:padding-top="0cm" fo:padding-bottom="0cm" fo:padding-left="0cm" fo:padding-right="0cm" loext:decorative="false"/>
      <style:paragraph-properties style:writing-mode="lr-tb"/>
    </style:style>
    <style:style style:name="gr19" style:family="graphic">
      <style:graphic-properties style:writing-mode="lr-tb" loext:decorative="false"/>
    </style:style>
    <style:style style:name="gr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3" style:family="graphic" style:parent-style-name="Body_20_Text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textarea-horizontal-align="justify" fo:min-height="0.536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25" style:family="graphic" style:parent-style-name="Body_20_Text">
      <style:graphic-properties draw:stroke="none" draw:textarea-horizontal-align="left" draw:textarea-vertical-align="top" draw:auto-grow-height="true" draw:auto-grow-width="true" fo:min-height="0.536cm" fo:min-width="0.422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opacity="66%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5" style:family="graphic" style:parent-style-name="Body_20_Text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textarea-horizontal-align="justify" fo:min-height="0.769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7" style:family="graphic" style:parent-style-name="Body_20_Text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textarea-horizontal-align="justify" fo:min-height="0.536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42" style:family="graphic" style:parent-style-name="Body_20_Text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textarea-horizontal-align="justify" fo:min-height="0.536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43" style:family="graphic" style:parent-style-name="Body_20_Text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4" style:family="graphic" style:parent-style-name="Heading">
      <style:graphic-properties draw:stroke="none" draw:fill="none" draw:textarea-horizontal-align="left" draw:textarea-vertical-align="top" draw:auto-grow-height="true" draw:auto-grow-width="true" fo:min-height="0.543cm" fo:min-width="5.771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Heading">
      <style:graphic-properties draw:stroke="none" draw:fill="none" draw:textarea-horizontal-align="left" draw:textarea-vertical-align="top" draw:auto-grow-height="true" draw:auto-grow-width="true" fo:min-height="0.543cm" fo:min-width="8.415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Body_20_Text">
      <style:graphic-properties draw:stroke="none" svg:stroke-color="#000000" draw:auto-grow-height="true" draw:auto-grow-width="false" fo:min-height="2.072cm" loext:decorative="false"/>
      <style:paragraph-properties style:writing-mode="lr-tb"/>
    </style:style>
    <style:style style:name="gr47" style:family="graphic" style:parent-style-name="caption">
      <style:graphic-properties draw:stroke="none" svg:stroke-color="#000000" draw:fill="none" draw:fill-color="#ffffff" draw:auto-grow-height="true" draw:auto-grow-width="false" fo:min-height="1.865cm" loext:decorative="false"/>
      <style:paragraph-properties style:writing-mode="lr-tb"/>
    </style:style>
    <style:style style:name="gr48" style:family="graphic">
      <style:graphic-properties style:protect="size" style:writing-mode="lr-tb" loext:decorative="false"/>
    </style:style>
    <style:style style:name="gr49" style:family="graphic" style:parent-style-name="standard" style:list-style-name="L3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000000" loext:fill-use-slide-background="false" draw:textarea-horizontal-align="justify" draw:textarea-vertical-align="middle" draw:auto-grow-height="false" fo:min-height="0.104cm" fo:min-width="0cm" fo:padding-top="0.139cm" fo:padding-bottom="0.139cm" fo:padding-left="0.264cm" fo:padding-right="0.264cm" fo:wrap-option="wrap" draw:shadow="hidden" draw:shadow-offset-x="0.2cm" draw:shadow-offset-y="0.2cm" draw:shadow-color="#808080" style:protect="size" loext:decorative="false"/>
    </style:style>
    <style:style style:name="gr50" style:family="graphic" style:parent-style-name="standard" style:list-style-name="L3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5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1.434cm" fo:min-width="5.623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4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1.389cm" fo:min-width="6.075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1.12cm" fo:min-width="9.415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8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9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none" draw:fill-color="#ffffff" loext:fill-use-slide-background="false" draw:textarea-horizontal-align="justify" draw:textarea-vertical-align="top" draw:auto-grow-height="false" fo:min-height="13.839cm" fo:min-width="17.932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none" draw:fill-color="#ffffff" loext:fill-use-slide-background="false" draw:textarea-horizontal-align="left" draw:textarea-vertical-align="top" draw:auto-grow-height="true" fo:min-height="0cm" fo:min-width="0cm" fo:padding-top="0.152cm" fo:padding-bottom="0.152cm" fo:padding-left="0.277cm" fo:padding-right="0.477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6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3.899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4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5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76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474cm" fo:min-width="1.763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70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508cm" fo:min-width="4.583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2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562cm" fo:min-width="4.133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484cm" fo:min-width="4.053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8" style:family="graphic">
      <style:graphic-properties style:protect="size" loext:decorative="false"/>
    </style:style>
    <style:style style:name="gr79" style:family="graphic" style:parent-style-name="standard" style:list-style-name="L3">
      <style:graphic-properties draw:stroke="solid" svg:stroke-width="0.053cm" svg:stroke-color="#000000" draw:marker-start="" draw:marker-start-width="0.28cm" draw:marker-start-center="false" draw:marker-end="" draw:marker-end-width="0.28cm" draw:marker-end-center="false" draw:fill="none" draw:fill-color="#729fcf" loext:fill-use-slide-background="false" draw:textarea-horizontal-align="justify" draw:textarea-vertical-align="middle" draw:auto-grow-height="false" fo:min-height="0.05cm" fo:min-width="0cm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0" style:family="graphic" style:parent-style-name="standard" style:list-style-name="L3">
      <style:graphic-properties draw:stroke="solid" draw:stroke-dash="Long_20_Dash" svg:stroke-width="0.1cm" svg:stroke-color="#000000" draw:marker-start="" draw:marker-start-width="0.35cm" draw:marker-start-center="false" draw:marker-end="UML_20_Arrow" draw:marker-end-width="0.35cm" draw:marker-end-center="false" draw:fill="solid" draw:fill-color="#000000" draw:textarea-horizontal-align="justify" draw:textarea-vertical-align="middle" draw:auto-grow-height="false" fo:min-height="0cm" fo:min-width="0cm" fo:padding-top="0.175cm" fo:padding-bottom="0.175cm" fo:padding-left="0.3cm" fo:padding-right="0.3cm" fo:wrap-option="wrap" draw:shadow="hidden" draw:shadow-offset-x="0.2cm" draw:shadow-offset-y="0.2cm" draw:shadow-color="#808080" loext:decorative="false"/>
    </style:style>
    <style:style style:name="gr8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2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3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1.12cm" fo:min-width="3.38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5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87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89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0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1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9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9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9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95" style:family="graphic" style:parent-style-name="standard">
      <style:graphic-properties draw:stroke="none" draw:fill="none" draw:fill-color="#ffffff" fo:min-height="0.62cm" loext:decorative="false"/>
      <style:paragraph-properties style:writing-mode="lr-tb"/>
    </style:style>
    <style:style style:name="gr9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8cm" fo:min-width="3.052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626cm" fo:min-width="3.466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8cm" fo:min-width="3.513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626cm" fo:min-width="3.466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0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2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3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0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0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07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08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9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0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2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3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11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117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8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9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0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386cm" fo:min-width="1.71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2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2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2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right" draw:textarea-vertical-align="middle" draw:auto-grow-height="false" fo:min-height="2.191cm" fo:min-width="4.481cm" fo:padding-top="0.152cm" fo:padding-bottom="0.152cm" fo:padding-left="0.6cm" fo:padding-right="0.2cm" fo:wrap-option="wrap" draw:shadow="hidden" draw:shadow-offset-x="0.2cm" draw:shadow-offset-y="0.2cm" draw:shadow-color="#808080" loext:decorative="false"/>
      <style:paragraph-properties style:writing-mode="lr-tb"/>
    </style:style>
    <style:style style:name="gr127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8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308cm" fo:min-width="2.442cm" fo:padding-top="0.152cm" fo:padding-bottom="0.152cm" fo:padding-left="0.3cm" fo:padding-right="0.27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131" style:family="graphic" style:parent-style-name="Body_20_Text">
      <style:graphic-properties draw:stroke="none" svg:stroke-color="#000000" draw:auto-grow-height="true" draw:auto-grow-width="false" fo:min-height="1.819cm" loext:decorative="false"/>
      <style:paragraph-properties style:writing-mode="lr-tb"/>
    </style:style>
    <style:style style:name="gr132" style:family="graphic" style:parent-style-name="caption">
      <style:graphic-properties draw:stroke="none" svg:stroke-color="#000000" draw:fill="none" draw:fill-color="#ffffff" draw:auto-grow-height="true" draw:auto-grow-width="false" fo:min-height="4.195cm" loext:decorative="false"/>
      <style:paragraph-properties style:writing-mode="lr-tb"/>
    </style:style>
    <style:style style:name="gr133" style:family="graphic" style:parent-style-name="Body_20_Text">
      <style:graphic-properties draw:stroke="none" svg:stroke-color="#000000" draw:auto-grow-height="true" draw:auto-grow-width="false" fo:min-height="2.285cm" loext:decorative="false"/>
      <style:paragraph-properties style:writing-mode="lr-tb"/>
    </style:style>
    <style:style style:name="gr134" style:family="graphic" style:parent-style-name="standard" style:list-style-name="L3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000000" loext:fill-use-slide-background="false" draw:textarea-horizontal-align="justify" draw:textarea-vertical-align="middle" draw:auto-grow-height="false" fo:min-height="0.104cm" fo:min-width="0cm" fo:padding-top="0.139cm" fo:padding-bottom="0.139cm" fo:padding-left="0.264cm" fo:padding-right="0.264cm" fo:wrap-option="wrap" draw:shadow="hidden" draw:shadow-offset-x="0.2cm" draw:shadow-offset-y="0.2cm" draw:shadow-color="#808080" style:protect="size" loext:decorative="false"/>
    </style:style>
    <style:style style:name="gr135" style:family="graphic" style:parent-style-name="standard" style:list-style-name="L3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36" style:family="graphic" style:parent-style-name="Graphic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right" draw:textarea-vertical-align="middle" draw:auto-grow-height="false" fo:min-height="2.191cm" fo:min-width="4.481cm" fo:padding-top="0.152cm" fo:padding-bottom="0.152cm" fo:padding-left="0.6cm" fo:padding-right="0.2cm" fo:wrap-option="wrap" draw:shadow="hidden" draw:shadow-offset-x="0.2cm" draw:shadow-offset-y="0.2cm" draw:shadow-color="#808080" loext:decorative="false"/>
      <style:paragraph-properties style:writing-mode="lr-tb"/>
    </style:style>
    <style:style style:name="gr13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73cm" fo:min-width="2.47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9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1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none" draw:fill-color="#ffffff" loext:fill-use-slide-background="false" draw:textarea-horizontal-align="justify" draw:textarea-vertical-align="top" draw:auto-grow-height="false" fo:min-height="5.435cm" fo:min-width="11.107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none" draw:fill-color="#ffffff" loext:fill-use-slide-background="false" draw:textarea-horizontal-align="left" draw:textarea-vertical-align="top" draw:auto-grow-height="true" fo:min-height="0cm" fo:min-width="0cm" fo:padding-top="0.152cm" fo:padding-bottom="0.152cm" fo:padding-left="0.277cm" fo:padding-right="0.477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3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14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0.74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4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862cm" fo:min-width="2.454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7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8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9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58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50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0.697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5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306cm" fo:min-width="2.524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3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1.21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584cm" fo:min-width="2.059cm" fo:padding-top="0.152cm" fo:padding-bottom="0.152cm" fo:padding-left="0.3cm" fo:padding-right="0.27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6" style:family="graphic" style:parent-style-name="standard" style:list-style-name="L3">
      <style:graphic-properties draw:stroke="solid" svg:stroke-width="0.053cm" svg:stroke-color="#000000" draw:marker-start="" draw:marker-start-width="0.28cm" draw:marker-start-center="false" draw:marker-end="" draw:marker-end-width="0.28cm" draw:marker-end-center="false" draw:fill="none" draw:fill-color="#729fcf" loext:fill-use-slide-background="false" draw:textarea-horizontal-align="justify" draw:textarea-vertical-align="middle" draw:auto-grow-height="false" fo:min-height="0.05cm" fo:min-width="0cm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7" style:family="graphic" style:parent-style-name="standard" style:list-style-name="L3">
      <style:graphic-properties draw:stroke="solid" draw:stroke-dash="Long_20_Dash" svg:stroke-width="0.1cm" svg:stroke-color="#000000" draw:marker-start="" draw:marker-start-width="0.35cm" draw:marker-start-center="false" draw:marker-end="UML_20_Arrow" draw:marker-end-width="0.35cm" draw:marker-end-center="false" draw:fill="solid" draw:fill-color="#000000" draw:textarea-horizontal-align="justify" draw:textarea-vertical-align="middle" draw:auto-grow-height="false" fo:min-height="0cm" fo:min-width="0cm" fo:padding-top="0.175cm" fo:padding-bottom="0.175cm" fo:padding-left="0.3cm" fo:padding-right="0.3cm" fo:wrap-option="wrap" draw:shadow="hidden" draw:shadow-offset-x="0.2cm" draw:shadow-offset-y="0.2cm" draw:shadow-color="#808080" loext:decorative="false"/>
    </style:style>
    <style:style style:name="gr158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9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0" style:family="graphic" style:parent-style-name="Heading">
      <style:graphic-properties draw:stroke="none" draw:fill="none" draw:textarea-horizontal-align="left" draw:textarea-vertical-align="top" draw:auto-grow-height="true" draw:auto-grow-width="true" fo:min-height="0.543cm" fo:min-width="3.213cm" fo:padding-top="0cm" fo:padding-bottom="0cm" fo:padding-left="0cm" fo:padding-right="0cm" loext:decorative="false"/>
      <style:paragraph-properties style:writing-mode="lr-tb"/>
    </style:style>
    <style:style style:name="gr161" style:family="graphic" style:parent-style-name="Body_20_Text">
      <style:graphic-properties draw:stroke="none" svg:stroke-color="#000000" draw:auto-grow-height="true" draw:auto-grow-width="false" fo:min-height="6.038cm" loext:decorative="false"/>
      <style:paragraph-properties style:writing-mode="lr-tb"/>
    </style:style>
    <style:style style:name="gr162" style:family="graphic" style:parent-style-name="Heading">
      <style:graphic-properties draw:stroke="none" draw:fill="none" draw:textarea-horizontal-align="left" draw:textarea-vertical-align="top" draw:auto-grow-height="true" draw:auto-grow-width="true" fo:min-height="0.543cm" fo:min-width="7.789cm" fo:padding-top="0cm" fo:padding-bottom="0cm" fo:padding-left="0cm" fo:padding-right="0cm" loext:decorative="false"/>
      <style:paragraph-properties style:writing-mode="lr-tb"/>
    </style:style>
    <style:style style:name="gr163" style:family="graphic" style:parent-style-name="Body_20_Text">
      <style:graphic-properties draw:stroke="none" svg:stroke-color="#000000" draw:auto-grow-height="true" draw:auto-grow-width="false" fo:min-height="7.567cm" loext:decorative="false"/>
      <style:paragraph-properties style:writing-mode="lr-tb"/>
    </style:style>
    <style:style style:name="gr1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5" style:family="graphic" style:parent-style-name="Body_20_Text">
      <style:graphic-properties draw:stroke="none" svg:stroke-color="#000000" draw:auto-grow-height="true" draw:auto-grow-width="false" fo:min-height="6.497cm" loext:decorative="false"/>
      <style:paragraph-properties style:writing-mode="lr-tb"/>
    </style:style>
    <style:style style:name="gr166" style:family="graphic" style:parent-style-name="caption">
      <style:graphic-properties draw:stroke="none" svg:stroke-color="#000000" draw:fill="none" draw:fill-color="#ffffff" draw:auto-grow-height="true" draw:auto-grow-width="false" fo:min-height="9.652cm" loext:decorative="false"/>
      <style:paragraph-properties style:writing-mode="lr-tb"/>
    </style:style>
    <style:style style:name="gr167" style:family="graphic" style:parent-style-name="caption">
      <style:graphic-properties draw:stroke="none" svg:stroke-color="#000000" draw:fill="none" draw:fill-color="#ffffff" draw:auto-grow-height="true" draw:auto-grow-width="false" fo:min-height="1.171cm" loext:decorative="false"/>
      <style:paragraph-properties style:writing-mode="lr-tb"/>
    </style:style>
    <style:style style:name="gr168" style:family="graphic" style:parent-style-name="caption">
      <style:graphic-properties draw:stroke="none" svg:stroke-color="#000000" draw:fill="none" draw:fill-color="#ffffff" draw:auto-grow-height="true" draw:auto-grow-width="false" fo:min-height="6.991cm" loext:decorative="false"/>
      <style:paragraph-properties style:writing-mode="lr-tb"/>
    </style:style>
    <style:style style:name="gr169" style:family="graphic" style:parent-style-name="standard" style:list-style-name="L3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000000" loext:fill-use-slide-background="false" draw:textarea-horizontal-align="justify" draw:textarea-vertical-align="middle" draw:auto-grow-height="false" fo:min-height="0.104cm" fo:min-width="0cm" fo:padding-top="0.139cm" fo:padding-bottom="0.139cm" fo:padding-left="0.264cm" fo:padding-right="0.264cm" fo:wrap-option="wrap" draw:shadow="hidden" draw:shadow-offset-x="0.2cm" draw:shadow-offset-y="0.2cm" draw:shadow-color="#808080" style:protect="size" loext:decorative="false"/>
    </style:style>
    <style:style style:name="gr170" style:family="graphic" style:parent-style-name="standard" style:list-style-name="L3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7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1.197cm" fo:min-width="1.684cm" fo:padding-top="0.152cm" fo:padding-bottom="0.152cm" fo:padding-left="0.3cm" fo:padding-right="0.27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174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5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6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7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179" style:family="graphic" style:parent-style-name="standard" style:list-style-name="L3">
      <style:graphic-properties draw:stroke="solid" svg:stroke-width="0.053cm" svg:stroke-color="#000000" draw:marker-start="" draw:marker-start-width="0.28cm" draw:marker-start-center="false" draw:marker-end="" draw:marker-end-width="0.28cm" draw:marker-end-center="false" draw:fill="none" draw:fill-color="#729fcf" loext:fill-use-slide-background="false" draw:textarea-horizontal-align="justify" draw:textarea-vertical-align="middle" draw:auto-grow-height="false" fo:min-height="0.05cm" fo:min-width="0cm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0" style:family="graphic" style:parent-style-name="standard" style:list-style-name="L3">
      <style:graphic-properties draw:stroke="solid" draw:stroke-dash="Long_20_Dash" svg:stroke-width="0.1cm" svg:stroke-color="#000000" draw:marker-start="" draw:marker-start-width="0.35cm" draw:marker-start-center="false" draw:marker-end="UML_20_Arrow" draw:marker-end-width="0.35cm" draw:marker-end-center="false" draw:fill="solid" draw:fill-color="#000000" draw:textarea-horizontal-align="justify" draw:textarea-vertical-align="middle" draw:auto-grow-height="false" fo:min-height="0cm" fo:min-width="0cm" fo:padding-top="0.175cm" fo:padding-bottom="0.175cm" fo:padding-left="0.3cm" fo:padding-right="0.3cm" fo:wrap-option="wrap" draw:shadow="hidden" draw:shadow-offset-x="0.2cm" draw:shadow-offset-y="0.2cm" draw:shadow-color="#808080" loext:decorative="false"/>
    </style:style>
    <style:style style:name="gr18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right" draw:textarea-vertical-align="middle" draw:auto-grow-height="false" fo:min-height="2.191cm" fo:min-width="4.481cm" fo:padding-top="0.152cm" fo:padding-bottom="0.152cm" fo:padding-left="0.6cm" fo:padding-right="0.2cm" fo:wrap-option="wrap" draw:shadow="hidden" draw:shadow-offset-x="0.2cm" draw:shadow-offset-y="0.2cm" draw:shadow-color="#808080" loext:decorative="false"/>
      <style:paragraph-properties style:writing-mode="lr-tb"/>
    </style:style>
    <style:style style:name="gr18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1.12cm" fo:min-width="3.697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3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4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5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8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87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88" style:family="graphic" style:parent-style-name="Body_20_Text">
      <style:graphic-properties draw:stroke="none" svg:stroke-color="#000000" draw:auto-grow-height="true" draw:auto-grow-width="false" fo:min-height="1.071cm" loext:decorative="false"/>
      <style:paragraph-properties style:writing-mode="lr-tb"/>
    </style:style>
    <style:style style:name="gr189" style:family="graphic" style:parent-style-name="Heading">
      <style:graphic-properties draw:stroke="none" draw:fill="none" draw:textarea-horizontal-align="left" draw:textarea-vertical-align="top" draw:auto-grow-height="true" draw:auto-grow-width="true" fo:min-height="0.543cm" fo:min-width="8.588cm" fo:padding-top="0cm" fo:padding-bottom="0cm" fo:padding-left="0cm" fo:padding-right="0cm" loext:decorative="false"/>
      <style:paragraph-properties style:writing-mode="lr-tb"/>
    </style:style>
    <style:style style:name="gr190" style:family="graphic" style:parent-style-name="Body_20_Text">
      <style:graphic-properties draw:stroke="none" svg:stroke-color="#000000" draw:textarea-horizontal-align="left" draw:auto-grow-height="true" draw:auto-grow-width="false" fo:min-height="0.68cm" loext:decorative="false"/>
      <style:paragraph-properties style:writing-mode="lr-tb"/>
    </style:style>
    <style:style style:name="gr191" style:family="graphic" style:parent-style-name="Body_20_Text">
      <style:graphic-properties draw:stroke="none" svg:stroke-color="#000000" draw:auto-grow-height="true" draw:auto-grow-width="false" fo:min-height="1.147cm" loext:decorative="false"/>
      <style:paragraph-properties style:writing-mode="lr-tb"/>
    </style:style>
    <style:style style:name="gr192" style:family="graphic" style:parent-style-name="caption">
      <style:graphic-properties draw:stroke="none" svg:stroke-color="#000000" draw:fill="none" draw:fill-color="#ffffff" draw:auto-grow-height="true" draw:auto-grow-width="false" fo:min-height="5.593cm" loext:decorative="false"/>
      <style:paragraph-properties style:writing-mode="lr-tb"/>
    </style:style>
    <style:style style:name="gr193" style:family="graphic" style:parent-style-name="Heading">
      <style:graphic-properties draw:stroke="none" draw:fill="none" draw:textarea-horizontal-align="left" draw:textarea-vertical-align="top" draw:auto-grow-height="true" draw:auto-grow-width="true" fo:min-height="0.543cm" fo:min-width="8.601cm" fo:padding-top="0cm" fo:padding-bottom="0cm" fo:padding-left="0cm" fo:padding-right="0cm" loext:decorative="false"/>
      <style:paragraph-properties style:writing-mode="lr-tb"/>
    </style:style>
    <style:style style:name="gr194" style:family="graphic" style:parent-style-name="standard" style:list-style-name="L3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000000" loext:fill-use-slide-background="false" draw:textarea-horizontal-align="justify" draw:textarea-vertical-align="middle" draw:auto-grow-height="false" fo:min-height="0.104cm" fo:min-width="0cm" fo:padding-top="0.139cm" fo:padding-bottom="0.139cm" fo:padding-left="0.264cm" fo:padding-right="0.264cm" fo:wrap-option="wrap" draw:shadow="hidden" draw:shadow-offset-x="0.2cm" draw:shadow-offset-y="0.2cm" draw:shadow-color="#808080" style:protect="size" loext:decorative="false"/>
    </style:style>
    <style:style style:name="gr195" style:family="graphic" style:parent-style-name="standard" style:list-style-name="L3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96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349cm" fo:min-width="1.319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right" draw:textarea-vertical-align="middle" draw:auto-grow-height="false" fo:min-height="2.191cm" fo:min-width="4.481cm" fo:padding-top="0.152cm" fo:padding-bottom="0.152cm" fo:padding-left="0.6cm" fo:padding-right="0.2cm" fo:wrap-option="wrap" draw:shadow="hidden" draw:shadow-offset-x="0.2cm" draw:shadow-offset-y="0.2cm" draw:shadow-color="#808080" loext:decorative="false"/>
      <style:paragraph-properties style:writing-mode="lr-tb"/>
    </style:style>
    <style:style style:name="gr19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967cm" fo:min-width="1.365cm" fo:padding-top="0.152cm" fo:padding-bottom="0.152cm" fo:padding-left="0.3cm" fo:padding-right="0.27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20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2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3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205" style:family="graphic" style:parent-style-name="standard" style:list-style-name="L3">
      <style:graphic-properties draw:stroke="solid" svg:stroke-width="0.053cm" svg:stroke-color="#000000" draw:marker-start="" draw:marker-start-width="0.28cm" draw:marker-start-center="false" draw:marker-end="" draw:marker-end-width="0.28cm" draw:marker-end-center="false" draw:fill="none" draw:fill-color="#729fcf" loext:fill-use-slide-background="false" draw:textarea-horizontal-align="justify" draw:textarea-vertical-align="middle" draw:auto-grow-height="false" fo:min-height="0.05cm" fo:min-width="0cm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6" style:family="graphic" style:parent-style-name="standard" style:list-style-name="L3">
      <style:graphic-properties draw:stroke="solid" draw:stroke-dash="Long_20_Dash" svg:stroke-width="0.1cm" svg:stroke-color="#000000" draw:marker-start="" draw:marker-start-width="0.35cm" draw:marker-start-center="false" draw:marker-end="UML_20_Arrow" draw:marker-end-width="0.35cm" draw:marker-end-center="false" draw:fill="solid" draw:fill-color="#000000" draw:textarea-horizontal-align="justify" draw:textarea-vertical-align="middle" draw:auto-grow-height="false" fo:min-height="0cm" fo:min-width="0cm" fo:padding-top="0.175cm" fo:padding-bottom="0.175cm" fo:padding-left="0.3cm" fo:padding-right="0.3cm" fo:wrap-option="wrap" draw:shadow="hidden" draw:shadow-offset-x="0.2cm" draw:shadow-offset-y="0.2cm" draw:shadow-color="#808080" loext:decorative="false"/>
    </style:style>
    <style:style style:name="gr207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8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9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0.74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10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0.697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1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2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214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0.74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1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602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439cm" fo:min-width="4.089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1.232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19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0.697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22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2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2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2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439cm" fo:min-width="2.957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504cm" fo:min-width="2.644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7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8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439cm" fo:min-width="2.836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0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1.08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3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32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33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34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3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0.697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3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0.74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37" style:family="graphic" style:parent-style-name="Body_20_Text">
      <style:graphic-properties draw:stroke="none" svg:stroke-color="#000000" draw:auto-grow-height="true" draw:auto-grow-width="false" fo:min-height="4.867cm" loext:decorative="false"/>
      <style:paragraph-properties style:writing-mode="lr-tb"/>
    </style:style>
    <style:style style:name="gr238" style:family="graphic" style:parent-style-name="standard" style:list-style-name="L3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000000" loext:fill-use-slide-background="false" draw:textarea-horizontal-align="justify" draw:textarea-vertical-align="middle" draw:auto-grow-height="false" fo:min-height="0.104cm" fo:min-width="0cm" fo:padding-top="0.139cm" fo:padding-bottom="0.139cm" fo:padding-left="0.264cm" fo:padding-right="0.264cm" fo:wrap-option="wrap" draw:shadow="hidden" draw:shadow-offset-x="0.2cm" draw:shadow-offset-y="0.2cm" draw:shadow-color="#808080" style:protect="size" loext:decorative="false"/>
    </style:style>
    <style:style style:name="gr239" style:family="graphic" style:parent-style-name="standard" style:list-style-name="L3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40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1.12cm" fo:min-width="3.58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1.12cm" fo:min-width="4.569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1.293cm" fo:min-width="5.702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1.033cm" fo:min-width="1.882cm" fo:padding-top="0.152cm" fo:padding-bottom="0.152cm" fo:padding-left="0.3cm" fo:padding-right="0.27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right" draw:textarea-vertical-align="middle" draw:auto-grow-height="false" fo:min-height="2.191cm" fo:min-width="4.481cm" fo:padding-top="0.152cm" fo:padding-bottom="0.152cm" fo:padding-left="0.6cm" fo:padding-right="0.2cm" fo:wrap-option="wrap" draw:shadow="hidden" draw:shadow-offset-x="0.2cm" draw:shadow-offset-y="0.2cm" draw:shadow-color="#808080" loext:decorative="false"/>
      <style:paragraph-properties style:writing-mode="lr-tb"/>
    </style:style>
    <style:style style:name="gr246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7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8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9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50" style:family="graphic" style:parent-style-name="standard" style:list-style-name="L3">
      <style:graphic-properties draw:stroke="solid" svg:stroke-width="0.053cm" svg:stroke-color="#000000" draw:marker-start="" draw:marker-start-width="0.28cm" draw:marker-start-center="false" draw:marker-end="" draw:marker-end-width="0.28cm" draw:marker-end-center="false" draw:fill="none" draw:fill-color="#729fcf" loext:fill-use-slide-background="false" draw:textarea-horizontal-align="justify" draw:textarea-vertical-align="middle" draw:auto-grow-height="false" fo:min-height="0.05cm" fo:min-width="0cm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51" style:family="graphic" style:parent-style-name="standard" style:list-style-name="L3">
      <style:graphic-properties draw:stroke="solid" draw:stroke-dash="Long_20_Dash" svg:stroke-width="0.1cm" svg:stroke-color="#000000" draw:marker-start="" draw:marker-start-width="0.35cm" draw:marker-start-center="false" draw:marker-end="UML_20_Arrow" draw:marker-end-width="0.35cm" draw:marker-end-center="false" draw:fill="solid" draw:fill-color="#000000" draw:textarea-horizontal-align="justify" draw:textarea-vertical-align="middle" draw:auto-grow-height="false" fo:min-height="0cm" fo:min-width="0cm" fo:padding-top="0.175cm" fo:padding-bottom="0.175cm" fo:padding-left="0.3cm" fo:padding-right="0.3cm" fo:wrap-option="wrap" draw:shadow="hidden" draw:shadow-offset-x="0.2cm" draw:shadow-offset-y="0.2cm" draw:shadow-color="#808080" loext:decorative="false"/>
    </style:style>
    <style:style style:name="gr252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53" style:family="graphic" style:parent-style-name="Heading">
      <style:graphic-properties draw:stroke="none" draw:fill="none" draw:textarea-horizontal-align="left" draw:textarea-vertical-align="top" draw:auto-grow-height="true" draw:auto-grow-width="true" fo:min-height="0.543cm" fo:min-width="10.763cm" fo:padding-top="0cm" fo:padding-bottom="0cm" fo:padding-left="0cm" fo:padding-right="0cm" loext:decorative="false"/>
      <style:paragraph-properties style:writing-mode="lr-tb"/>
    </style:style>
    <style:style style:name="gr254" style:family="graphic" style:parent-style-name="Body_20_Text">
      <style:graphic-properties draw:stroke="none" svg:stroke-color="#000000" draw:auto-grow-height="true" draw:auto-grow-width="false" fo:min-height="4.816cm" loext:decorative="false"/>
      <style:paragraph-properties style:writing-mode="lr-tb"/>
    </style:style>
    <style:style style:name="gr255" style:family="graphic" style:parent-style-name="Body_20_Text">
      <style:graphic-properties draw:stroke="none" svg:stroke-color="#000000" draw:auto-grow-height="true" draw:auto-grow-width="false" fo:min-height="0.536cm" loext:decorative="false"/>
      <style:paragraph-properties style:writing-mode="lr-tb"/>
    </style:style>
    <style:style style:name="gr256" style:family="graphic" style:parent-style-name="Body_20_Text">
      <style:graphic-properties draw:stroke="none" svg:stroke-color="#000000" draw:auto-grow-height="true" draw:auto-grow-width="false" fo:min-height="3.313cm" loext:decorative="false"/>
      <style:paragraph-properties style:writing-mode="lr-tb"/>
    </style:style>
    <style:style style:name="gr257" style:family="graphic" style:parent-style-name="standard" style:list-style-name="L3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000000" loext:fill-use-slide-background="false" draw:textarea-horizontal-align="justify" draw:textarea-vertical-align="middle" draw:auto-grow-height="false" fo:min-height="0.104cm" fo:min-width="0cm" fo:padding-top="0.139cm" fo:padding-bottom="0.139cm" fo:padding-left="0.264cm" fo:padding-right="0.264cm" fo:wrap-option="wrap" draw:shadow="hidden" draw:shadow-offset-x="0.2cm" draw:shadow-offset-y="0.2cm" draw:shadow-color="#808080" style:protect="size" loext:decorative="false"/>
    </style:style>
    <style:style style:name="gr258" style:family="graphic" style:parent-style-name="standard" style:list-style-name="L3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59" style:family="graphic" style:parent-style-name="Graphic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right" draw:textarea-vertical-align="middle" draw:auto-grow-height="false" fo:min-height="2.191cm" fo:min-width="4.481cm" fo:padding-top="0.152cm" fo:padding-bottom="0.152cm" fo:padding-left="0.6cm" fo:padding-right="0.2cm" fo:wrap-option="wrap" draw:shadow="hidden" draw:shadow-offset-x="0.2cm" draw:shadow-offset-y="0.2cm" draw:shadow-color="#808080" loext:decorative="false"/>
      <style:paragraph-properties style:writing-mode="lr-tb"/>
    </style:style>
    <style:style style:name="gr26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73cm" fo:min-width="2.879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2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26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none" draw:fill-color="#ffffff" loext:fill-use-slide-background="false" draw:textarea-horizontal-align="justify" draw:textarea-vertical-align="top" draw:auto-grow-height="false" fo:min-height="6.479cm" fo:min-width="16.127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none" draw:fill-color="#ffffff" loext:fill-use-slide-background="false" draw:textarea-horizontal-align="left" draw:textarea-vertical-align="top" draw:auto-grow-height="true" fo:min-height="0cm" fo:min-width="0cm" fo:padding-top="0.152cm" fo:padding-bottom="0.152cm" fo:padding-left="0.277cm" fo:padding-right="0.477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6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26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0.74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588cm" fo:min-width="2.828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0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58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7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0.697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74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5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1.21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584cm" fo:min-width="2.181cm" fo:padding-top="0.152cm" fo:padding-bottom="0.152cm" fo:padding-left="0.3cm" fo:padding-right="0.27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8" style:family="graphic" style:parent-style-name="standard" style:list-style-name="L3">
      <style:graphic-properties draw:stroke="solid" svg:stroke-width="0.053cm" svg:stroke-color="#000000" draw:marker-start="" draw:marker-start-width="0.28cm" draw:marker-start-center="false" draw:marker-end="" draw:marker-end-width="0.28cm" draw:marker-end-center="false" draw:fill="none" draw:fill-color="#729fcf" loext:fill-use-slide-background="false" draw:textarea-horizontal-align="justify" draw:textarea-vertical-align="middle" draw:auto-grow-height="false" fo:min-height="0.05cm" fo:min-width="0cm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9" style:family="graphic" style:parent-style-name="standard" style:list-style-name="L3">
      <style:graphic-properties draw:stroke="solid" draw:stroke-dash="Long_20_Dash" svg:stroke-width="0.1cm" svg:stroke-color="#000000" draw:marker-start="" draw:marker-start-width="0.35cm" draw:marker-start-center="false" draw:marker-end="UML_20_Arrow" draw:marker-end-width="0.35cm" draw:marker-end-center="false" draw:fill="solid" draw:fill-color="#000000" draw:textarea-horizontal-align="justify" draw:textarea-vertical-align="middle" draw:auto-grow-height="false" fo:min-height="0cm" fo:min-width="0cm" fo:padding-top="0.175cm" fo:padding-bottom="0.175cm" fo:padding-left="0.3cm" fo:padding-right="0.3cm" fo:wrap-option="wrap" draw:shadow="hidden" draw:shadow-offset-x="0.2cm" draw:shadow-offset-y="0.2cm" draw:shadow-color="#808080" loext:decorative="false"/>
    </style:style>
    <style:style style:name="gr280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28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98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8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466cm" fo:min-width="0.838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4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466cm" fo:min-width="2.245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287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8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466cm" fo:min-width="4.042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0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9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9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0.697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9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0.74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9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592cm" fo:min-width="3.302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5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96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97" style:family="graphic" style:parent-style-name="caption">
      <style:graphic-properties draw:stroke="none" svg:stroke-color="#000000" draw:fill="none" draw:fill-color="#ffffff" draw:auto-grow-height="true" draw:auto-grow-width="false" fo:min-height="1.315cm" loext:decorative="false"/>
      <style:paragraph-properties style:writing-mode="lr-tb"/>
    </style:style>
    <style:style style:name="gr298" style:family="graphic" style:parent-style-name="Body_20_Text">
      <style:graphic-properties draw:stroke="none" svg:stroke-color="#000000" draw:auto-grow-height="true" draw:auto-grow-width="false" fo:min-height="7.605cm" loext:decorative="false"/>
      <style:paragraph-properties style:writing-mode="lr-tb"/>
    </style:style>
    <style:style style:name="gr299" style:family="graphic" style:parent-style-name="standard">
      <style:graphic-properties draw:stroke="none" draw:fill="none" fo:min-height="1.433cm" loext:decorative="false"/>
      <style:paragraph-properties style:writing-mode="lr-tb"/>
    </style:style>
    <style:style style:name="gr300" style:family="graphic" style:parent-style-name="standard">
      <style:graphic-properties draw:stroke="none" draw:fill="none" fo:min-height="1.337cm" loext:decorative="false"/>
      <style:paragraph-properties style:writing-mode="lr-tb"/>
    </style:style>
    <style:style style:name="gr301" style:family="graphic" style:parent-style-name="Heading">
      <style:graphic-properties draw:stroke="none" draw:fill="none" draw:textarea-horizontal-align="left" draw:textarea-vertical-align="top" draw:auto-grow-height="true" draw:auto-grow-width="true" fo:min-height="0.624cm" fo:min-width="8.46cm" fo:padding-top="0cm" fo:padding-bottom="0cm" fo:padding-left="0cm" fo:padding-right="0cm" loext:decorative="false"/>
      <style:paragraph-properties style:writing-mode="lr-tb"/>
    </style:style>
    <style:style style:name="gr302" style:family="graphic" style:parent-style-name="Body_20_Text">
      <style:graphic-properties draw:stroke="none" svg:stroke-color="#000000" draw:auto-grow-height="true" draw:auto-grow-width="false" fo:min-height="2.141cm" loext:decorative="false"/>
      <style:paragraph-properties style:writing-mode="lr-tb"/>
    </style:style>
    <style:style style:name="gr303" style:family="graphic" style:parent-style-name="standard" style:list-style-name="L3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000000" loext:fill-use-slide-background="false" draw:textarea-horizontal-align="justify" draw:textarea-vertical-align="middle" draw:auto-grow-height="false" fo:min-height="0.104cm" fo:min-width="0cm" fo:padding-top="0.139cm" fo:padding-bottom="0.139cm" fo:padding-left="0.264cm" fo:padding-right="0.264cm" fo:wrap-option="wrap" draw:shadow="hidden" draw:shadow-offset-x="0.2cm" draw:shadow-offset-y="0.2cm" draw:shadow-color="#808080" style:protect="size" loext:decorative="false"/>
    </style:style>
    <style:style style:name="gr304" style:family="graphic" style:parent-style-name="standard" style:list-style-name="L3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305" style:family="graphic" style:parent-style-name="Graphic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0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right" draw:textarea-vertical-align="middle" draw:auto-grow-height="false" fo:min-height="2.191cm" fo:min-width="4.481cm" fo:padding-top="0.152cm" fo:padding-bottom="0.152cm" fo:padding-left="0.6cm" fo:padding-right="0.2cm" fo:wrap-option="wrap" draw:shadow="hidden" draw:shadow-offset-x="0.2cm" draw:shadow-offset-y="0.2cm" draw:shadow-color="#808080" loext:decorative="false"/>
      <style:paragraph-properties style:writing-mode="lr-tb"/>
    </style:style>
    <style:style style:name="gr30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911cm" fo:min-width="4.468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8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0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3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none" draw:fill-color="#ffffff" loext:fill-use-slide-background="false" draw:textarea-horizontal-align="justify" draw:textarea-vertical-align="top" draw:auto-grow-height="false" fo:min-height="6.859cm" fo:min-width="17.563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none" draw:fill-color="#ffffff" loext:fill-use-slide-background="false" draw:textarea-horizontal-align="left" draw:textarea-vertical-align="top" draw:auto-grow-height="true" fo:min-height="0cm" fo:min-width="0cm" fo:padding-top="0.152cm" fo:padding-bottom="0.152cm" fo:padding-left="0.277cm" fo:padding-right="0.477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2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31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0.74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15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1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58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17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0.697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18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19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0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1.21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671cm" fo:min-width="2.181cm" fo:padding-top="0.152cm" fo:padding-bottom="0.152cm" fo:padding-left="0.3cm" fo:padding-right="0.27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2" style:family="graphic" style:parent-style-name="standard" style:list-style-name="L3">
      <style:graphic-properties draw:stroke="solid" svg:stroke-width="0.053cm" svg:stroke-color="#000000" draw:marker-start="" draw:marker-start-width="0.28cm" draw:marker-start-center="false" draw:marker-end="" draw:marker-end-width="0.28cm" draw:marker-end-center="false" draw:fill="none" draw:fill-color="#729fcf" loext:fill-use-slide-background="false" draw:textarea-horizontal-align="justify" draw:textarea-vertical-align="middle" draw:auto-grow-height="false" fo:min-height="0.05cm" fo:min-width="0cm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3" style:family="graphic" style:parent-style-name="standard" style:list-style-name="L3">
      <style:graphic-properties draw:stroke="solid" draw:stroke-dash="Long_20_Dash" svg:stroke-width="0.1cm" svg:stroke-color="#000000" draw:marker-start="" draw:marker-start-width="0.35cm" draw:marker-start-center="false" draw:marker-end="UML_20_Arrow" draw:marker-end-width="0.35cm" draw:marker-end-center="false" draw:fill="solid" draw:fill-color="#000000" draw:textarea-horizontal-align="justify" draw:textarea-vertical-align="middle" draw:auto-grow-height="false" fo:min-height="0cm" fo:min-width="0cm" fo:padding-top="0.175cm" fo:padding-bottom="0.175cm" fo:padding-left="0.3cm" fo:padding-right="0.3cm" fo:wrap-option="wrap" draw:shadow="hidden" draw:shadow-offset-x="0.2cm" draw:shadow-offset-y="0.2cm" draw:shadow-color="#808080" loext:decorative="false"/>
    </style:style>
    <style:style style:name="gr324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3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466cm" fo:min-width="0.838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7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329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0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2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0.697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3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0.74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741cm" fo:min-width="3.875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6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7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58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340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4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4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0.74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631cm" fo:min-width="3.241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4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4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0.74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4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1.987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348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4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3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1.401cm" fo:min-width="4.279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5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5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631cm" fo:min-width="3.241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4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55" style:family="graphic" style:parent-style-name="caption">
      <style:graphic-properties draw:stroke="none" svg:stroke-color="#000000" draw:fill="none" draw:fill-color="#ffffff" draw:auto-grow-height="true" draw:auto-grow-width="false" fo:min-height="1.612cm" loext:decorative="false"/>
      <style:paragraph-properties style:writing-mode="lr-tb"/>
    </style:style>
    <style:style style:name="gr356" style:family="graphic" style:parent-style-name="Body_20_Text">
      <style:graphic-properties draw:stroke="none" svg:stroke-color="#000000" draw:auto-grow-height="true" draw:auto-grow-width="false" fo:min-height="1.973cm" loext:decorative="false"/>
      <style:paragraph-properties style:writing-mode="lr-tb"/>
    </style:style>
    <style:style style:name="gr357" style:family="graphic" style:parent-style-name="caption">
      <style:graphic-properties draw:stroke="none" svg:stroke-color="#000000" draw:fill="none" draw:fill-color="#ffffff" draw:auto-grow-height="true" draw:auto-grow-width="false" fo:min-height="3.655cm" loext:decorative="false"/>
      <style:paragraph-properties style:writing-mode="lr-tb"/>
    </style:style>
    <style:style style:name="gr358" style:family="graphic" style:parent-style-name="Body_20_Text">
      <style:graphic-properties draw:stroke="none" svg:stroke-color="#000000" draw:auto-grow-height="true" draw:auto-grow-width="false" fo:min-height="1.119cm" loext:decorative="false"/>
      <style:paragraph-properties style:writing-mode="lr-tb"/>
    </style:style>
    <style:style style:name="gr359" style:family="graphic" style:parent-style-name="standard" style:list-style-name="L3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000000" loext:fill-use-slide-background="false" draw:textarea-horizontal-align="justify" draw:textarea-vertical-align="middle" draw:auto-grow-height="false" fo:min-height="0.104cm" fo:min-width="0cm" fo:padding-top="0.139cm" fo:padding-bottom="0.139cm" fo:padding-left="0.264cm" fo:padding-right="0.264cm" fo:wrap-option="wrap" draw:shadow="hidden" draw:shadow-offset-x="0.2cm" draw:shadow-offset-y="0.2cm" draw:shadow-color="#808080" style:protect="size" loext:decorative="false"/>
    </style:style>
    <style:style style:name="gr360" style:family="graphic" style:parent-style-name="standard" style:list-style-name="L3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361" style:family="graphic" style:parent-style-name="Graphic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6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right" draw:textarea-vertical-align="middle" draw:auto-grow-height="false" fo:min-height="2.191cm" fo:min-width="4.481cm" fo:padding-top="0.152cm" fo:padding-bottom="0.152cm" fo:padding-left="0.6cm" fo:padding-right="0.2cm" fo:wrap-option="wrap" draw:shadow="hidden" draw:shadow-offset-x="0.2cm" draw:shadow-offset-y="0.2cm" draw:shadow-color="#808080" loext:decorative="false"/>
      <style:paragraph-properties style:writing-mode="lr-tb"/>
    </style:style>
    <style:style style:name="gr3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1.245cm" fo:min-width="4.426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4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6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36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none" draw:fill-color="#ffffff" loext:fill-use-slide-background="false" draw:textarea-horizontal-align="justify" draw:textarea-vertical-align="top" draw:auto-grow-height="false" fo:min-height="7.016cm" fo:min-width="17.206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none" draw:fill-color="#ffffff" loext:fill-use-slide-background="false" draw:textarea-horizontal-align="left" draw:textarea-vertical-align="top" draw:auto-grow-height="true" fo:min-height="0cm" fo:min-width="0cm" fo:padding-top="0.152cm" fo:padding-bottom="0.152cm" fo:padding-left="0.277cm" fo:padding-right="0.477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8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370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0.74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7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7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58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7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0.697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74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75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7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1.21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671cm" fo:min-width="2.181cm" fo:padding-top="0.152cm" fo:padding-bottom="0.152cm" fo:padding-left="0.3cm" fo:padding-right="0.27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8" style:family="graphic" style:parent-style-name="standard" style:list-style-name="L3">
      <style:graphic-properties draw:stroke="solid" svg:stroke-width="0.053cm" svg:stroke-color="#000000" draw:marker-start="" draw:marker-start-width="0.28cm" draw:marker-start-center="false" draw:marker-end="" draw:marker-end-width="0.28cm" draw:marker-end-center="false" draw:fill="none" draw:fill-color="#729fcf" loext:fill-use-slide-background="false" draw:textarea-horizontal-align="justify" draw:textarea-vertical-align="middle" draw:auto-grow-height="false" fo:min-height="0.05cm" fo:min-width="0cm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79" style:family="graphic" style:parent-style-name="standard" style:list-style-name="L3">
      <style:graphic-properties draw:stroke="solid" draw:stroke-dash="Long_20_Dash" svg:stroke-width="0.1cm" svg:stroke-color="#000000" draw:marker-start="" draw:marker-start-width="0.35cm" draw:marker-start-center="false" draw:marker-end="UML_20_Arrow" draw:marker-end-width="0.35cm" draw:marker-end-center="false" draw:fill="solid" draw:fill-color="#000000" draw:textarea-horizontal-align="justify" draw:textarea-vertical-align="middle" draw:auto-grow-height="false" fo:min-height="0cm" fo:min-width="0cm" fo:padding-top="0.175cm" fo:padding-bottom="0.175cm" fo:padding-left="0.3cm" fo:padding-right="0.3cm" fo:wrap-option="wrap" draw:shadow="hidden" draw:shadow-offset-x="0.2cm" draw:shadow-offset-y="0.2cm" draw:shadow-color="#808080" loext:decorative="false"/>
    </style:style>
    <style:style style:name="gr380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1.011cm" fo:min-width="3.564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2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3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4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0.74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8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854cm" fo:min-width="2.069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7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0.74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89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1.987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9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631cm" fo:min-width="3.241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9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39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788cm" fo:min-width="3.869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4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9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39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693cm" fo:min-width="3.162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7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98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99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1.21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400" style:family="graphic" style:parent-style-name="Body_20_Text">
      <style:graphic-properties draw:stroke="none" svg:stroke-color="#000000" draw:auto-grow-height="true" draw:auto-grow-width="false" fo:min-height="1.468cm" loext:decorative="false"/>
      <style:paragraph-properties style:writing-mode="lr-tb"/>
    </style:style>
    <style:style style:name="gr40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02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6.257cm" fo:padding-top="0cm" fo:padding-bottom="0cm" fo:padding-left="0cm" fo:padding-right="0cm" loext:decorative="false"/>
      <style:paragraph-properties style:writing-mode="lr-tb"/>
    </style:style>
    <style:style style:name="gr403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1.147cm" fo:padding-top="0cm" fo:padding-bottom="0cm" fo:padding-left="0cm" fo:padding-right="0cm" loext:decorative="false"/>
      <style:paragraph-properties style:writing-mode="lr-tb"/>
    </style:style>
    <style:style style:name="gr40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405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0.422cm" fo:padding-top="0cm" fo:padding-bottom="0cm" fo:padding-left="0cm" fo:padding-right="0cm" loext:decorative="false"/>
      <style:paragraph-properties style:writing-mode="lr-tb"/>
    </style:style>
    <style:style style:name="gr406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8.315cm" fo:padding-top="0cm" fo:padding-bottom="0cm" fo:padding-left="0cm" fo:padding-right="0cm" loext:decorative="false"/>
      <style:paragraph-properties style:writing-mode="lr-tb"/>
    </style:style>
    <style:style style:name="gr40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5.228cm" fo:padding-top="0cm" fo:padding-bottom="0cm" fo:padding-left="0cm" fo:padding-right="0cm" loext:decorative="false"/>
      <style:paragraph-properties style:writing-mode="lr-tb"/>
    </style:style>
    <style:style style:name="gr408" style:family="graphic" style:parent-style-name="standard">
      <style:graphic-properties draw:stroke="none" draw:fill="solid" draw:fill-color="#000000" loext:decorative="false"/>
    </style:style>
    <style:style style:name="gr409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7.964cm" fo:padding-top="0cm" fo:padding-bottom="0cm" fo:padding-left="0cm" fo:padding-right="0cm" loext:decorative="false"/>
      <style:paragraph-properties style:writing-mode="lr-tb"/>
    </style:style>
    <style:style style:name="gr410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7.666cm" fo:padding-top="0cm" fo:padding-bottom="0cm" fo:padding-left="0cm" fo:padding-right="0cm" loext:decorative="false"/>
      <style:paragraph-properties style:writing-mode="lr-tb"/>
    </style:style>
    <style:style style:name="gr411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6.88cm" fo:padding-top="0cm" fo:padding-bottom="0cm" fo:padding-left="0cm" fo:padding-right="0cm" loext:decorative="false"/>
      <style:paragraph-properties style:writing-mode="lr-tb"/>
    </style:style>
    <style:style style:name="gr412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8.675cm" fo:padding-top="0cm" fo:padding-bottom="0cm" fo:padding-left="0cm" fo:padding-right="0cm" loext:decorative="false"/>
      <style:paragraph-properties style:writing-mode="lr-tb"/>
    </style:style>
    <style:style style:name="gr413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6.827cm" fo:padding-top="0cm" fo:padding-bottom="0cm" fo:padding-left="0cm" fo:padding-right="0cm" loext:decorative="false"/>
      <style:paragraph-properties style:writing-mode="lr-tb"/>
    </style:style>
    <style:style style:name="gr414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7.521cm" fo:padding-top="0cm" fo:padding-bottom="0cm" fo:padding-left="0cm" fo:padding-right="0cm" loext:decorative="false"/>
      <style:paragraph-properties style:writing-mode="lr-tb"/>
    </style:style>
    <style:style style:name="gr415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4.625cm" fo:padding-top="0cm" fo:padding-bottom="0cm" fo:padding-left="0cm" fo:padding-right="0cm" loext:decorative="false"/>
      <style:paragraph-properties style:writing-mode="lr-tb"/>
    </style:style>
    <style:style style:name="gr416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8.708cm" fo:padding-top="0cm" fo:padding-bottom="0cm" fo:padding-left="0cm" fo:padding-right="0cm" loext:decorative="false"/>
      <style:paragraph-properties style:writing-mode="lr-tb"/>
    </style:style>
    <style:style style:name="gr41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1.762cm" fo:padding-top="0cm" fo:padding-bottom="0cm" fo:padding-left="0cm" fo:padding-right="0cm" loext:decorative="false"/>
      <style:paragraph-properties style:writing-mode="lr-tb"/>
    </style:style>
    <style:style style:name="gr418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6.991cm" fo:padding-top="0cm" fo:padding-bottom="0cm" fo:padding-left="0cm" fo:padding-right="0cm" loext:decorative="false"/>
      <style:paragraph-properties style:writing-mode="lr-tb"/>
    </style:style>
    <style:style style:name="gr419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7.777cm" fo:padding-top="0cm" fo:padding-bottom="0cm" fo:padding-left="0cm" fo:padding-right="0cm" loext:decorative="false"/>
      <style:paragraph-properties style:writing-mode="lr-tb"/>
    </style:style>
    <style:style style:name="gr420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8.185cm" fo:padding-top="0cm" fo:padding-bottom="0cm" fo:padding-left="0cm" fo:padding-right="0cm" loext:decorative="false"/>
      <style:paragraph-properties style:writing-mode="lr-tb"/>
    </style:style>
    <style:style style:name="gr421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5.936cm" fo:padding-top="0cm" fo:padding-bottom="0cm" fo:padding-left="0cm" fo:padding-right="0cm" loext:decorative="false"/>
      <style:paragraph-properties style:writing-mode="lr-tb"/>
    </style:style>
    <style:style style:name="gr422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5.041cm" fo:padding-top="0cm" fo:padding-bottom="0cm" fo:padding-left="0cm" fo:padding-right="0cm" loext:decorative="false"/>
      <style:paragraph-properties style:writing-mode="lr-tb"/>
    </style:style>
    <style:style style:name="gr423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8.32cm" fo:padding-top="0cm" fo:padding-bottom="0cm" fo:padding-left="0cm" fo:padding-right="0cm" loext:decorative="false"/>
      <style:paragraph-properties style:writing-mode="lr-tb"/>
    </style:style>
    <style:style style:name="gr424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7.934cm" fo:padding-top="0cm" fo:padding-bottom="0cm" fo:padding-left="0cm" fo:padding-right="0cm" loext:decorative="false"/>
      <style:paragraph-properties style:writing-mode="lr-tb"/>
    </style:style>
    <style:style style:name="gr425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7.44cm" fo:padding-top="0cm" fo:padding-bottom="0cm" fo:padding-left="0cm" fo:padding-right="0cm" loext:decorative="false"/>
      <style:paragraph-properties style:writing-mode="lr-tb"/>
    </style:style>
    <style:style style:name="gr426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7.836cm" fo:padding-top="0cm" fo:padding-bottom="0cm" fo:padding-left="0cm" fo:padding-right="0cm" loext:decorative="false"/>
      <style:paragraph-properties style:writing-mode="lr-tb"/>
    </style:style>
    <style:style style:name="gr42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8.36cm" fo:padding-top="0cm" fo:padding-bottom="0cm" fo:padding-left="0cm" fo:padding-right="0cm" loext:decorative="false"/>
      <style:paragraph-properties style:writing-mode="lr-tb"/>
    </style:style>
    <style:style style:name="gr428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6.137cm" fo:padding-top="0cm" fo:padding-bottom="0cm" fo:padding-left="0cm" fo:padding-right="0cm" loext:decorative="false"/>
      <style:paragraph-properties style:writing-mode="lr-tb"/>
    </style:style>
    <style:style style:name="gr429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9.83cm" fo:padding-top="0cm" fo:padding-bottom="0cm" fo:padding-left="0cm" fo:padding-right="0cm" loext:decorative="false"/>
      <style:paragraph-properties style:writing-mode="lr-tb"/>
    </style:style>
    <style:style style:name="gr430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0.449cm" fo:padding-top="0cm" fo:padding-bottom="0cm" fo:padding-left="0cm" fo:padding-right="0cm" loext:decorative="false"/>
      <style:paragraph-properties style:writing-mode="lr-tb"/>
    </style:style>
    <style:style style:name="gr431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2.596cm" fo:padding-top="0cm" fo:padding-bottom="0cm" fo:padding-left="0cm" fo:padding-right="0cm" loext:decorative="false"/>
      <style:paragraph-properties style:writing-mode="lr-tb"/>
    </style:style>
    <style:style style:name="gr432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4.619cm" fo:padding-top="0cm" fo:padding-bottom="0cm" fo:padding-left="0cm" fo:padding-right="0cm" loext:decorative="false"/>
      <style:paragraph-properties style:writing-mode="lr-tb"/>
    </style:style>
    <style:style style:name="gr433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0.444cm" fo:padding-top="0cm" fo:padding-bottom="0cm" fo:padding-left="0cm" fo:padding-right="0cm" loext:decorative="false"/>
      <style:paragraph-properties style:writing-mode="lr-tb"/>
    </style:style>
    <style:style style:name="gr434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3.652cm" fo:padding-top="0cm" fo:padding-bottom="0cm" fo:padding-left="0cm" fo:padding-right="0cm" loext:decorative="false"/>
      <style:paragraph-properties style:writing-mode="lr-tb"/>
    </style:style>
    <style:style style:name="gr435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5.929cm" fo:padding-top="0cm" fo:padding-bottom="0cm" fo:padding-left="0cm" fo:padding-right="0cm" loext:decorative="false"/>
      <style:paragraph-properties style:writing-mode="lr-tb"/>
    </style:style>
    <style:style style:name="gr436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6.73cm" fo:padding-top="0cm" fo:padding-bottom="0cm" fo:padding-left="0cm" fo:padding-right="0cm" loext:decorative="false"/>
      <style:paragraph-properties style:writing-mode="lr-tb"/>
    </style:style>
    <style:style style:name="gr43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0.45cm" fo:padding-top="0cm" fo:padding-bottom="0cm" fo:padding-left="0cm" fo:padding-right="0cm" loext:decorative="false"/>
      <style:paragraph-properties style:writing-mode="lr-tb"/>
    </style:style>
    <style:style style:name="gr438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4.1cm" fo:padding-top="0cm" fo:padding-bottom="0cm" fo:padding-left="0cm" fo:padding-right="0cm" loext:decorative="false"/>
      <style:paragraph-properties style:writing-mode="lr-tb"/>
    </style:style>
    <style:style style:name="gr439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8.251cm" fo:padding-top="0cm" fo:padding-bottom="0cm" fo:padding-left="0cm" fo:padding-right="0cm" loext:decorative="false"/>
      <style:paragraph-properties style:writing-mode="lr-tb"/>
    </style:style>
    <style:style style:name="gr440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3.895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style:font-name="FreeSerif" fo:font-size="24pt" style:font-size-asian="24pt" style:font-size-complex="24pt"/>
    </style:style>
    <style:style style:name="P3" style:family="paragraph">
      <loext:graphic-properties draw:fill="none"/>
      <style:text-properties fo:font-size="24pt" style:font-size-asian="24pt" style:font-size-complex="24pt"/>
    </style:style>
    <style:style style:name="P4" style:family="paragraph">
      <loext:graphic-properties draw:fill="none"/>
      <style:text-properties fo:font-size="3.90000009536743pt" style:font-size-asian="3.90000009536743pt" style:font-size-complex="3.90000009536743pt"/>
    </style:style>
    <style:style style:name="P5" style:family="paragraph">
      <loext:graphic-properties draw:fill="solid" draw:fill-color="#4f81bd"/>
    </style:style>
    <style:style style:name="P6" style:family="paragraph">
      <loext:graphic-properties draw:fill="none"/>
      <style:text-properties style:font-name="FreeSerif" fo:font-size="27.8999996185303pt" style:font-size-asian="27.8999996185303pt" style:font-size-complex="27.8999996185303pt"/>
    </style:style>
    <style:style style:name="P7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8" style:family="paragraph">
      <loext:graphic-properties draw:fill="none"/>
      <style:text-properties style:font-size-asian="14.1000003814697pt"/>
    </style:style>
    <style:style style:name="P9" style:family="paragraph">
      <style:paragraph-properties fo:text-align="start"/>
      <style:text-properties style:font-size-asian="12pt" style:font-size-complex="12pt"/>
    </style:style>
    <style:style style:name="P10" style:family="paragraph">
      <loext:graphic-properties draw:fill="solid" draw:fill-color="#ffffff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none"/>
      <style:paragraph-properties fo:text-align="center"/>
      <style:text-properties fo:font-size="9.89999961853027pt" style:font-size-asian="9.89999961853027pt" style:font-size-complex="9.89999961853027pt"/>
    </style:style>
    <style:style style:name="P13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14" style:family="paragraph">
      <loext:graphic-properties draw:fill="none"/>
      <style:text-properties fo:color="#77bc65" loext:opacity="100%" style:font-name="FreeSerif" fo:font-size="14.1000003814697pt" style:font-size-asian="14.1000003814697pt" style:font-size-complex="14.1000003814697pt"/>
    </style:style>
    <style:style style:name="P15" style:family="paragraph">
      <loext:graphic-properties draw:fill="none"/>
      <style:paragraph-properties fo:text-align="start"/>
      <style:text-properties fo:font-size="11.1000003814697pt" style:font-size-asian="11.1000003814697pt" style:font-size-complex="11.1000003814697pt"/>
    </style:style>
    <style:style style:name="P16" style:family="paragraph">
      <style:text-properties style:font-size-asian="3.90000009536743pt" style:font-size-complex="3.90000009536743pt"/>
    </style:style>
    <style:style style:name="P17" style:family="paragraph">
      <style:text-properties style:font-size-asian="9.89999961853027pt" style:font-size-complex="9.89999961853027pt"/>
    </style:style>
    <style:style style:name="P18" style:family="paragraph">
      <loext:graphic-properties draw:fill="none"/>
      <style:paragraph-properties fo:text-align="start"/>
      <style:text-properties fo:color="#c9211e" loext:opacity="100%" style:font-size-asian="14.1000003814697pt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text-indent="0cm" style:writing-mode="lr-tb"/>
    </style:style>
    <style:style style:name="P25" style:family="paragraph">
      <style:paragraph-properties fo:margin-left="0cm" fo:margin-right="0cm" fo:text-indent="0cm"/>
      <style:text-properties fo:font-variant="normal" fo:text-transform="none" style:use-window-font-color="true" loext:opacity="0%" style:text-outline="false" style:text-line-through-style="none" style:text-line-through-type="none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cm" fo:margin-bottom="0cm" fo:line-height="100%" fo:text-indent="0cm" style:writing-mode="lr-tb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text-properties style:font-size-asian="12pt" style:font-size-complex="12pt"/>
    </style:style>
    <style:style style:name="P29" style:family="paragraph">
      <loext:graphic-properties draw:fill="solid" draw:fill-color="#ffffff" draw:opacity="66%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text-properties style:font-size-asian="13pt"/>
    </style:style>
    <style:style style:name="P32" style:family="paragraph">
      <style:paragraph-properties fo:text-align="start"/>
    </style:style>
    <style:style style:name="P33" style:family="paragraph">
      <loext:graphic-properties draw:fill="none" draw:fill-color="#ffffff"/>
      <style:paragraph-properties fo:text-align="start"/>
    </style:style>
    <style:style style:name="P3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none" draw:fill-color="#ffffff"/>
    </style:style>
    <style:style style:name="P5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style:paragraph-properties fo:text-align="start"/>
      <style:text-properties fo:font-weight="normal" style:font-size-asian="22pt" style:font-weight-asian="normal" style:font-size-complex="22pt" style:font-weight-complex="normal"/>
    </style:style>
    <style:style style:name="P5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none"/>
      <style:paragraph-properties fo:text-align="start"/>
      <style:text-properties style:font-size-asian="13pt"/>
    </style:style>
    <style:style style:name="P63" style:family="paragraph">
      <style:paragraph-properties fo:text-align="start"/>
      <style:text-properties fo:font-weight="normal" style:font-size-asian="12pt" style:font-weight-asian="normal" style:font-size-complex="12pt" style:font-weight-complex="normal"/>
    </style:style>
    <style:style style:name="P64" style:family="paragraph">
      <loext:graphic-properties draw:fill="none"/>
      <style:paragraph-properties fo:text-align="center"/>
    </style:style>
    <style:style style:name="P6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8" style:family="paragraph">
      <style:paragraph-properties fo:margin-left="0cm" fo:margin-right="0cm" fo:margin-top="0.42cm" fo:margin-bottom="0.35cm" fo:line-height="100%" fo:text-indent="0cm" style:writing-mode="lr-tb"/>
    </style:style>
    <style:style style:name="P69" style:family="paragraph">
      <style:paragraph-properties fo:text-align="left" style:writing-mode="lr-tb"/>
    </style:style>
    <style:style style:name="P70" style:family="paragraph">
      <style:paragraph-properties fo:text-align="left"/>
    </style:style>
    <style:style style:name="P71" style:family="paragraph">
      <style:paragraph-properties fo:margin-left="0cm" fo:margin-right="0cm" fo:text-align="left" fo:text-indent="0cm" style:writing-mode="lr-tb"/>
    </style:style>
    <style:style style:name="P72" style:family="paragraph">
      <style:paragraph-properties fo:margin-left="0cm" fo:margin-right="0cm" fo:text-align="left" fo:text-indent="0cm"/>
    </style:style>
    <style:style style:name="P73" style:family="paragraph">
      <style:paragraph-properties fo:margin-top="0.051cm" fo:margin-bottom="0.051cm" fo:line-height="115%" fo:text-align="start" style:text-autospace="none" style:writing-mode="lr-tb"/>
    </style:style>
    <style:style style:name="P74" style:family="paragraph">
      <style:paragraph-properties fo:margin-left="0cm" fo:margin-right="0cm" fo:margin-top="0.051cm" fo:margin-bottom="0.051cm" fo:line-height="115%" fo:text-align="start" fo:text-indent="0cm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solid" draw:fill-color="#ffffff"/>
      <style:paragraph-properties fo:margin-left="0cm" fo:margin-right="0cm" fo:margin-top="0.051cm" fo:margin-bottom="0.051cm" fo:line-height="115%" fo:text-align="start" fo:text-indent="0cm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style:paragraph-properties fo:margin-top="0.42cm" fo:margin-bottom="0.35cm" fo:line-height="115%" fo:text-align="start" style:text-autospace="none" style:writing-mode="lr-tb"/>
    </style:style>
    <style:style style:name="P77" style:family="paragraph">
      <style:paragraph-properties fo:margin-top="0.42cm" fo:margin-bottom="0.35cm" fo:line-height="115%" fo:text-align="start" style:text-autospace="none"/>
      <style:text-properties fo:font-size="22pt" fo:font-weight="bold" style:font-size-asian="22pt" style:font-weight-asian="bold" style:font-size-complex="22pt" style:font-weight-complex="bold"/>
    </style:style>
    <style:style style:name="P78" style:family="paragraph">
      <style:paragraph-properties fo:margin-left="1cm" fo:margin-right="0cm" fo:margin-top="0.051cm" fo:margin-bottom="0.051cm" fo:line-height="115%" fo:text-align="start" fo:text-indent="0cm" style:text-autospace="none" style:writing-mode="lr-tb"/>
    </style:style>
    <style:style style:name="P79" style:family="paragraph">
      <style:paragraph-properties fo:margin-left="1cm" fo:margin-right="0cm" fo:margin-top="0.42cm" fo:margin-bottom="0.35cm" fo:line-height="115%" fo:text-align="start" fo:text-indent="0cm" style:text-autospace="none" style:writing-mode="lr-tb"/>
    </style:style>
    <style:style style:name="P80" style:family="paragraph">
      <loext:graphic-properties draw:fill="none"/>
      <style:text-properties fo:font-size="16pt" style:font-size-asian="16pt" style:font-size-complex="16pt"/>
    </style:style>
    <style:style style:name="P81" style:family="paragraph">
      <loext:graphic-properties draw:fill="none"/>
      <style:text-properties fo:font-size="10pt" style:font-size-asian="10pt" style:font-size-complex="10pt"/>
    </style:style>
    <style:style style:name="P82" style:family="paragraph">
      <loext:graphic-properties draw:fill="none"/>
      <style:text-properties fo:color="#4f81bd" loext:opacity="100%" style:font-size-asian="13pt"/>
    </style:style>
    <style:style style:name="P83" style:family="paragraph">
      <style:paragraph-properties fo:margin-top="0.42cm" fo:margin-bottom="0.35cm" fo:line-height="115%" fo:text-align="start" style:text-autospace="none"/>
      <style:text-properties fo:font-size="10pt" style:font-size-asian="10pt" style:font-size-complex="10pt"/>
    </style:style>
    <style:style style:name="P84" style:family="paragraph">
      <style:paragraph-properties fo:margin-top="0.051cm" fo:margin-bottom="0.051cm" style:text-autospace="none"/>
    </style:style>
    <style:style style:name="P85" style:family="paragraph">
      <style:paragraph-properties fo:margin-left="0cm" fo:margin-right="0cm" fo:margin-top="0cm" fo:margin-bottom="0cm" fo:line-height="100%" fo:text-indent="0cm" style:writing-mode="lr-tb"/>
      <style:text-properties style:font-name="FreeSans2"/>
    </style:style>
    <style:style style:name="P8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ans2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style:paragraph-properties fo:margin-top="0.051cm" fo:margin-bottom="0.051cm" fo:line-height="115%" fo:text-align="start" style:text-autospace="none"/>
    </style:style>
    <style:style style:name="P88" style:family="paragraph">
      <style:paragraph-properties fo:text-align="center"/>
    </style:style>
    <style:style style:name="P89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90" style:family="paragraph">
      <loext:graphic-properties draw:fill="none"/>
      <style:text-properties fo:font-size="13pt" style:font-size-asian="13pt" style:font-size-complex="13pt"/>
    </style:style>
    <style:style style:name="P91" style:family="paragraph">
      <loext:graphic-properties draw:fill="none"/>
      <style:text-properties fo:font-size="12pt" style:font-size-asian="12pt" style:font-size-complex="12pt"/>
    </style:style>
    <style:style style:name="P92" style:family="paragraph">
      <loext:graphic-properties draw:fill="solid" draw:fill-color="#000000"/>
    </style:style>
    <style:style style:name="T1" style:family="text">
      <style:text-properties fo:color="#17365d" loext:opacity="100%" style:font-name="FreeSerif" fo:font-size="24pt" fo:font-style="italic" fo:font-weight="bold" style:font-name-asian="Cambria" style:font-size-asian="24pt" style:font-style-asian="italic" style:font-weight-asian="bold" style:font-name-complex="Cambria" style:font-size-complex="24pt" style:font-style-complex="italic" style:font-weight-complex="bold"/>
    </style:style>
    <style:style style:name="T2" style:family="text">
      <style:text-properties fo:color="#17365d" loext:opacity="100%" style:font-name="FreeSerif" fo:font-size="24pt" fo:font-weight="normal" style:font-name-asian="Cambria" style:font-size-asian="24pt" style:font-weight-asian="normal" style:font-name-complex="Cambria" style:font-size-complex="24pt" style:font-weight-complex="normal"/>
    </style:style>
    <style:style style:name="T3" style:family="text">
      <style:text-properties fo:color="#17365d" loext:opacity="100%" style:font-name="Cambria" fo:font-size="24pt" fo:font-weight="normal" style:font-name-asian="Cambria" style:font-size-asian="24pt" style:font-weight-asian="normal" style:font-name-complex="Cambria" style:font-size-complex="24pt" style:font-weight-complex="normal"/>
    </style:style>
    <style:style style:name="T4" style:family="text">
      <style:text-properties fo:color="#17365d" loext:opacity="100%" style:font-name="Cambria" fo:font-size="3.90000009536743pt" fo:font-weight="normal" style:font-name-asian="Cambria" style:font-size-asian="3.90000009536743pt" style:font-weight-asian="normal" style:font-name-complex="Cambria" style:font-size-complex="3.90000009536743pt" style:font-weight-complex="normal"/>
    </style:style>
    <style:style style:name="T5" style:family="text">
      <style:text-properties fo:color="#17365d" loext:opacity="100%" style:font-name="FreeSerif" fo:font-size="27.8999996185303pt" fo:font-weight="normal" style:font-name-asian="Cambria" style:font-size-asian="27.8999996185303pt" style:font-weight-asian="normal" style:font-name-complex="Cambria" style:font-size-complex="27.8999996185303pt" style:font-weight-complex="normal"/>
    </style:style>
    <style:style style:name="T6" style:family="text">
      <style:text-properties fo:color="#000000" loext:opacity="100%" style:font-name="Calibri" fo:font-size="11.1000003814697pt" fo:font-style="italic" fo:font-weight="normal" style:font-name-asian="Calibri" style:font-size-asian="11.1000003814697pt" style:font-style-asian="italic" style:font-weight-asian="normal" style:font-name-complex="Calibri" style:font-size-complex="11.1000003814697pt" style:font-style-complex="italic" style:font-weight-complex="normal"/>
    </style:style>
    <style:style style:name="T7" style:family="text">
      <style:text-properties fo:color="#365f91" loext:opacity="100%" fo:font-weight="bold" style:font-size-asian="14.1000003814697pt" style:font-weight-asian="bold" style:font-weight-complex="bold"/>
    </style:style>
    <style:style style:name="T8" style:family="text">
      <style:text-properties fo:color="#000000" loext:opacity="100%" fo:font-weight="normal" style:font-name-asian="Calibri" style:font-size-asian="12pt" style:font-weight-asian="normal" style:font-name-complex="Calibri" style:font-size-complex="12pt" style:font-weight-complex="normal"/>
    </style:style>
    <style:style style:name="T9" style:family="text">
      <style:text-properties fo:color="#c9211e" loext:opacity="100%" fo:font-weight="bold" style:font-name-asian="Calibri" style:font-size-asian="12pt" style:font-weight-asian="bold" style:font-name-complex="Calibri" style:font-size-complex="12pt" style:font-weight-complex="bold"/>
    </style:style>
    <style:style style:name="T10" style:family="text">
      <style:text-properties fo:color="#77bc65" loext:opacity="100%" fo:font-weight="bold" style:font-name-asian="Calibri" style:font-size-asian="12pt" style:font-weight-asian="bold" style:font-name-complex="Calibri" style:font-size-complex="12pt" style:font-weight-complex="bold"/>
    </style:style>
    <style:style style:name="T11" style:family="text">
      <style:text-properties fo:color="#5983b0" loext:opacity="100%" fo:font-weight="bold" style:font-name-asian="Calibri" style:font-size-asian="12pt" style:font-weight-asian="bold" style:font-name-complex="Calibri" style:font-size-complex="12pt" style:font-weight-complex="bold"/>
    </style:style>
    <style:style style:name="T12" style:family="text">
      <style:text-properties fo:color="#000000" loext:opacity="100%" style:font-name="FreeSerif" fo:font-size="9.89999961853027pt" fo:font-weight="normal" style:font-name-asian="Calibri" style:font-size-asian="9.89999961853027pt" style:font-weight-asian="normal" style:font-name-complex="Calibri" style:font-size-complex="9.89999961853027pt" style:font-weight-complex="normal"/>
    </style:style>
    <style:style style:name="T13" style:family="text">
      <style:text-properties fo:color="#000000" loext:opacity="100%" style:font-name="Calibri" fo:font-size="9.89999961853027pt" fo:font-weight="normal" style:font-name-asian="Calibri" style:font-size-asian="9.89999961853027pt" style:font-weight-asian="normal" style:font-name-complex="Calibri" style:font-size-complex="9.89999961853027pt" style:font-weight-complex="normal"/>
    </style:style>
    <style:style style:name="T14" style:family="text">
      <style:text-properties fo:color="#77bc65" loext:opacity="100%" style:font-name="FreeSerif" fo:font-size="14.1000003814697pt" fo:font-weight="bold" style:font-name-asian="Cambria" style:font-size-asian="14.1000003814697pt" style:font-weight-asian="bold" style:font-name-complex="Cambria" style:font-size-complex="14.1000003814697pt" style:font-weight-complex="bold"/>
    </style:style>
    <style:style style:name="T15" style:family="text">
      <style:text-properties style:use-window-font-color="true" loext:opacity="0%" fo:font-weight="normal" style:font-name-asian="Calibri" style:font-size-asian="12pt" style:font-weight-asian="normal" style:font-name-complex="Calibri" style:font-size-complex="12pt" style:font-weight-complex="normal"/>
    </style:style>
    <style:style style:name="T16" style:family="text">
      <style:text-properties fo:color="#00000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style:style style:name="T17" style:family="text">
      <style:text-properties fo:color="#17365d" loext:opacity="100%" fo:font-weight="normal" style:font-name-asian="Cambria" style:font-size-asian="3.90000009536743pt" style:font-weight-asian="normal" style:font-name-complex="Cambria" style:font-size-complex="3.90000009536743pt" style:font-weight-complex="normal"/>
    </style:style>
    <style:style style:name="T18" style:family="text">
      <style:text-properties fo:color="#000000" loext:opacity="100%" fo:font-weight="normal" style:font-name-asian="Calibri" style:font-size-asian="9.89999961853027pt" style:font-weight-asian="normal" style:font-name-complex="Calibri" style:font-size-complex="9.89999961853027pt" style:font-weight-complex="normal"/>
    </style:style>
    <style:style style:name="T19" style:family="text">
      <style:text-properties fo:color="#c9211e" loext:opacity="100%" fo:font-weight="bold" style:font-size-asian="14.1000003814697pt" style:font-weight-asian="bold" style:font-weight-complex="bold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77bc65" loext:opacity="100%" style:text-outline="false" style:text-line-through-style="none" style:text-line-through-type="none" style:font-name="Calibri" fo:font-size="12pt" fo:language="zxx" fo:country="none" fo:font-style="normal" fo:text-shadow="none" style:text-underline-style="none" fo:font-weight="bold" style:letter-kerning="true" style:font-name-asian="Calibri" style:font-size-asian="12pt" style:font-style-asian="normal" style:font-weight-asian="bold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4f81bd" loext:opacity="100%" fo:font-weight="bold" style:font-size-asian="13pt" style:font-weight-asian="bold" style:font-weight-complex="bold"/>
    </style:style>
    <style:style style:name="T26" style:family="text">
      <style:text-properties fo:color="#000000" loext:opacity="100%" fo:font-weight="normal" style:font-name-asian="Calibri" style:font-weight-asian="normal" style:font-weight-complex="normal"/>
    </style:style>
    <style:style style:name="T27" style:family="text">
      <style:text-properties fo:color="#c9211e" loext:opacity="100%" fo:font-weight="bold" style:font-name-asian="Calibri" style:font-weight-asian="bold" style:font-weight-complex="bold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c9211e" loext:opacity="100%" style:text-outline="false" style:text-line-through-style="none" style:text-line-through-type="none" style:font-name="Calibri" fo:font-size="8pt" fo:language="zxx" fo:country="none" fo:font-style="normal" fo:text-shadow="none" style:text-underline-style="none" fo:font-weight="bold" style:letter-kerning="true" style:font-name-asian="Calibri" style:font-size-asian="8pt" style:font-style-asian="normal" style:font-weight-asian="bold" style:font-name-complex="Calibri" style:font-size-complex="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77bc65" loext:opacity="100%" style:text-outline="false" style:text-line-through-style="none" style:text-line-through-type="none" style:font-name="Calibri" fo:font-size="8pt" fo:language="zxx" fo:country="none" fo:font-style="normal" fo:text-shadow="none" style:text-underline-style="none" fo:font-weight="bold" style:letter-kerning="true" style:font-name-asian="Calibri" style:font-size-asian="8pt" style:font-style-asian="normal" style:font-weight-asian="bold" style:font-name-complex="Calibri" style:font-size-complex="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weight="normal" style:font-name-asian="Calibri" style:font-size-asian="12pt" style:font-weight-asian="normal" style:font-name-complex="Calibri" style:font-size-complex="12pt" style:font-weight-complex="normal"/>
    </style:style>
    <style:style style:name="T34" style:family="text">
      <style:text-properties fo:color="#729fcf" loext:opacity="100%" fo:font-weight="bold" style:font-name-asian="Calibri" style:font-size-asian="12pt" style:font-weight-asian="bold" style:font-name-complex="Calibri" style:font-size-complex="12pt" style:font-weight-complex="bold"/>
    </style:style>
    <style:style style:name="T35" style:family="text">
      <style:text-properties fo:font-weight="normal" style:font-name-asian="FreeSerif1" style:font-size-asian="12pt" style:font-weight-asian="normal" style:font-name-complex="FreeSerif1" style:font-size-complex="12pt" style:font-weight-complex="normal"/>
    </style:style>
    <style:style style:name="T36" style:family="text">
      <style:text-properties fo:font-weight="bold" style:font-name-asian="Calibri" style:font-size-asian="12pt" style:font-weight-asian="bold" style:font-name-complex="Calibri" style:font-size-complex="12pt" style:font-weight-complex="bold"/>
    </style:style>
    <style:style style:name="T37" style:family="text">
      <style:text-properties fo:color="#000000" loext:opacity="100%" fo:font-style="normal" fo:font-weight="normal" style:font-name-asian="TexMaths Symbols" style:font-size-asian="12pt" style:font-style-asian="normal" style:font-weight-asian="normal" style:font-name-complex="TexMaths Symbols" style:font-size-complex="12pt" style:font-style-complex="normal" style:font-weight-complex="normal"/>
    </style:style>
    <style:style style:name="T38" style:family="text">
      <style:text-properties fo:color="#000000" loext:opacity="100%" fo:font-style="normal" style:text-underline-style="none" fo:font-weight="normal" style:font-name-asian="TexMaths Symbols" style:font-size-asian="12pt" style:font-style-asian="normal" style:font-weight-asian="normal" style:font-name-complex="TexMaths Symbols" style:font-size-complex="12pt" style:font-style-complex="normal" style:font-weight-complex="normal"/>
    </style:style>
    <style:style style:name="T39" style:family="text">
      <style:text-properties fo:color="#000000" loext:opacity="100%" fo:font-style="normal" style:text-underline-style="none" fo:font-weight="normal" style:font-name-asian="FreeSerif1" style:font-size-asian="12pt" style:font-style-asian="normal" style:font-weight-asian="normal" style:font-name-complex="FreeSerif1" style:font-size-complex="12pt" style:font-style-complex="normal" style:font-weight-complex="normal"/>
    </style:style>
    <style:style style:name="T40" style:family="text">
      <style:text-properties fo:color="#000000" loext:opacity="100%" style:text-position="sub 58%" fo:font-style="normal" style:text-underline-style="none" fo:font-weight="normal" style:font-name-asian="TexMaths Symbols" style:font-size-asian="12pt" style:font-style-asian="normal" style:font-weight-asian="normal" style:font-name-complex="TexMaths Symbols" style:font-size-complex="12pt" style:font-style-complex="normal" style:font-weight-complex="normal"/>
    </style:style>
    <style:style style:name="T41" style:family="text">
      <style:text-properties fo:color="#000000" loext:opacity="100%" style:text-position="0% 100%" fo:font-style="normal" style:text-underline-style="none" fo:font-weight="normal" style:font-name-asian="TexMaths Symbols" style:font-size-asian="12pt" style:font-style-asian="normal" style:font-weight-asian="normal" style:font-name-complex="TexMaths Symbols" style:font-size-complex="12pt" style:font-style-complex="normal" style:font-weight-complex="normal"/>
    </style:style>
    <style:style style:name="T42" style:family="text">
      <style:text-properties fo:color="#000000" loext:opacity="100%" style:text-position="0% 100%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43" style:family="text">
      <style:text-properties style:font-size-asian="12pt" style:font-size-complex="12pt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729fcf" loext:opacity="100%" style:text-outline="false" style:text-line-through-style="none" style:text-line-through-type="none" fo:language="zxx" fo:country="none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fo:language="zxx" fo:country="none" fo:font-style="normal" fo:text-shadow="none" style:text-underline-style="none" fo:font-weight="normal" style:letter-kerning="true" style:font-name-asian="FreeSerif1" style:font-size-asian="12pt" style:font-style-asian="normal" style:font-weight-asian="normal" style:font-name-complex="FreeSerif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77bc65" loext:opacity="100%" style:text-outline="false" style:text-line-through-style="none" style:text-line-through-type="none" fo:language="zxx" fo:country="none" fo:font-style="normal" fo:text-shadow="none" style:text-underline-style="none" fo:font-weight="bold" style:letter-kerning="true" style:font-name-asian="Calibri" style:font-size-asian="12pt" style:font-style-asian="normal" style:font-weight-asian="bold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fo:language="zxx" fo:country="none" fo:text-shadow="none" style:text-underline-style="none" fo:font-weight="normal" style:letter-kerning="true" style:font-name-asian="FreeSerif1" style:font-weight-asian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fo:language="zxx" fo:country="none" fo:font-style="normal" fo:text-shadow="none" style:text-underline-style="none" fo:font-weight="normal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font-name-asian="Calibri" style:font-size-asian="12pt" style:font-name-complex="Calibri" style:font-size-complex="12pt"/>
    </style:style>
    <style:style style:name="T51" style:family="text">
      <style:text-properties style:font-name="FreeSans" fo:font-size="12pt" style:font-name-asian="Calibri" style:font-size-asian="12pt" style:font-name-complex="Calibri" style:font-size-complex="12pt"/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font-name="FreeSans" fo:font-size="12pt" fo:language="zxx" fo:country="none" fo:text-shadow="none" style:text-underline-style="none" fo:font-weight="normal" style:letter-kerning="true" style:font-name-asian="FreeSerif1" style:font-size-asian="12pt" style:font-weight-asian="normal" style:font-name-complex="Calibri" style:font-size-complex="12pt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Free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729fcf" loext:opacity="100%" style:text-outline="false" style:text-line-through-style="none" style:text-line-through-type="none" style:font-name="FreeSans" fo:font-size="12pt" fo:language="zxx" fo:country="none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font-name="Free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c9211e" loext:opacity="100%" style:text-outline="false" style:text-line-through-style="none" style:text-line-through-type="none" style:font-name="FreeSans" fo:font-size="12pt" fo:language="zxx" fo:country="none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style:font-name="FreeSans" fo:font-size="12pt" fo:language="zxx" fo:country="none" fo:font-style="italic" fo:text-shadow="none" style:text-underline-style="none" fo:font-weight="normal" style:letter-kerning="true" style:font-name-asian="Noto Sans CJK SC" style:font-size-asian="12pt" style:font-style-asian="italic" style:font-weight-asian="normal" style:font-name-complex="Noto Sans Devanagari" style:font-size-complex="12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00" loext:opacity="100%" style:text-outline="false" style:text-line-through-style="none" style:text-line-through-type="none" fo:language="zxx" fo:country="none" fo:text-shadow="none" style:text-underline-style="none" fo:font-weight="normal" style:letter-kerning="true" style:font-name-asian="FreeSerif1" style:font-size-asian="12pt" style:font-weight-asian="normal" style:font-name-complex="Calibri" style:font-size-complex="12pt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729fcf" loext:opacity="100%" style:text-outline="false" style:text-line-through-style="none" style:text-line-through-type="none" style:font-name="FreeSans" fo:font-size="8pt" fo:language="zxx" fo:country="none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text-outline="false" style:text-line-through-style="none" style:text-line-through-type="none" style:font-name="FreeSans" fo:font-size="12pt" fo:language="zxx" fo:country="none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loext:opacity="0%" style:text-outline="false" style:text-line-through-style="none" style:text-line-through-type="none" style:font-name="FreeSans" fo:font-size="12pt" fo:language="zxx" fo:country="none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00" loext:opacity="100%" style:text-outline="false" style:text-line-through-style="none" style:text-line-through-type="none" style:font-name="FreeSans" fo:font-size="12pt" fo:language="zxx" fo:country="none" fo:font-style="normal" fo:text-shadow="none" style:text-underline-style="none" fo:font-weight="normal" style:letter-kerning="true" style:font-name-asian="FreeSerif1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c9211e" loext:opacity="100%" style:text-outline="false" style:text-line-through-style="none" style:text-line-through-type="none" style:font-name="FreeSans" fo:font-size="12pt" fo:language="zxx" fo:country="none" fo:font-style="normal" fo:text-shadow="none" style:text-underline-style="none" fo:font-weight="bold" style:letter-kerning="true" style:font-name-asian="Calibri" style:font-size-asian="12pt" style:font-style-asian="normal" style:font-weight-asian="bold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00" loext:opacity="100%" style:text-outline="false" style:text-line-through-style="none" style:text-line-through-type="none" style:font-name="FreeSans" fo:font-size="12pt" fo:language="zxx" fo:country="none" fo:font-style="normal" fo:text-shadow="none" style:text-underline-style="none" fo:font-weight="normal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00" loext:opacity="100%" style:text-outline="false" style:text-line-through-style="none" style:text-line-through-type="none" style:font-name="FreeSans" fo:font-size="12pt" fo:language="zxx" fo:country="none" fo:font-style="italic" fo:text-shadow="none" style:text-underline-style="none" fo:font-weight="normal" style:letter-kerning="true" style:font-name-asian="Calibri" style:font-size-asian="12pt" style:font-style-asian="italic" style:font-weight-asian="normal" style:font-name-complex="Calibri" style:font-size-complex="12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c9211e" loext:opacity="100%" style:text-outline="false" style:text-line-through-style="none" style:text-line-through-type="none" style:font-name="FreeSans" fo:font-size="12pt" fo:language="zxx" fo:country="none" fo:font-style="normal" fo:text-shadow="none" style:text-underline-style="none" fo:font-weight="bold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c9211e" loext:opacity="100%" style:text-outline="false" style:text-line-through-style="none" style:text-line-through-type="none" style:font-name="FreeSans" fo:font-size="12pt" fo:language="zxx" fo:country="none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00" loext:opacity="100%" style:text-outline="false" style:text-line-through-style="none" style:text-line-through-type="none" style:font-name="FreeSans" fo:font-size="12pt" fo:language="zxx" fo:country="none" fo:text-shadow="none" style:text-underline-style="none" fo:font-weight="normal" style:letter-kerning="true" fo:background-color="transparent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00" loext:opacity="100%" style:text-outline="false" style:text-line-through-style="none" style:text-line-through-type="none" style:font-name="FreeSans" fo:font-size="12pt" fo:language="zxx" fo:country="none" fo:text-shadow="none" style:text-underline-style="none" fo:font-weight="normal" style:letter-kerning="true" fo:background-color="#729fcf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text-outline="false" style:text-line-through-style="none" style:text-line-through-type="none" style:font-name="FreeSans2" fo:font-size="12pt" fo:language="zxx" fo:country="none" fo:font-style="normal" fo:text-shadow="none" style:text-underline-style="none" fo:font-weight="normal" style:letter-kerning="true" style:font-name-asian="TexMaths Symbols" style:font-size-asian="12pt" style:font-style-asian="normal" style:font-weight-asian="normal" style:font-name-complex="TexMaths Symbols" style:font-size-complex="12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text-outline="false" style:text-line-through-style="none" style:text-line-through-type="none" style:font-name="FreeSans" fo:font-size="12pt" fo:language="zxx" fo:country="none" fo:text-shadow="none" style:text-underline-style="none" fo:font-weight="normal" style:letter-kerning="true" fo:background-color="#729fcf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text-outline="false" style:text-line-through-style="none" style:text-line-through-type="none" style:font-name="FreeSans2" fo:font-size="12pt" fo:language="zxx" fo:country="none" fo:font-style="normal" fo:text-shadow="none" style:text-underline-style="none" fo:font-weight="normal" style:letter-kerning="true" fo:background-color="transparent" style:font-name-asian="TexMaths Symbols" style:font-size-asian="12pt" style:font-style-asian="normal" style:font-weight-asian="normal" style:font-name-complex="TexMaths Symbols" style:font-size-complex="1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loext:opacity="100%" style:text-outline="false" style:text-line-through-style="none" style:text-line-through-type="none" style:font-name="FreeSans2" fo:font-size="12pt" fo:language="zxx" fo:country="none" fo:font-style="normal" fo:text-shadow="none" style:text-underline-style="none" fo:font-weight="normal" style:letter-kerning="true" fo:background-color="#e96666" style:font-name-asian="TexMaths Symbols" style:font-size-asian="12pt" style:font-style-asian="normal" style:font-weight-asian="normal" style:font-name-complex="TexMaths Symbols" style:font-size-complex="1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text-outline="false" style:text-line-through-style="none" style:text-line-through-type="none" style:font-name="FreeSans" fo:font-size="12pt" fo:language="zxx" fo:country="none" fo:text-shadow="none" style:text-underline-style="none" fo:font-weight="normal" style:letter-kerning="true" fo:background-color="#5eb91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text-outline="false" style:text-line-through-style="none" style:text-line-through-type="none" style:font-name="FreeSans2" fo:font-size="12pt" fo:language="zxx" fo:country="none" fo:font-style="normal" fo:text-shadow="none" style:text-underline-style="none" fo:font-weight="normal" style:letter-kerning="true" fo:background-color="#5eb91e" style:font-name-asian="TexMaths Symbols" style:font-size-asian="12pt" style:font-style-asian="normal" style:font-weight-asian="normal" style:font-name-complex="TexMaths Symbols" style:font-size-complex="1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text-outline="false" style:text-line-through-style="none" style:text-line-through-type="none" style:text-position="0% 100%" style:font-name="TexMaths Symbols" fo:font-size="12pt" fo:letter-spacing="normal" fo:language="zxx" fo:country="none" fo:font-style="normal" fo:text-shadow="none" style:text-underline-style="none" fo:font-weight="normal" style:letter-kerning="true" style:font-name-asian="TexMaths Symbols" style:font-size-asian="12pt" style:font-style-asian="normal" style:font-weight-asian="normal" style:font-name-complex="TexMaths Symbols" style:font-size-complex="1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text-outline="false" style:text-line-through-style="none" style:text-line-through-type="none" style:text-position="super 58%" style:font-name="TexMaths Symbols" fo:font-size="12pt" fo:letter-spacing="normal" fo:language="zxx" fo:country="none" fo:font-style="normal" fo:text-shadow="none" style:text-underline-style="none" fo:font-weight="normal" style:letter-kerning="true" style:font-name-asian="TexMaths Symbols" style:font-size-asian="12pt" style:font-style-asian="normal" style:font-weight-asian="normal" style:font-name-complex="TexMaths Symbols" style:font-size-complex="1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text-outline="false" style:text-line-through-style="none" style:text-line-through-type="none" style:text-position="0% 100%" style:font-name="TexMaths Symbols" fo:font-size="12pt" fo:language="zxx" fo:country="none" fo:font-style="normal" fo:text-shadow="none" style:text-underline-style="none" fo:font-weight="normal" style:letter-kerning="true" style:font-name-asian="TexMaths Symbols" style:font-size-asian="12pt" style:font-style-asian="normal" style:font-weight-asian="normal" style:font-name-complex="TexMaths Symbols" style:font-size-complex="1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text-outline="false" style:text-line-through-style="none" style:text-line-through-type="none" style:text-position="sub 58%" style:font-name="TexMaths Symbols" fo:font-size="12pt" fo:language="zxx" fo:country="none" fo:font-style="normal" fo:text-shadow="none" style:text-underline-style="none" fo:font-weight="normal" style:letter-kerning="true" style:font-name-asian="TexMaths Symbols" style:font-size-asian="12pt" style:font-style-asian="normal" style:font-weight-asian="normal" style:font-name-complex="TexMaths Symbols" style:font-size-complex="1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style:text-outline="false" style:text-line-through-style="none" style:text-line-through-type="none" style:text-position="super 58%" style:font-name="TexMaths Symbols" fo:font-size="12pt" fo:letter-spacing="-0.471cm" fo:language="zxx" fo:country="none" fo:font-style="normal" fo:text-shadow="none" style:text-underline-style="none" fo:font-weight="normal" style:letter-kerning="true" style:font-name-asian="TexMaths Symbols" style:font-size-asian="12pt" style:font-style-asian="normal" style:font-weight-asian="normal" style:font-name-complex="TexMaths Symbols" style:font-size-complex="12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style:text-outline="false" style:text-line-through-style="none" style:text-line-through-type="none" style:text-position="0% 100%" style:font-name="TexMaths Symbols1" fo:font-size="12pt" fo:letter-spacing="normal" fo:language="zxx" fo:country="none" fo:font-style="normal" fo:text-shadow="none" style:text-underline-style="none" fo:font-weight="normal" style:letter-kerning="true" style:font-name-asian="TexMaths Symbols" style:font-size-asian="12pt" style:font-style-asian="normal" style:font-weight-asian="normal" style:font-name-complex="TexMaths Symbols" style:font-size-complex="12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text-outline="false" style:text-line-through-style="none" style:text-line-through-type="none" style:text-position="sub 58%" style:font-name="TexMaths Symbols1" fo:font-size="12pt" fo:letter-spacing="normal" fo:language="zxx" fo:country="none" fo:font-style="normal" fo:text-shadow="none" style:text-underline-style="none" fo:font-weight="normal" style:letter-kerning="true" style:font-name-asian="TexMaths Symbols" style:font-size-asian="12pt" style:font-style-asian="normal" style:font-weight-asian="normal" style:font-name-complex="TexMaths Symbols" style:font-size-complex="12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style:text-outline="false" style:text-line-through-style="none" style:text-line-through-type="none" style:text-position="0% 100%" style:font-name="TexMaths Symbols" fo:font-size="16pt" fo:language="zxx" fo:country="none" fo:font-style="normal" fo:text-shadow="none" style:text-underline-style="none" fo:font-weight="normal" style:letter-kerning="true" style:font-name-asian="TexMaths Symbols" style:font-size-asian="16pt" style:font-style-asian="normal" style:font-weight-asian="normal" style:font-name-complex="TexMaths Symbol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text-outline="false" style:text-line-through-style="none" style:text-line-through-type="none" style:text-position="0% 100%" style:font-name="TexMaths Symbols" fo:font-size="16pt" fo:language="zxx" fo:country="none" fo:font-style="normal" fo:text-shadow="none" style:text-underline-style="none" fo:font-weight="normal" style:letter-kerning="true" fo:background-color="#729fcf" style:font-name-asian="TexMaths Symbols" style:font-size-asian="16pt" style:font-style-asian="normal" style:font-weight-asian="normal" style:font-name-complex="TexMaths Symbol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style:text-outline="false" style:text-line-through-style="none" style:text-line-through-type="none" style:text-position="0% 100%" style:font-name="TexMaths Symbols" fo:font-size="16pt" fo:letter-spacing="normal" fo:language="zxx" fo:country="none" fo:font-style="normal" fo:text-shadow="none" style:text-underline-style="none" fo:font-weight="normal" style:letter-kerning="true" fo:background-color="#729fcf" style:font-name-asian="TexMaths Symbols" style:font-size-asian="16pt" style:font-style-asian="normal" style:font-weight-asian="normal" style:font-name-complex="TexMaths Symbol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exMaths Symbols" fo:font-size="16pt" fo:letter-spacing="normal" fo:language="zxx" fo:country="none" fo:font-style="normal" fo:text-shadow="none" style:text-underline-style="none" fo:font-weight="normal" style:letter-kerning="true" fo:background-color="#e96666" style:font-name-asian="TexMaths Symbols" style:font-size-asian="16pt" style:font-style-asian="normal" style:font-weight-asian="normal" style:font-name-complex="TexMaths Symbol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exMaths Symbols" fo:font-size="16pt" fo:letter-spacing="normal" fo:language="zxx" fo:country="none" fo:font-style="normal" fo:text-shadow="none" style:text-underline-style="none" fo:font-weight="normal" style:letter-kerning="true" fo:background-color="transparent" style:font-name-asian="TexMaths Symbols" style:font-size-asian="16pt" style:font-style-asian="normal" style:font-weight-asian="normal" style:font-name-complex="TexMaths Symbol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style:text-outline="false" style:text-line-through-style="none" style:text-line-through-type="none" style:text-position="0% 100%" style:font-name="TexMaths Symbols" fo:font-size="16pt" fo:language="zxx" fo:country="none" fo:font-style="normal" fo:text-shadow="none" style:text-underline-style="none" fo:font-weight="normal" style:letter-kerning="true" fo:background-color="#5eb91e" style:font-name-asian="TexMaths Symbols" style:font-size-asian="16pt" style:font-style-asian="normal" style:font-weight-asian="normal" style:font-name-complex="TexMaths Symbol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style:text-outline="false" style:text-line-through-style="none" style:text-line-through-type="none" style:text-position="sub 58%" style:font-name="TexMaths Symbols" fo:font-size="16pt" fo:language="zxx" fo:country="none" fo:font-style="normal" fo:text-shadow="none" style:text-underline-style="none" fo:font-weight="normal" style:letter-kerning="true" style:font-name-asian="TexMaths Symbols" style:font-size-asian="16pt" style:font-style-asian="normal" style:font-weight-asian="normal" style:font-name-complex="TexMaths Symbol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text-outline="false" style:text-line-through-style="none" style:text-line-through-type="none" style:text-position="super 58%" style:font-name="TexMaths Symbols" fo:font-size="16pt" fo:letter-spacing="-0.471cm" fo:language="zxx" fo:country="none" fo:font-style="normal" fo:text-shadow="none" style:text-underline-style="none" fo:font-weight="normal" style:letter-kerning="true" style:font-name-asian="TexMaths Symbols" style:font-size-asian="16pt" style:font-style-asian="normal" style:font-weight-asian="normal" style:font-name-complex="TexMaths Symbol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style:text-outline="false" style:text-line-through-style="none" style:text-line-through-type="none" style:text-position="0% 100%" style:font-name="TexMaths Symbols" fo:font-size="16pt" fo:letter-spacing="normal" fo:language="zxx" fo:country="none" fo:font-style="normal" fo:text-shadow="none" style:text-underline-style="none" fo:font-weight="normal" style:letter-kerning="true" style:font-name-asian="TexMaths Symbols" style:font-size-asian="16pt" style:font-style-asian="normal" style:font-weight-asian="normal" style:font-name-complex="TexMaths Symbol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style:text-outline="false" style:text-line-through-style="none" style:text-line-through-type="none" style:text-position="super 58%" style:font-name="TexMaths Symbols" fo:font-size="16pt" fo:letter-spacing="normal" fo:language="zxx" fo:country="none" fo:font-style="normal" fo:text-shadow="none" style:text-underline-style="none" fo:font-weight="normal" style:letter-kerning="true" style:font-name-asian="TexMaths Symbols" style:font-size-asian="16pt" style:font-style-asian="normal" style:font-weight-asian="normal" style:font-name-complex="TexMaths Symbol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style:text-outline="false" style:text-line-through-style="none" style:text-line-through-type="none" style:font-name="TexMaths Symbols" fo:font-size="8pt" fo:language="zxx" fo:country="none" fo:font-style="normal" fo:text-shadow="none" style:text-underline-style="none" fo:font-weight="normal" style:letter-kerning="true" style:font-name-asian="TexMaths Symbols" style:font-size-asian="8pt" style:font-style-asian="normal" style:font-weight-asian="normal" style:font-name-complex="TexMaths Symbols" style:font-size-complex="8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text-outline="false" style:text-line-through-style="none" style:text-line-through-type="none" style:text-position="0% 100%" style:font-name="TexMaths Symbols" fo:font-size="8pt" fo:language="zxx" fo:country="none" fo:font-style="normal" fo:text-shadow="none" style:text-underline-style="none" fo:font-weight="normal" style:letter-kerning="true" style:font-name-asian="TexMaths Symbols" style:font-size-asian="8pt" style:font-style-asian="normal" style:font-weight-asian="normal" style:font-name-complex="TexMaths Symbols" style:font-size-complex="8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style:text-outline="false" style:text-line-through-style="none" style:text-line-through-type="none" style:text-position="0% 100%" style:font-name="TexMaths Symbols1" fo:font-size="8pt" fo:letter-spacing="normal" fo:language="zxx" fo:country="none" fo:font-style="normal" fo:text-shadow="none" style:text-underline-style="none" fo:font-weight="normal" style:letter-kerning="true" style:font-name-asian="TexMaths Symbols" style:font-size-asian="8pt" style:font-style-asian="normal" style:font-weight-asian="normal" style:font-name-complex="TexMaths Symbols" style:font-size-complex="8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style:text-outline="false" style:text-line-through-style="none" style:text-line-through-type="none" style:text-position="sub 58%" style:font-name="TexMaths Symbols1" fo:font-size="8pt" fo:letter-spacing="normal" fo:language="zxx" fo:country="none" fo:font-style="normal" fo:text-shadow="none" style:text-underline-style="none" fo:font-weight="normal" style:letter-kerning="true" style:font-name-asian="TexMaths Symbols" style:font-size-asian="8pt" style:font-style-asian="normal" style:font-weight-asian="normal" style:font-name-complex="TexMaths Symbols" style:font-size-complex="8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729fcf" loext:opacity="100%" style:text-outline="false" style:text-line-through-style="none" style:text-line-through-type="none" fo:language="zxx" fo:country="none" fo:font-style="normal" fo:text-shadow="none" style:text-underline-style="none" fo:font-weight="bold" style:letter-kerning="true" style:font-size-asian="12pt" style:font-style-asian="normal" style:font-weight-asian="bold" style:font-style-complex="normal" style:font-weight-complex="bold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style:text-outline="false" style:text-line-through-style="none" style:text-line-through-type="none" style:font-name="FreeSans1" fo:font-size="12pt" fo:language="zxx" fo:country="none" fo:text-shadow="none" style:text-underline-style="none" fo:font-weight="normal" style:letter-kerning="true" style:font-name-asian="FreeSans1" style:font-size-asian="12pt" style:font-weight-asian="normal" style:font-name-complex="FreeSans1" style:font-size-complex="12pt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style:text-outline="false" style:text-line-through-style="none" style:text-line-through-type="none" style:font-name="FreeSans" fo:font-size="12pt" fo:language="zxx" fo:country="none" fo:text-shadow="none" style:text-underline-style="none" fo:font-weight="normal" style:letter-kerning="true" style:font-name-asian="FreeSans1" style:font-size-asian="12pt" style:font-weight-asian="normal" style:font-name-complex="FreeSans1" style:font-size-complex="12pt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729fcf" loext:opacity="100%" style:text-outline="false" style:text-line-through-style="none" style:text-line-through-type="none" style:font-name="FreeSans" fo:font-size="12pt" fo:language="zxx" fo:country="none" fo:text-shadow="none" style:text-underline-style="none" fo:font-weight="bold" style:letter-kerning="true" style:font-name-asian="FreeSans1" style:font-size-asian="12pt" style:font-weight-asian="bold" style:font-name-complex="FreeSans1" style:font-size-complex="12pt" style:font-weight-complex="bold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style:use-window-font-color="true" loext:opacity="0%" style:text-outline="false" style:text-line-through-style="none" style:text-line-through-type="none" style:font-name="FreeSans" fo:font-size="12pt" fo:language="zxx" fo:country="none" fo:text-shadow="none" style:text-underline-style="none" fo:font-weight="normal" style:letter-kerning="true" style:font-name-asian="FreeSans1" style:font-size-asian="12pt" style:font-weight-asian="normal" style:font-name-complex="FreeSans1" style:font-size-complex="12pt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00" loext:opacity="100%" style:text-outline="false" style:text-line-through-style="none" style:text-line-through-type="none" style:font-name="FreeSans" fo:font-size="12pt" fo:language="zxx" fo:country="none" fo:text-shadow="none" style:text-underline-style="none" fo:font-weight="normal" style:letter-kerning="true" style:font-name-asian="FreeSans1" style:font-size-asian="12pt" style:font-weight-asian="normal" style:font-name-complex="FreeSans1" style:font-size-complex="12pt" style:font-weight-complex="normal" style:text-emphasize="none" style:font-relief="none" style:text-overline-style="none" style:text-overline-color="font-color"/>
    </style:style>
    <style:style style:name="T105" style:family="text">
      <style:text-properties style:font-name="FreeSans" fo:font-size="10pt" fo:font-style="normal" style:font-size-asian="12pt" style:font-style-asian="italic" style:font-name-complex="FreeSans1" style:font-size-complex="12pt" style:font-style-complex="italic"/>
    </style:style>
    <style:style style:name="T106" style:family="text">
      <style:text-properties fo:font-variant="normal" fo:text-transform="none" style:text-outline="false" style:text-line-through-style="none" style:text-line-through-type="none" fo:font-size="12pt" fo:language="zxx" fo:country="none" fo:text-shadow="none" style:text-underline-style="none" style:letter-kerning="true" style:font-size-asian="12pt" style:font-size-complex="12pt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style:text-outline="false" style:text-line-through-style="none" style:text-line-through-type="none" style:font-name="Liberation Sans" fo:font-size="8pt" fo:language="zxx" fo:country="none" fo:font-style="normal" fo:text-shadow="none" style:text-underline-style="none" style:letter-kerning="true" style:font-name-asian="Noto Sans CJK SC" style:font-size-asian="8pt" style:font-style-asian="normal" style:font-name-complex="Noto Sans Devanagari" style:font-size-complex="8pt" style:font-style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style:use-window-font-color="true" loext:opacity="0%" style:text-outline="false" style:text-line-through-style="none" style:text-line-through-type="none" style:font-name="FreeSans2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style:text-outline="false" style:text-line-through-style="none" style:text-line-through-type="none" style:font-name="FreeSans" fo:font-size="12pt" fo:language="zxx" fo:country="none" fo:text-shadow="none" style:text-underline-style="none" style:letter-kerning="true" style:font-size-asian="12pt" style:font-size-complex="12pt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729fcf" loext:opacity="100%" style:text-outline="false" style:text-line-through-style="none" style:text-line-through-type="none" style:font-name="FreeSans" fo:font-size="12pt" fo:language="zxx" fo:country="none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0000" loext:opacity="100%" style:text-outline="false" style:text-line-through-style="none" style:text-line-through-type="none" style:font-name="FreeSans" fo:font-size="12pt" fo:language="zxx" fo:country="none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112" style:family="text">
      <style:text-properties fo:color="#365f91" loext:opacity="100%" style:font-name="Cambria" fo:font-size="14.1000003814697pt" fo:font-weight="bold" style:font-name-asian="Cambria" style:font-size-asian="14.1000003814697pt" style:font-weight-asian="bold" style:font-name-complex="Cambria" style:font-size-complex="14.1000003814697pt" style:font-weight-complex="bold"/>
    </style:style>
    <style:style style:name="T113" style:family="text">
      <style:text-properties fo:color="#4f81bd" loext:opacity="100%" style:font-name="Cambria" fo:font-size="13pt" fo:font-weight="bold" style:font-name-asian="Cambria" style:font-size-asian="13pt" style:font-weight-asian="bold" style:font-name-complex="Cambria" style:font-size-complex="13pt" style:font-weight-complex="bold"/>
    </style:style>
    <style:style style:name="T114" style:family="text">
      <style:text-properties fo:color="#000000" loext:opacity="100%" style:font-name="Symbol" fo:font-size="12pt" fo:font-weight="normal" style:font-name-asian="Symbol" style:font-size-asian="12pt" style:font-weight-asian="normal" style:font-name-complex="Symbol" style:font-size-complex="12pt" style:font-weight-complex="normal"/>
    </style:style>
    <style:style style:name="T115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116" style:family="text">
      <style:text-properties fo:color="#000000" loext:opacity="100%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117" style:family="text">
      <style:text-properties fo:color="#000000" loext:opacity="100%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118" style:family="text">
      <style:text-properties fo:color="#000000" loext:opacity="100%" style:font-name="Calibri" fo:font-size="12pt" fo:font-style="italic" fo:font-weight="normal" style:font-name-asian="Calibri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119" style:family="text">
      <style:text-properties fo:color="#4f81bd" loext:opacity="100%" style:font-name="Cambria" fo:font-size="9.89999961853027pt" fo:font-weight="bold" style:font-name-asian="Cambria" style:font-size-asian="9.89999961853027pt" style:font-weight-asian="bold" style:font-name-complex="Cambria" style:font-size-complex="9.8999996185302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1.644cm" svg:height="0.932cm" svg:x="4.453cm" svg:y="2.04cm">
          <draw:text-box>
            <text:p text:style-name="P1"><text:span text:style-name="T1">Progetto Assembly RISC-V </text:span><text:span text:style-name="T2">per il <text:s/></text:span></text:p>
          </draw:text-box>
        </draw:frame>
        <draw:frame draw:style-name="gr2" draw:text-style-name="P2" draw:layer="layout" svg:width="13.478cm" svg:height="0.932cm" svg:x="3.412cm" svg:y="3.035cm">
          <draw:text-box>
            <text:p text:style-name="P1"><text:span text:style-name="T2">Corso di Architetture degli Elaboratori <text:s/></text:span></text:p>
          </draw:text-box>
        </draw:frame>
        <draw:frame draw:style-name="gr3" draw:text-style-name="P2" draw:layer="layout" svg:width="7.189cm" svg:height="0.932cm" svg:x="6.934cm" svg:y="4.026cm">
          <draw:text-box>
            <text:p text:style-name="P1"><text:span text:style-name="T2">– A.A. 2025/2026 – <text:s/></text:span></text:p>
          </draw:text-box>
        </draw:frame>
        <draw:frame draw:style-name="gr4" draw:text-style-name="P3" draw:layer="layout" svg:width="0.846cm" svg:height="0.932cm" svg:x="10.499cm" svg:y="4.352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139cm" svg:height="0.158cm" svg:x="10.693cm" svg:y="4.988cm">
          <draw:text-box>
            <text:p text:style-name="P1"><text:span text:style-name="T4"><text:s/></text:span></text:p>
          </draw:text-box>
        </draw:frame>
        <draw:polygon draw:style-name="gr6" draw:text-style-name="P5" draw:layer="layout" svg:width="18.301cm" svg:height="0.033cm" svg:x="1.35cm" svg:y="6.443cm" svg:viewBox="0 0 18302 34" draw:points="0,0 18302,0 18302,34 0,34">
          <text:p/>
        </draw:polygon>
        <draw:frame draw:style-name="gr7" draw:text-style-name="P6" draw:layer="layout" svg:width="7.941cm" svg:height="1.089cm" svg:x="6.447cm" svg:y="5.196cm">
          <draw:text-box>
            <text:p text:style-name="P1"><text:span text:style-name="T5">Messaggi in Codice </text:span></text:p>
          </draw:text-box>
        </draw:frame>
        <draw:frame draw:style-name="gr8" draw:text-style-name="P7" draw:layer="layout" svg:width="0.388cm" svg:height="0.437cm" svg:x="19.55cm" svg:y="9.407cm">
          <draw:text-box>
            <text:p text:style-name="P1"><text:span text:style-name="T6"><text:s/></text:span></text:p>
          </draw:text-box>
        </draw:frame>
        <draw:frame draw:style-name="gr9" draw:text-style-name="P8" draw:layer="layout" svg:width="5.175cm" svg:height="0.543cm" svg:x="1.401cm" svg:y="9.477cm">
          <draw:text-box>
            <text:p text:style-name="P1"><text:span text:style-name="T7">Struttura del codice</text:span></text:p>
          </draw:text-box>
        </draw:frame>
        <draw:frame draw:style-name="gr10" draw:text-style-name="P9" draw:layer="layout" svg:width="18.314cm" svg:height="2.356cm" svg:x="1.401cm" svg:y="10.239cm">
          <draw:text-box>
            <text:p text:style-name="P1"><text:span text:style-name="T8">Iniziando dalla procedura _start, Il programma chiama una procedura per inizializzare sulla stack la sttuttura </text:span><text:span text:style-name="T9"><text:a xlink:href="#cypher_data" xlink:type="simple">cypher_data</text:a></text:span><text:span text:style-name="T8">, carica l’indirizzo della stringa </text:span><text:span text:style-name="T10"><text:a xlink:href="#Parametri del programma" xlink:type="simple">myplaintext</text:a></text:span><text:span text:style-name="T8">, e un valore booleano, I quali vengono utilizzati come argomenti della procedura </text:span><text:span text:style-name="T11"><text:a xlink:href="#cypher_iter" xlink:type="simple">cypher_iter</text:a></text:span><text:span text:style-name="T8">, la quale determina la sequenza di procedure di cifratura e decifratura che verranno chiamate.</text:span></text:p>
          </draw:text-box>
        </draw:frame>
        <draw:polygon draw:style-name="gr11" draw:text-style-name="P10" draw:layer="layout" svg:width="18.314cm" svg:height="1.979cm" draw:transform="skewX (0.00296705972839036) rotate (0.00314159265358979) translate (1.39965477405974cm 7.00700108456285cm)" svg:viewBox="0 0 18315 1980" draw:points="0,0 18315,2 18315,1980 0,1978">
          <text:p/>
        </draw:polygon>
        <draw:frame draw:style-name="gr12" draw:text-style-name="P12" draw:layer="layout" svg:width="17.094cm" svg:height="0.551cm" svg:x="1.668cm" svg:y="7.264cm">
          <draw:text-box>
            <text:p text:style-name="P11"><text:span text:style-name="T12">Autore: Federico Carlo Martini <text:s/></text:span><text:span text:style-name="T12"><text:a xlink:href="mailto:federico.martini3@edu.unifi.it" xlink:type="simple">federico.martini3@edu.unifi.it</text:a></text:span><text:span text:style-name="T12"><text:s/>Matricola: 7190724 data:</text:span></text:p>
          </draw:text-box>
        </draw:frame>
        <draw:frame draw:style-name="gr13" draw:text-style-name="P13" draw:layer="layout" svg:width="0.35cm" svg:height="0.391cm" svg:x="1.668cm" svg:y="8.019cm">
          <draw:text-box>
            <text:p text:style-name="P1"><text:span text:style-name="T13"><text:s/></text:span></text:p>
          </draw:text-box>
        </draw:frame>
        <draw:frame draw:style-name="gr14" draw:text-style-name="P14" draw:layer="layout" svg:width="5.858cm" svg:height="0.543cm" svg:x="1.4cm" svg:y="12.712cm">
          <draw:text-box>
            <text:p text:style-name="P1"><text:span text:style-name="T14">Parametri del programma: </text:span></text:p>
          </draw:text-box>
        </draw:frame>
        <draw:frame draw:name="Parametri del programma" draw:style-name="gr10" draw:text-style-name="P9" draw:layer="layout" svg:width="18.314cm" svg:height="1.813cm" svg:x="1.401cm" svg:y="13.34cm">
          <draw:text-box>
            <text:p text:style-name="P1"><text:span text:style-name="T10">myplaintext: </text:span><text:span text:style-name="T15">Satringa di input del programma, oggetto delle procedure di cifratura</text:span><text:span text:style-name="T15"><text:line-break/></text:span><text:span text:style-name="T10">sostK: </text:span><text:span text:style-name="T15">Valore numerico usato come parametro dal </text:span><text:span text:style-name="T11"><text:a xlink:href="#caesar_encrypt" xlink:type="simple">cifrario di Cesare</text:a></text:span><text:span text:style-name="T11"><text:line-break/></text:span><text:span text:style-name="T10">blocKey: </text:span><text:span text:style-name="T15">Stringa parametro del </text:span><text:span text:style-name="T11"><text:a xlink:href="#block_encrypt" xlink:type="simple">cifrario a blocchi</text:a></text:span><text:span text:style-name="T11"><text:line-break/></text:span><text:span text:style-name="T10">mycypher: </text:span><text:span text:style-name="T15">Stringa di caratteri tra {A, B, C, D, E} che determina la sequenza di procedure chiamate</text:span></text:p>
          </draw:text-box>
        </draw:frame>
        <draw:frame draw:style-name="gr15" draw:text-style-name="P15" draw:layer="layout" svg:width="0.943cm" svg:height="0.642cm" svg:x="1.475cm" svg:y="28.154cm">
          <draw:text-box>
            <text:p text:style-name="P1"><text:span text:style-name="T16">1</text:span></text:p>
          </draw:text-box>
        </draw:frame>
      </draw:page>
      <draw:page draw:name="page2" draw:style-name="dp1" draw:master-page-name="master-page3">
        <draw:frame draw:style-name="gr16" draw:text-style-name="P16" draw:layer="layout" svg:width="0.139cm" svg:height="0.536cm" svg:x="10.893cm" svg:y="8.988cm">
          <draw:text-box>
            <text:p text:style-name="P1"><text:span text:style-name="T17"><text:s/></text:span></text:p>
          </draw:text-box>
        </draw:frame>
        <draw:frame draw:style-name="gr8" draw:text-style-name="P7" draw:layer="layout" svg:width="0.388cm" svg:height="0.437cm" svg:x="19.55cm" svg:y="10.207cm">
          <draw:text-box>
            <text:p text:style-name="P1"><text:span text:style-name="T6"><text:s/></text:span></text:p>
          </draw:text-box>
        </draw:frame>
        <draw:frame draw:style-name="gr17" draw:text-style-name="P17" draw:layer="layout" svg:width="0.35cm" svg:height="0.536cm" svg:x="1.868cm" svg:y="12.019cm">
          <draw:text-box>
            <text:p text:style-name="P1"><text:span text:style-name="T18"><text:s/></text:span></text:p>
          </draw:text-box>
        </draw:frame>
        <draw:frame draw:style-name="gr18" draw:text-style-name="P18" draw:layer="layout" svg:width="15.939cm" svg:height="0.543cm" svg:x="1.935cm" svg:y="2.117cm">
          <draw:text-box>
            <text:p text:style-name="P1"><text:span text:style-name="T19">Strutture </text:span><text:span text:style-name="T19">dati </text:span><text:span text:style-name="T19">utilizzate</text:span><text:span text:style-name="T19">: </text:span></text:p>
          </draw:text-box>
        </draw:frame>
        <draw:frame draw:name="heap_chunk" draw:style-name="gr10" draw:text-style-name="P9" draw:layer="layout" svg:width="6.983cm" svg:height="1.522cm" svg:x="1.6cm" svg:y="7.87cm">
          <draw:text-box>
            <text:p text:style-name="P1"><text:span text:style-name="T9">heap_chunk: </text:span><text:span text:style-name="T15">struttura di 12+ byte che organizza una zona di memoria</text:span></text:p>
            <text:p text:style-name="P1"><text:span text:style-name="T15"/></text:p>
            <text:p text:style-name="P1"><text:span text:style-name="T15"/></text:p>
            <text:p text:style-name="P1"><text:span text:style-name="T11"/></text:p>
          </draw:text-box>
        </draw:frame>
        <draw:g draw:style-name="gr19" xml:id="id1" draw:id="id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0" draw:text-style-name="P20" draw:layer="layout" svg:width="8.89cm" svg:height="0.671cm" svg:x="8.92cm" svg:y="7.27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9"><text:span text:style-name="T20">heap_chun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2" draw:layer="layout" svg:width="8.89cm" svg:height="2.069cm" svg:x="8.92cm" svg:y="7.94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21"><text:span text:style-name="T20">- [byte 0-3] : indirizzo del chunk precedente</text:span></text:p>
            <text:p text:style-name="P21"><text:span text:style-name="T20">- [byte 4-7]: bool -&gt; blocco occupato / libero</text:span></text:p>
            <text:p text:style-name="P21"><text:span text:style-name="T20">- [byte 8-11]: dimensione allocabile x</text:span><text:span text:style-name="T20"><text:line-break/></text:span><text:span text:style-name="T20">- [byte 12-[x+12]]: memoria allocabil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2" draw:text-style-name="P23" draw:layer="layout" svg:x1="17.81cm" svg:y1="8.64cm" svg:x2="13.365cm" svg:y2="10.01cm" draw:start-shape="id1" draw:end-shape="id1" draw:end-glue-point="2" svg:d="M17810 8640h527v1896h-4972v-526" svg:viewBox="0 0 4973 1897">
          <text:p/>
        </draw:connector>
        <draw:frame draw:style-name="gr23" draw:text-style-name="P25" draw:layer="layout" svg:width="0.711cm" svg:height="0.536cm" svg:x="12.192cm" svg:y="10.219cm">
          <draw:text-box>
            <text:p text:style-name="P24"><text:span text:style-name="T21">0..1</text:span></text:p>
          </draw:text-box>
        </draw:frame>
        <draw:frame draw:style-name="gr24" draw:text-style-name="P27" draw:layer="layout" svg:width="0.711cm" svg:height="0.475cm" svg:x="18.906cm" svg:y="8.128cm">
          <draw:text-box>
            <text:p text:style-name="P26"><text:span text:style-name="T22">0..1</text:span></text:p>
          </draw:text-box>
        </draw:frame>
        <draw:frame draw:style-name="gr25" draw:text-style-name="P28" draw:layer="layout" svg:width="0.422cm" svg:height="0.536cm" svg:x="13.15cm" svg:y="23.533cm">
          <draw:text-box>
            <text:p text:style-name="P1"><text:span text:style-name="T8"><text:s/></text:span></text:p>
          </draw:text-box>
        </draw:frame>
        <draw:frame draw:style-name="gr8" draw:text-style-name="P7" draw:layer="layout" svg:width="0.388cm" svg:height="0.437cm" svg:x="18.789cm" svg:y="12.585cm">
          <draw:text-box>
            <text:p text:style-name="P1"><text:span text:style-name="T16"><text:s/></text:span></text:p>
          </draw:text-box>
        </draw:frame>
        <draw:frame draw:style-name="gr8" draw:text-style-name="P7" draw:layer="layout" svg:width="0.388cm" svg:height="0.437cm" svg:x="15.605cm" svg:y="14.503cm">
          <draw:text-box>
            <text:p text:style-name="P1"><text:span text:style-name="T16"><text:s/></text:span></text:p>
          </draw:text-box>
        </draw:frame>
        <draw:frame draw:name="cypher_data" draw:style-name="gr10" draw:text-style-name="P9" draw:layer="layout" svg:width="8.789cm" svg:height="1.522cm" svg:x="1.602cm" svg:y="12.171cm">
          <draw:text-box>
            <text:p text:style-name="P1"><text:span text:style-name="T9">cyp</text:span><text:span text:style-name="T9">her</text:span><text:span text:style-name="T9">_da</text:span><text:span text:style-name="T9">ta:</text:span><text:span text:style-name="T10"> </text:span><text:span text:style-name="T15">Sru</text:span><text:span text:style-name="T15">ttur</text:span><text:span text:style-name="T15">a di </text:span><text:span text:style-name="T15">16 </text:span><text:span text:style-name="T15">byt</text:span><text:span text:style-name="T15">e </text:span><text:span text:style-name="T15">con</text:span><text:span text:style-name="T15">ten</text:span><text:span text:style-name="T15">ent</text:span><text:span text:style-name="T15">e I </text:span><text:span text:style-name="T15">par</text:span><text:span text:style-name="T15">am</text:span><text:span text:style-name="T15">etri </text:span><text:span text:style-name="T15">per </text:span><text:span text:style-name="T15">la </text:span><text:span text:style-name="T15">pro</text:span><text:span text:style-name="T15">ced</text:span><text:span text:style-name="T15">ura </text:span><text:span text:style-name="T11"><text:a xlink:href="#cypher_iter" xlink:type="simple">cypher_iter</text:a></text:span></text:p>
            <text:p text:style-name="P1"><text:span text:style-name="T9"/></text:p>
            <text:p text:style-name="P1"><text:span text:style-name="T11"/></text:p>
          </draw:text-box>
        </draw:frame>
        <draw:g draw:style-name="gr19">
          <draw:glue-point draw:id="4" svg:x="-3cm" svg:y="4.701cm"/>
          <draw:glue-point draw:id="5" svg:x="-1cm" svg:y="4.776cm"/>
          <draw:glue-point draw:id="6" svg:x="0.995cm" svg:y="4.85cm"/>
          <draw:glue-point draw:id="7" svg:x="2.995cm" svg:y="4.925cm"/>
          <draw:glue-point draw:id="8" svg:x="-0.001cm" svg:y="-0.655cm" draw:align="bottom-right"/>
          <draw:glue-point draw:id="9" svg:x="0cm" svg:y="-0.725cm" draw:align="bottom-left"/>
          <draw:glue-point draw:id="10" svg:x="-3cm" svg:y="-4.925cm"/>
          <draw:glue-point draw:id="11" svg:x="-1cm" svg:y="-4.85cm"/>
          <draw:glue-point draw:id="12" svg:x="0.995cm" svg:y="-4.776cm"/>
          <draw:glue-point draw:id="13" svg:x="2.995cm" svg:y="-4.701cm"/>
          <draw:glue-point draw:id="14" svg:x="-0.001cm" svg:y="0.706cm" draw:align="top-right"/>
          <draw:glue-point draw:id="15" svg:x="0cm" svg:y="0.636cm" draw:align="top-left"/>
          <draw:custom-shape draw:style-name="gr26" draw:text-style-name="P20" draw:layer="layout" svg:width="9.208cm" svg:height="0.671cm" svg:x="10.508cm" svg:y="11.68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9"><text:span text:style-name="T20">cypher_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9" draw:layer="layout" svg:width="9.208cm" svg:height="2.069cm" svg:x="10.508cm" svg:y="12.356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21"><text:span text:style-name="T20">-[byte 0-3] : indirizzo di </text:span><text:span text:style-name="T23"><text:a xlink:href="#Parametri del programma" xlink:type="simple">mycypher</text:a></text:span></text:p>
            <text:p text:style-name="P21"><text:span text:style-name="T20">-[byte 4-7] : copia di </text:span><text:span text:style-name="T23"><text:a xlink:href="#Parametri del programma" xlink:type="simple">sostK</text:a></text:span></text:p>
            <text:p text:style-name="P21"><text:span text:style-name="T20">-[byte 8-11] : indirizzo di </text:span><text:span text:style-name="T23"><text:a xlink:href="#Parametri del programma" xlink:type="simple">blocKey</text:a></text:span></text:p>
            <text:p text:style-name="P21"><text:span text:style-name="T20">-[byte 12-15] : indirizzo di </text:span><text:span text:style-name="T24">dictionary_fun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name="mem_arena" draw:style-name="gr10" draw:text-style-name="P9" draw:layer="layout" svg:width="8.789cm" svg:height="1.522cm" svg:x="1.603cm" svg:y="15.271cm">
          <draw:text-box>
            <text:p text:style-name="P1"><text:span text:style-name="T9">mem_arena:</text:span><text:span text:style-name="T10"> </text:span><text:span text:style-name="T15">Sruttura di grandezza variabile, utilizzata per richieste di memoria in gruppo, con una richiesta di x byte: il programma alloca x + 8 byte e permette di ottenere porzioni della memoria richiesta <text:s/>successivamente</text:span></text:p>
            <text:p text:style-name="P1"><text:span text:style-name="T9"/></text:p>
            <text:p text:style-name="P1"><text:span text:style-name="T11"/></text:p>
          </draw:text-box>
        </draw:frame>
        <draw:g draw:style-name="gr19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8" draw:text-style-name="P20" draw:layer="layout" svg:width="8.255cm" svg:height="0.671cm" svg:x="10.508cm" svg:y="15.252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9"><text:span text:style-name="T20">mem_aren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2" draw:layer="layout" svg:width="8.255cm" svg:height="1.603cm" svg:x="10.508cm" svg:y="15.92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21"><text:span text:style-name="T20">-[byte 0-3] : intero: numero di byte utilizzati</text:span></text:p>
            <text:p text:style-name="P21"><text:span text:style-name="T20">-[byte 4-7] : intero: grandezza arena</text:span></text:p>
            <text:p text:style-name="P21"><text:span text:style-name="T20">-[byte 8-x] : memoria allocabil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name="occurrence_map" draw:style-name="gr10" draw:text-style-name="P9" draw:layer="layout" svg:width="8.789cm" svg:height="1.522cm" svg:x="1.604cm" svg:y="19.188cm">
          <draw:text-box>
            <text:p text:style-name="P1"><text:span text:style-name="T9">occurrence_map:</text:span><text:span text:style-name="T10"> </text:span><text:span text:style-name="T15">struttura di 384 byte:(carattere massimo – carattere minimo + 1) * 4.</text:span></text:p>
            <text:p text:style-name="P1"><text:span text:style-name="T15">Consiste in un array di puntatori a liste concatenate, ogni elemento “I” corrisponde alla lista di occorrenze del carattere ascii(i + 32), in caso in cui non ci siano occorrenze del carattere, la lista risulta nulla</text:span></text:p>
          </draw:text-box>
        </draw:frame>
        <draw:g draw:style-name="gr19" xml:id="id3" draw:id="id3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0" draw:text-style-name="P20" draw:layer="layout" svg:width="8.573cm" svg:height="0.671cm" svg:x="10.508cm" svg:y="19.8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9"><text:span text:style-name="T20">occurrence_ma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22" draw:layer="layout" svg:width="8.573cm" svg:height="0.671cm" svg:x="10.508cm" svg:y="20.50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21"><text:span text:style-name="T20">-[byte 0-383] : </text:span><text:span text:style-name="T20">list_node[96] 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name="list_node" draw:style-name="gr10" draw:text-style-name="P9" draw:layer="layout" svg:width="8.789cm" svg:height="1.522cm" svg:x="1.705cm" svg:y="23.988cm">
          <draw:text-box>
            <text:p text:style-name="P1"><text:span text:style-name="T9">list_node:</text:span><text:span text:style-name="T10"> </text:span><text:span text:style-name="T15">Struttura di 8 byte che indica una singola occorrenza di un carattere nel testo da cifrare</text:span></text:p>
          </draw:text-box>
        </draw:frame>
        <draw:g draw:style-name="gr19" xml:id="id2" draw:id="id2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2" draw:text-style-name="P20" draw:layer="layout" svg:width="8.059cm" svg:height="0.671cm" svg:x="11.021cm" svg:y="23.54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9"><text:span text:style-name="T20">list_no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22" draw:layer="layout" svg:width="8.059cm" svg:height="1.137cm" svg:x="11.021cm" svg:y="24.216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21"><text:span text:style-name="T20">-[byte 0-3] = indice di occorrenza</text:span></text:p>
            <text:p text:style-name="P21"><text:span text:style-name="T20">-[byte 4-7] = indirizzo del prossimo nod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4" draw:text-style-name="P23" draw:layer="layout" svg:x1="15.05cm" svg:y1="23.545cm" svg:x2="13.937cm" svg:y2="21.18cm" draw:start-shape="id2" draw:start-glue-point="0" draw:end-shape="id3" draw:end-glue-point="5" svg:d="M15050 23545v-1183h-1113v-1182" svg:viewBox="0 0 1114 2366">
          <text:p/>
        </draw:connector>
        <draw:frame draw:style-name="gr35" draw:text-style-name="P25" draw:layer="layout" svg:width="0.69cm" svg:height="0.769cm" svg:x="12.972cm" svg:y="21.482cm">
          <draw:text-box>
            <text:p text:style-name="P24"><text:span text:style-name="T21">1..1</text:span></text:p>
          </draw:text-box>
        </draw:frame>
        <draw:connector draw:style-name="gr36" draw:text-style-name="P23" draw:layer="layout" svg:x1="17.023cm" svg:y1="25.376cm" svg:x2="15.05cm" svg:y2="25.353cm" draw:end-shape="id2" svg:d="M17023 25376v503h-1973v-526" svg:viewBox="0 0 1974 527">
          <text:p/>
        </draw:connector>
        <draw:frame draw:style-name="gr37" draw:text-style-name="P25" draw:layer="layout" svg:width="0.711cm" svg:height="0.536cm" svg:x="14.01cm" svg:y="25.54cm">
          <draw:text-box>
            <text:p text:style-name="P24"><text:span text:style-name="T21">0..1</text:span></text:p>
          </draw:text-box>
        </draw:frame>
        <draw:frame draw:style-name="gr38" draw:text-style-name="P27" draw:layer="layout" svg:width="0.711cm" svg:height="0.475cm" svg:x="15.195cm" svg:y="23.056cm">
          <draw:text-box>
            <text:p text:style-name="P26"><text:span text:style-name="T22">0..*</text:span></text:p>
          </draw:text-box>
        </draw:frame>
        <draw:frame draw:name="heap" draw:style-name="gr10" draw:text-style-name="P9" draw:layer="layout" svg:width="8.49cm" svg:height="1.522cm" svg:x="1.601cm" svg:y="3.971cm">
          <draw:text-box>
            <text:p text:style-name="P1"><text:span text:style-name="T9">heap: </text:span><text:span text:style-name="T15">Raccoglie la memoria allocata dinamicamente dal programma, unico nel programma, se necessario viene esteso con la syscall “brk”, e heap_size aggiornata di conseguenza</text:span></text:p>
          </draw:text-box>
        </draw:frame>
        <draw:g draw:style-name="gr19" xml:id="id4" draw:id="id4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9" draw:text-style-name="P20" draw:layer="layout" svg:width="9.207cm" svg:height="0.671cm" svg:x="10.19cm" svg:y="3.84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9"><text:span text:style-name="T20">hea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2" draw:layer="layout" svg:width="9.207cm" svg:height="1.137cm" svg:x="10.19cm" svg:y="4.52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21"><text:span text:style-name="T20">-heap_size: grandezza totale in byte</text:span></text:p>
            <text:p text:style-name="P21"><text:span text:style-name="T20">-heap_start : indirizzo da cui inizia 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1" draw:text-style-name="P27" draw:layer="layout" svg:width="0.711cm" svg:height="0.475cm" svg:x="15.021cm" svg:y="5.855cm">
          <draw:text-box>
            <text:p text:style-name="P26"><text:span text:style-name="T22">1..1</text:span></text:p>
          </draw:text-box>
        </draw:frame>
        <draw:frame draw:style-name="gr42" draw:text-style-name="P25" draw:layer="layout" svg:width="0.711cm" svg:height="0.536cm" svg:x="12.119cm" svg:y="6.624cm">
          <draw:text-box>
            <text:p text:style-name="P24"><text:span text:style-name="T21">1..*</text:span></text:p>
          </draw:text-box>
        </draw:frame>
        <draw:connector draw:style-name="gr43" draw:text-style-name="P30" draw:layer="layout" svg:x1="13.235cm" svg:y1="7.207cm" svg:x2="14.793cm" svg:y2="5.657cm" draw:end-shape="id4" draw:end-glue-point="2" svg:d="M13235 7207v-512h1558v-1038" svg:viewBox="0 0 1559 1551">
          <text:p/>
        </draw:connector>
        <draw:frame draw:style-name="gr15" draw:text-style-name="P15" draw:layer="layout" svg:width="0.943cm" svg:height="0.642cm" svg:x="1.475cm" svg:y="28.154cm">
          <draw:text-box>
            <text:p text:style-name="P1"><text:span text:style-name="T16">2</text:span></text:p>
          </draw:text-box>
        </draw:frame>
      </draw:page>
      <draw:page draw:name="page3" draw:style-name="dp1" draw:master-page-name="master-page64">
        <draw:frame draw:style-name="gr15" draw:text-style-name="P15" draw:layer="layout" svg:width="0.943cm" svg:height="0.642cm" svg:x="1.474cm" svg:y="28.154cm">
          <draw:text-box>
            <text:p text:style-name="P1"><text:span text:style-name="T16">3</text:span></text:p>
          </draw:text-box>
        </draw:frame>
        <draw:frame draw:style-name="gr44" draw:text-style-name="P8" draw:layer="layout" svg:width="5.771cm" svg:height="0.543cm" svg:x="1.401cm" svg:y="2.026cm">
          <draw:text-box>
            <text:p text:style-name="P1"><text:span text:style-name="T7">Procedure notevoli: </text:span></text:p>
          </draw:text-box>
        </draw:frame>
        <draw:frame draw:name="cypher_iter" draw:style-name="gr45" draw:text-style-name="P31" draw:layer="layout" svg:width="8.415cm" svg:height="0.543cm" svg:x="1.401cm" svg:y="2.623cm">
          <draw:text-box>
            <text:p text:style-name="P1"><text:span text:style-name="T25">cypher_iter:</text:span></text:p>
          </draw:text-box>
        </draw:frame>
        <draw:frame draw:style-name="gr46" draw:text-style-name="P32" draw:layer="layout" svg:width="18.237cm" svg:height="2.072cm" svg:x="1.455cm" svg:y="3.458cm">
          <draw:text-box>
            <text:p text:style-name="P1"><text:span text:style-name="T8">Procedura principale del programma, itera sulla stringa cypher passata come parametro, applica le funzioni di cifratura in base alla lettera corrente della stringa, poi stampa il risultato, e libera la stringa precedente a partire dal secondo ciclo.</text:span><text:span text:style-name="T8"><text:line-break/></text:span><text:span text:style-name="T8"/></text:p>
          </draw:text-box>
        </draw:frame>
        <draw:frame draw:style-name="gr47" draw:text-style-name="P33" draw:layer="layout" svg:width="8.051cm" svg:height="1.865cm" svg:x="1.493cm" svg:y="5.313cm">
          <draw:text-box>
            <text:p text:style-name="P1"><text:span text:style-name="T26">Parametri: </text:span></text:p>
            <text:p text:style-name="P1"><text:span text:style-name="T26">a0: La stringa da cifrare / decifrare (src)</text:span><text:span text:style-name="T26"><text:line-break/></text:span><text:span text:style-name="T26">a1: </text:span><text:span text:style-name="T27"><text:a xlink:href="#cypher_data" xlink:type="simple">cypher_data</text:a></text:span><text:span text:style-name="T27"><text:line-break/></text:span><text:span text:style-name="T26">a2: bool → criptazione / decifrazione (encrypt)</text:span></text:p>
          </draw:text-box>
        </draw:frame>
        <draw:frame draw:style-name="gr47" draw:text-style-name="P33" draw:layer="layout" svg:width="8.051cm" svg:height="1.865cm" svg:x="9.594cm" svg:y="5.423cm">
          <draw:text-box>
            <text:p text:style-name="P1"><text:span text:style-name="T26">Valore di ritorno: </text:span></text:p>
            <text:p text:style-name="P1"><text:span text:style-name="T26">a0: La stringa cifrata / decifrata (dest)</text:span></text:p>
          </draw:text-box>
        </draw:frame>
        <draw:g draw:style-name="gr48" xml:id="id28" draw:id="id28">
          <draw:path draw:style-name="gr49" draw:text-style-name="P34" draw:layer="layout" svg:width="0.5cm" svg:height="0.5cm" svg:x="3.932cm" svg:y="7.752cm" svg:viewBox="0 0 501 501" svg:d="M501 251c0 43-12 87-34 125s-53 69-91 91-82 34-125 34c-44 0-88-12-126-34s-69-53-91-91-34-82-34-125c0-44 12-88 34-126s53-69 91-91 82-34 126-34c43 0 87 12 125 34s69 53 91 91 34 82 34 126z">
            <text:p/>
          </draw:path>
          <draw:custom-shape draw:style-name="gr50" draw:text-style-name="P35" draw:layer="layout" svg:width="0.25cm" svg:height="0.25cm" svg:x="4.057cm" svg:y="7.877cm">
            <text:p/>
            <draw:enhanced-geometry svg:viewBox="0 0 21600 21600" draw:type="rectangle" draw:enhanced-path="M 0 0 L 21600 0 21600 21600 0 21600 0 0 Z N"/>
          </draw:custom-shape>
        </draw:g>
        <draw:connector draw:style-name="gr51" draw:text-style-name="P36" draw:layer="layout" svg:x1="11.401cm" svg:y1="10.304cm" svg:x2="9.132cm" svg:y2="10.322cm" draw:start-shape="id5" draw:end-shape="id6" draw:end-glue-point="7" svg:d="M11401 10304h-1129v18h-1140" svg:viewBox="0 0 2270 19">
          <text:p/>
        </draw:connector>
        <draw:custom-shape draw:style-name="gr52" draw:text-style-name="P38" xml:id="id5" draw:id="id5" draw:layer="layout" svg:width="6.283cm" svg:height="1.854cm" svg:x="11.401cm" svg:y="9.377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37"><text:span text:style-name="T28">i = 0</text:span></text:p>
          <text:p text:style-name="P37"><text:span text:style-name="T28">Termine iter = mycypher.len </text:span></text:p>
          <text:p text:style-name="P37"><text:span text:style-name="T28">Incremento iter = 1</text:span></text:p>
          <text:p text:style-name="P37"><text:span text:style-name="T28">Carica tabella di salto di criptazi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53" draw:text-style-name="P39" draw:layer="layout" svg:width="2.534cm" svg:height="0.601cm" svg:x="9.09cm" svg:y="7.43cm">
          <draw:text-box>
            <text:p text:style-name="P26"><text:span text:style-name="T20">[</text:span><text:span text:style-name="T28">Falso</text:span><text:span text:style-name="T20">]</text:span></text:p>
          </draw:text-box>
        </draw:frame>
        <draw:connector draw:style-name="gr54" draw:text-style-name="P36" draw:layer="layout" svg:x1="11.393cm" svg:y1="8.09cm" svg:x2="8.632cm" svg:y2="9.822cm" draw:start-shape="id7" draw:start-glue-point="3" draw:end-shape="id6" draw:end-glue-point="4" svg:d="M11393 8090h-2761v1732" svg:viewBox="0 0 2762 1733">
          <text:p/>
        </draw:connector>
        <draw:custom-shape draw:style-name="gr55" draw:text-style-name="P38" xml:id="id7" draw:id="id7" draw:layer="layout" svg:width="6.731cm" svg:height="1.805cm" svg:x="11.393cm" svg:y="7.188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37"><text:span text:style-name="T28">i = mycypher.len - 1</text:span></text:p>
          <text:p text:style-name="P37"><text:span text:style-name="T28">Termine iter = <text:s/>-1 </text:span></text:p>
          <text:p text:style-name="P37"><text:span text:style-name="T28">Incremento iter = <text:s/>-1</text:span></text:p>
          <text:p text:style-name="P37"><text:span text:style-name="T28">Carica tabella di salto di decifrazi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6" draw:text-style-name="P38" xml:id="id10" draw:id="id10" draw:layer="layout" svg:width="10.035cm" svg:height="1.5cm" svg:x="9.018cm" svg:y="12.712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37"><text:span text:style-name="T28">a0 = src</text:span></text:p>
          <text:p text:style-name="P37"><text:span text:style-name="T28">a1= src.len</text:span></text:p>
          <text:p text:style-name="P37"><text:span text:style-name="T28">Leggi carattere corrente di mycyph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7" draw:text-style-name="P36" draw:layer="layout" svg:x1="18.632cm" svg:y1="10.322cm" svg:x2="17.684cm" svg:y2="10.304cm" draw:start-shape="id8" draw:start-glue-point="5" draw:end-shape="id5" draw:end-glue-point="1" svg:d="M18632 10322h-479v-18h-469" svg:viewBox="0 0 949 19">
          <text:p/>
        </draw:connector>
        <draw:connector draw:style-name="gr58" draw:text-style-name="P36" draw:layer="layout" svg:x1="19.132cm" svg:y1="9.822cm" svg:x2="18.124cm" svg:y2="8.09cm" draw:start-shape="id8" draw:start-glue-point="4" draw:end-shape="id7" draw:end-glue-point="1" svg:d="M19132 9822v-1732h-1008" svg:viewBox="0 0 1009 1733">
          <text:p/>
        </draw:connector>
        <draw:frame draw:style-name="gr59" draw:text-style-name="P39" draw:layer="layout" svg:width="2.534cm" svg:height="0.736cm" svg:x="9.158cm" svg:y="9.483cm">
          <draw:text-box>
            <text:p text:style-name="P26"><text:span text:style-name="T20">[</text:span><text:span text:style-name="T28">Vero</text:span><text:span text:style-name="T20">]</text:span></text:p>
          </draw:text-box>
        </draw:frame>
        <draw:g draw:style-name="gr19">
          <draw:custom-shape draw:style-name="gr60" draw:text-style-name="P40" draw:layer="layout" svg:width="18.386cm" svg:height="14.043cm" svg:x="1.477cm" svg:y="11.83cm">
            <draw:glue-point draw:id="4" svg:x="3cm" svg:y="-5cm"/>
            <draw:glue-point draw:id="5" svg:x="-3cm" svg:y="-5cm"/>
            <draw:glue-point draw:id="6" svg:x="-3cm" svg:y="5cm"/>
            <draw:glue-point draw:id="7" svg:x="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41" draw:layer="layout" svg:width="5.418cm" svg:height="0.695cm" svg:x="1.477cm" svg:y="11.83cm">
            <text:p text:style-name="P37"><text:span text:style-name="T28">Ciclo criptazione / decifraione <text:s/></text:span></text:p>
            <draw:enhanced-geometry svg:viewBox="0 0 21600 21600" draw:type="non-primitve" draw:enhanced-path="M 0 0 L 21600 0 19000 21600 0 21600 0 0 Z N"/>
          </draw:custom-shape>
        </draw:g>
        <draw:custom-shape draw:style-name="gr62" draw:text-style-name="P42" xml:id="id9" draw:id="id9" draw:layer="layout" svg:width="1cm" svg:height="1cm" svg:x="1.844cm" svg:y="13.7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3" draw:text-style-name="P43" draw:layer="layout" svg:width="4.399cm" svg:height="0.779cm" svg:x="1.983cm" svg:y="13.007cm">
          <draw:text-box>
            <text:p text:style-name="P26"><text:span text:style-name="T28">[calcolo su tabella di salto</text:span></text:p>
            <text:p text:style-name="P26"><text:span text:style-name="T28">In base a mycypher [i]]</text:span></text:p>
          </draw:text-box>
        </draw:frame>
        <draw:connector draw:style-name="gr64" draw:text-style-name="P36" draw:layer="layout" svg:x1="2.844cm" svg:y1="14.281cm" svg:x2="9.018cm" svg:y2="13.462cm" draw:start-shape="id9" draw:start-glue-point="7" draw:end-shape="id10" draw:end-glue-point="3" svg:d="M2844 14281h3093v-819h3081" svg:viewBox="0 0 6175 820">
          <text:p/>
        </draw:connector>
        <draw:connector draw:style-name="gr65" draw:text-style-name="P36" draw:layer="layout" svg:x1="4.93cm" svg:y1="24.934cm" svg:x2="2.344cm" svg:y2="14.781cm" draw:start-shape="id11" draw:start-glue-point="3" draw:end-shape="id9" draw:end-glue-point="6" svg:d="M4930 24934h-2586v-10153" svg:viewBox="0 0 2587 10154">
          <text:p/>
        </draw:connector>
        <draw:frame draw:style-name="gr66" draw:text-style-name="P39" draw:layer="layout" svg:width="2.576cm" svg:height="0.601cm" svg:x="6.048cm" svg:y="9.205cm">
          <draw:text-box>
            <text:p text:style-name="P26"><text:span text:style-name="T20">[</text:span><text:span text:style-name="T28">Crittazione?</text:span><text:span text:style-name="T20">]</text:span></text:p>
          </draw:text-box>
        </draw:frame>
        <draw:custom-shape draw:style-name="gr67" draw:text-style-name="P45" xml:id="id11" draw:id="id11" draw:layer="layout" svg:width="2.301cm" svg:height="0.772cm" svg:x="4.93cm" svg:y="24.548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44"><text:span text:style-name="T29">Chiama </text:span><text:span text:style-name="T30">inver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8" draw:text-style-name="P36" draw:layer="layout" svg:x1="4.906cm" svg:y1="18.305cm" svg:x2="2.365cm" svg:y2="18.306cm" draw:start-shape="id12" draw:start-glue-point="3" svg:d="M4906 18305h-1534v1h-1007" svg:viewBox="0 0 2542 2">
          <text:p/>
        </draw:connector>
        <draw:custom-shape draw:style-name="gr69" draw:text-style-name="P42" xml:id="id8" draw:id="id8" draw:layer="layout" svg:width="1cm" svg:height="1cm" svg:x="18.632cm" svg:y="9.8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0" draw:text-style-name="P36" draw:layer="layout" draw:line-skew="0.53cm" svg:x1="14.035cm" svg:y1="12.712cm" svg:x2="19.132cm" svg:y2="10.822cm" draw:start-shape="id10" draw:end-shape="id8" draw:end-glue-point="6" svg:d="M14035 12712v-409h5097v-1481" svg:viewBox="0 0 5098 1891">
          <text:p/>
        </draw:connector>
        <draw:custom-shape draw:style-name="gr71" draw:text-style-name="P47" xml:id="id18" draw:id="id18" draw:layer="layout" svg:width="5.125cm" svg:height="0.81cm" svg:x="4.916cm" svg:y="23.313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46"><text:span text:style-name="T29">a2=</text:span><text:span text:style-name="T31"><text:a xlink:href="#cypher_data" xlink:type="simple">cypher_data</text:a></text:span><text:span text:style-name="T31">.</text:span><text:span text:style-name="T29">dictionary_function</text:span></text:p>
          <text:p text:style-name="P46"><text:span text:style-name="T29">Chiama </text:span><text:span text:style-name="T30">dictiona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2" draw:text-style-name="P36" draw:layer="layout" svg:x1="4.853cm" svg:y1="22.448cm" svg:x2="2.321cm" svg:y2="22.451cm" draw:start-shape="id13" draw:start-glue-point="3" svg:d="M4853 22448h-1530v3h-1002" svg:viewBox="0 0 2533 4">
          <text:p/>
        </draw:connector>
        <draw:frame draw:style-name="gr73" draw:text-style-name="P48" draw:layer="layout" svg:width="2.534cm" svg:height="0.489cm" svg:x="2.936cm" svg:y="24.934cm">
          <draw:text-box>
            <text:p text:style-name="P26"><text:span text:style-name="T29">[caso E]</text:span></text:p>
          </draw:text-box>
        </draw:frame>
        <draw:custom-shape draw:style-name="gr74" draw:text-style-name="P42" xml:id="id17" draw:id="id17" draw:layer="layout" svg:width="1cm" svg:height="1cm" svg:x="15.345cm" svg:y="14.9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5" draw:text-style-name="P45" xml:id="id14" draw:id="id14" draw:layer="layout" svg:width="4.683cm" svg:height="0.872cm" svg:x="4.827cm" svg:y="20.787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44"><text:span text:style-name="T29">Chiama </text:span><text:span text:style-name="T30">occurrence_encryp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6" draw:text-style-name="P45" xml:id="id13" draw:id="id13" draw:layer="layout" svg:width="4.593cm" svg:height="0.784cm" svg:x="4.853cm" svg:y="22.056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44"><text:span text:style-name="T29">Chiama </text:span><text:span text:style-name="T30">occurrence_decyph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7" draw:text-style-name="P36" draw:layer="layout" svg:x1="4.827cm" svg:y1="21.223cm" svg:x2="2.381cm" svg:y2="21.216cm" draw:start-shape="id14" draw:start-glue-point="3" svg:d="M4827 21223h-1487v-7h-959" svg:viewBox="0 0 2447 8">
          <text:p/>
        </draw:connector>
        <draw:g draw:style-name="gr78" xml:id="id15" draw:id="id15">
          <draw:path draw:style-name="gr79" draw:text-style-name="P49" draw:layer="layout" svg:width="0.5cm" svg:height="0.5cm" svg:x="10.82cm" svg:y="28.018cm" svg:viewBox="0 0 501 501" svg:d="M501 251c0 43-12 87-34 125s-53 69-91 91-82 34-125 34c-44 0-88-12-126-34s-69-53-91-91-34-82-34-125c0-44 12-88 34-126s53-69 91-91 82-34 126-34c43 0 87 12 125 34s69 53 91 91 34 82 34 126z">
            <text:p/>
          </draw:path>
          <draw:path draw:style-name="gr80" draw:text-style-name="P34" draw:layer="layout" svg:width="0.2cm" svg:height="0.2cm" svg:x="10.97cm" svg:y="28.168cm" svg:viewBox="0 0 201 201" svg:d="M201 101c0 17-5 34-13 50-9 15-22 28-37 37-16 8-33 13-50 13-18 0-35-5-51-13-15-9-28-22-37-37-8-16-13-33-13-50 0-18 5-35 13-51 9-15 22-28 37-37 16-8 33-13 51-13 17 0 34 5 50 13 15 9 28 22 37 37 8 16 13 33 13 51z">
            <text:p/>
          </draw:path>
        </draw:g>
        <draw:connector draw:style-name="gr81" draw:text-style-name="P36" draw:layer="layout" svg:x1="11.07cm" svg:y1="28.018cm" svg:x2="11.064cm" svg:y2="27.182cm" draw:start-shape="id15" draw:start-glue-point="0" draw:end-shape="id16" draw:end-glue-point="2" svg:d="M11070 28018v-418h-6v-418" svg:viewBox="0 0 7 837">
          <text:p/>
        </draw:connector>
        <draw:connector draw:style-name="gr82" draw:text-style-name="P36" draw:layer="layout" draw:line-skew="1.787cm" svg:x1="15.345cm" svg:y1="15.442cm" svg:x2="7.231cm" svg:y2="24.934cm" draw:start-shape="id17" draw:start-glue-point="5" draw:end-shape="id11" draw:end-glue-point="1" svg:d="M15345 15442h-2275v9492h-5839" svg:viewBox="0 0 8115 9493">
          <text:p/>
        </draw:connector>
        <draw:connector draw:style-name="gr83" draw:text-style-name="P36" draw:layer="layout" svg:x1="13.048cm" svg:y1="23.72cm" svg:x2="10.041cm" svg:y2="23.718cm" draw:end-shape="id18" draw:end-glue-point="1" svg:d="M13048 23720h-1240v-2h-1767" svg:viewBox="0 0 3008 3">
          <text:p/>
        </draw:connector>
        <draw:custom-shape draw:style-name="gr84" draw:text-style-name="P45" xml:id="id21" draw:id="id21" draw:layer="layout" svg:width="4cm" svg:height="1.5cm" svg:x="13.835cm" svg:y="20.146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44"><text:span text:style-name="T29">Stampa a0 (dest)</text:span></text:p>
          <text:p text:style-name="P44"><text:span text:style-name="T29">src = dest</text:span></text:p>
          <text:p text:style-name="P44"><text:span text:style-name="T29">i = i + incremento iter</text:span></text:p>
          <text:p text:style-name="P44"><text:span text:style-name="T29">Prima iterazione = fals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5" draw:text-style-name="P36" draw:layer="layout" svg:x1="15.88cm" svg:y1="16.62cm" svg:x2="15.845cm" svg:y2="15.942cm" draw:start-shape="id19" draw:start-glue-point="4" draw:end-shape="id17" draw:end-glue-point="6" svg:d="M15880 16620v-338h-35v-340" svg:viewBox="0 0 36 679">
          <text:p/>
        </draw:connector>
        <draw:custom-shape draw:style-name="gr86" draw:text-style-name="P42" xml:id="id20" draw:id="id20" draw:layer="layout" svg:width="1cm" svg:height="1cm" svg:x="15.345cm" svg:y="2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7" draw:text-style-name="P36" draw:layer="layout" svg:x1="15.845cm" svg:y1="22.647cm" svg:x2="15.835cm" svg:y2="21.646cm" draw:start-shape="id20" draw:start-glue-point="4" draw:end-shape="id21" draw:end-glue-point="2" svg:d="M15845 22647v-505h-10v-496" svg:viewBox="0 0 11 1002">
          <text:p/>
        </draw:connector>
        <draw:frame draw:style-name="gr88" draw:text-style-name="P48" draw:layer="layout" svg:width="2.534cm" svg:height="0.601cm" svg:x="13.311cm" svg:y="22.086cm">
          <draw:text-box>
            <text:p text:style-name="P26"><text:span text:style-name="T29">[i != termine iter]</text:span></text:p>
          </draw:text-box>
        </draw:frame>
        <draw:connector draw:style-name="gr89" draw:text-style-name="P36" draw:layer="layout" draw:line-skew="1.015cm" svg:x1="11.064cm" svg:y1="26.571cm" svg:x2="15.845cm" svg:y2="23.647cm" draw:start-shape="id16" draw:start-glue-point="0" draw:end-shape="id20" draw:end-glue-point="6" svg:d="M11064 26571v-441h4781v-2483" svg:viewBox="0 0 4782 2925">
          <text:p/>
        </draw:connector>
        <draw:connector draw:style-name="gr90" draw:text-style-name="P36" draw:layer="layout" draw:line-skew="1.647cm" svg:x1="19.116cm" svg:y1="12.286cm" svg:x2="16.345cm" svg:y2="23.147cm" draw:end-shape="id20" draw:end-glue-point="7" svg:d="M19116 12286h531v10861h-3302" svg:viewBox="0 0 3303 10862">
          <text:p/>
        </draw:connector>
        <draw:frame draw:style-name="gr91" draw:text-style-name="P48" draw:layer="layout" svg:width="2.534cm" svg:height="0.601cm" svg:x="16.3cm" svg:y="22.446cm">
          <draw:text-box>
            <text:p text:style-name="P26"><text:span text:style-name="T29">[vero]</text:span></text:p>
          </draw:text-box>
        </draw:frame>
        <draw:frame draw:style-name="gr92" draw:text-style-name="P48" draw:layer="layout" svg:width="2.534cm" svg:height="0.601cm" svg:x="14.472cm" svg:y="23.372cm">
          <draw:text-box>
            <text:p text:style-name="P26"><text:span text:style-name="T29">[falso]</text:span></text:p>
          </draw:text-box>
        </draw:frame>
        <draw:frame draw:style-name="gr93" draw:text-style-name="P48" draw:layer="layout" svg:width="2.534cm" svg:height="0.601cm" svg:x="2.796cm" svg:y="23.618cm">
          <draw:text-box>
            <text:p text:style-name="P26"><text:span text:style-name="T29">[caso D]</text:span></text:p>
          </draw:text-box>
        </draw:frame>
        <draw:frame draw:style-name="gr94" draw:text-style-name="P48" draw:layer="layout" svg:width="2.534cm" svg:height="0.601cm" svg:x="2.165cm" svg:y="22.564cm">
          <draw:text-box>
            <text:p text:style-name="P26"><text:span text:style-name="T29">[caso C] &amp;&amp;</text:span></text:p>
            <text:p text:style-name="P26"><text:span text:style-name="T29">[decyhper] </text:span></text:p>
          </draw:text-box>
        </draw:frame>
        <draw:frame draw:style-name="gr95" draw:text-style-name="P50" draw:layer="layout" svg:width="1.47cm" svg:height="0.62cm" svg:x="2.43cm" svg:y="21.305cm">
          <draw:text-box>
            <text:p><text:span text:style-name="T29">[caso C] &amp;&amp;</text:span></text:p>
            <text:p><text:span text:style-name="T29">[encrypt] </text:span></text:p>
          </draw:text-box>
        </draw:frame>
        <draw:custom-shape draw:style-name="gr96" draw:text-style-name="P51" xml:id="id12" draw:id="id12" draw:layer="layout" svg:width="3.632cm" svg:height="1.14cm" svg:x="4.906cm" svg:y="17.735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19"><text:span text:style-name="T29">a2 = </text:span><text:span text:style-name="T31"><text:a xlink:href="#cypher_data" xlink:type="simple">cypher_data</text:a></text:span><text:span text:style-name="T29"><text:s/></text:span></text:p>
          <text:p text:style-name="P19"><text:span text:style-name="T29">Chiama </text:span><text:span text:style-name="T30"><text:a xlink:href="#block_encrypt" xlink:type="simple">block_encrypt</text:a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7" draw:text-style-name="P53" xml:id="id23" draw:id="id23" draw:layer="layout" svg:width="4.024cm" svg:height="0.944cm" svg:x="4.878cm" svg:y="16.388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52"><text:span text:style-name="T29">a2 = </text:span><text:span text:style-name="T32"><text:a xlink:href="#Parametri del programma" xlink:type="simple">sostK</text:a></text:span></text:p>
          <text:p text:style-name="P46"><text:span text:style-name="T29">Chiama </text:span><text:span text:style-name="T30"><text:a xlink:href="#caesar_decypher" xlink:type="simple">caesar_decypher</text:a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8" draw:text-style-name="P45" xml:id="id22" draw:id="id22" draw:layer="layout" svg:width="4.093cm" svg:height="1.14cm" svg:x="4.869cm" svg:y="19.307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52"><text:span text:style-name="T29">a2 = </text:span><text:span text:style-name="T31"><text:a xlink:href="#cypher_data" xlink:type="simple">cypher_data</text:a></text:span><text:span text:style-name="T31">.</text:span><text:span text:style-name="T32"><text:a xlink:href="#Parametri del programma" xlink:type="simple">blocKey</text:a></text:span></text:p>
          <text:p text:style-name="P44"><text:span text:style-name="T29">Chiama </text:span><text:span text:style-name="T30"><text:a xlink:href="#block_decypher" xlink:type="simple">block_decypher</text:a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9" draw:text-style-name="P53" xml:id="id24" draw:id="id24" draw:layer="layout" svg:width="4.024cm" svg:height="0.944cm" svg:x="4.902cm" svg:y="14.975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52"><text:span text:style-name="T29">a2 = </text:span><text:span text:style-name="T32"><text:a xlink:href="#Parametri del programma" xlink:type="simple">sostK</text:a></text:span></text:p>
          <text:p text:style-name="P46"><text:span text:style-name="T29">Chiama </text:span><text:span text:style-name="T30"><text:a xlink:href="#caesar_encrypt" xlink:type="simple">caesar_encrypt</text:a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00" draw:text-style-name="P36" draw:layer="layout" svg:x1="4.869cm" svg:y1="19.877cm" svg:x2="2.355cm" svg:y2="19.884cm" draw:start-shape="id22" draw:start-glue-point="3" svg:d="M4869 19877h-1521v7h-993" svg:viewBox="0 0 2515 8">
          <text:p/>
        </draw:connector>
        <draw:connector draw:style-name="gr101" draw:text-style-name="P36" draw:layer="layout" svg:x1="4.916cm" svg:y1="23.718cm" svg:x2="2.339cm" svg:y2="23.728cm" draw:start-shape="id18" draw:start-glue-point="3" svg:d="M4916 23718h-1552v10h-1025" svg:viewBox="0 0 2578 11">
          <text:p/>
        </draw:connector>
        <draw:connector draw:style-name="gr102" draw:text-style-name="P36" draw:layer="layout" svg:x1="4.878cm" svg:y1="16.86cm" svg:x2="2.336cm" svg:y2="16.858cm" draw:start-shape="id23" draw:start-glue-point="3" svg:d="M4878 16860h-1534v-2h-1008" svg:viewBox="0 0 2543 3">
          <text:p/>
        </draw:connector>
        <draw:connector draw:style-name="gr103" draw:text-style-name="P36" draw:layer="layout" svg:x1="4.902cm" svg:y1="15.447cm" svg:x2="2.359cm" svg:y2="15.444cm" draw:start-shape="id24" draw:start-glue-point="3" svg:d="M4902 15447h-1535v-3h-1008" svg:viewBox="0 0 2544 4">
          <text:p/>
        </draw:connector>
        <draw:frame draw:style-name="gr104" draw:text-style-name="P48" draw:layer="layout" svg:width="2.534cm" svg:height="0.601cm" svg:x="2.344cm" svg:y="15.774cm">
          <draw:text-box>
            <text:p text:style-name="P26"><text:span text:style-name="T29">[caso A] &amp;&amp;</text:span><text:span text:style-name="T29"><text:line-break/></text:span><text:span text:style-name="T29">[encrypy]</text:span></text:p>
            <text:p text:style-name="P26"><text:span text:style-name="T29"><text:s/></text:span></text:p>
            <text:p text:style-name="P26"><text:span text:style-name="T29"/></text:p>
          </draw:text-box>
        </draw:frame>
        <draw:frame draw:style-name="gr105" draw:text-style-name="P48" draw:layer="layout" svg:width="2.534cm" svg:height="0.601cm" svg:x="2.244cm" svg:y="17.046cm">
          <draw:text-box>
            <text:p text:style-name="P26"><text:span text:style-name="T29">[ca</text:span><text:span text:style-name="T29">so </text:span><text:span text:style-name="T29">A] </text:span><text:span text:style-name="T29">&amp;&amp;</text:span><text:span text:style-name="T29"><text:line-break/></text:span><text:span text:style-name="T29">[de</text:span><text:span text:style-name="T29">cy</text:span><text:span text:style-name="T29">ph</text:span><text:span text:style-name="T29">er]</text:span></text:p>
            <text:p text:style-name="P26"><text:span text:style-name="T29"><text:s/></text:span></text:p>
          </draw:text-box>
        </draw:frame>
        <draw:frame draw:style-name="gr106" draw:text-style-name="P48" draw:layer="layout" svg:width="2.534cm" svg:height="0.601cm" svg:x="2.195cm" svg:y="18.518cm">
          <draw:text-box>
            <text:p text:style-name="P26"><text:span text:style-name="T29">[caso B] &amp;&amp;</text:span><text:span text:style-name="T29"><text:line-break/></text:span><text:span text:style-name="T29">[encrypt]</text:span></text:p>
            <text:p text:style-name="P26"><text:span text:style-name="T29"><text:s/></text:span></text:p>
          </draw:text-box>
        </draw:frame>
        <draw:frame draw:style-name="gr107" draw:text-style-name="P48" draw:layer="layout" svg:width="2.534cm" svg:height="0.601cm" svg:x="2.195cm" svg:y="20.019cm">
          <draw:text-box>
            <text:p text:style-name="P26"><text:span text:style-name="T29">[caso B] &amp;&amp;</text:span><text:span text:style-name="T29"><text:line-break/></text:span><text:span text:style-name="T29">[decypher]</text:span></text:p>
            <text:p text:style-name="P26"><text:span text:style-name="T29"><text:s/></text:span></text:p>
          </draw:text-box>
        </draw:frame>
        <draw:connector draw:style-name="gr108" draw:text-style-name="P36" draw:layer="layout" svg:x1="13.048cm" svg:y1="22.556cm" svg:x2="9.446cm" svg:y2="22.559cm" svg:d="M13048 22556h-1801v3h-1801" svg:viewBox="0 0 3603 4">
          <text:p/>
        </draw:connector>
        <draw:connector draw:style-name="gr109" draw:text-style-name="P36" draw:layer="layout" svg:x1="13.043cm" svg:y1="15.454cm" svg:x2="8.926cm" svg:y2="15.447cm" draw:end-shape="id24" draw:end-glue-point="1" svg:d="M13043 15454h-1794v-7h-2323" svg:viewBox="0 0 4118 8">
          <text:p/>
        </draw:connector>
        <draw:connector draw:style-name="gr110" draw:text-style-name="P36" draw:layer="layout" svg:x1="13.049cm" svg:y1="16.855cm" svg:x2="8.902cm" svg:y2="16.86cm" draw:end-shape="id23" draw:end-glue-point="1" svg:d="M13049 16855h-1809v5h-2338" svg:viewBox="0 0 4148 6">
          <text:p/>
        </draw:connector>
        <draw:connector draw:style-name="gr111" draw:text-style-name="P36" draw:layer="layout" svg:x1="13.073cm" svg:y1="18.311cm" svg:x2="8.538cm" svg:y2="18.305cm" draw:end-shape="id12" draw:end-glue-point="1" svg:d="M13073 18311h-2003v-6h-2532" svg:viewBox="0 0 4536 7">
          <text:p/>
        </draw:connector>
        <draw:connector draw:style-name="gr112" draw:text-style-name="P36" draw:layer="layout" svg:x1="13.031cm" svg:y1="19.871cm" svg:x2="8.962cm" svg:y2="19.877cm" draw:end-shape="id22" draw:end-glue-point="1" svg:d="M13031 19871h-1771v6h-2298" svg:viewBox="0 0 4070 7">
          <text:p/>
        </draw:connector>
        <draw:connector draw:style-name="gr113" draw:text-style-name="P36" draw:layer="layout" svg:x1="13.05cm" svg:y1="21.218cm" svg:x2="9.51cm" svg:y2="21.223cm" draw:end-shape="id14" draw:end-glue-point="1" svg:d="M13050 21218h-1506v5h-2034" svg:viewBox="0 0 3541 6">
          <text:p/>
        </draw:connector>
        <draw:custom-shape draw:style-name="gr114" draw:text-style-name="P42" xml:id="id19" draw:id="id19" draw:layer="layout" svg:width="1cm" svg:height="1cm" svg:x="15.38cm" svg:y="16.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15" draw:text-style-name="P48" draw:layer="layout" svg:width="2.534cm" svg:height="0.601cm" svg:x="13.799cm" svg:y="16.359cm">
          <draw:text-box>
            <text:p text:style-name="P26"><text:span text:style-name="T29">[prima </text:span></text:p>
            <text:p text:style-name="P26"><text:span text:style-name="T29">iterazione?]</text:span></text:p>
          </draw:text-box>
        </draw:frame>
        <draw:custom-shape draw:style-name="gr116" draw:text-style-name="P42" xml:id="id25" draw:id="id25" draw:layer="layout" svg:width="1cm" svg:height="1cm" svg:x="15.36cm" svg:y="18.1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7" draw:text-style-name="P36" draw:layer="layout" svg:x1="15.86cm" svg:y1="18.108cm" svg:x2="15.88cm" svg:y2="17.62cm" draw:start-shape="id25" draw:start-glue-point="4" draw:end-shape="id19" draw:end-glue-point="6" svg:d="M15860 18108v-243h20v-245" svg:viewBox="0 0 21 489">
          <text:p/>
        </draw:connector>
        <draw:connector draw:style-name="gr118" draw:text-style-name="P36" draw:layer="layout" svg:x1="15.835cm" svg:y1="20.146cm" svg:x2="15.86cm" svg:y2="19.108cm" draw:start-shape="id21" draw:start-glue-point="0" draw:end-shape="id25" draw:end-glue-point="6" svg:d="M15835 20146v-513h25v-525" svg:viewBox="0 0 26 1039">
          <text:p/>
        </draw:connector>
        <draw:connector draw:style-name="gr119" draw:text-style-name="P36" draw:layer="layout" svg:x1="17.294cm" svg:y1="17.153cm" svg:x2="16.38cm" svg:y2="17.12cm" draw:start-shape="id26" draw:start-glue-point="3" draw:end-shape="id19" draw:end-glue-point="7" svg:d="M17294 17153h-451v-33h-463" svg:viewBox="0 0 915 34">
          <text:p/>
        </draw:connector>
        <draw:connector draw:style-name="gr120" draw:text-style-name="P36" draw:layer="layout" svg:x1="16.36cm" svg:y1="18.608cm" svg:x2="18.413cm" svg:y2="17.49cm" draw:start-shape="id25" draw:start-glue-point="7" draw:end-shape="id26" draw:end-glue-point="2" svg:d="M16360 18608h2053v-1118" svg:viewBox="0 0 2054 1119">
          <text:p/>
        </draw:connector>
        <draw:custom-shape draw:style-name="gr121" draw:text-style-name="P51" xml:id="id26" draw:id="id26" draw:layer="layout" svg:width="2.238cm" svg:height="0.674cm" svg:x="17.294cm" svg:y="16.816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19"><text:span text:style-name="T29">a0 = src</text:span></text:p>
          <text:p text:style-name="P19"><text:span text:style-name="T29">Chiama fre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22" draw:text-style-name="P48" draw:layer="layout" svg:width="2.534cm" svg:height="0.601cm" svg:x="14.66cm" svg:y="17.579cm">
          <draw:text-box>
            <text:p text:style-name="P26"><text:span text:style-name="T29">[vero]</text:span></text:p>
          </draw:text-box>
        </draw:frame>
        <draw:frame draw:style-name="gr123" draw:text-style-name="P48" draw:layer="layout" svg:width="2.534cm" svg:height="0.601cm" svg:x="16.345cm" svg:y="16.359cm">
          <draw:text-box>
            <text:p text:style-name="P26"><text:span text:style-name="T29">[falso]</text:span></text:p>
          </draw:text-box>
        </draw:frame>
        <draw:frame draw:style-name="gr124" draw:text-style-name="P48" draw:layer="layout" svg:width="2.534cm" svg:height="0.601cm" svg:x="19cm" svg:y="10.647cm">
          <draw:text-box>
            <text:p text:style-name="P26"><text:span text:style-name="T29">[end if]</text:span></text:p>
          </draw:text-box>
        </draw:frame>
        <draw:frame draw:style-name="gr125" draw:text-style-name="P48" draw:layer="layout" svg:width="2.534cm" svg:height="0.601cm" svg:x="15.879cm" svg:y="14.831cm">
          <draw:text-box>
            <text:p text:style-name="P26"><text:span text:style-name="T29">[end switch]</text:span></text:p>
          </draw:text-box>
        </draw:frame>
        <draw:polygon draw:style-name="gr126" draw:text-style-name="P55" xml:id="id27" draw:id="id27" draw:layer="layout" svg:width="3.764cm" svg:height="1.354cm" svg:x="2.297cm" svg:y="9.63cm" svg:viewBox="0 0 3765 1355" draw:points="0,0 2352,0 2824,0 3764,0 3764,677 3765,678 3764,678 3764,1354 2824,1354 2824,1355 0,1355 941,678">
          <text:p text:style-name="P54"><text:span text:style-name="T29">In:</text:span></text:p>
          <text:p text:style-name="P54"><text:span text:style-name="T29">src, </text:span><text:span text:style-name="T31"><text:a xlink:href="#cypher_data" xlink:type="simple">cypher_data</text:a></text:span><text:span text:style-name="T29">, </text:span></text:p>
          <text:p text:style-name="P54"><text:span text:style-name="T29">bool: encrypt </text:span></text:p>
        </draw:polygon>
        <draw:connector draw:style-name="gr127" draw:text-style-name="P36" draw:layer="layout" svg:x1="8.132cm" svg:y1="10.322cm" svg:x2="6.062cm" svg:y2="10.307cm" draw:start-shape="id6" draw:start-glue-point="5" draw:end-shape="id27" draw:end-glue-point="1" svg:d="M8132 10322h-1040v-15h-1030" svg:viewBox="0 0 2071 16">
          <text:p/>
        </draw:connector>
        <draw:connector draw:style-name="gr128" draw:text-style-name="P36" draw:layer="layout" svg:x1="4.179cm" svg:y1="9.63cm" svg:x2="4.182cm" svg:y2="8.253cm" draw:start-shape="id27" draw:start-glue-point="0" draw:end-shape="id28" draw:end-glue-point="2" svg:d="M4179 9630v-695h3v-682" svg:viewBox="0 0 4 1378">
          <text:p/>
        </draw:connector>
        <draw:custom-shape draw:style-name="gr129" draw:text-style-name="P57" xml:id="id16" draw:id="id16" draw:layer="layout" svg:width="3.018cm" svg:height="0.611cm" svg:x="9.555cm" svg:y="26.571cm">
          <text:p text:style-name="P56"><text:span text:style-name="T29">out = dest</text:span></text:p>
          <draw:enhanced-geometry svg:viewBox="0 0 21600 21600" draw:mirror-horizontal="false" draw:mirror-vertical="false" draw:text-areas="0 0 21600 21600" draw:type="pentagon-right" draw:modifiers="15339.648890361" draw:enhanced-path="M 0 0 L ?f0 0 21600 10800 ?f0 21600 0 21600 Z N">
            <draw:equation draw:name="f0" draw:formula="$0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130" draw:text-style-name="P42" xml:id="id6" draw:id="id6" draw:layer="layout" svg:width="1cm" svg:height="1cm" svg:x="8.132cm" svg:y="9.8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4" draw:style-name="dp1" draw:master-page-name="master-page64">
        <draw:frame draw:style-name="gr15" draw:text-style-name="P15" draw:layer="layout" svg:width="0.943cm" svg:height="0.642cm" svg:x="1.474cm" svg:y="28.154cm">
          <draw:text-box>
            <text:p text:style-name="P1"><text:span text:style-name="T16">4</text:span></text:p>
          </draw:text-box>
        </draw:frame>
        <draw:frame draw:style-name="gr44" draw:text-style-name="P8" draw:layer="layout" svg:width="5.771cm" svg:height="0.543cm" svg:x="1.401cm" svg:y="2.026cm">
          <draw:text-box>
            <text:p text:style-name="P1"><text:span text:style-name="T7">Procedure notevoli: </text:span></text:p>
          </draw:text-box>
        </draw:frame>
        <draw:frame draw:name="str_map_alloc" draw:style-name="gr45" draw:text-style-name="P31" draw:layer="layout" svg:width="8.415cm" svg:height="0.543cm" svg:x="1.421cm" svg:y="2.834cm">
          <draw:text-box>
            <text:p text:style-name="P1"><text:span text:style-name="T25">str_map_alloc: </text:span></text:p>
          </draw:text-box>
        </draw:frame>
        <draw:frame draw:style-name="gr131" draw:text-style-name="P58" draw:layer="layout" svg:width="18.237cm" svg:height="1.819cm" svg:x="1.391cm" svg:y="3.486cm">
          <draw:text-box>
            <text:p text:style-name="P1"><text:span text:style-name="T33">Procedura che alloca memoria per una stringa che passa come argomento a </text:span><text:span text:style-name="T34">str_map</text:span><text:span text:style-name="T33">.</text:span><text:span text:style-name="T33"><text:line-break/></text:span><text:span text:style-name="T33">Verrà usata spesso da altre procedure</text:span></text:p>
            <text:p text:style-name="P1"><text:span text:style-name="T33"/></text:p>
          </draw:text-box>
        </draw:frame>
        <draw:frame draw:style-name="gr132" draw:text-style-name="P50" draw:layer="layout" svg:width="12.7cm" svg:height="4.195cm" svg:x="1.391cm" svg:y="4.822cm">
          <draw:text-box>
            <text:p>Pseudocodice:</text:p>
            <text:p/>
            <text:p>(char [], int) str_map_alloc(char [] src, int src_len, char (*funzione)(char))</text:p>
            <text:p>{</text:p>
            <text:p><text:tab/>char [] dest = malloc(src_len + 1);</text:p>
            <text:p><text:tab/>dest = str_map(src, dest, funzione);</text:p>
            <text:p><text:tab/>return (dest, src_len);</text:p>
            <text:p>}</text:p>
            <text:p/>
          </draw:text-box>
        </draw:frame>
        <draw:frame draw:name="str_map" draw:style-name="gr45" draw:text-style-name="P31" draw:layer="layout" svg:width="8.415cm" svg:height="0.543cm" svg:x="1.399cm" svg:y="8.586cm">
          <draw:text-box>
            <text:p text:style-name="P1"><text:span text:style-name="T25">s</text:span><text:span text:style-name="T25">t</text:span><text:span text:style-name="T25">r</text:span><text:span text:style-name="T25">_</text:span><text:span text:style-name="T25">m</text:span><text:span text:style-name="T25">a</text:span><text:span text:style-name="T25">p</text:span><text:span text:style-name="T25">:</text:span><text:span text:style-name="T25"> </text:span></text:p>
          </draw:text-box>
        </draw:frame>
        <draw:frame draw:style-name="gr133" draw:text-style-name="P58" draw:layer="layout" svg:width="18.237cm" svg:height="2.285cm" svg:x="1.409cm" svg:y="9.312cm">
          <draw:text-box>
            <text:p text:style-name="P1"><text:span text:style-name="T33">Procedura </text:span><text:span text:style-name="T33">ispirata dal </text:span><text:span text:style-name="T33">linguaggio </text:span><text:span text:style-name="T33">funzionale </text:span><text:span text:style-name="T33">che itera su </text:span><text:span text:style-name="T33">una stringa, </text:span><text:span text:style-name="T33">e che per </text:span><text:span text:style-name="T33">ogni </text:span><text:span text:style-name="T33">carattere </text:span><text:span text:style-name="T33">nell’indice </text:span><text:span text:style-name="T33">“i” applica la </text:span><text:span text:style-name="T33">funzione </text:span><text:span text:style-name="T33">passata </text:span><text:span text:style-name="T33">come </text:span><text:span text:style-name="T33">argomento, </text:span><text:span text:style-name="T33">la quale </text:span><text:span text:style-name="T33">produce un </text:span><text:span text:style-name="T33">carattere </text:span><text:span text:style-name="T33">che viene </text:span><text:span text:style-name="T33">scritto nello </text:span><text:span text:style-name="T33">stesso </text:span><text:span text:style-name="T33">indice sulla </text:span><text:span text:style-name="T33">stringa di </text:span><text:span text:style-name="T33">destinazione</text:span><text:span text:style-name="T33">.</text:span></text:p>
          </draw:text-box>
        </draw:frame>
        <draw:g draw:style-name="gr48" xml:id="id30" draw:id="id30">
          <draw:path draw:style-name="gr134" draw:text-style-name="P34" draw:layer="layout" svg:width="0.5cm" svg:height="0.5cm" svg:x="2.298cm" svg:y="11.699cm" svg:viewBox="0 0 501 501" svg:d="M501 251c0 43-12 87-34 125s-53 69-91 91-82 34-125 34c-44 0-88-12-126-34s-69-53-91-91-34-82-34-125c0-44 12-88 34-126s53-69 91-91 82-34 126-34c43 0 87 12 125 34s69 53 91 91 34 82 34 126z">
            <text:p/>
          </draw:path>
          <draw:custom-shape draw:style-name="gr135" draw:text-style-name="P35" draw:layer="layout" svg:width="0.25cm" svg:height="0.25cm" svg:x="2.423cm" svg:y="11.824cm">
            <text:p/>
            <draw:enhanced-geometry svg:viewBox="0 0 21600 21600" draw:type="rectangle" draw:enhanced-path="M 0 0 L 21600 0 21600 21600 0 21600 0 0 Z N"/>
          </draw:custom-shape>
        </draw:g>
        <draw:connector draw:style-name="gr136" draw:text-style-name="P59" draw:layer="layout" svg:x1="4.218cm" svg:y1="11.93cm" svg:x2="2.799cm" svg:y2="11.949cm" draw:start-shape="id29" draw:start-glue-point="3" draw:end-shape="id30" draw:end-glue-point="1" svg:d="M4218 11930h-716v19h-703" svg:viewBox="0 0 1420 20">
          <text:p/>
        </draw:connector>
        <draw:polygon draw:style-name="gr137" draw:text-style-name="P60" xml:id="id29" draw:id="id29" draw:layer="layout" svg:width="3.791cm" svg:height="1.432cm" svg:x="4.218cm" svg:y="11.214cm" svg:viewBox="0 0 3792 1433" draw:points="0,0 2369,0 2844,0 3791,0 3791,716 3792,717 3791,717 3791,1432 2844,1432 2844,1433 0,1433 948,717">
          <text:p text:style-name="P54"><text:span text:style-name="T29">In: char [] src, </text:span></text:p>
          <text:p text:style-name="P54"><text:span text:style-name="T29">char [] dest,</text:span></text:p>
          <text:p text:style-name="P54"><text:span text:style-name="T29"><text:s/>funzione (char) -&gt; char</text:span></text:p>
        </draw:polygon>
        <draw:custom-shape draw:style-name="gr138" draw:text-style-name="P45" xml:id="id31" draw:id="id31" draw:layer="layout" svg:width="3.042cm" svg:height="1.062cm" draw:transform="skewX (0.00663225115757845) translate (9.428cm 11.413cm)">
          <draw:glue-point draw:id="4" svg:x="1.685cm" svg:y="-4.994cm"/>
          <draw:glue-point draw:id="5" svg:x="-1.622cm" svg:y="-4.994cm"/>
          <draw:glue-point draw:id="6" svg:x="-3.336cm" svg:y="4.994cm"/>
          <draw:glue-point draw:id="7" svg:x="3.281cm" svg:y="4.994cm"/>
          <draw:glue-point draw:id="8" svg:x="1.624cm" svg:y="4.994cm"/>
          <draw:glue-point draw:id="9" svg:x="-1.682cm" svg:y="4.994cm"/>
          <draw:glue-point draw:id="10" svg:x="-3.278cm" svg:y="-4.994cm"/>
          <draw:glue-point draw:id="11" svg:x="3.339cm" svg:y="-4.994cm"/>
          <draw:glue-point draw:id="12" svg:x="-4.943cm" svg:y="-3.326cm"/>
          <draw:glue-point draw:id="13" svg:x="-4.987cm" svg:y="3.326cm"/>
          <draw:glue-point draw:id="14" svg:x="4.946cm" svg:y="3.326cm"/>
          <draw:glue-point draw:id="15" svg:x="4.989cm" svg:y="-3.326cm"/>
          <text:p text:style-name="P44"><text:span text:style-name="T29">i = 0;</text:span></text:p>
          <text:p text:style-name="P44"><text:span text:style-name="T29">c = funzione(str[i]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39" draw:text-style-name="P36" draw:layer="layout" svg:x1="9.421cm" svg:y1="11.944cm" svg:x2="8.01cm" svg:y2="11.93cm" draw:start-shape="id31" draw:start-glue-point="3" draw:end-shape="id29" draw:end-glue-point="1" svg:d="M9421 11944h-705v-14h-706" svg:viewBox="0 0 1412 15">
          <text:p/>
        </draw:connector>
        <draw:custom-shape draw:style-name="gr140" draw:text-style-name="P42" xml:id="id32" draw:id="id32" draw:layer="layout" svg:width="1cm" svg:height="1cm" svg:x="10.436cm" svg:y="13.5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draw:style-name="gr19">
          <draw:custom-shape draw:style-name="gr141" draw:text-style-name="P40" draw:layer="layout" svg:width="11.561cm" svg:height="5.639cm" svg:x="5.252cm" svg:y="12.984cm">
            <draw:glue-point draw:id="4" svg:x="3cm" svg:y="-5cm"/>
            <draw:glue-point draw:id="5" svg:x="-3cm" svg:y="-5cm"/>
            <draw:glue-point draw:id="6" svg:x="-3cm" svg:y="5cm"/>
            <draw:glue-point draw:id="7" svg:x="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2" draw:text-style-name="P61" draw:layer="layout" svg:width="2.363cm" svg:height="0.614cm" svg:x="5.252cm" svg:y="12.984cm">
            <text:p text:style-name="P44"><text:span text:style-name="T29">str_map loop</text:span></text:p>
            <draw:enhanced-geometry svg:viewBox="0 0 21600 21600" draw:type="non-primitve" draw:enhanced-path="M 0 0 L 21600 0 19000 21600 0 21600 0 0 Z N"/>
          </draw:custom-shape>
        </draw:g>
        <draw:connector draw:style-name="gr143" draw:text-style-name="P36" draw:layer="layout" svg:x1="10.936cm" svg:y1="13.525cm" svg:x2="10.942cm" svg:y2="12.475cm" draw:start-shape="id32" draw:start-glue-point="4" draw:end-shape="id31" draw:end-glue-point="2" svg:d="M10936 13525v-530h6v-520" svg:viewBox="0 0 7 1051">
          <text:p/>
        </draw:connector>
        <draw:custom-shape draw:style-name="gr144" draw:text-style-name="P42" xml:id="id34" draw:id="id34" draw:layer="layout" svg:width="1cm" svg:height="1cm" svg:x="10.436cm" svg:y="17.0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45" draw:text-style-name="P48" draw:layer="layout" svg:width="1.245cm" svg:height="0.601cm" svg:x="11.214cm" svg:y="13.375cm">
          <draw:text-box>
            <text:p text:style-name="P26"><text:span text:style-name="T29">[falso]</text:span></text:p>
          </draw:text-box>
        </draw:frame>
        <draw:custom-shape draw:style-name="gr146" draw:text-style-name="P45" xml:id="id33" draw:id="id33" draw:layer="layout" svg:width="3.042cm" svg:height="1.21cm" draw:transform="skewX (0.00663225115757845) translate (9.416cm 15.428cm)">
          <draw:glue-point draw:id="4" svg:x="1.685cm" svg:y="-4.994cm"/>
          <draw:glue-point draw:id="5" svg:x="-1.622cm" svg:y="-4.994cm"/>
          <draw:glue-point draw:id="6" svg:x="-3.336cm" svg:y="4.994cm"/>
          <draw:glue-point draw:id="7" svg:x="3.281cm" svg:y="4.994cm"/>
          <draw:glue-point draw:id="8" svg:x="1.624cm" svg:y="4.994cm"/>
          <draw:glue-point draw:id="9" svg:x="-1.682cm" svg:y="4.994cm"/>
          <draw:glue-point draw:id="10" svg:x="-3.278cm" svg:y="-4.994cm"/>
          <draw:glue-point draw:id="11" svg:x="3.339cm" svg:y="-4.994cm"/>
          <draw:glue-point draw:id="12" svg:x="-4.943cm" svg:y="-3.326cm"/>
          <draw:glue-point draw:id="13" svg:x="-4.987cm" svg:y="3.326cm"/>
          <draw:glue-point draw:id="14" svg:x="4.946cm" svg:y="3.326cm"/>
          <draw:glue-point draw:id="15" svg:x="4.989cm" svg:y="-3.326cm"/>
          <text:p text:style-name="P44"><text:span text:style-name="T29">dest[i] = c;</text:span></text:p>
          <text:p text:style-name="P44"><text:span text:style-name="T29">i++;</text:span></text:p>
          <text:p text:style-name="P44"><text:span text:style-name="T29">c = funzione(str[i]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47" draw:text-style-name="P36" draw:layer="layout" svg:x1="10.937cm" svg:y1="15.428cm" svg:x2="10.936cm" svg:y2="14.525cm" draw:start-shape="id33" draw:start-glue-point="0" draw:end-shape="id32" draw:end-glue-point="6" svg:d="M10937 15428v-445h-1v-458" svg:viewBox="0 0 2 904">
          <text:p/>
        </draw:connector>
        <draw:connector draw:style-name="gr148" draw:text-style-name="P36" draw:layer="layout" svg:x1="10.436cm" svg:y1="14.025cm" svg:x2="9.408cm" svg:y2="16.033cm" draw:start-shape="id32" draw:start-glue-point="5" draw:end-shape="id33" draw:end-glue-point="3" svg:d="M10436 14025h-1553v2008h525" svg:viewBox="0 0 1554 2009">
          <text:p/>
        </draw:connector>
        <draw:frame draw:style-name="gr149" draw:text-style-name="P48" draw:layer="layout" svg:width="2.558cm" svg:height="0.601cm" svg:x="8.078cm" svg:y="13.275cm">
          <draw:text-box>
            <text:p text:style-name="P26"><text:span text:style-name="T29">[src[i] != ‘\0’] &amp;&amp; </text:span></text:p>
            <text:p text:style-name="P26"><text:span text:style-name="T29">[c != ‘\0’]</text:span></text:p>
          </draw:text-box>
        </draw:frame>
        <draw:frame draw:style-name="gr150" draw:text-style-name="P48" draw:layer="layout" svg:width="1.197cm" svg:height="0.668cm" svg:x="9.715cm" svg:y="14.525cm">
          <draw:text-box>
            <text:p text:style-name="P26"><text:span text:style-name="T29">[vero]</text:span></text:p>
          </draw:text-box>
        </draw:frame>
        <draw:connector draw:style-name="gr151" draw:text-style-name="P36" draw:layer="layout" draw:line-skew="1.585cm" svg:x1="11.436cm" svg:y1="17.525cm" svg:x2="11.436cm" svg:y2="14.025cm" draw:start-shape="id34" draw:start-glue-point="7" draw:end-shape="id32" draw:end-glue-point="7" svg:d="M11436 17525h2124v-3500h-2124" svg:viewBox="0 0 2125 3501">
          <text:p/>
        </draw:connector>
        <draw:custom-shape draw:style-name="gr152" draw:text-style-name="P45" xml:id="id35" draw:id="id35" draw:layer="layout" svg:width="3.042cm" svg:height="0.584cm" draw:transform="skewX (0.00680678408277789) translate (9.427cm 19.211cm)">
          <draw:glue-point draw:id="4" svg:x="1.685cm" svg:y="-4.994cm"/>
          <draw:glue-point draw:id="5" svg:x="-1.622cm" svg:y="-4.994cm"/>
          <draw:glue-point draw:id="6" svg:x="-3.336cm" svg:y="4.994cm"/>
          <draw:glue-point draw:id="7" svg:x="3.281cm" svg:y="4.994cm"/>
          <draw:glue-point draw:id="8" svg:x="1.624cm" svg:y="4.994cm"/>
          <draw:glue-point draw:id="9" svg:x="-1.682cm" svg:y="4.994cm"/>
          <draw:glue-point draw:id="10" svg:x="-3.278cm" svg:y="-4.994cm"/>
          <draw:glue-point draw:id="11" svg:x="3.339cm" svg:y="-4.994cm"/>
          <draw:glue-point draw:id="12" svg:x="-4.943cm" svg:y="-3.326cm"/>
          <draw:glue-point draw:id="13" svg:x="-4.987cm" svg:y="3.326cm"/>
          <draw:glue-point draw:id="14" svg:x="4.946cm" svg:y="3.326cm"/>
          <draw:glue-point draw:id="15" svg:x="4.989cm" svg:y="-3.326cm"/>
          <text:p text:style-name="P44"><text:span text:style-name="T29">dest[i] = '\0'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53" draw:text-style-name="P36" draw:layer="layout" svg:x1="10.948cm" svg:y1="19.211cm" svg:x2="10.936cm" svg:y2="18.025cm" draw:start-shape="id35" draw:start-glue-point="0" draw:end-shape="id34" draw:end-glue-point="6" svg:d="M10948 19211v-587h-12v-599" svg:viewBox="0 0 13 1187">
          <text:p/>
        </draw:connector>
        <draw:frame draw:style-name="gr154" draw:text-style-name="P48" draw:layer="layout" svg:width="1.715cm" svg:height="0.601cm" svg:x="10.983cm" svg:y="17.776cm">
          <draw:text-box>
            <text:p text:style-name="P26"><text:span text:style-name="T29">[end loop]</text:span></text:p>
          </draw:text-box>
        </draw:frame>
        <draw:custom-shape draw:style-name="gr155" draw:text-style-name="P57" xml:id="id36" draw:id="id36" draw:layer="layout" svg:width="2.635cm" svg:height="0.887cm" svg:x="13.972cm" svg:y="19.074cm">
          <text:p text:style-name="P56"><text:span text:style-name="T29">Out: dest</text:span></text:p>
          <draw:enhanced-geometry svg:viewBox="0 0 21600 21600" draw:text-areas="0 0 21600 21600" draw:type="pentagon-right" draw:modifiers="14438.2397572079" draw:enhanced-path="M 0 0 L ?f0 0 21600 10800 ?f0 21600 0 21600 Z N">
            <draw:equation draw:name="f0" draw:formula="$0 "/>
            <draw:handle draw:handle-range-x-minimum="0" draw:handle-range-x-maximum="21600" draw:handle-position="$0 top" draw:handle-position-x="$0" draw:handle-position-y="top"/>
          </draw:enhanced-geometry>
        </draw:custom-shape>
        <draw:g draw:style-name="gr78" xml:id="id37" draw:id="id37">
          <draw:path draw:style-name="gr156" draw:text-style-name="P49" draw:layer="layout" svg:width="0.5cm" svg:height="0.5cm" svg:x="17.798cm" svg:y="19.246cm" svg:viewBox="0 0 501 501" svg:d="M501 251c0 43-12 87-34 125s-53 69-91 91-82 34-125 34c-44 0-88-12-126-34s-69-53-91-91-34-82-34-125c0-44 12-88 34-126s53-69 91-91 82-34 126-34c43 0 87 12 125 34s69 53 91 91 34 82 34 126z">
            <text:p/>
          </draw:path>
          <draw:path draw:style-name="gr157" draw:text-style-name="P34" draw:layer="layout" svg:width="0.2cm" svg:height="0.2cm" svg:x="17.948cm" svg:y="19.396cm" svg:viewBox="0 0 201 201" svg:d="M201 101c0 17-5 34-13 50-9 15-22 28-37 37-16 8-33 13-50 13-18 0-35-5-51-13-15-9-28-22-37-37-8-16-13-33-13-50 0-18 5-35 13-51 9-15 22-28 37-37 16-8 33-13 51-13 17 0 34 5 50 13 15 9 28 22 37 37 8 16 13 33 13 51z">
            <text:p/>
          </draw:path>
        </draw:g>
        <draw:connector draw:style-name="gr158" draw:text-style-name="P36" draw:layer="layout" svg:x1="13.972cm" svg:y1="19.517cm" svg:x2="12.469cm" svg:y2="19.503cm" draw:start-shape="id36" draw:start-glue-point="3" draw:end-shape="id35" draw:end-glue-point="1" svg:d="M13972 19517h-752v-14h-751" svg:viewBox="0 0 1504 15">
          <text:p/>
        </draw:connector>
        <draw:connector draw:style-name="gr159" draw:text-style-name="P36" draw:layer="layout" svg:x1="17.798cm" svg:y1="19.496cm" svg:x2="16.607cm" svg:y2="19.517cm" draw:start-shape="id37" draw:start-glue-point="3" draw:end-shape="id36" draw:end-glue-point="1" svg:d="M17798 19496h-595v21h-596" svg:viewBox="0 0 1192 22">
          <text:p/>
        </draw:connector>
        <draw:frame draw:name="str_map_alloc 2" draw:style-name="gr160" draw:text-style-name="P62" draw:layer="layout" svg:width="3.213cm" svg:height="0.543cm" svg:x="1.4cm" svg:y="20.287cm">
          <draw:text-box>
            <text:p text:style-name="P1"><text:span text:style-name="T25">curry_word: </text:span></text:p>
          </draw:text-box>
        </draw:frame>
        <draw:frame draw:style-name="gr161" draw:text-style-name="P58" draw:layer="layout" svg:width="17.605cm" svg:height="6.038cm" svg:x="1.41cm" svg:y="21.113cm">
          <draw:text-box>
            <text:p text:style-name="P1"><text:span text:style-name="T33">Per fare pieno uso della potenzialità del linguaggio funzionale </text:span><text:span text:style-name="T35">è</text:span><text:span text:style-name="T33"> necessario essere in grado di eseguire l’operazione di </text:span><text:span text:style-name="T36">currying</text:span><text:span text:style-name="T33">, o di applicazione parziale di funzioni, in quanto </text:span><text:span text:style-name="T34"><text:a xlink:href="#str_map" xlink:type="simple">str_map</text:a></text:span><text:span text:style-name="T8"><text:s/>può solo valutare funzioni con un singolo parametro.</text:span><text:span text:style-name="T8"><text:line-break/></text:span><text:span text:style-name="T8">In linguaggio informale, eseguendo questa operazione su una funzione </text:span><text:span text:style-name="T37">f</text:span><text:span text:style-name="T38">: (X×Y )→Z, <text:s/></text:span><text:span text:style-name="T39">è</text:span><text:span text:style-name="T8"> possibile definire una funzione </text:span><text:span text:style-name="T38">f</text:span><text:span text:style-name="T40">x</text:span><text:span text:style-name="T41">:(Y)→Z, </text:span><text:span text:style-name="T42"><text:s/>che accetta un numero ridotto di argomenti, in un certo senso “fissando” il valore di x.</text:span></text:p>
            <text:p text:style-name="P1"><text:span text:style-name="T42">In questo documento richiamerò la funzione “curry()” come una funzione capace di associare la funzione passata come primo argomento, agli argomenti successivi, come dire: </text:span><text:span text:style-name="T42"><text:line-break/></text:span><text:span text:style-name="T42">curry(func(), a, b) = func(a, b, …). </text:span></text:p>
            <text:p text:style-name="P1"><text:span text:style-name="T42">Volevo far presente che l’implementazione effettiva differisce da questo comportamento, anche se produce un effetto analogo.</text:span></text:p>
          </draw:text-box>
        </draw:frame>
      </draw:page>
      <draw:page draw:name="page5" draw:style-name="dp1" draw:master-page-name="master-page64">
        <draw:frame draw:style-name="gr15" draw:text-style-name="P15" draw:layer="layout" svg:width="0.943cm" svg:height="0.642cm" svg:x="1.474cm" svg:y="28.154cm">
          <draw:text-box>
            <text:p text:style-name="P1"><text:span text:style-name="T16">5</text:span></text:p>
          </draw:text-box>
        </draw:frame>
        <draw:frame draw:style-name="gr44" draw:text-style-name="P8" draw:layer="layout" svg:width="5.771cm" svg:height="0.543cm" svg:x="1.401cm" svg:y="2.026cm">
          <draw:text-box>
            <text:p text:style-name="P1"><text:span text:style-name="T7">Procedure notevoli: </text:span></text:p>
          </draw:text-box>
        </draw:frame>
        <draw:frame draw:name="Implementazione di curry_word" draw:style-name="gr162" draw:text-style-name="P62" draw:layer="layout" svg:width="7.789cm" svg:height="0.543cm" svg:x="1.4cm" svg:y="2.987cm">
          <draw:text-box>
            <text:p text:style-name="P1"><text:span text:style-name="T25">Implementazione di curry_word: </text:span></text:p>
          </draw:text-box>
        </draw:frame>
        <draw:frame draw:style-name="gr163" draw:text-style-name="P63" draw:layer="layout" svg:width="17.605cm" svg:height="7.567cm" svg:x="1.658cm" svg:y="3.919cm">
          <draw:text-box>
            <text:p text:style-name="P1"><text:span text:style-name="T43">Nel codice l’implementazione della procedura risulta non convenzionale e rompe alcune delle regole che mi sono imposto durante la scrittura del codice, ho fatto questa scelta per mantenere il resto della struttura e logica del programma, e per evitare di appoggiarmi a variabili globali alterando ulteriormente lo stato del programma tra chiamate. </text:span><text:span text:style-name="T43"><text:line-break/></text:span><text:span text:style-name="T43">E in tutta onestà per testare i un po’ limiti della mia conoscenza di Riscv e Ripes, mantenendo comunque un codice deterministico.</text:span><text:span text:style-name="T43"><text:line-break/></text:span><text:span text:style-name="T43"><text:line-break/></text:span><text:span text:style-name="T43">In breve la procedura altera la sezione .text del programma durante l’esecuzione, inserendo due operazioni che permettono di caricare una parola arbitraria in un registro specificato durante la chiamata.</text:span><text:span text:style-name="T43"><text:line-break/></text:span><text:span text:style-name="T43">Questo pu</text:span><text:span text:style-name="T44">ò essere fatto con sicurezza solo se abbiamo definito un simbolo e lasciato spazio per due operazioni nella sezione del codice che vogliamo modificare.</text:span></text:p>
            <text:p text:style-name="P1"><text:span text:style-name="T43"><text:line-break/></text:span><text:span text:style-name="T43"/></text:p>
          </draw:text-box>
        </draw:frame>
        <draw:frame draw:style-name="gr164" draw:text-style-name="P64" draw:layer="layout" svg:width="6.644cm" svg:height="1.832cm" svg:x="10.692cm" svg:y="10.946cm">
          <draw:image xlink:href="Pictures/100000010000012200000050F922DA25.png" xlink:type="simple" xlink:show="embed" xlink:actuate="onLoad" draw:mime-type="image/png">
            <text:p/>
          </draw:image>
        </draw:frame>
        <draw:frame draw:style-name="gr164" draw:text-style-name="P64" draw:layer="layout" svg:width="9.153cm" svg:height="1.883cm" svg:x="10.647cm" svg:y="13.701cm">
          <draw:image xlink:href="Pictures/10000001000001800000004F28348659.png" xlink:type="simple" xlink:show="embed" xlink:actuate="onLoad" draw:mime-type="image/png">
            <text:p/>
          </draw:image>
        </draw:frame>
        <draw:frame draw:style-name="gr165" draw:text-style-name="P32" draw:layer="layout" svg:width="8.617cm" svg:height="6.497cm" svg:x="1.621cm" svg:y="10.817cm">
          <draw:text-box>
            <text:p text:style-name="P1"><text:span text:style-name="T44">Per esempio nella funzione </text:span><text:span text:style-name="T45"><text:a xlink:href="#caesar_sost" xlink:type="simple">caesar_sost</text:a></text:span><text:span text:style-name="T46"><text:s/>la sequenza di codice dopo il simbolo "caesar_sost_load_k" </text:span><text:span text:style-name="T44">è compresa intenzionalmente da due azioni senza effffetto, in modo che possa essere</text:span><text:span text:style-name="T46"> sovrascritta con una sequenza che carica il valore di </text:span><text:span text:style-name="T47"><text:a xlink:href="#Parametri del programma" xlink:type="simple">sostK</text:a></text:span><text:span text:style-name="T46"><text:s/>nel registro t1.</text:span><text:span text:style-name="T46"><text:line-break/></text:span><text:span text:style-name="T46">Questa sequenza spezza il valore in una parte superiore di 20 bit, e una inferiore di 12 e sfrutta le istruzioni immediate per costruire il valore nel registro scelto</text:span></text:p>
            <text:p text:style-name="P1"><text:span text:style-name="T46"/></text:p>
          </draw:text-box>
        </draw:frame>
        <draw:frame draw:style-name="gr166" draw:text-style-name="P50" draw:layer="layout" svg:width="16.865cm" svg:height="9.652cm" svg:x="1.491cm" svg:y="17.223cm">
          <draw:text-box>
            <text:p>Pseudocodice:</text:p>
            <text:p/>
            <text:p>void curry_word(32bit_int valore, int registro, 32bit_int *indirizzo_destinazione)</text:p>
            <text:p>{</text:p>
            <text:p><text:tab/>bit bit_flip = leggi_nesimo_bit(valore, 12); <text:s/>→ * </text:p>
            <text:p/>
            <text:p><text:tab/>32bit_int lui_opcode = 0b0110111; </text:p>
            <text:p><text:tab/></text:p>
            <text:p><text:tab/>32bit_int istruzione_lui = ((valore &gt;&gt; 12) + bit_flip) &lt;&lt; 12;</text:p>
            <text:p><text:tab/>istruzione_lui |= registro &lt;&lt; 7; </text:p>
            <text:p><text:tab/>istruzione_lui |= lui_opcode;</text:p>
            <text:p/>
            <text:p><text:tab/>32bit_int addi_opcode = 0b0010011;</text:p>
            <text:p/>
            <text:p><text:tab/>32bit_int istruzione_addi = valore &lt;&lt; 20; </text:p>
            <text:p><text:tab/>istruzione_addi |= registro &lt;&lt; 7 | registro &lt;&lt; 15; </text:p>
            <text:p><text:tab/>istruzione_addi |= addi_opcode; </text:p>
            <text:p/>
            <text:p><text:tab/>indirizzo_destinazione[0] = istruizione_lui;</text:p>
            <text:p><text:tab/>indirizzo_destinazione[1] = istruzione_addi;</text:p>
            <text:p>}</text:p>
            <text:p/>
          </draw:text-box>
        </draw:frame>
        <draw:frame draw:style-name="gr167" draw:text-style-name="P33" draw:layer="layout" svg:width="17.768cm" svg:height="1.171cm" svg:x="1.522cm" svg:y="26.618cm">
          <draw:text-box>
            <text:p text:style-name="P1"><text:span text:style-name="T48">* dato che il bit più significativo della codifica di un numero definisce il suo segno, in caso il 12esimo bit del valore sia uno si aggiunge 1 alla porzione superiore per bilanciare il fatto che la porzione inferiore sarà interpretata come negativa.</text:span></text:p>
          </draw:text-box>
        </draw:frame>
      </draw:page>
      <draw:page draw:name="page6" draw:style-name="dp1" draw:master-page-name="master-page64">
        <draw:frame draw:style-name="gr44" draw:text-style-name="P8" draw:layer="layout" svg:width="5.771cm" svg:height="0.543cm" svg:x="1.401cm" svg:y="2.026cm">
          <draw:text-box>
            <text:p text:style-name="P1"><text:span text:style-name="T7">Procedure notevoli: </text:span></text:p>
          </draw:text-box>
        </draw:frame>
        <draw:frame draw:style-name="gr168" draw:text-style-name="P50" draw:layer="layout" svg:width="16.392cm" svg:height="6.991cm" svg:x="1.548cm" svg:y="22.27cm">
          <draw:text-box>
            <text:p>Pseudocodice:</text:p>
            <text:p/>
            <text:p>(char [], int) block_encrypt(char [] src, int src_len, char [] blocKey)</text:p>
            <text:p>{</text:p>
            <text:p><text:tab/>int i = 0;</text:p>
            <text:p><text:tab/>return (str_map_alloc(src, src_len, curry(block_map, &amp;i, blockey, true));</text:p>
            <text:p>}</text:p>
            <text:p/>
            <text:p>(char [], int) block_decypher(char [] src, int src_len, char [] blocKey)</text:p>
            <text:p>{</text:p>
            <text:p><text:tab/>int i = 0;</text:p>
            <text:p><text:tab/>return (str_map_alloc(src, src_len, curry(block_map, &amp;i, blockey, false));</text:p>
            <text:p>}<text:line-break/></text:p>
          </draw:text-box>
        </draw:frame>
        <draw:frame draw:name="caesar_sost" draw:style-name="gr45" draw:text-style-name="P62" draw:layer="layout" svg:width="8.415cm" svg:height="0.543cm" svg:x="1.403cm" svg:y="12.326cm">
          <draw:text-box>
            <text:p text:style-name="P1"><text:span text:style-name="T25">cesar_sost: </text:span></text:p>
          </draw:text-box>
        </draw:frame>
        <draw:g draw:style-name="gr48" xml:id="id39" draw:id="id39">
          <draw:path draw:style-name="gr169" draw:text-style-name="P34" draw:layer="layout" svg:width="0.5cm" svg:height="0.5cm" svg:x="2.152cm" svg:y="16.291cm" svg:viewBox="0 0 501 501" svg:d="M501 251c0 43-12 87-34 125s-53 69-91 91-82 34-125 34c-44 0-88-12-126-34s-69-53-91-91-34-82-34-125c0-44 12-88 34-126s53-69 91-91 82-34 126-34c43 0 87 12 125 34s69 53 91 91 34 82 34 126z">
            <text:p/>
          </draw:path>
          <draw:custom-shape draw:style-name="gr170" draw:text-style-name="P35" draw:layer="layout" svg:width="0.25cm" svg:height="0.25cm" svg:x="2.277cm" svg:y="16.416cm">
            <text:p/>
            <draw:enhanced-geometry svg:viewBox="0 0 21600 21600" draw:type="rectangle" draw:enhanced-path="M 0 0 L 21600 0 21600 21600 0 21600 0 0 Z N"/>
          </draw:custom-shape>
        </draw:g>
        <draw:connector draw:style-name="gr171" draw:text-style-name="P36" draw:layer="layout" svg:x1="3.332cm" svg:y1="16.533cm" svg:x2="2.653cm" svg:y2="16.541cm" draw:start-shape="id38" draw:start-glue-point="3" draw:end-shape="id39" draw:end-glue-point="1" svg:d="M3332 16533h-346v8h-333" svg:viewBox="0 0 680 9">
          <text:p/>
        </draw:connector>
        <draw:custom-shape draw:style-name="gr172" draw:text-style-name="P66" xml:id="id41" draw:id="id41" draw:layer="layout" svg:width="2.26cm" svg:height="1.5cm" svg:x="14.915cm" svg:y="15.666cm">
          <text:p text:style-name="P65"><text:span text:style-name="T20">out: c</text:span></text:p>
          <draw:enhanced-geometry svg:viewBox="0 0 21600 21600" draw:text-areas="0 0 21600 21600" draw:type="pentagon-right" draw:modifiers="13240.866873065" draw:enhanced-path="M 0 0 L ?f0 0 21600 10800 ?f0 21600 0 21600 Z N">
            <draw:equation draw:name="f0" draw:formula="$0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173" draw:text-style-name="P42" xml:id="id40" draw:id="id40" draw:layer="layout" svg:width="1cm" svg:height="1cm" svg:x="9.825cm" svg:y="14.3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4" draw:text-style-name="P36" draw:layer="layout" draw:line-skew="-0.606cm" svg:x1="9.825cm" svg:y1="14.878cm" svg:x2="7.332cm" svg:y2="16.533cm" draw:start-shape="id40" draw:end-shape="id38" draw:end-glue-point="1" svg:d="M9825 14878h-1858v1655h-635" svg:viewBox="0 0 2494 1656">
          <text:p/>
        </draw:connector>
        <draw:connector draw:style-name="gr175" draw:text-style-name="P36" draw:layer="layout" svg:x1="14.915cm" svg:y1="16.416cm" svg:x2="14.147cm" svg:y2="16.466cm" draw:start-shape="id41" draw:start-glue-point="3" draw:end-shape="id42" draw:end-glue-point="7" svg:d="M14915 16416h-378v50h-390" svg:viewBox="0 0 769 51">
          <text:p/>
        </draw:connector>
        <draw:connector draw:style-name="gr176" draw:text-style-name="P36" draw:layer="layout" svg:x1="13.647cm" svg:y1="15.966cm" svg:x2="10.825cm" svg:y2="14.878cm" draw:start-shape="id42" draw:start-glue-point="4" draw:end-shape="id40" draw:end-glue-point="7" svg:d="M13647 15966v-1088h-2822" svg:viewBox="0 0 2823 1089">
          <text:p/>
        </draw:connector>
        <draw:connector draw:style-name="gr177" draw:text-style-name="P36" draw:layer="layout" svg:x1="18.261cm" svg:y1="16.398cm" svg:x2="17.175cm" svg:y2="16.416cm" draw:start-shape="id43" draw:start-glue-point="3" draw:end-shape="id41" svg:d="M18261 16398h-542v18h-544" svg:viewBox="0 0 1087 19">
          <text:p/>
        </draw:connector>
        <draw:custom-shape draw:style-name="gr178" draw:text-style-name="P42" xml:id="id42" draw:id="id42" draw:layer="layout" svg:width="1cm" svg:height="1cm" svg:x="13.147cm" svg:y="15.9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draw:style-name="gr78" xml:id="id43" draw:id="id43">
          <draw:path draw:style-name="gr179" draw:text-style-name="P49" draw:layer="layout" svg:width="0.5cm" svg:height="0.5cm" svg:x="18.261cm" svg:y="16.148cm" svg:viewBox="0 0 501 501" svg:d="M501 251c0 43-12 87-34 125s-53 69-91 91-82 34-125 34c-44 0-88-12-126-34s-69-53-91-91-34-82-34-125c0-44 12-88 34-126s53-69 91-91 82-34 126-34c43 0 87 12 125 34s69 53 91 91 34 82 34 126z">
            <text:p/>
          </draw:path>
          <draw:path draw:style-name="gr180" draw:text-style-name="P34" draw:layer="layout" svg:width="0.2cm" svg:height="0.2cm" svg:x="18.411cm" svg:y="16.298cm" svg:viewBox="0 0 201 201" svg:d="M201 101c0 17-5 34-13 50-9 15-22 28-37 37-16 8-33 13-50 13-18 0-35-5-51-13-15-9-28-22-37-37-8-16-13-33-13-50 0-18 5-35 13-51 9-15 22-28 37-37 16-8 33-13 51-13 17 0 34 5 50 13 15 9 28 22 37 37 8 16 13 33 13 51z">
            <text:p/>
          </draw:path>
        </draw:g>
        <draw:polygon draw:style-name="gr181" draw:text-style-name="P60" xml:id="id38" draw:id="id38" draw:layer="layout" svg:width="3.999cm" svg:height="1.499cm" svg:x="3.332cm" svg:y="15.783cm" svg:viewBox="0 0 4000 1500" draw:points="0,0 2499,0 3000,0 3999,0 3999,749 4000,750 3999,751 3999,1499 3000,1499 3000,1500 0,1500 1000,750">
          <text:p text:style-name="P67"><text:span text:style-name="T20">in: c, sostK</text:span></text:p>
        </draw:polygon>
        <draw:custom-shape draw:style-name="gr182" draw:text-style-name="P45" xml:id="id44" draw:id="id44" draw:layer="layout" svg:width="4.317cm" svg:height="1.5cm" svg:x="8.195cm" svg:y="16.436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44"><text:span text:style-name="T29">minusco</text:span><text:span text:style-name="T29">lo = c &amp; </text:span><text:span text:style-name="T29">32;</text:span></text:p>
          <text:p text:style-name="P44"><text:span text:style-name="T29">c = (c – </text:span><text:span text:style-name="T29">'A' - </text:span><text:span text:style-name="T29">minusco</text:span><text:span text:style-name="T29">lo + </text:span><text:span text:style-name="T29">sostk);</text:span></text:p>
          <text:p text:style-name="P44"><text:span text:style-name="T29">c = c % </text:span><text:span text:style-name="T29">26 + </text:span><text:span text:style-name="T29">minusco</text:span><text:span text:style-name="T29">lo + 'A'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83" draw:text-style-name="P36" draw:layer="layout" svg:x1="10.353cm" svg:y1="16.436cm" svg:x2="10.325cm" svg:y2="15.378cm" draw:start-shape="id44" draw:start-glue-point="0" draw:end-shape="id40" draw:end-glue-point="6" svg:d="M10353 16436v-523h-28v-535" svg:viewBox="0 0 29 1059">
          <text:p/>
        </draw:connector>
        <draw:connector draw:style-name="gr184" draw:text-style-name="P36" draw:layer="layout" svg:x1="13.147cm" svg:y1="16.466cm" svg:x2="12.512cm" svg:y2="17.186cm" draw:start-shape="id42" draw:start-glue-point="5" draw:end-shape="id44" draw:end-glue-point="1" svg:d="M13147 16466h-323v720h-312" svg:viewBox="0 0 636 721">
          <text:p/>
        </draw:connector>
        <draw:frame draw:style-name="gr185" draw:text-style-name="P48" draw:layer="layout" svg:width="2.553cm" svg:height="0.601cm" svg:x="7.479cm" svg:y="14.252cm">
          <draw:text-box>
            <text:p text:style-name="P68"><text:span text:style-name="T29">[c è una lettera?]</text:span></text:p>
          </draw:text-box>
        </draw:frame>
        <draw:frame draw:style-name="gr186" draw:text-style-name="P48" draw:layer="layout" svg:width="2.534cm" svg:height="0.601cm" svg:x="10.831cm" svg:y="14.36cm">
          <draw:text-box>
            <text:p text:style-name="P26"><text:span text:style-name="T29">[falso]</text:span></text:p>
          </draw:text-box>
        </draw:frame>
        <draw:frame draw:style-name="gr187" draw:text-style-name="P48" draw:layer="layout" svg:width="2.534cm" svg:height="0.601cm" svg:x="10.196cm" svg:y="15.196cm">
          <draw:text-box>
            <text:p text:style-name="P26"><text:span text:style-name="T29">[vero]</text:span></text:p>
          </draw:text-box>
        </draw:frame>
        <draw:frame draw:name="block_encrypt" draw:style-name="gr45" draw:text-style-name="P31" draw:layer="layout" svg:width="8.415cm" svg:height="0.543cm" svg:x="1.401cm" svg:y="18.425cm">
          <draw:text-box>
            <text:p text:style-name="P1"><text:span text:style-name="T25">block_encrypt: (Cifrario a blocchi)</text:span></text:p>
          </draw:text-box>
        </draw:frame>
        <draw:frame draw:style-name="gr188" draw:text-style-name="P70" draw:layer="layout" svg:width="18.237cm" svg:height="1.071cm" svg:x="1.455cm" svg:y="19.26cm">
          <draw:text-box>
            <text:p text:style-name="P69"><text:span text:style-name="T8">Semplice procedura che delega il processo alla procedura </text:span><text:span text:style-name="T34">str_map</text:span><text:span text:style-name="T8">, dopo aver effettuato il currying della funzione “</text:span><text:span text:style-name="T34"><text:a xlink:href="#block_map" xlink:type="simple">block_map</text:a></text:span><text:span text:style-name="T8">”</text:span></text:p>
          </draw:text-box>
        </draw:frame>
        <draw:frame draw:name="block_decypher" draw:style-name="gr189" draw:text-style-name="P31" draw:layer="layout" svg:width="8.588cm" svg:height="0.543cm" svg:x="1.402cm" svg:y="20.526cm">
          <draw:text-box>
            <text:p text:style-name="P1"><text:span text:style-name="T25">block_decypher: (Cifrario di Cesare)</text:span></text:p>
          </draw:text-box>
        </draw:frame>
        <draw:frame draw:style-name="gr190" draw:text-style-name="P32" draw:layer="layout" svg:width="18.237cm" svg:height="0.68cm" svg:x="1.456cm" svg:y="21.261cm">
          <draw:text-box>
            <text:p text:style-name="P71"><text:span text:style-name="T49">Uguale alla procedura di cifratura, eccetto che cambia l'argomento booleano</text:span></text:p>
          </draw:text-box>
        </draw:frame>
        <draw:frame draw:style-name="gr191" draw:text-style-name="P32" draw:layer="layout" svg:width="18.237cm" svg:height="1.147cm" svg:x="1.456cm" svg:y="13.06cm">
          <draw:text-box>
            <text:p text:style-name="P1"><text:span text:style-name="T8">Semplice procedura che effettua la cifratura a sostituzione di un carattere in base all’input. </text:span></text:p>
            <text:p text:style-name="P1"><text:span text:style-name="T8">Lascia tutti I caratteri al di fuori delle lettere invariati.</text:span></text:p>
          </draw:text-box>
        </draw:frame>
        <draw:frame draw:style-name="gr15" draw:text-style-name="P15" draw:layer="layout" svg:width="0.943cm" svg:height="0.642cm" svg:x="1.476cm" svg:y="28.155cm">
          <draw:text-box>
            <text:p text:style-name="P1"><text:span text:style-name="T16">6</text:span></text:p>
          </draw:text-box>
        </draw:frame>
        <draw:frame draw:style-name="gr192" draw:text-style-name="P50" draw:layer="layout" svg:width="12.7cm" svg:height="5.593cm" svg:x="1.535cm" svg:y="7.246cm">
          <draw:text-box>
            <text:p>Pseudocodice:</text:p>
            <text:p/>
            <text:p>(char [], int) caesar_encrypt(char [] src, int src_len, int sostK)</text:p>
            <text:p>{</text:p>
            <text:p><text:tab/>return (str_map_alloc(src, src_len, curry(caesar_sost, sostK));</text:p>
            <text:p>}</text:p>
            <text:p/>
            <text:p>(char [], int) caesar_decypher(char [] src, int src_len, int sostK)</text:p>
            <text:p>{</text:p>
            <text:p><text:tab/>return (caesar_encrypt(src, src_len, 26 – sostK));</text:p>
            <text:p>}<text:line-break/></text:p>
          </draw:text-box>
        </draw:frame>
        <draw:frame draw:name="caesar_encrypt" draw:style-name="gr45" draw:text-style-name="P31" draw:layer="layout" svg:width="8.415cm" svg:height="0.543cm" svg:x="1.401cm" svg:y="2.927cm">
          <draw:text-box>
            <text:p text:style-name="P1"><text:span text:style-name="T25">cesar_encrypt: (Cifrario di Cesare)</text:span></text:p>
          </draw:text-box>
        </draw:frame>
        <draw:frame draw:style-name="gr188" draw:text-style-name="P32" draw:layer="layout" svg:width="18.237cm" svg:height="1.071cm" svg:x="1.455cm" svg:y="3.762cm">
          <draw:text-box>
            <text:p text:style-name="P1"><text:span text:style-name="T8">Semplice procedura che delega il processo alla procedura </text:span><text:span text:style-name="T34">str_map</text:span><text:span text:style-name="T8">, dopo aver effettuato il currying della funzione “</text:span><text:span text:style-name="T34"><text:a xlink:href="#caesar_sost" xlink:type="simple">caesar_sost</text:a></text:span><text:span text:style-name="T8">”</text:span></text:p>
          </draw:text-box>
        </draw:frame>
        <draw:frame draw:name="caesar_decypher" draw:style-name="gr193" draw:text-style-name="P31" draw:layer="layout" svg:width="8.601cm" svg:height="0.543cm" svg:x="1.402cm" svg:y="5.128cm">
          <draw:text-box>
            <text:p text:style-name="P1"><text:span text:style-name="T25">cesar_decypher: (Cifrario di Cesare)</text:span></text:p>
          </draw:text-box>
        </draw:frame>
        <draw:frame draw:style-name="gr188" draw:text-style-name="P72" draw:layer="layout" svg:width="18.237cm" svg:height="1.071cm" svg:x="1.493cm" svg:y="5.863cm">
          <draw:text-box>
            <text:p text:style-name="P71"><text:span text:style-name="T50">Fa rieferimento </text:span><text:span text:style-name="T50">a </text:span><text:span text:style-name="T45"><text:a xlink:href="#caesar_encrypt" xlink:type="simple">caesar_encrypt</text:a></text:span><text:span text:style-name="T44">, infatti tutto </text:span><text:span text:style-name="T44">ciò che fa è </text:span><text:span text:style-name="T44">chiamare la </text:span><text:span text:style-name="T44">stessa </text:span><text:span text:style-name="T44">cambiando il </text:span><text:span text:style-name="T44">terzo </text:span><text:span text:style-name="T44">argomento da “</text:span><text:span text:style-name="T47"><text:a xlink:href="#Parametri del programma" xlink:type="simple">sostK</text:a></text:span><text:span text:style-name="T44">” a “26 - </text:span><text:span text:style-name="T47"><text:a xlink:href="#Parametri del programma" xlink:type="simple">sostK</text:a></text:span><text:span text:style-name="T44">”</text:span></text:p>
          </draw:text-box>
        </draw:frame>
      </draw:page>
      <draw:page draw:name="page7" draw:style-name="dp1" draw:master-page-name="master-page79">
        <draw:frame draw:name="block_map" draw:style-name="gr45" draw:text-style-name="P31" draw:layer="layout" svg:width="8.415cm" svg:height="0.543cm" svg:x="1.402cm" svg:y="2.924cm">
          <draw:text-box>
            <text:p text:style-name="P1"><text:span text:style-name="T25">bloc</text:span><text:span text:style-name="T25">k_m</text:span><text:span text:style-name="T25">ap:</text:span></text:p>
          </draw:text-box>
        </draw:frame>
        <draw:frame draw:style-name="gr188" draw:text-style-name="P70" draw:layer="layout" svg:width="18.237cm" svg:height="1.071cm" svg:x="1.534cm" svg:y="3.721cm">
          <draw:text-box>
            <text:p text:style-name="P69"><text:span text:style-name="T50">Funzione che </text:span><text:span text:style-name="T50">ad ogni </text:span><text:span text:style-name="T50">chiamata </text:span><text:span text:style-name="T50">avanza la </text:span><text:span text:style-name="T50">stringa </text:span><text:span text:style-name="T50">associata, </text:span><text:span text:style-name="T50">prende un </text:span><text:span text:style-name="T50">carattere di </text:span><text:span text:style-name="T50">input e lo </text:span><text:span text:style-name="T50">somma col </text:span><text:span text:style-name="T50">carattere </text:span><text:span text:style-name="T50">corrente della </text:span><text:span text:style-name="T50">stringa, e </text:span><text:span text:style-name="T50">ritorna il </text:span><text:span text:style-name="T50">risultato.</text:span></text:p>
          </draw:text-box>
        </draw:frame>
        <draw:g draw:style-name="gr48" xml:id="id46" draw:id="id46">
          <draw:path draw:style-name="gr194" draw:text-style-name="P34" draw:layer="layout" svg:width="0.5cm" svg:height="0.5cm" svg:x="1.552cm" svg:y="5.754cm" svg:viewBox="0 0 501 501" svg:d="M501 251c0 43-12 87-34 125s-53 69-91 91-82 34-125 34c-44 0-88-12-126-34s-69-53-91-91-34-82-34-125c0-44 12-88 34-126s53-69 91-91 82-34 126-34c43 0 87 12 125 34s69 53 91 91 34 82 34 126z">
            <text:p/>
          </draw:path>
          <draw:custom-shape draw:style-name="gr195" draw:text-style-name="P35" draw:layer="layout" svg:width="0.25cm" svg:height="0.25cm" svg:x="1.677cm" svg:y="5.879cm">
            <text:p/>
            <draw:enhanced-geometry svg:viewBox="0 0 21600 21600" draw:type="rectangle" draw:enhanced-path="M 0 0 L 21600 0 21600 21600 0 21600 0 0 Z N"/>
          </draw:custom-shape>
        </draw:g>
        <draw:connector draw:style-name="gr196" draw:text-style-name="P36" draw:layer="layout" svg:x1="3.17cm" svg:y1="5.992cm" svg:x2="2.053cm" svg:y2="6.004cm" draw:start-shape="id45" draw:start-glue-point="3" draw:end-shape="id46" draw:end-glue-point="1" svg:d="M3170 5992h-565v12h-552" svg:viewBox="0 0 1118 13">
          <text:p/>
        </draw:connector>
        <draw:custom-shape draw:style-name="gr197" draw:text-style-name="P45" xml:id="id52" draw:id="id52" draw:layer="layout" svg:width="1.841cm" svg:height="0.631cm" svg:x="4.058cm" svg:y="9.176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44"><text:span text:style-name="T29">*i = 0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polygon draw:style-name="gr198" draw:text-style-name="P60" xml:id="id45" draw:id="id45" draw:layer="layout" svg:width="3.631cm" svg:height="1.611cm" svg:x="3.17cm" svg:y="5.186cm" svg:viewBox="0 0 3632 1612" draw:points="0,0 2269,0 2724,0 3631,0 3631,805 3632,807 3631,807 3631,1611 2724,1611 2724,1612 0,1612 908,807">
          <text:p text:style-name="P54"><text:span text:style-name="T29">In: char c,</text:span></text:p>
          <text:p text:style-name="P54"><text:span text:style-name="T29"><text:s/>int *i,</text:span></text:p>
          <text:p text:style-name="P54"><text:span text:style-name="T29"><text:s/>char [] block_str,</text:span></text:p>
          <text:p text:style-name="P54"><text:span text:style-name="T29">bool: encrypt</text:span></text:p>
        </draw:polygon>
        <draw:custom-shape draw:style-name="gr199" draw:text-style-name="P57" xml:id="id47" draw:id="id47" draw:layer="layout" svg:width="1.941cm" svg:height="1.27cm" svg:x="15.417cm" svg:y="7.966cm">
          <text:p text:style-name="P56"><text:span text:style-name="T29">out: c</text:span></text:p>
          <draw:enhanced-geometry svg:viewBox="0 0 21600 21600" draw:text-areas="0 0 21600 21600" draw:type="pentagon-right" draw:modifiers="11878.8877445932" draw:enhanced-path="M 0 0 L ?f0 0 21600 10800 ?f0 21600 0 21600 Z N">
            <draw:equation draw:name="f0" draw:formula="$0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200" draw:text-style-name="P42" xml:id="id50" draw:id="id50" draw:layer="layout" svg:width="1cm" svg:height="1cm" svg:x="4.475cm" svg:y="7.5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1" draw:text-style-name="P36" draw:layer="layout" svg:x1="15.417cm" svg:y1="8.601cm" svg:x2="14.42cm" svg:y2="8.567cm" draw:start-shape="id47" draw:start-glue-point="3" draw:end-shape="id48" draw:end-glue-point="7" svg:d="M15417 8601h-493v-34h-504" svg:viewBox="0 0 998 35">
          <text:p/>
        </draw:connector>
        <draw:connector draw:style-name="gr202" draw:text-style-name="P36" draw:layer="layout" svg:x1="6.769cm" svg:y1="8.063cm" svg:x2="5.475cm" svg:y2="8.046cm" draw:start-shape="id49" draw:end-shape="id50" draw:end-glue-point="7" svg:d="M6769 8063h-646v-17h-648" svg:viewBox="0 0 1295 18">
          <text:p/>
        </draw:connector>
        <draw:connector draw:style-name="gr203" draw:text-style-name="P36" draw:layer="layout" svg:x1="18.763cm" svg:y1="8.598cm" svg:x2="17.358cm" svg:y2="8.601cm" draw:start-shape="id51" draw:start-glue-point="3" draw:end-shape="id47" svg:d="M18763 8598h-702v3h-703" svg:viewBox="0 0 1406 4">
          <text:p/>
        </draw:connector>
        <draw:custom-shape draw:style-name="gr204" draw:text-style-name="P42" xml:id="id49" draw:id="id49" draw:layer="layout" svg:width="1cm" svg:height="1cm" svg:x="6.769cm" svg:y="7.5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draw:style-name="gr78" xml:id="id51" draw:id="id51">
          <draw:path draw:style-name="gr205" draw:text-style-name="P49" draw:layer="layout" svg:width="0.5cm" svg:height="0.5cm" svg:x="18.763cm" svg:y="8.348cm" svg:viewBox="0 0 501 501" svg:d="M501 251c0 43-12 87-34 125s-53 69-91 91-82 34-125 34c-44 0-88-12-126-34s-69-53-91-91-34-82-34-125c0-44 12-88 34-126s53-69 91-91 82-34 126-34c43 0 87 12 125 34s69 53 91 91 34 82 34 126z">
            <text:p/>
          </draw:path>
          <draw:path draw:style-name="gr206" draw:text-style-name="P34" draw:layer="layout" svg:width="0.2cm" svg:height="0.2cm" svg:x="18.913cm" svg:y="8.498cm" svg:viewBox="0 0 201 201" svg:d="M201 101c0 17-5 34-13 50-9 15-22 28-37 37-16 8-33 13-50 13-18 0-35-5-51-13-15-9-28-22-37-37-8-16-13-33-13-50 0-18 5-35 13-51 9-15 22-28 37-37 16-8 33-13 51-13 17 0 34 5 50 13 15 9 28 22 37 37 8 16 13 33 13 51z">
            <text:p/>
          </draw:path>
        </draw:g>
        <draw:connector draw:style-name="gr207" draw:text-style-name="P36" draw:layer="layout" svg:x1="4.978cm" svg:y1="9.176cm" svg:x2="4.975cm" svg:y2="8.546cm" draw:start-shape="id52" draw:start-glue-point="0" draw:end-shape="id50" draw:end-glue-point="6" svg:d="M4978 9176v-309h-3v-321" svg:viewBox="0 0 4 631">
          <text:p/>
        </draw:connector>
        <draw:connector draw:style-name="gr208" draw:text-style-name="P36" draw:layer="layout" svg:x1="11.365cm" svg:y1="6.348cm" svg:x2="10.399cm" svg:y2="6.299cm" draw:start-shape="id53" draw:start-glue-point="5" draw:end-shape="id54" draw:end-glue-point="1" svg:d="M11365 6348h-488v-49h-478" svg:viewBox="0 0 967 50">
          <text:p/>
        </draw:connector>
        <draw:frame draw:style-name="gr209" draw:text-style-name="P48" draw:layer="layout" svg:width="1.245cm" svg:height="0.601cm" svg:x="5.656cm" svg:y="7.445cm">
          <draw:text-box>
            <text:p text:style-name="P26"><text:span text:style-name="T29">[falso]</text:span></text:p>
          </draw:text-box>
        </draw:frame>
        <draw:frame draw:style-name="gr210" draw:text-style-name="P48" draw:layer="layout" svg:width="1.197cm" svg:height="0.601cm" svg:x="3.886cm" svg:y="8.375cm">
          <draw:text-box>
            <text:p text:style-name="P26"><text:span text:style-name="T29">[vero]</text:span></text:p>
          </draw:text-box>
        </draw:frame>
        <draw:connector draw:style-name="gr211" draw:text-style-name="P36" draw:layer="layout" svg:x1="4.975cm" svg:y1="7.546cm" svg:x2="4.986cm" svg:y2="6.798cm" draw:start-shape="id50" draw:start-glue-point="4" draw:end-shape="id45" draw:end-glue-point="2" svg:d="M4975 7546v-379h11v-369" svg:viewBox="0 0 12 749">
          <text:p/>
        </draw:connector>
        <draw:connector draw:style-name="gr212" draw:text-style-name="P36" draw:layer="layout" svg:x1="8.806cm" svg:y1="6.702cm" svg:x2="7.769cm" svg:y2="8.063cm" draw:start-shape="id54" draw:start-glue-point="2" draw:end-shape="id49" draw:end-glue-point="7" svg:d="M8806 6702v1361h-1037" svg:viewBox="0 0 1038 1362">
          <text:p/>
        </draw:connector>
        <draw:custom-shape draw:style-name="gr213" draw:text-style-name="P42" xml:id="id53" draw:id="id53" draw:layer="layout" svg:width="1cm" svg:height="1cm" svg:x="11.365cm" svg:y="5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4" draw:text-style-name="P36" draw:layer="layout" svg:x1="7.269cm" svg:y1="8.563cm" svg:x2="5.899cm" svg:y2="9.491cm" draw:start-shape="id49" draw:start-glue-point="6" draw:end-shape="id52" draw:end-glue-point="1" svg:d="M7269 8563v928h-1370" svg:viewBox="0 0 1371 929">
          <text:p/>
        </draw:connector>
        <draw:frame draw:style-name="gr215" draw:text-style-name="P48" draw:layer="layout" svg:width="1.245cm" svg:height="0.601cm" svg:x="10.789cm" svg:y="6.702cm">
          <draw:text-box>
            <text:p text:style-name="P26"><text:span text:style-name="T29">[falso]</text:span></text:p>
          </draw:text-box>
        </draw:frame>
        <draw:frame draw:style-name="gr216" draw:text-style-name="P48" draw:layer="layout" svg:width="3.102cm" svg:height="0.601cm" svg:x="1.433cm" svg:y="7.211cm">
          <draw:text-box>
            <text:p text:style-name="P26"><text:span text:style-name="T29">[block_str[*i] == '\0'?]</text:span></text:p>
          </draw:text-box>
        </draw:frame>
        <draw:custom-shape draw:style-name="gr217" draw:text-style-name="P45" xml:id="id55" draw:id="id55" draw:layer="layout" svg:width="4.623cm" svg:height="0.733cm" svg:x="15.121cm" svg:y="5.953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44"><text:span text:style-name="T29">c = (c + block_char) % 96 + 32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18" draw:text-style-name="P48" draw:layer="layout" svg:width="1.732cm" svg:height="0.601cm" svg:x="10.435cm" svg:y="5.247cm">
          <draw:text-box>
            <text:p text:style-name="P26"><text:span text:style-name="T29">[encrypt?]</text:span></text:p>
          </draw:text-box>
        </draw:frame>
        <draw:frame draw:style-name="gr219" draw:text-style-name="P48" draw:layer="layout" svg:width="1.197cm" svg:height="0.601cm" svg:x="12.727cm" svg:y="5.652cm">
          <draw:text-box>
            <text:p text:style-name="P26"><text:span text:style-name="T29">[vero]</text:span></text:p>
          </draw:text-box>
        </draw:frame>
        <draw:custom-shape draw:style-name="gr220" draw:text-style-name="P42" xml:id="id48" draw:id="id48" draw:layer="layout" svg:width="1cm" svg:height="1cm" svg:x="13.42cm" svg:y="8.0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21" draw:text-style-name="P36" draw:layer="layout" svg:x1="15.121cm" svg:y1="6.319cm" svg:x2="12.365cm" svg:y2="6.348cm" draw:start-shape="id55" draw:start-glue-point="3" draw:end-shape="id53" draw:end-glue-point="7" svg:d="M15121 6319h-1372v29h-1384" svg:viewBox="0 0 2757 30">
          <text:p/>
        </draw:connector>
        <draw:connector draw:style-name="gr222" draw:text-style-name="P36" draw:layer="layout" svg:x1="13.92cm" svg:y1="8.067cm" svg:x2="17.432cm" svg:y2="6.686cm" draw:start-shape="id48" draw:start-glue-point="4" draw:end-shape="id55" draw:end-glue-point="2" svg:d="M13920 8067v-696h3512v-685" svg:viewBox="0 0 3513 1382">
          <text:p/>
        </draw:connector>
        <draw:custom-shape draw:style-name="gr223" draw:text-style-name="P42" xml:id="id57" draw:id="id57" draw:layer="layout" svg:width="1cm" svg:height="1cm" svg:x="10.318cm" svg:y="9.8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4" draw:text-style-name="P42" xml:id="id58" draw:id="id58" draw:layer="layout" svg:width="1cm" svg:height="1cm" svg:x="13.409cm" svg:y="9.8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5" draw:text-style-name="P45" xml:id="id56" draw:id="id56" draw:layer="layout" svg:width="3.491cm" svg:height="0.733cm" svg:x="9.076cm" svg:y="8.164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44"><text:span text:style-name="T29">c = c - block_char – 32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26" draw:text-style-name="P45" xml:id="id54" draw:id="id54" draw:layer="layout" svg:width="3.186cm" svg:height="0.806cm" svg:x="7.213cm" svg:y="5.896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44"><text:span text:style-name="T29">block_char = str[*i];</text:span></text:p>
          <text:p text:style-name="P44"><text:span text:style-name="T29">*i = *i + 1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27" draw:text-style-name="P36" draw:layer="layout" svg:x1="10.821cm" svg:y1="8.164cm" svg:x2="11.865cm" svg:y2="6.848cm" draw:start-shape="id56" draw:end-shape="id53" draw:end-glue-point="6" svg:d="M10821 8164v-652h1044v-664" svg:viewBox="0 0 1045 1317">
          <text:p/>
        </draw:connector>
        <draw:connector draw:style-name="gr228" draw:text-style-name="P36" draw:layer="layout" svg:x1="10.818cm" svg:y1="9.86cm" svg:x2="10.821cm" svg:y2="8.897cm" draw:start-shape="id57" draw:start-glue-point="4" draw:end-shape="id56" draw:end-glue-point="2" svg:d="M10818 9860v-487h3v-476" svg:viewBox="0 0 4 964">
          <text:p/>
        </draw:connector>
        <draw:custom-shape draw:style-name="gr229" draw:text-style-name="P45" xml:id="id59" draw:id="id59" draw:layer="layout" svg:width="3.37cm" svg:height="0.733cm" svg:x="9.15cm" svg:y="11.502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44"><text:span text:style-name="T29">c = c + 96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30" draw:text-style-name="P48" draw:layer="layout" svg:width="1.583cm" svg:height="0.601cm" svg:x="8.482cm" svg:y="9.735cm">
          <draw:text-box>
            <text:p text:style-name="P26"><text:span text:style-name="T29">[c &lt; 32?]</text:span></text:p>
          </draw:text-box>
        </draw:frame>
        <draw:connector draw:style-name="gr231" draw:text-style-name="P36" draw:layer="layout" svg:x1="13.92cm" svg:y1="9.067cm" svg:x2="13.909cm" svg:y2="9.856cm" draw:start-shape="id48" draw:start-glue-point="6" draw:end-shape="id58" draw:end-glue-point="4" svg:d="M13920 9067v395h-11v394" svg:viewBox="0 0 12 790">
          <text:p/>
        </draw:connector>
        <draw:connector draw:style-name="gr232" draw:text-style-name="P36" draw:layer="layout" svg:x1="13.409cm" svg:y1="10.356cm" svg:x2="11.318cm" svg:y2="10.36cm" draw:start-shape="id58" draw:start-glue-point="5" draw:end-shape="id57" draw:end-glue-point="7" svg:d="M13409 10356h-1045v4h-1046" svg:viewBox="0 0 2092 5">
          <text:p/>
        </draw:connector>
        <draw:connector draw:style-name="gr233" draw:text-style-name="P36" draw:layer="layout" svg:x1="10.318cm" svg:y1="10.36cm" svg:x2="9.15cm" svg:y2="11.868cm" draw:start-shape="id57" draw:start-glue-point="5" draw:end-shape="id59" draw:end-glue-point="3" svg:d="M10318 10360h-1695v1508h527" svg:viewBox="0 0 1696 1509">
          <text:p/>
        </draw:connector>
        <draw:connector draw:style-name="gr234" draw:text-style-name="P36" draw:layer="layout" svg:x1="10.835cm" svg:y1="11.502cm" svg:x2="10.818cm" svg:y2="10.86cm" draw:start-shape="id59" draw:start-glue-point="0" draw:end-shape="id57" draw:end-glue-point="6" svg:d="M10835 11502v-315h-17v-327" svg:viewBox="0 0 18 643">
          <text:p/>
        </draw:connector>
        <draw:frame draw:style-name="gr235" draw:text-style-name="P48" draw:layer="layout" svg:width="1.197cm" svg:height="0.601cm" svg:x="9.638cm" svg:y="10.86cm">
          <draw:text-box>
            <text:p text:style-name="P26"><text:span text:style-name="T29">[vero]</text:span></text:p>
          </draw:text-box>
        </draw:frame>
        <draw:frame draw:style-name="gr236" draw:text-style-name="P48" draw:layer="layout" svg:width="1.245cm" svg:height="0.601cm" svg:x="11.318cm" svg:y="9.755cm">
          <draw:text-box>
            <text:p text:style-name="P26"><text:span text:style-name="T29">[falso]</text:span></text:p>
          </draw:text-box>
        </draw:frame>
        <draw:frame draw:style-name="gr15" draw:text-style-name="P15" draw:layer="layout" svg:width="0.943cm" svg:height="0.642cm" svg:x="1.477cm" svg:y="28.055cm">
          <draw:text-box>
            <text:p text:style-name="P1"><text:span text:style-name="T16">7</text:span></text:p>
          </draw:text-box>
        </draw:frame>
        <draw:frame draw:style-name="gr44" draw:text-style-name="P8" draw:layer="layout" svg:width="5.771cm" svg:height="0.543cm" svg:x="1.402cm" svg:y="2.027cm">
          <draw:text-box>
            <text:p text:style-name="P1"><text:span text:style-name="T7">Procedure notevoli: </text:span></text:p>
          </draw:text-box>
        </draw:frame>
        <draw:frame draw:name="occurrence_encrypt" draw:style-name="gr45" draw:text-style-name="P31" draw:layer="layout" svg:width="8.415cm" svg:height="0.543cm" svg:x="1.403cm" svg:y="12.325cm">
          <draw:text-box>
            <text:p text:style-name="P1"><text:span text:style-name="T25">occurrence_encrypt:</text:span></text:p>
          </draw:text-box>
        </draw:frame>
        <draw:frame draw:style-name="gr237" draw:text-style-name="P70" draw:layer="layout" svg:width="18.237cm" svg:height="4.867cm" svg:x="1.535cm" svg:y="13.122cm">
          <draw:text-box>
            <text:p text:style-name="P73"><text:span text:style-name="T51">Probabilmente la procedura pi</text:span><text:span text:style-name="T52">ù complessa del progetto, insieme alla procedura associata di decifrazione. La procedura </text:span><text:span text:style-name="T53">è divisa in tre passaggi: </text:span><text:span text:style-name="T54"><text:a xlink:href="#get_occurrence_map" xlink:type="simple">get_occurrence_map</text:a></text:span><text:span text:style-name="T55"><text:s/>in cui si itera sulla stringa in input per ricavarne una </text:span><text:span text:style-name="T56"><text:a xlink:href="#occurrence_map" xlink:type="simple">occurrence_map</text:a></text:span><text:span text:style-name="T55">, </text:span><text:span text:style-name="T54"><text:a xlink:href="#occurrence_dest_size" xlink:type="simple">occurrence_dest_size</text:a></text:span><text:span text:style-name="T54"><text:s/></text:span><text:span text:style-name="T55">in cui si sfrutta la mappa ottenuta per calcolare la lunghezza della stringa finale, e infine </text:span><text:span text:style-name="T55"><text:line-break/></text:span><text:span text:style-name="T54"><text:a xlink:href="#occurrence_construct_cypher_text" xlink:type="simple">occurrence_construct_cypher_text</text:a></text:span><text:span text:style-name="T55"> che sfrutta le informazioni ottenute precedentemente per allocare e costruire la stringa finale.</text:span></text:p>
            <text:p text:style-name="P73"><text:span text:style-name="T55">La mappa </text:span><text:span text:style-name="T53">è composta, un array di puntatory salvato sulla stack, e di </text:span><text:span text:style-name="T57">src_len</text:span><text:span text:style-name="T53"> nodi di lista concatenata sullo heap, divisi in tante liste diverse quanti sono i caratteri diversi in src.</text:span><text:span text:style-name="T58"><text:line-break/></text:span><text:span text:style-name="T58"/></text:p>
          </draw:text-box>
        </draw:frame>
        <draw:g draw:style-name="gr48" xml:id="id61" draw:id="id61">
          <draw:path draw:style-name="gr238" draw:text-style-name="P34" draw:layer="layout" svg:width="0.5cm" svg:height="0.5cm" svg:x="1.561cm" svg:y="18.875cm" svg:viewBox="0 0 501 501" svg:d="M501 251c0 43-12 87-34 125s-53 69-91 91-82 34-125 34c-44 0-88-12-126-34s-69-53-91-91-34-82-34-125c0-44 12-88 34-126s53-69 91-91 82-34 126-34c43 0 87 12 125 34s69 53 91 91 34 82 34 126z">
            <text:p/>
          </draw:path>
          <draw:custom-shape draw:style-name="gr239" draw:text-style-name="P35" draw:layer="layout" svg:width="0.25cm" svg:height="0.25cm" svg:x="1.686cm" svg:y="19cm">
            <text:p/>
            <draw:enhanced-geometry svg:viewBox="0 0 21600 21600" draw:type="rectangle" draw:enhanced-path="M 0 0 L 21600 0 21600 21600 0 21600 0 0 Z N"/>
          </draw:custom-shape>
        </draw:g>
        <draw:connector draw:style-name="gr240" draw:text-style-name="P36" draw:layer="layout" svg:x1="2.626cm" svg:y1="19.147cm" svg:x2="2.062cm" svg:y2="19.125cm" draw:start-shape="id60" draw:start-glue-point="3" draw:end-shape="id61" draw:end-glue-point="1" svg:d="M2626 19147h-288v-22h-276" svg:viewBox="0 0 565 23">
          <text:p/>
        </draw:connector>
        <draw:custom-shape draw:style-name="gr241" draw:text-style-name="P45" xml:id="id62" draw:id="id62" draw:layer="layout" svg:width="4.2cm" svg:height="1.5cm" svg:x="5.325cm" svg:y="20.107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44"><text:span text:style-name="T59"><text:a xlink:href="#occurrence_map" xlink:type="simple">occurrence_map</text:a></text:span><text:span text:style-name="T29"><text:s/>= </text:span><text:span text:style-name="T29"><text:line-break/></text:span><text:span text:style-name="T30"><text:a xlink:href="#get_occurrence_map" xlink:type="simple">get_occurrence_map</text:a></text:span><text:span text:style-name="T29">(src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42" draw:text-style-name="P45" xml:id="id63" draw:id="id63" draw:layer="layout" svg:width="5.189cm" svg:height="1.5cm" svg:x="8.015cm" svg:y="18.199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44"><text:span text:style-name="T29">dest_len = <text:s/></text:span><text:span text:style-name="T30"><text:a xlink:href="#occurrence_dest_size" xlink:type="simple">occurrence_dest_size
</text:a></text:span></text:p>
          <text:p text:style-name="P44"><text:span text:style-name="T29">(</text:span><text:span text:style-name="T59"><text:a xlink:href="#occurrence_map" xlink:type="simple">occurrence_map</text:a></text:span><text:span text:style-name="T29">, src_len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43" draw:text-style-name="P75" xml:id="id64" draw:id="id64" draw:layer="layout" svg:width="6.346cm" svg:height="1.697cm" svg:x="11.63cm" svg:y="20.068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74"><text:span text:style-name="T29">dest = <text:s/></text:span><text:span text:style-name="T60"><text:a xlink:href="#occurrence_construct_cypher_text" xlink:type="simple">occurrence_construct_cypher_text
</text:a></text:span><text:span text:style-name="T29">(</text:span><text:span text:style-name="T59"><text:a xlink:href="#occurrence_map" xlink:type="simple">occurrence_map</text:a></text:span><text:span text:style-name="T29">, dest_len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44" draw:text-style-name="P57" xml:id="id65" draw:id="id65" draw:layer="layout" svg:width="2.458cm" svg:height="1.336cm" svg:x="15.639cm" svg:y="18.199cm">
          <text:p text:style-name="P56"><text:span text:style-name="T29">Out: dest, dest_len</text:span></text:p>
          <draw:enhanced-geometry svg:viewBox="0 0 21600 21600" draw:mirror-horizontal="false" draw:mirror-vertical="false" draw:text-areas="0 0 21600 21600" draw:type="pentagon-right" draw:modifiers="13913.9487596584" draw:enhanced-path="M 0 0 L ?f0 0 21600 10800 ?f0 21600 0 21600 Z N">
            <draw:equation draw:name="f0" draw:formula="$0 "/>
            <draw:handle draw:handle-range-x-minimum="0" draw:handle-range-x-maximum="21600" draw:handle-position="$0 top" draw:handle-position-x="$0" draw:handle-position-y="top"/>
          </draw:enhanced-geometry>
        </draw:custom-shape>
        <draw:polygon draw:style-name="gr245" draw:text-style-name="P55" xml:id="id60" draw:id="id60" draw:layer="layout" svg:width="2.934cm" svg:height="1.034cm" svg:x="2.626cm" svg:y="18.63cm" svg:viewBox="0 0 2935 1035" draw:points="0,0 1834,0 2201,0 2934,0 2934,517 2935,518 2934,518 2934,1034 2201,1034 2201,1035 0,1035 734,518">
          <text:p text:style-name="P67"><text:span text:style-name="T29">In: char [] src,</text:span><text:span text:style-name="T29"><text:line-break/></text:span><text:span text:style-name="T29">src_len</text:span></text:p>
        </draw:polygon>
        <draw:connector draw:style-name="gr246" draw:text-style-name="P36" draw:layer="layout" svg:x1="5.325cm" svg:y1="20.857cm" svg:x2="4.093cm" svg:y2="19.665cm" draw:start-shape="id62" draw:start-glue-point="3" draw:end-shape="id60" draw:end-glue-point="2" svg:d="M5325 20857h-1232v-1192" svg:viewBox="0 0 1233 1193">
          <text:p/>
        </draw:connector>
        <draw:connector draw:style-name="gr247" draw:text-style-name="P36" draw:layer="layout" svg:x1="8.015cm" svg:y1="18.949cm" svg:x2="7.425cm" svg:y2="20.107cm" draw:start-shape="id63" draw:end-shape="id62" draw:end-glue-point="0" svg:d="M8015 18949h-590v1158" svg:viewBox="0 0 591 1159">
          <text:p/>
        </draw:connector>
        <draw:connector draw:style-name="gr248" draw:text-style-name="P36" draw:layer="layout" svg:x1="11.63cm" svg:y1="20.916cm" svg:x2="10.609cm" svg:y2="19.699cm" draw:start-shape="id64" draw:start-glue-point="3" draw:end-shape="id63" draw:end-glue-point="2" svg:d="M11630 20916h-1021v-1217" svg:viewBox="0 0 1022 1218">
          <text:p/>
        </draw:connector>
        <draw:connector draw:style-name="gr249" draw:text-style-name="P36" draw:layer="layout" svg:x1="15.639cm" svg:y1="18.867cm" svg:x2="14.803cm" svg:y2="20.068cm" draw:start-shape="id65" draw:end-shape="id64" draw:end-glue-point="0" svg:d="M15639 18867h-836v1201" svg:viewBox="0 0 837 1202">
          <text:p/>
        </draw:connector>
        <draw:g draw:style-name="gr78" xml:id="id66" draw:id="id66">
          <draw:path draw:style-name="gr250" draw:text-style-name="P49" draw:layer="layout" svg:width="0.5cm" svg:height="0.5cm" svg:x="18.865cm" svg:y="18.607cm" svg:viewBox="0 0 501 501" svg:d="M501 251c0 43-12 87-34 125s-53 69-91 91-82 34-125 34c-44 0-88-12-126-34s-69-53-91-91-34-82-34-125c0-44 12-88 34-126s53-69 91-91 82-34 126-34c43 0 87 12 125 34s69 53 91 91 34 82 34 126z">
            <text:p/>
          </draw:path>
          <draw:path draw:style-name="gr251" draw:text-style-name="P34" draw:layer="layout" svg:width="0.2cm" svg:height="0.2cm" svg:x="19.015cm" svg:y="18.757cm" svg:viewBox="0 0 201 201" svg:d="M201 101c0 17-5 34-13 50-9 15-22 28-37 37-16 8-33 13-50 13-18 0-35-5-51-13-15-9-28-22-37-37-8-16-13-33-13-50 0-18 5-35 13-51 9-15 22-28 37-37 16-8 33-13 51-13 17 0 34 5 50 13 15 9 28 22 37 37 8 16 13 33 13 51z">
            <text:p/>
          </draw:path>
        </draw:g>
        <draw:connector draw:style-name="gr252" draw:text-style-name="P36" draw:layer="layout" svg:x1="18.865cm" svg:y1="18.857cm" svg:x2="18.097cm" svg:y2="18.867cm" draw:start-shape="id66" draw:start-glue-point="3" draw:end-shape="id65" draw:end-glue-point="1" svg:d="M18865 18857h-383v10h-385" svg:viewBox="0 0 769 11">
          <text:p/>
        </draw:connector>
        <draw:frame draw:name="occurrence_encrypt 1" draw:style-name="gr253" draw:text-style-name="P31" draw:layer="layout" svg:width="10.763cm" svg:height="0.543cm" svg:x="1.404cm" svg:y="22.226cm">
          <draw:text-box>
            <text:p text:style-name="P1"><text:span text:style-name="T25">Gesttione di memoria in occurrence_encrypt:</text:span></text:p>
          </draw:text-box>
        </draw:frame>
        <draw:frame draw:style-name="gr254" draw:text-style-name="P70" draw:layer="layout" svg:width="18.237cm" svg:height="4.816cm" svg:x="1.536cm" svg:y="23.023cm">
          <draw:text-box>
            <text:p text:style-name="P76"><text:span text:style-name="T61">Dato che la </text:span><text:span text:style-name="T61">procedura </text:span><text:span text:style-name="T61">produce una </text:span><text:span text:style-name="T61">stringa dalla </text:span><text:span text:style-name="T61">lungezza </text:span><text:span text:style-name="T61">maggiore </text:span><text:span text:style-name="T61">dalla stringa </text:span><text:span text:style-name="T61">di partenza, </text:span><text:span text:style-name="T61">ho ritenuto </text:span><text:span text:style-name="T61">che sarebbe </text:span><text:span text:style-name="T61">stato utile </text:span><text:span text:style-name="T61">costruire un </text:span><text:span text:style-name="T61">sistema per </text:span><text:span text:style-name="T61">allocare </text:span><text:span text:style-name="T61">memoria </text:span><text:span text:style-name="T61">dinamicame</text:span><text:span text:style-name="T61">nte, infatti il </text:span><text:span text:style-name="T61">programma </text:span><text:span text:style-name="T53">è supportato </text:span><text:span text:style-name="T53">da una </text:span><text:span text:style-name="T53">implementa</text:span><text:span text:style-name="T53">zione del </text:span><text:span text:style-name="T53">pattern </text:span><text:span text:style-name="T62">malloc / </text:span><text:span text:style-name="T62">free</text:span><text:span text:style-name="T53">, in cui </text:span><text:span text:style-name="T53">si è </text:span><text:span text:style-name="T53">possibile </text:span><text:span text:style-name="T53">richiedere </text:span><text:span text:style-name="T53">memoria </text:span><text:span text:style-name="T53">dinamicame</text:span><text:span text:style-name="T53">nte dello </text:span><text:span text:style-name="T53">heap con </text:span><text:span text:style-name="T54">malloc</text:span><text:span text:style-name="T53">, e </text:span><text:span text:style-name="T53">restituirla </text:span><text:span text:style-name="T53">con </text:span><text:span text:style-name="T54">free</text:span><text:span text:style-name="T53"> </text:span><text:span text:style-name="T53">quando non </text:span><text:span text:style-name="T53">pi</text:span><text:span text:style-name="T63">ù in uso; </text:span><text:span text:style-name="T63">questo </text:span><text:span text:style-name="T63">pattern </text:span><text:span text:style-name="T63">verrà </text:span><text:span text:style-name="T63">utilizzato </text:span><text:span text:style-name="T63">quando la </text:span><text:span text:style-name="T63">memoria </text:span><text:span text:style-name="T63">richiesta </text:span><text:span text:style-name="T63">non </text:span><text:span text:style-name="T53">è </text:span><text:span text:style-name="T53">stimabile a </text:span><text:span text:style-name="T53">compile </text:span><text:span text:style-name="T53">time.</text:span><text:span text:style-name="T63"><text:line-break/></text:span><text:span text:style-name="T53">Tutte le </text:span><text:span text:style-name="T53">procedure </text:span><text:span text:style-name="T53">fanno uso di </text:span><text:span text:style-name="T54">malloc</text:span><text:span text:style-name="T53"> per </text:span><text:span text:style-name="T53">allocare la </text:span><text:span text:style-name="T53">memoria, in </text:span><text:span text:style-name="T53">pi</text:span><text:span text:style-name="T63">ù nel</text:span><text:span text:style-name="T53"> caso </text:span><text:span text:style-name="T53">di </text:span><text:span text:style-name="T54">occurrence</text:span><text:span text:style-name="T54">_encrypt</text:span><text:span text:style-name="T55">, </text:span><text:span text:style-name="T55">viene </text:span><text:span text:style-name="T55">allocata con </text:span><text:span text:style-name="T54">malloc </text:span><text:span text:style-name="T55">una </text:span><text:span text:style-name="T64"><text:a xlink:href="#mem_arena" xlink:type="simple">mem_arena</text:a></text:span><text:span text:style-name="T65">, che </text:span><text:span text:style-name="T65">permette di </text:span><text:span text:style-name="T65">eseguire </text:span><text:span text:style-name="T65">una </text:span><text:span text:style-name="T65">richiesta di </text:span><text:span text:style-name="T65">memoria </text:span><text:span text:style-name="T65">iniziale, e </text:span><text:span text:style-name="T65">spartire in </text:span><text:span text:style-name="T65">maniera </text:span><text:span text:style-name="T65">compatta </text:span><text:span text:style-name="T65">diverse </text:span><text:span text:style-name="T65">porzioni, </text:span><text:span text:style-name="T65">associando </text:span><text:span text:style-name="T65">gli oggetti </text:span><text:span text:style-name="T65">che infine </text:span><text:span text:style-name="T65">possono </text:span><text:span text:style-name="T65">essere tutti </text:span><text:span text:style-name="T65">liberati con </text:span><text:span text:style-name="T65">una singola </text:span><text:span text:style-name="T65">chiamata di </text:span><text:span text:style-name="T54">free</text:span><text:span text:style-name="T55">. Qui </text:span><text:span text:style-name="T55">l’arena </text:span><text:span text:style-name="T55">raccoglie </text:span><text:span text:style-name="T65">i </text:span><text:span text:style-name="T65"><text:tab/></text:span></text:p>
          </draw:text-box>
        </draw:frame>
        <draw:frame draw:style-name="gr255" draw:text-style-name="P77" draw:layer="layout" svg:width="18.237cm" svg:height="0.536cm" svg:x="0.637cm" svg:y="27.852cm">
          <draw:text-box>
            <text:p text:style-name="P76"><text:span text:style-name="T65"><text:tab/></text:span><text:span text:style-name="T66">src_len</text:span><text:span text:style-name="T67"> </text:span><text:span text:style-name="T67"><text:a xlink:href="#list_node" xlink:type="simple">list_node</text:a></text:span><text:span text:style-name="T64"><text:s/></text:span><text:span text:style-name="T65">puntati da </text:span><text:span text:style-name="T56"><text:a xlink:href="#occurrence_map" xlink:type="simple">occurrence_map</text:a></text:span><text:span text:style-name="T55">.</text:span></text:p>
          </draw:text-box>
        </draw:frame>
      </draw:page>
      <draw:page draw:name="page8" draw:style-name="dp1" draw:master-page-name="master-page79">
        <draw:frame draw:name="get_occurrence_map" draw:style-name="gr45" draw:text-style-name="P31" draw:layer="layout" svg:width="8.415cm" svg:height="0.543cm" svg:x="1.404cm" svg:y="2.826cm">
          <draw:text-box>
            <text:p text:style-name="P1"><text:span text:style-name="T25">get_occurrence_map:</text:span></text:p>
          </draw:text-box>
        </draw:frame>
        <draw:frame draw:style-name="gr15" draw:text-style-name="P15" draw:layer="layout" svg:width="0.943cm" svg:height="0.642cm" svg:x="1.478cm" svg:y="28.055cm">
          <draw:text-box>
            <text:p text:style-name="P1"><text:span text:style-name="T16">8</text:span></text:p>
          </draw:text-box>
        </draw:frame>
        <draw:frame draw:style-name="gr44" draw:text-style-name="P8" draw:layer="layout" svg:width="5.771cm" svg:height="0.543cm" svg:x="1.403cm" svg:y="2.028cm">
          <draw:text-box>
            <text:p text:style-name="P1"><text:span text:style-name="T7">Procedure notevoli: </text:span></text:p>
          </draw:text-box>
        </draw:frame>
        <draw:frame draw:style-name="gr256" draw:text-style-name="P70" draw:layer="layout" svg:width="18.237cm" svg:height="3.313cm" svg:x="1.536cm" svg:y="3.623cm">
          <draw:text-box>
            <text:p text:style-name="P73"><text:span text:style-name="T61">Questa procedura itera su una stringa, e crea un nodo di una lista concatenata per ogni carattere c, il </text:span><text:span text:style-name="T68"><text:a xlink:href="#list_node" xlink:type="simple">nodo</text:a></text:span><text:span text:style-name="T61"><text:s/>contiene l’indice numerico in cui il carattere si trova nella stringa, e l’indirizzo della memoria del prossimo nodo, 0 in caso sia l’ultimo.</text:span></text:p>
            <text:p text:style-name="P73"><text:span text:style-name="T61">Il nodo poi viene inserito nella lista puntata dall’array passato in input, nella posizione ‘c – 32’.</text:span></text:p>
            <text:p text:style-name="P73"><text:span text:style-name="T61">Inifine, quando si raggiunge il termine della stringa, viene restituito l’array popolato.</text:span><text:span text:style-name="T61"><text:line-break/></text:span><text:span text:style-name="T61">L’uso di questa struttura permette di mantenere una complessita lineare.</text:span></text:p>
          </draw:text-box>
        </draw:frame>
        <draw:g draw:style-name="gr48" xml:id="id68" draw:id="id68">
          <draw:path draw:style-name="gr257" draw:text-style-name="P34" draw:layer="layout" svg:width="0.5cm" svg:height="0.5cm" svg:x="2.299cm" svg:y="7.6cm" svg:viewBox="0 0 501 501" svg:d="M501 251c0 43-12 87-34 125s-53 69-91 91-82 34-125 34c-44 0-88-12-126-34s-69-53-91-91-34-82-34-125c0-44 12-88 34-126s53-69 91-91 82-34 126-34c43 0 87 12 125 34s69 53 91 91 34 82 34 126z">
            <text:p/>
          </draw:path>
          <draw:custom-shape draw:style-name="gr258" draw:text-style-name="P35" draw:layer="layout" svg:width="0.25cm" svg:height="0.25cm" svg:x="2.424cm" svg:y="7.725cm">
            <text:p/>
            <draw:enhanced-geometry svg:viewBox="0 0 21600 21600" draw:type="rectangle" draw:enhanced-path="M 0 0 L 21600 0 21600 21600 0 21600 0 0 Z N"/>
          </draw:custom-shape>
        </draw:g>
        <draw:connector draw:style-name="gr259" draw:text-style-name="P59" draw:layer="layout" svg:x1="4.219cm" svg:y1="7.836cm" svg:x2="2.8cm" svg:y2="7.85cm" draw:start-shape="id67" draw:start-glue-point="3" draw:end-shape="id68" draw:end-glue-point="1" svg:d="M4219 7836h-716v14h-703" svg:viewBox="0 0 1420 15">
          <text:p/>
        </draw:connector>
        <draw:polygon draw:style-name="gr260" draw:text-style-name="P60" xml:id="id67" draw:id="id67" draw:layer="layout" svg:width="3.791cm" svg:height="1.422cm" svg:x="4.219cm" svg:y="7.125cm" svg:viewBox="0 0 3792 1423" draw:points="0,0 2369,0 2844,0 3791,0 3791,711 3792,712 3791,712 3791,1422 2844,1422 2844,1423 0,1423 948,712">
          <text:p text:style-name="P54"><text:span text:style-name="T29">In: char [] src, </text:span></text:p>
          <text:p text:style-name="P54"><text:span text:style-name="T59"><text:a xlink:href="#list_node" xlink:type="simple">list_node</text:a></text:span><text:span text:style-name="T69"><text:s/></text:span><text:span text:style-name="T29">[96] </text:span><text:span text:style-name="T59"><text:a xlink:href="#occurrence_map" xlink:type="simple">map</text:a></text:span></text:p>
        </draw:polygon>
        <draw:custom-shape draw:style-name="gr261" draw:text-style-name="P45" xml:id="id69" draw:id="id69" draw:layer="layout" svg:width="3.451cm" svg:height="1.062cm" draw:transform="skewX (0.00663225115757845) translate (9.229cm 7.314cm)">
          <draw:glue-point draw:id="4" svg:x="1.685cm" svg:y="-4.994cm"/>
          <draw:glue-point draw:id="5" svg:x="-1.622cm" svg:y="-4.994cm"/>
          <draw:glue-point draw:id="6" svg:x="-3.336cm" svg:y="4.994cm"/>
          <draw:glue-point draw:id="7" svg:x="3.281cm" svg:y="4.994cm"/>
          <draw:glue-point draw:id="8" svg:x="1.624cm" svg:y="4.994cm"/>
          <draw:glue-point draw:id="9" svg:x="-1.682cm" svg:y="4.994cm"/>
          <draw:glue-point draw:id="10" svg:x="-3.278cm" svg:y="-4.994cm"/>
          <draw:glue-point draw:id="11" svg:x="3.339cm" svg:y="-4.994cm"/>
          <draw:glue-point draw:id="12" svg:x="-4.943cm" svg:y="-3.326cm"/>
          <draw:glue-point draw:id="13" svg:x="-4.987cm" svg:y="3.326cm"/>
          <draw:glue-point draw:id="14" svg:x="4.946cm" svg:y="3.326cm"/>
          <draw:glue-point draw:id="15" svg:x="4.989cm" svg:y="-3.326cm"/>
          <text:p text:style-name="P44"><text:span text:style-name="T29">chiama bzero(map);**</text:span></text:p>
          <text:p text:style-name="P44"><text:span text:style-name="T29">i = 0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62" draw:text-style-name="P36" draw:layer="layout" svg:x1="9.222cm" svg:y1="7.845cm" svg:x2="8.011cm" svg:y2="7.836cm" draw:start-shape="id69" draw:start-glue-point="3" draw:end-shape="id67" draw:end-glue-point="1" svg:d="M9222 7845h-605v-9h-606" svg:viewBox="0 0 1212 10">
          <text:p/>
        </draw:connector>
        <draw:custom-shape draw:style-name="gr263" draw:text-style-name="P42" xml:id="id70" draw:id="id70" draw:layer="layout" svg:width="1cm" svg:height="1cm" svg:x="10.437cm" svg:y="9.8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draw:style-name="gr19">
          <draw:custom-shape draw:style-name="gr264" draw:text-style-name="P40" draw:layer="layout" svg:width="16.581cm" svg:height="6.683cm" svg:x="2.428cm" svg:y="8.916cm">
            <draw:glue-point draw:id="4" svg:x="3cm" svg:y="-5cm"/>
            <draw:glue-point draw:id="5" svg:x="-3cm" svg:y="-5cm"/>
            <draw:glue-point draw:id="6" svg:x="-3cm" svg:y="5cm"/>
            <draw:glue-point draw:id="7" svg:x="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5" draw:text-style-name="P61" draw:layer="layout" svg:width="4.058cm" svg:height="0.614cm" svg:x="2.428cm" svg:y="8.916cm">
            <text:p text:style-name="P44"><text:span text:style-name="T29">get_occurrence_map_loop</text:span></text:p>
            <draw:enhanced-geometry svg:viewBox="0 0 21600 21600" draw:type="non-primitve" draw:enhanced-path="M 0 0 L 21600 0 19000 21600 0 21600 0 0 Z N"/>
          </draw:custom-shape>
        </draw:g>
        <draw:connector draw:style-name="gr266" draw:text-style-name="P36" draw:layer="layout" svg:x1="10.937cm" svg:y1="9.826cm" svg:x2="10.947cm" svg:y2="8.376cm" draw:start-shape="id70" draw:start-glue-point="4" draw:end-shape="id69" draw:end-glue-point="2" svg:d="M10937 9826v-730h10v-720" svg:viewBox="0 0 11 1451">
          <text:p/>
        </draw:connector>
        <draw:custom-shape draw:style-name="gr267" draw:text-style-name="P42" xml:id="id73" draw:id="id73" draw:layer="layout" svg:width="1cm" svg:height="1cm" svg:x="10.437cm" svg:y="14.4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68" draw:text-style-name="P48" draw:layer="layout" svg:width="1.245cm" svg:height="0.601cm" svg:x="11.215cm" svg:y="9.576cm">
          <draw:text-box>
            <text:p text:style-name="P26"><text:span text:style-name="T29">[falso]</text:span></text:p>
          </draw:text-box>
        </draw:frame>
        <draw:custom-shape draw:style-name="gr269" draw:text-style-name="P45" xml:id="id71" draw:id="id71" draw:layer="layout" svg:width="3.38cm" svg:height="0.9cm" draw:transform="skewX (0.00663225115757845) translate (3.019cm 9.898cm)">
          <draw:glue-point draw:id="4" svg:x="1.685cm" svg:y="-4.994cm"/>
          <draw:glue-point draw:id="5" svg:x="-1.622cm" svg:y="-4.994cm"/>
          <draw:glue-point draw:id="6" svg:x="-3.336cm" svg:y="4.994cm"/>
          <draw:glue-point draw:id="7" svg:x="3.281cm" svg:y="4.994cm"/>
          <draw:glue-point draw:id="8" svg:x="1.624cm" svg:y="4.994cm"/>
          <draw:glue-point draw:id="9" svg:x="-1.682cm" svg:y="4.994cm"/>
          <draw:glue-point draw:id="10" svg:x="-3.278cm" svg:y="-4.994cm"/>
          <draw:glue-point draw:id="11" svg:x="3.339cm" svg:y="-4.994cm"/>
          <draw:glue-point draw:id="12" svg:x="-4.943cm" svg:y="-3.326cm"/>
          <draw:glue-point draw:id="13" svg:x="-4.987cm" svg:y="3.326cm"/>
          <draw:glue-point draw:id="14" svg:x="4.946cm" svg:y="3.326cm"/>
          <draw:glue-point draw:id="15" svg:x="4.989cm" svg:y="-3.326cm"/>
          <text:p text:style-name="P44"><text:span text:style-name="T29">pos = src[i] – 32;</text:span></text:p>
          <text:p text:style-name="P44"><text:span text:style-name="T29">nodo = nuovo nodo(i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70" draw:text-style-name="P36" draw:layer="layout" svg:x1="6.399cm" svg:y1="10.348cm" svg:x2="10.437cm" svg:y2="10.326cm" draw:start-shape="id71" draw:start-glue-point="1" draw:end-shape="id70" draw:end-glue-point="5" svg:d="M6399 10348h2014v-22h2024" svg:viewBox="0 0 4039 23">
          <text:p/>
        </draw:connector>
        <draw:connector draw:style-name="gr271" draw:text-style-name="P36" draw:layer="layout" svg:x1="4.737cm" svg:y1="11.626cm" svg:x2="4.703cm" svg:y2="10.798cm" draw:start-shape="id72" draw:start-glue-point="4" draw:end-shape="id71" draw:end-glue-point="2" svg:d="M4737 11626v-419h-34v-409" svg:viewBox="0 0 35 829">
          <text:p/>
        </draw:connector>
        <draw:frame draw:style-name="gr272" draw:text-style-name="P48" draw:layer="layout" svg:width="2.558cm" svg:height="0.601cm" svg:x="8.657cm" svg:y="9.025cm">
          <draw:text-box>
            <text:p text:style-name="P26"><text:span text:style-name="T29">[src[i] != ‘\0’]</text:span></text:p>
          </draw:text-box>
        </draw:frame>
        <draw:frame draw:style-name="gr273" draw:text-style-name="P48" draw:layer="layout" svg:width="1.197cm" svg:height="0.668cm" svg:x="9.366cm" svg:y="10.146cm">
          <draw:text-box>
            <text:p text:style-name="P26"><text:span text:style-name="T29">[vero]</text:span></text:p>
          </draw:text-box>
        </draw:frame>
        <draw:connector draw:style-name="gr274" draw:text-style-name="P36" draw:layer="layout" draw:line-skew="6.853cm" svg:x1="11.437cm" svg:y1="14.926cm" svg:x2="11.437cm" svg:y2="10.326cm" draw:start-shape="id73" draw:start-glue-point="7" draw:end-shape="id70" draw:end-glue-point="7" svg:d="M11437 14926h7392v-4600h-7392" svg:viewBox="0 0 7393 4601">
          <text:p/>
        </draw:connector>
        <draw:connector draw:style-name="gr275" draw:text-style-name="P36" draw:layer="layout" svg:x1="10.929cm" svg:y1="15.975cm" svg:x2="10.937cm" svg:y2="15.426cm" draw:start-shape="id74" draw:start-glue-point="0" draw:end-shape="id73" draw:end-glue-point="6" svg:d="M10929 15975v-269h8v-280" svg:viewBox="0 0 9 550">
          <text:p/>
        </draw:connector>
        <draw:frame draw:style-name="gr276" draw:text-style-name="P48" draw:layer="layout" svg:width="1.715cm" svg:height="0.601cm" svg:x="11.484cm" svg:y="14.265cm">
          <draw:text-box>
            <text:p text:style-name="P26"><text:span text:style-name="T29">[end loop]</text:span></text:p>
          </draw:text-box>
        </draw:frame>
        <draw:custom-shape draw:style-name="gr277" draw:text-style-name="P45" xml:id="id74" draw:id="id74" draw:layer="layout" svg:width="2.757cm" svg:height="0.887cm" svg:x="9.551cm" svg:y="15.975cm">
          <text:p text:style-name="P44"><text:span text:style-name="T29">Out: </text:span><text:span text:style-name="T59"><text:a xlink:href="#occurrence_map" xlink:type="simple">map</text:a></text:span></text:p>
          <draw:enhanced-geometry svg:viewBox="0 0 21600 21600" draw:text-areas="0 0 21600 21600" draw:type="pentagon-right" draw:modifiers="14755.0398839739" draw:enhanced-path="M 0 0 L ?f0 0 21600 10800 ?f0 21600 0 21600 Z N">
            <draw:equation draw:name="f0" draw:formula="$0 "/>
            <draw:handle draw:handle-range-x-minimum="0" draw:handle-range-x-maximum="21600" draw:handle-position="$0 top" draw:handle-position-x="$0" draw:handle-position-y="top"/>
          </draw:enhanced-geometry>
        </draw:custom-shape>
        <draw:g draw:style-name="gr78" xml:id="id75" draw:id="id75">
          <draw:path draw:style-name="gr278" draw:text-style-name="P49" draw:layer="layout" svg:width="0.5cm" svg:height="0.5cm" svg:x="13.799cm" svg:y="16.147cm" svg:viewBox="0 0 501 501" svg:d="M501 251c0 43-12 87-34 125s-53 69-91 91-82 34-125 34c-44 0-88-12-126-34s-69-53-91-91-34-82-34-125c0-44 12-88 34-126s53-69 91-91 82-34 126-34c43 0 87 12 125 34s69 53 91 91 34 82 34 126z">
            <text:p/>
          </draw:path>
          <draw:path draw:style-name="gr279" draw:text-style-name="P34" draw:layer="layout" svg:width="0.2cm" svg:height="0.2cm" svg:x="13.949cm" svg:y="16.297cm" svg:viewBox="0 0 201 201" svg:d="M201 101c0 17-5 34-13 50-9 15-22 28-37 37-16 8-33 13-50 13-18 0-35-5-51-13-15-9-28-22-37-37-8-16-13-33-13-50 0-18 5-35 13-51 9-15 22-28 37-37 16-8 33-13 51-13 17 0 34 5 50 13 15 9 28 22 37 37 8 16 13 33 13 51z">
            <text:p/>
          </draw:path>
        </draw:g>
        <draw:connector draw:style-name="gr280" draw:text-style-name="P36" draw:layer="layout" svg:x1="13.799cm" svg:y1="16.397cm" svg:x2="12.308cm" svg:y2="16.418cm" draw:start-shape="id75" draw:start-glue-point="3" draw:end-shape="id74" draw:end-glue-point="1" svg:d="M13799 16397h-745v21h-746" svg:viewBox="0 0 1492 22">
          <text:p/>
        </draw:connector>
        <draw:custom-shape draw:style-name="gr281" draw:text-style-name="P42" xml:id="id72" draw:id="id72" draw:layer="layout" svg:width="1cm" svg:height="1cm" svg:x="4.237cm" svg:y="11.6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82" draw:text-style-name="P48" draw:layer="layout" svg:width="2.598cm" svg:height="0.601cm" svg:x="2.305cm" svg:y="11.294cm">
          <draw:text-box>
            <text:p text:style-name="P26"><text:span text:style-name="T29">[map[pos] == 0?]</text:span></text:p>
          </draw:text-box>
        </draw:frame>
        <draw:custom-shape draw:style-name="gr283" draw:text-style-name="P45" xml:id="id76" draw:id="id76" draw:layer="layout" svg:width="1.376cm" svg:height="0.764cm" draw:transform="skewX (0.00645771823237902) translate (17.216cm 12.239cm)">
          <draw:glue-point draw:id="4" svg:x="1.685cm" svg:y="-4.994cm"/>
          <draw:glue-point draw:id="5" svg:x="-1.622cm" svg:y="-4.994cm"/>
          <draw:glue-point draw:id="6" svg:x="-3.336cm" svg:y="4.994cm"/>
          <draw:glue-point draw:id="7" svg:x="3.281cm" svg:y="4.994cm"/>
          <draw:glue-point draw:id="8" svg:x="1.624cm" svg:y="4.994cm"/>
          <draw:glue-point draw:id="9" svg:x="-1.682cm" svg:y="4.994cm"/>
          <draw:glue-point draw:id="10" svg:x="-3.278cm" svg:y="-4.994cm"/>
          <draw:glue-point draw:id="11" svg:x="3.339cm" svg:y="-4.994cm"/>
          <draw:glue-point draw:id="12" svg:x="-4.943cm" svg:y="-3.326cm"/>
          <draw:glue-point draw:id="13" svg:x="-4.987cm" svg:y="3.326cm"/>
          <draw:glue-point draw:id="14" svg:x="4.946cm" svg:y="3.326cm"/>
          <draw:glue-point draw:id="15" svg:x="4.989cm" svg:y="-3.326cm"/>
          <text:p text:style-name="P44"><text:span text:style-name="T29">i++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84" draw:text-style-name="P36" draw:layer="layout" draw:line-skew="-0.713cm" svg:x1="10.937cm" svg:y1="10.826cm" svg:x2="17.904cm" svg:y2="12.239cm" draw:start-shape="id70" draw:start-glue-point="6" draw:end-shape="id76" draw:end-glue-point="0" svg:d="M10937 10826h6967v1413" svg:viewBox="0 0 6968 1414">
          <text:p/>
        </draw:connector>
        <draw:custom-shape draw:style-name="gr285" draw:text-style-name="P45" xml:id="id78" draw:id="id78" draw:layer="layout" svg:width="2.783cm" svg:height="0.764cm" draw:transform="skewX (0.00645771823237902) translate (5.942cm 13.539cm)">
          <draw:glue-point draw:id="4" svg:x="1.685cm" svg:y="-4.994cm"/>
          <draw:glue-point draw:id="5" svg:x="-1.622cm" svg:y="-4.994cm"/>
          <draw:glue-point draw:id="6" svg:x="-3.336cm" svg:y="4.994cm"/>
          <draw:glue-point draw:id="7" svg:x="3.281cm" svg:y="4.994cm"/>
          <draw:glue-point draw:id="8" svg:x="1.624cm" svg:y="4.994cm"/>
          <draw:glue-point draw:id="9" svg:x="-1.682cm" svg:y="4.994cm"/>
          <draw:glue-point draw:id="10" svg:x="-3.278cm" svg:y="-4.994cm"/>
          <draw:glue-point draw:id="11" svg:x="3.339cm" svg:y="-4.994cm"/>
          <draw:glue-point draw:id="12" svg:x="-4.943cm" svg:y="-3.326cm"/>
          <draw:glue-point draw:id="13" svg:x="-4.987cm" svg:y="3.326cm"/>
          <draw:glue-point draw:id="14" svg:x="4.946cm" svg:y="3.326cm"/>
          <draw:glue-point draw:id="15" svg:x="4.989cm" svg:y="-3.326cm"/>
          <text:p text:style-name="P44"><text:span text:style-name="T29">map[pos] = nodo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86" draw:text-style-name="P42" xml:id="id77" draw:id="id77" draw:layer="layout" svg:width="1cm" svg:height="1cm" svg:x="15.207cm" svg:y="13.4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87" draw:text-style-name="P36" draw:layer="layout" svg:x1="17.899cm" svg:y1="13.003cm" svg:x2="16.207cm" svg:y2="13.904cm" draw:start-shape="id76" draw:start-glue-point="2" draw:end-shape="id77" draw:end-glue-point="7" svg:d="M17899 13003v901h-1692" svg:viewBox="0 0 1693 902">
          <text:p/>
        </draw:connector>
        <draw:connector draw:style-name="gr288" draw:text-style-name="P36" draw:layer="layout" svg:x1="15.207cm" svg:y1="13.904cm" svg:x2="8.725cm" svg:y2="13.921cm" draw:start-shape="id77" draw:start-glue-point="5" draw:end-shape="id78" draw:end-glue-point="1" svg:d="M15207 13904h-3246v17h-3236" svg:viewBox="0 0 6483 18">
          <text:p/>
        </draw:connector>
        <draw:custom-shape draw:style-name="gr289" draw:text-style-name="P45" xml:id="id79" draw:id="id79" draw:layer="layout" svg:width="4.58cm" svg:height="0.764cm" draw:transform="skewX (0.00645771823237902) translate (11.819cm 11.758cm)">
          <draw:glue-point draw:id="4" svg:x="1.685cm" svg:y="-4.994cm"/>
          <draw:glue-point draw:id="5" svg:x="-1.622cm" svg:y="-4.994cm"/>
          <draw:glue-point draw:id="6" svg:x="-3.336cm" svg:y="4.994cm"/>
          <draw:glue-point draw:id="7" svg:x="3.281cm" svg:y="4.994cm"/>
          <draw:glue-point draw:id="8" svg:x="1.624cm" svg:y="4.994cm"/>
          <draw:glue-point draw:id="9" svg:x="-1.682cm" svg:y="4.994cm"/>
          <draw:glue-point draw:id="10" svg:x="-3.278cm" svg:y="-4.994cm"/>
          <draw:glue-point draw:id="11" svg:x="3.339cm" svg:y="-4.994cm"/>
          <draw:glue-point draw:id="12" svg:x="-4.943cm" svg:y="-3.326cm"/>
          <draw:glue-point draw:id="13" svg:x="-4.987cm" svg:y="3.326cm"/>
          <draw:glue-point draw:id="14" svg:x="4.946cm" svg:y="3.326cm"/>
          <draw:glue-point draw:id="15" svg:x="4.989cm" svg:y="-3.326cm"/>
          <text:p text:style-name="P44"><text:span text:style-name="T29">nodo_prec.prossimo = nodo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90" draw:text-style-name="P36" draw:layer="layout" draw:line-skew="-0.134cm" svg:x1="15.707cm" svg:y1="13.404cm" svg:x2="14.104cm" svg:y2="12.522cm" draw:start-shape="id77" draw:start-glue-point="4" draw:end-shape="id79" draw:end-glue-point="2" svg:d="M15707 13404v-580h-1603v-302" svg:viewBox="0 0 1604 883">
          <text:p/>
        </draw:connector>
        <draw:connector draw:style-name="gr291" draw:text-style-name="P36" draw:layer="layout" svg:x1="5.937cm" svg:y1="13.921cm" svg:x2="4.737cm" svg:y2="12.626cm" draw:start-shape="id78" draw:start-glue-point="3" draw:end-shape="id72" draw:end-glue-point="6" svg:d="M5937 13921h-1200v-1295" svg:viewBox="0 0 1201 1296">
          <text:p/>
        </draw:connector>
        <draw:frame draw:style-name="gr292" draw:text-style-name="P48" draw:layer="layout" svg:width="1.197cm" svg:height="0.668cm" svg:x="4.567cm" svg:y="13.246cm">
          <draw:text-box>
            <text:p text:style-name="P26"><text:span text:style-name="T29">[vero]</text:span></text:p>
          </draw:text-box>
        </draw:frame>
        <draw:frame draw:style-name="gr293" draw:text-style-name="P48" draw:layer="layout" svg:width="1.245cm" svg:height="0.601cm" svg:x="5.116cm" svg:y="11.377cm">
          <draw:text-box>
            <text:p text:style-name="P26"><text:span text:style-name="T29">[falso]</text:span></text:p>
          </draw:text-box>
        </draw:frame>
        <draw:custom-shape draw:style-name="gr294" draw:text-style-name="P45" xml:id="id80" draw:id="id80" draw:layer="layout" svg:width="3.856cm" svg:height="0.906cm" draw:transform="skewX (0.00663225115757845) translate (6.474cm 11.658cm)">
          <draw:glue-point draw:id="4" svg:x="1.685cm" svg:y="-4.994cm"/>
          <draw:glue-point draw:id="5" svg:x="-1.622cm" svg:y="-4.994cm"/>
          <draw:glue-point draw:id="6" svg:x="-3.336cm" svg:y="4.994cm"/>
          <draw:glue-point draw:id="7" svg:x="3.281cm" svg:y="4.994cm"/>
          <draw:glue-point draw:id="8" svg:x="1.624cm" svg:y="4.994cm"/>
          <draw:glue-point draw:id="9" svg:x="-1.682cm" svg:y="4.994cm"/>
          <draw:glue-point draw:id="10" svg:x="-3.278cm" svg:y="-4.994cm"/>
          <draw:glue-point draw:id="11" svg:x="3.339cm" svg:y="-4.994cm"/>
          <draw:glue-point draw:id="12" svg:x="-4.943cm" svg:y="-3.326cm"/>
          <draw:glue-point draw:id="13" svg:x="-4.987cm" svg:y="3.326cm"/>
          <draw:glue-point draw:id="14" svg:x="4.946cm" svg:y="3.326cm"/>
          <draw:glue-point draw:id="15" svg:x="4.989cm" svg:y="-3.326cm"/>
          <text:p text:style-name="P44"><text:span text:style-name="T29">nodo_prec = map[pos].ultimo_nodo();*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95" draw:text-style-name="P36" draw:layer="layout" svg:x1="6.468cm" svg:y1="12.111cm" svg:x2="5.237cm" svg:y2="12.126cm" draw:start-shape="id80" draw:start-glue-point="3" draw:end-shape="id72" draw:end-glue-point="7" svg:d="M6468 12111h-609v15h-622" svg:viewBox="0 0 1232 16">
          <text:p/>
        </draw:connector>
        <draw:connector draw:style-name="gr296" draw:text-style-name="P36" draw:layer="layout" svg:x1="11.814cm" svg:y1="12.14cm" svg:x2="10.33cm" svg:y2="12.111cm" draw:start-shape="id79" draw:start-glue-point="3" draw:end-shape="id80" draw:end-glue-point="1" svg:d="M11814 12140h-742v-29h-742" svg:viewBox="0 0 1485 30">
          <text:p/>
        </draw:connector>
        <draw:frame draw:style-name="gr297" draw:text-style-name="P50" draw:layer="layout" svg:width="17.084cm" svg:height="1.315cm" svg:x="2.475cm" svg:y="17.089cm">
          <draw:text-box>
            <text:p>*: list.utlimo_nodo() in realta si tratta di un semplice ciclo che itera fino alla fine della stringa <text:line-break/>**: bzero(generic *ptr, int size): azzera la zona di memoria da ptr a ptr + size</text:p>
          </draw:text-box>
        </draw:frame>
        <draw:frame draw:name="occurrence_dest_size" draw:style-name="gr45" draw:text-style-name="P31" draw:layer="layout" svg:width="8.415cm" svg:height="0.543cm" svg:x="1.405cm" svg:y="18.127cm">
          <draw:text-box>
            <text:p text:style-name="P1"><text:span text:style-name="T25">occurrence_dest_size:</text:span></text:p>
          </draw:text-box>
        </draw:frame>
        <draw:frame draw:style-name="gr298" draw:text-style-name="P70" draw:layer="layout" svg:width="18.237cm" svg:height="7.605cm" svg:x="1.537cm" svg:y="18.923cm">
          <draw:text-box>
            <text:p text:style-name="P73"><text:span text:style-name="T61">Procedura per calcolare la lunghezza della stringa cifrata, serve per allocare memoria in anticipo.</text:span><text:span text:style-name="T61"><text:line-break/></text:span><text:span text:style-name="T61">Dopo aver iterato sulla mappa per contare il numero di caratteri diversi, applica una formula per calcolare la grandezza finale, la formula deriva da questa intuizione: </text:span><text:span text:style-name="T61"><text:line-break/></text:span><text:span text:style-name="T61"><text:line-break/></text:span><text:span text:style-name="T70">1 carattere + 1 spazio </text:span><text:span text:style-name="T71">(2)</text:span><text:span text:style-name="T72"> </text:span><text:span text:style-name="T61">per ogni </text:span><text:span text:style-name="T73">carattere unico </text:span><text:span text:style-name="T74"><text:s/>(</text:span><text:span text:style-name="T75">eccetto il primo che non segue uno spazio</text:span><text:span text:style-name="T74">)</text:span><text:span text:style-name="T61"><text:line-break/></text:span><text:span text:style-name="T76">1</text:span><text:span text:style-name="T72"> '-' per </text:span><text:span text:style-name="T77">ogni carattere</text:span><text:span text:style-name="T72"> della stringa</text:span></text:p>
            <text:p text:style-name="P73"><text:span text:style-name="T72">1 stringa numerica per ogni carattere delal stringa -&gt; somma di lunghezza di ogni stringa numerica da 1 a src_len:</text:span></text:p>
            <text:p text:style-name="P78"><text:span text:style-name="T72">numstr_len(9) = (strlen("1") = 1) + (strlen("2") = 1) + ... + (strlen("9") = 1) = 1 * 9</text:span></text:p>
            <text:p text:style-name="P78"><text:span text:style-name="T72">numstr_len(10) = 2 * 1 + numstr_len(9)</text:span></text:p>
            <text:p text:style-name="P78"><text:span text:style-name="T72">numstr_len(11) = 2 * (11 – 9) + numstr_len(9)</text:span><text:span text:style-name="T72"><text:line-break/></text:span><text:span text:style-name="T72">numstr_len(100) = 3 * (100 – 99) + 2 * (100 – 10) + 1 * (10 – 1)</text:span></text:p>
            <text:p text:style-name="P79"><text:span text:style-name="T72">numstr_len(x): <text:s/>(</text:span><text:span text:style-name="T78">p+1) × (x − (10</text:span><text:span text:style-name="T79">p </text:span><text:span text:style-name="T78">-1)) +</text:span><text:span text:style-name="T72"> </text:span><text:span text:style-name="T80">∑</text:span><text:span text:style-name="T81">k=1</text:span><text:span text:style-name="T82"> p</text:span><text:span text:style-name="T79"> <text:s text:c="8"/></text:span><text:span text:style-name="T78">(k*(10</text:span><text:span text:style-name="T79">k</text:span><text:span text:style-name="T78">−10</text:span><text:span text:style-name="T79">k − 1</text:span><text:span text:style-name="T78">)), <text:s/>con p = </text:span><text:span text:style-name="T83">⌋log</text:span><text:span text:style-name="T84">10</text:span><text:span text:style-name="T83">(x)⌊</text:span></text:p>
          </draw:text-box>
        </draw:frame>
        <draw:frame draw:style-name="gr299" draw:text-style-name="P80" draw:layer="layout" svg:width="14.969cm" svg:height="1.433cm" svg:x="5.307cm" svg:y="27.226cm">
          <draw:text-box>
            <text:p><text:span text:style-name="T85">x =</text:span><text:span text:style-name="T86"> 2 </text:span><text:span text:style-name="T87">×</text:span><text:span text:style-name="T86">c </text:span><text:span text:style-name="T85">+ (</text:span><text:span text:style-name="T88">- 1</text:span><text:span text:style-name="T89">)</text:span><text:span text:style-name="T85">+</text:span><text:span text:style-name="T90">l</text:span><text:span text:style-name="T85"> <text:s/>+ <text:s/>∑</text:span><text:span text:style-name="T91">k=1</text:span><text:span text:style-name="T92"> p</text:span><text:span text:style-name="T93">(k*(10</text:span><text:span text:style-name="T94">k</text:span><text:span text:style-name="T93">−10</text:span><text:span text:style-name="T94">k − 1</text:span><text:span text:style-name="T93">)) + p × (l + 1 − <text:s/>10</text:span><text:span text:style-name="T94">p − 1</text:span><text:span text:style-name="T93">)</text:span></text:p>
          </draw:text-box>
        </draw:frame>
        <draw:frame draw:style-name="gr300" draw:text-style-name="P81" draw:layer="layout" svg:width="3.531cm" svg:height="1.337cm" svg:x="1.294cm" svg:y="26.966cm">
          <draw:text-box>
            <text:p text:style-name="P79"><text:span text:style-name="T95">c=caratteri diversi</text:span><text:span text:style-name="T95"><text:line-break/></text:span><text:span text:style-name="T96">l=lunghezza(src)</text:span><text:span text:style-name="T96"><text:line-break/></text:span><text:span text:style-name="T96">p= </text:span><text:span text:style-name="T97">⌋log</text:span><text:span text:style-name="T98">10</text:span><text:span text:style-name="T97">(x)⌊</text:span><text:span text:style-name="T97"><text:line-break/></text:span><text:span text:style-name="T97">P=⌈log</text:span><text:span text:style-name="T98">10</text:span><text:span text:style-name="T97">(x)⌉</text:span></text:p>
          </draw:text-box>
        </draw:frame>
      </draw:page>
      <draw:page draw:name="page9" draw:style-name="dp1" draw:master-page-name="master-page79">
        <draw:frame draw:name="occurrence_construct_cypher_text" draw:style-name="gr301" draw:text-style-name="P82" draw:layer="layout" svg:width="8.46cm" svg:height="0.624cm" svg:x="1.404cm" svg:y="3.026cm">
          <draw:text-box>
            <text:p text:style-name="P73"><text:span text:style-name="T99">occurrence_construct_cypher_text:</text:span></text:p>
          </draw:text-box>
        </draw:frame>
        <draw:frame draw:style-name="gr15" draw:text-style-name="P15" draw:layer="layout" svg:width="0.943cm" svg:height="0.642cm" svg:x="1.478cm" svg:y="28.055cm">
          <draw:text-box>
            <text:p text:style-name="P1"><text:span text:style-name="T16">9</text:span></text:p>
          </draw:text-box>
        </draw:frame>
        <draw:frame draw:style-name="gr44" draw:text-style-name="P8" draw:layer="layout" svg:width="5.771cm" svg:height="0.543cm" svg:x="1.403cm" svg:y="2.228cm">
          <draw:text-box>
            <text:p text:style-name="P1"><text:span text:style-name="T7">Procedure notevoli: </text:span></text:p>
          </draw:text-box>
        </draw:frame>
        <draw:frame draw:style-name="gr302" draw:text-style-name="P70" draw:layer="layout" svg:width="18.237cm" svg:height="2.141cm" svg:x="1.537cm" svg:y="3.823cm">
          <draw:text-box>
            <text:p text:style-name="P73"><text:span text:style-name="T61">Una volta presa la </text:span><text:span text:style-name="T56"><text:a xlink:href="#occurrence_map" xlink:type="simple">occurrence_map</text:a></text:span><text:span text:style-name="T55"><text:s/>calcolata precedentemente, iterare su essa:</text:span><text:span text:style-name="T55"><text:line-break/></text:span><text:span text:style-name="T55">Per ogni lista non nulla in indice i: si aggiunge il carattere in codifica ascii i + 32, poi per ogni nodo nella lista si appende ‘-’ e il numero salvato nel nodo in formato di stringa, infine si separa con uno spazio.</text:span></text:p>
          </draw:text-box>
        </draw:frame>
        <draw:g draw:style-name="gr48" xml:id="id82" draw:id="id82">
          <draw:path draw:style-name="gr303" draw:text-style-name="P34" draw:layer="layout" svg:width="0.5cm" svg:height="0.5cm" svg:x="2.299cm" svg:y="6.401cm" svg:viewBox="0 0 501 501" svg:d="M501 251c0 43-12 87-34 125s-53 69-91 91-82 34-125 34c-44 0-88-12-126-34s-69-53-91-91-34-82-34-125c0-44 12-88 34-126s53-69 91-91 82-34 126-34c43 0 87 12 125 34s69 53 91 91 34 82 34 126z">
            <text:p/>
          </draw:path>
          <draw:custom-shape draw:style-name="gr304" draw:text-style-name="P35" draw:layer="layout" svg:width="0.25cm" svg:height="0.25cm" svg:x="2.424cm" svg:y="6.526cm">
            <text:p/>
            <draw:enhanced-geometry svg:viewBox="0 0 21600 21600" draw:type="rectangle" draw:enhanced-path="M 0 0 L 21600 0 21600 21600 0 21600 0 0 Z N"/>
          </draw:custom-shape>
        </draw:g>
        <draw:connector draw:style-name="gr305" draw:text-style-name="P59" draw:layer="layout" svg:x1="3.619cm" svg:y1="6.637cm" svg:x2="2.8cm" svg:y2="6.651cm" draw:start-shape="id81" draw:start-glue-point="3" draw:end-shape="id82" draw:end-glue-point="1" svg:d="M3619 6637h-416v14h-403" svg:viewBox="0 0 820 15">
          <text:p/>
        </draw:connector>
        <draw:polygon draw:style-name="gr306" draw:text-style-name="P60" xml:id="id81" draw:id="id81" draw:layer="layout" svg:width="3.791cm" svg:height="1.422cm" svg:x="3.619cm" svg:y="5.926cm" svg:viewBox="0 0 3792 1423" draw:points="0,0 2369,0 2844,0 3791,0 3791,711 3792,712 3791,712 3791,1422 2844,1422 2844,1423 0,1423 948,712">
          <text:p text:style-name="P54"><text:span text:style-name="T29">In: dest_len, </text:span></text:p>
          <text:p text:style-name="P54"><text:span text:style-name="T59"><text:a xlink:href="#list_node" xlink:type="simple">list_node</text:a></text:span><text:span text:style-name="T69"><text:s/></text:span><text:span text:style-name="T29">[96] </text:span><text:span text:style-name="T59"><text:a xlink:href="#occurrence_map" xlink:type="simple">map</text:a></text:span></text:p>
        </draw:polygon>
        <draw:custom-shape draw:style-name="gr307" draw:text-style-name="P45" xml:id="id83" draw:id="id83" draw:layer="layout" svg:width="5.062cm" svg:height="1.265cm" draw:transform="skewX (0.00628318530717959) translate (8.43cm 6.012cm)">
          <draw:glue-point draw:id="4" svg:x="1.685cm" svg:y="-4.994cm"/>
          <draw:glue-point draw:id="5" svg:x="-1.622cm" svg:y="-4.994cm"/>
          <draw:glue-point draw:id="6" svg:x="-3.336cm" svg:y="4.994cm"/>
          <draw:glue-point draw:id="7" svg:x="3.281cm" svg:y="4.994cm"/>
          <draw:glue-point draw:id="8" svg:x="1.624cm" svg:y="4.994cm"/>
          <draw:glue-point draw:id="9" svg:x="-1.682cm" svg:y="4.994cm"/>
          <draw:glue-point draw:id="10" svg:x="-3.278cm" svg:y="-4.994cm"/>
          <draw:glue-point draw:id="11" svg:x="3.339cm" svg:y="-4.994cm"/>
          <draw:glue-point draw:id="12" svg:x="-4.943cm" svg:y="-3.326cm"/>
          <draw:glue-point draw:id="13" svg:x="-4.987cm" svg:y="3.326cm"/>
          <draw:glue-point draw:id="14" svg:x="4.946cm" svg:y="3.326cm"/>
          <draw:glue-point draw:id="15" svg:x="4.989cm" svg:y="-3.326cm"/>
          <text:p text:style-name="P44"><text:span text:style-name="T29">i = 0;</text:span></text:p>
          <text:p text:style-name="P44"><text:span text:style-name="T29">dest = malloc(dest_len + 1);</text:span></text:p>
          <text:p text:style-name="P44"><text:span text:style-name="T29">caratteri_scritti = 0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08" draw:text-style-name="P36" draw:layer="layout" svg:x1="8.422cm" svg:y1="6.644cm" svg:x2="7.411cm" svg:y2="6.637cm" draw:start-shape="id83" draw:start-glue-point="3" draw:end-shape="id81" draw:end-glue-point="1" svg:d="M8422 6644h-504v-7h-507" svg:viewBox="0 0 1012 8">
          <text:p/>
        </draw:connector>
        <draw:custom-shape draw:style-name="gr309" draw:text-style-name="P42" xml:id="id84" draw:id="id84" draw:layer="layout" svg:width="1cm" svg:height="1cm" svg:x="10.437cm" svg:y="8.0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draw:style-name="gr19">
          <draw:custom-shape draw:style-name="gr310" draw:text-style-name="P40" draw:layer="layout" svg:width="18.017cm" svg:height="7.063cm" svg:x="1.676cm" svg:y="7.694cm">
            <draw:glue-point draw:id="4" svg:x="3cm" svg:y="-5cm"/>
            <draw:glue-point draw:id="5" svg:x="-3cm" svg:y="-5cm"/>
            <draw:glue-point draw:id="6" svg:x="-3cm" svg:y="5cm"/>
            <draw:glue-point draw:id="7" svg:x="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1" draw:text-style-name="P61" draw:layer="layout" svg:width="5.702cm" svg:height="0.614cm" svg:x="1.676cm" svg:y="7.694cm">
            <text:p text:style-name="P44"><text:span text:style-name="T29">occurrence_construct_cypher_text_loop</text:span></text:p>
            <draw:enhanced-geometry svg:viewBox="0 0 21600 21600" draw:mirror-horizontal="false" draw:mirror-vertical="false" draw:type="non-primitve" draw:enhanced-path="M 0 0 L 21600 0 19000 21600 0 21600 0 0 Z N"/>
          </draw:custom-shape>
        </draw:g>
        <draw:connector draw:style-name="gr312" draw:text-style-name="P36" draw:layer="layout" svg:x1="10.937cm" svg:y1="8.027cm" svg:x2="10.953cm" svg:y2="7.277cm" draw:start-shape="id84" draw:start-glue-point="4" draw:end-shape="id83" draw:end-glue-point="2" svg:d="M10937 8027v-380h16v-370" svg:viewBox="0 0 17 751">
          <text:p/>
        </draw:connector>
        <draw:custom-shape draw:style-name="gr313" draw:text-style-name="P42" xml:id="id86" draw:id="id86" draw:layer="layout" svg:width="1cm" svg:height="1cm" svg:x="10.437cm" svg:y="14.0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14" draw:text-style-name="P48" draw:layer="layout" svg:width="1.245cm" svg:height="0.601cm" svg:x="11.215cm" svg:y="8.377cm">
          <draw:text-box>
            <text:p text:style-name="P26"><text:span text:style-name="T29">[falso]</text:span></text:p>
          </draw:text-box>
        </draw:frame>
        <draw:connector draw:style-name="gr315" draw:text-style-name="P36" draw:layer="layout" svg:x1="2.337cm" svg:y1="9.527cm" svg:x2="10.437cm" svg:y2="8.527cm" draw:start-shape="id85" draw:start-glue-point="4" draw:end-shape="id84" draw:end-glue-point="5" svg:d="M2337 9527v-1000h8100" svg:viewBox="0 0 8101 1001">
          <text:p/>
        </draw:connector>
        <draw:frame draw:style-name="gr316" draw:text-style-name="P48" draw:layer="layout" svg:width="2.558cm" svg:height="0.601cm" svg:x="9.568cm" svg:y="7.694cm">
          <draw:text-box>
            <text:p text:style-name="P26"><text:span text:style-name="T29">[i &lt; 96?]</text:span></text:p>
          </draw:text-box>
        </draw:frame>
        <draw:frame draw:style-name="gr317" draw:text-style-name="P48" draw:layer="layout" svg:width="1.197cm" svg:height="0.668cm" svg:x="9.366cm" svg:y="8.427cm">
          <draw:text-box>
            <text:p text:style-name="P26"><text:span text:style-name="T29">[vero]</text:span></text:p>
          </draw:text-box>
        </draw:frame>
        <draw:connector draw:style-name="gr318" draw:text-style-name="P36" draw:layer="layout" draw:line-skew="7.371cm" svg:x1="11.437cm" svg:y1="14.527cm" svg:x2="11.437cm" svg:y2="8.527cm" draw:start-shape="id86" draw:start-glue-point="7" draw:end-shape="id84" draw:end-glue-point="7" svg:d="M11437 14527h7910v-6000h-7910" svg:viewBox="0 0 7911 6001">
          <text:p/>
        </draw:connector>
        <draw:connector draw:style-name="gr319" draw:text-style-name="P36" draw:layer="layout" svg:x1="10.927cm" svg:y1="15.685cm" svg:x2="10.937cm" svg:y2="15.027cm" draw:start-shape="id87" draw:start-glue-point="0" draw:end-shape="id86" draw:end-glue-point="6" svg:d="M10927 15685v-323h10v-335" svg:viewBox="0 0 11 659">
          <text:p/>
        </draw:connector>
        <draw:frame draw:style-name="gr320" draw:text-style-name="P48" draw:layer="layout" svg:width="1.715cm" svg:height="0.601cm" svg:x="9.036cm" svg:y="14.185cm">
          <draw:text-box>
            <text:p text:style-name="P26"><text:span text:style-name="T29">[end loop]</text:span></text:p>
          </draw:text-box>
        </draw:frame>
        <draw:custom-shape draw:style-name="gr321" draw:text-style-name="P45" xml:id="id89" draw:id="id89" draw:layer="layout" svg:width="2.757cm" svg:height="0.974cm" svg:x="13.751cm" svg:y="15.689cm">
          <text:p text:style-name="P44"><text:span text:style-name="T29">Out: dest</text:span></text:p>
          <draw:enhanced-geometry svg:viewBox="0 0 21600 21600" draw:text-areas="0 0 21600 21600" draw:type="pentagon-right" draw:modifiers="14755.0398839739" draw:enhanced-path="M 0 0 L ?f0 0 21600 10800 ?f0 21600 0 21600 Z N">
            <draw:equation draw:name="f0" draw:formula="$0 "/>
            <draw:handle draw:handle-range-x-minimum="0" draw:handle-range-x-maximum="21600" draw:handle-position="$0 top" draw:handle-position-x="$0" draw:handle-position-y="top"/>
          </draw:enhanced-geometry>
        </draw:custom-shape>
        <draw:g draw:style-name="gr78" xml:id="id88" draw:id="id88">
          <draw:path draw:style-name="gr322" draw:text-style-name="P49" draw:layer="layout" svg:width="0.5cm" svg:height="0.5cm" svg:x="17.499cm" svg:y="15.948cm" svg:viewBox="0 0 501 501" svg:d="M501 251c0 43-12 87-34 125s-53 69-91 91-82 34-125 34c-44 0-88-12-126-34s-69-53-91-91-34-82-34-125c0-44 12-88 34-126s53-69 91-91 82-34 126-34c43 0 87 12 125 34s69 53 91 91 34 82 34 126z">
            <text:p/>
          </draw:path>
          <draw:path draw:style-name="gr323" draw:text-style-name="P34" draw:layer="layout" svg:width="0.2cm" svg:height="0.2cm" svg:x="17.649cm" svg:y="16.098cm" svg:viewBox="0 0 201 201" svg:d="M201 101c0 17-5 34-13 50-9 15-22 28-37 37-16 8-33 13-50 13-18 0-35-5-51-13-15-9-28-22-37-37-8-16-13-33-13-50 0-18 5-35 13-51 9-15 22-28 37-37 16-8 33-13 51-13 17 0 34 5 50 13 15 9 28 22 37 37 8 16 13 33 13 51z">
            <text:p/>
          </draw:path>
        </draw:g>
        <draw:connector draw:style-name="gr324" draw:text-style-name="P36" draw:layer="layout" svg:x1="17.499cm" svg:y1="16.198cm" svg:x2="16.508cm" svg:y2="16.176cm" draw:start-shape="id88" draw:start-glue-point="3" draw:end-shape="id89" draw:end-glue-point="1" svg:d="M17499 16198h-495v-22h-496" svg:viewBox="0 0 992 23">
          <text:p/>
        </draw:connector>
        <draw:custom-shape draw:style-name="gr325" draw:text-style-name="P42" xml:id="id85" draw:id="id85" draw:layer="layout" svg:width="1cm" svg:height="1cm" svg:x="1.837cm" svg:y="9.5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6" draw:text-style-name="P45" xml:id="id90" draw:id="id90" draw:layer="layout" svg:width="1.376cm" svg:height="0.764cm" draw:transform="skewX (0.00645771823237902) translate (17.816cm 8.74cm)">
          <draw:glue-point draw:id="4" svg:x="1.685cm" svg:y="-4.994cm"/>
          <draw:glue-point draw:id="5" svg:x="-1.622cm" svg:y="-4.994cm"/>
          <draw:glue-point draw:id="6" svg:x="-3.336cm" svg:y="4.994cm"/>
          <draw:glue-point draw:id="7" svg:x="3.281cm" svg:y="4.994cm"/>
          <draw:glue-point draw:id="8" svg:x="1.624cm" svg:y="4.994cm"/>
          <draw:glue-point draw:id="9" svg:x="-1.682cm" svg:y="4.994cm"/>
          <draw:glue-point draw:id="10" svg:x="-3.278cm" svg:y="-4.994cm"/>
          <draw:glue-point draw:id="11" svg:x="3.339cm" svg:y="-4.994cm"/>
          <draw:glue-point draw:id="12" svg:x="-4.943cm" svg:y="-3.326cm"/>
          <draw:glue-point draw:id="13" svg:x="-4.987cm" svg:y="3.326cm"/>
          <draw:glue-point draw:id="14" svg:x="4.946cm" svg:y="3.326cm"/>
          <draw:glue-point draw:id="15" svg:x="4.989cm" svg:y="-3.326cm"/>
          <text:p text:style-name="P44"><text:span text:style-name="T29">i++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27" draw:text-style-name="P36" draw:layer="layout" draw:line-skew="-0.468cm" svg:x1="10.937cm" svg:y1="9.027cm" svg:x2="17.811cm" svg:y2="9.122cm" draw:start-shape="id84" draw:start-glue-point="6" draw:end-shape="id90" draw:end-glue-point="3" svg:d="M10937 9027v71h3693v24h3181" svg:viewBox="0 0 6875 96">
          <text:p/>
        </draw:connector>
        <draw:custom-shape draw:style-name="gr328" draw:text-style-name="P42" xml:id="id91" draw:id="id91" draw:layer="layout" svg:width="1cm" svg:height="1cm" svg:x="18.024cm" svg:y="12.4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29" draw:text-style-name="P36" draw:layer="layout" svg:x1="18.499cm" svg:y1="9.504cm" svg:x2="18.524cm" svg:y2="12.441cm" draw:start-shape="id90" draw:start-glue-point="2" draw:end-shape="id91" draw:end-glue-point="4" svg:d="M18499 9504v1464h25v1473" svg:viewBox="0 0 26 2938">
          <text:p/>
        </draw:connector>
        <draw:connector draw:style-name="gr330" draw:text-style-name="P36" draw:layer="layout" draw:line-skew="0cm 0.261cm" svg:x1="12.771cm" svg:y1="12.199cm" svg:x2="16.805cm" svg:y2="12.476cm" draw:start-shape="id92" draw:start-glue-point="1" draw:end-shape="id93" draw:end-glue-point="4" svg:d="M12771 12199h1761 2273v277" svg:viewBox="0 0 4035 278">
          <text:p/>
        </draw:connector>
        <draw:connector draw:style-name="gr331" draw:text-style-name="P36" draw:layer="layout" svg:x1="18.024cm" svg:y1="12.941cm" svg:x2="17.305cm" svg:y2="12.976cm" draw:start-shape="id91" draw:start-glue-point="5" draw:end-shape="id93" draw:end-glue-point="7" svg:d="M18024 12941h-359v35h-360" svg:viewBox="0 0 720 36">
          <text:p/>
        </draw:connector>
        <draw:connector draw:style-name="gr332" draw:text-style-name="P36" draw:layer="layout" svg:x1="18.524cm" svg:y1="13.441cm" svg:x2="2.337cm" svg:y2="10.527cm" draw:start-shape="id91" draw:start-glue-point="6" draw:end-shape="id85" draw:end-glue-point="6" svg:d="M18524 13441v539h-16187v-3453" svg:viewBox="0 0 16188 3454">
          <text:p/>
        </draw:connector>
        <draw:frame draw:style-name="gr333" draw:text-style-name="P48" draw:layer="layout" svg:width="1.197cm" svg:height="0.668cm" svg:x="2.191cm" svg:y="13.312cm">
          <draw:text-box>
            <text:p text:style-name="P26"><text:span text:style-name="T29">[vero]</text:span></text:p>
          </draw:text-box>
        </draw:frame>
        <draw:frame draw:style-name="gr334" draw:text-style-name="P48" draw:layer="layout" svg:width="1.245cm" svg:height="0.601cm" svg:x="2.75cm" svg:y="9.926cm">
          <draw:text-box>
            <text:p text:style-name="P26"><text:span text:style-name="T29">[falso]</text:span></text:p>
          </draw:text-box>
        </draw:frame>
        <draw:custom-shape draw:style-name="gr335" draw:text-style-name="P45" xml:id="id95" draw:id="id95" draw:layer="layout" svg:width="4.447cm" svg:height="1.073cm" draw:transform="skewX (0.00645771823237902) translate (8.036cm 9.454cm)">
          <draw:glue-point draw:id="4" svg:x="1.685cm" svg:y="-4.994cm"/>
          <draw:glue-point draw:id="5" svg:x="-1.622cm" svg:y="-4.994cm"/>
          <draw:glue-point draw:id="6" svg:x="-3.336cm" svg:y="4.994cm"/>
          <draw:glue-point draw:id="7" svg:x="3.281cm" svg:y="4.994cm"/>
          <draw:glue-point draw:id="8" svg:x="1.624cm" svg:y="4.994cm"/>
          <draw:glue-point draw:id="9" svg:x="-1.682cm" svg:y="4.994cm"/>
          <draw:glue-point draw:id="10" svg:x="-3.278cm" svg:y="-4.994cm"/>
          <draw:glue-point draw:id="11" svg:x="3.339cm" svg:y="-4.994cm"/>
          <draw:glue-point draw:id="12" svg:x="-4.943cm" svg:y="-3.326cm"/>
          <draw:glue-point draw:id="13" svg:x="-4.987cm" svg:y="3.326cm"/>
          <draw:glue-point draw:id="14" svg:x="4.946cm" svg:y="3.326cm"/>
          <draw:glue-point draw:id="15" svg:x="4.989cm" svg:y="-3.326cm"/>
          <text:p text:style-name="P44"><text:span text:style-name="T29">nodo = map[i];</text:span></text:p>
          <text:p text:style-name="P44"><text:span text:style-name="T29">dest[caratteri_scritti] = i + 32;</text:span></text:p>
          <text:p text:style-name="P44"><text:span text:style-name="T29">caratteri_scritti++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36" draw:text-style-name="P36" draw:layer="layout" svg:x1="4.262cm" svg:y1="10.015cm" svg:x2="2.837cm" svg:y2="10.027cm" draw:start-shape="id94" draw:start-glue-point="5" draw:end-shape="id85" draw:end-glue-point="7" svg:d="M4262 10015h-712v12h-713" svg:viewBox="0 0 1426 13">
          <text:p/>
        </draw:connector>
        <draw:connector draw:style-name="gr337" draw:text-style-name="P36" draw:layer="layout" svg:x1="10.303cm" svg:y1="11.291cm" svg:x2="10.252cm" svg:y2="10.527cm" draw:start-shape="id92" draw:start-glue-point="0" draw:end-shape="id95" draw:end-glue-point="2" svg:d="M10303 11291v-382h-51v-382" svg:viewBox="0 0 52 765">
          <text:p/>
        </draw:connector>
        <draw:frame draw:style-name="gr338" draw:text-style-name="P48" draw:layer="layout" svg:width="2.558cm" svg:height="0.601cm" svg:x="2.162cm" svg:y="8.425cm">
          <draw:text-box>
            <text:p text:style-name="P26"><text:span text:style-name="T29">[map[i] == 0?]</text:span></text:p>
          </draw:text-box>
        </draw:frame>
        <draw:custom-shape draw:style-name="gr339" draw:text-style-name="P42" xml:id="id94" draw:id="id94" draw:layer="layout" svg:width="1cm" svg:height="1cm" svg:x="4.262cm" svg:y="9.5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40" draw:text-style-name="P36" draw:layer="layout" svg:x1="6.408cm" svg:y1="9.964cm" svg:x2="5.262cm" svg:y2="10.015cm" draw:start-shape="id96" draw:start-glue-point="5" draw:end-shape="id94" draw:end-glue-point="7" svg:d="M6408 9964h-572v51h-574" svg:viewBox="0 0 1147 52">
          <text:p/>
        </draw:connector>
        <draw:connector draw:style-name="gr341" draw:text-style-name="P36" draw:layer="layout" draw:line-skew="0cm -0.244cm" svg:x1="6.908cm" svg:y1="10.464cm" svg:x2="6.626cm" svg:y2="12.158cm" draw:start-shape="id96" draw:start-glue-point="6" draw:end-shape="id97" draw:end-glue-point="1" svg:d="M6908 10464v616 1078h-282" svg:viewBox="0 0 283 1695">
          <text:p/>
        </draw:connector>
        <draw:frame draw:style-name="gr342" draw:text-style-name="P48" draw:layer="layout" svg:width="1.245cm" svg:height="0.668cm" svg:x="3.549cm" svg:y="11.116cm">
          <draw:text-box>
            <text:p text:style-name="P26"><text:span text:style-name="T29">[falso]</text:span></text:p>
          </draw:text-box>
        </draw:frame>
        <draw:custom-shape draw:style-name="gr343" draw:text-style-name="P45" xml:id="id97" draw:id="id97" draw:layer="layout" svg:width="3.799cm" svg:height="0.949cm" draw:transform="skewX (0.00628318530717959) translate (2.827cm 11.684cm)">
          <draw:glue-point draw:id="4" svg:x="1.685cm" svg:y="-4.994cm"/>
          <draw:glue-point draw:id="5" svg:x="-1.622cm" svg:y="-4.994cm"/>
          <draw:glue-point draw:id="6" svg:x="-3.336cm" svg:y="4.994cm"/>
          <draw:glue-point draw:id="7" svg:x="3.281cm" svg:y="4.994cm"/>
          <draw:glue-point draw:id="8" svg:x="1.624cm" svg:y="4.994cm"/>
          <draw:glue-point draw:id="9" svg:x="-1.682cm" svg:y="4.994cm"/>
          <draw:glue-point draw:id="10" svg:x="-3.278cm" svg:y="-4.994cm"/>
          <draw:glue-point draw:id="11" svg:x="3.339cm" svg:y="-4.994cm"/>
          <draw:glue-point draw:id="12" svg:x="-4.943cm" svg:y="-3.326cm"/>
          <draw:glue-point draw:id="13" svg:x="-4.987cm" svg:y="3.326cm"/>
          <draw:glue-point draw:id="14" svg:x="4.946cm" svg:y="3.326cm"/>
          <draw:glue-point draw:id="15" svg:x="4.989cm" svg:y="-3.326cm"/>
          <text:p text:style-name="P44"><text:span text:style-name="T29">dest[caratteri_scritti] = ' ';</text:span></text:p>
          <text:p text:style-name="P44"><text:span text:style-name="T29">caratteri_scritti++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44" draw:text-style-name="P36" draw:layer="layout" svg:x1="4.726cm" svg:y1="11.684cm" svg:x2="4.762cm" svg:y2="10.515cm" draw:start-shape="id97" draw:start-glue-point="0" draw:end-shape="id94" draw:end-glue-point="6" svg:d="M4726 11684v-579h36v-590" svg:viewBox="0 0 37 1170">
          <text:p/>
        </draw:connector>
        <draw:frame draw:style-name="gr345" draw:text-style-name="P48" draw:layer="layout" svg:width="1.245cm" svg:height="0.601cm" svg:x="5.533cm" svg:y="8.956cm">
          <draw:text-box>
            <text:p text:style-name="P26"><text:span text:style-name="T29">[vero]</text:span></text:p>
          </draw:text-box>
        </draw:frame>
        <draw:frame draw:style-name="gr346" draw:text-style-name="P48" draw:layer="layout" svg:width="2.487cm" svg:height="0.545cm" svg:x="3.088cm" svg:y="9.112cm">
          <draw:text-box>
            <text:p text:style-name="P26"><text:span text:style-name="T29">[c..scritti == 0?]</text:span></text:p>
          </draw:text-box>
        </draw:frame>
        <draw:custom-shape draw:style-name="gr347" draw:text-style-name="P42" xml:id="id96" draw:id="id96" draw:layer="layout" svg:width="1cm" svg:height="1cm" svg:x="6.408cm" svg:y="9.4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48" draw:text-style-name="P36" draw:layer="layout" svg:x1="8.029cm" svg:y1="9.99cm" svg:x2="7.408cm" svg:y2="9.964cm" draw:start-shape="id95" draw:start-glue-point="3" draw:end-shape="id96" draw:end-glue-point="7" svg:d="M8029 9990h-304v-26h-317" svg:viewBox="0 0 622 27">
          <text:p/>
        </draw:connector>
        <draw:custom-shape draw:style-name="gr349" draw:text-style-name="P42" xml:id="id93" draw:id="id93" draw:layer="layout" svg:width="1cm" svg:height="1cm" svg:x="16.305cm" svg:y="12.4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0" draw:text-style-name="P45" xml:id="id92" draw:id="id92" draw:layer="layout" svg:width="4.935cm" svg:height="1.817cm" draw:transform="skewX (0.00663225115757845) translate (7.836cm 11.291cm)">
          <draw:glue-point draw:id="4" svg:x="1.685cm" svg:y="-4.994cm"/>
          <draw:glue-point draw:id="5" svg:x="-1.622cm" svg:y="-4.994cm"/>
          <draw:glue-point draw:id="6" svg:x="-3.336cm" svg:y="4.994cm"/>
          <draw:glue-point draw:id="7" svg:x="3.281cm" svg:y="4.994cm"/>
          <draw:glue-point draw:id="8" svg:x="1.624cm" svg:y="4.994cm"/>
          <draw:glue-point draw:id="9" svg:x="-1.682cm" svg:y="4.994cm"/>
          <draw:glue-point draw:id="10" svg:x="-3.278cm" svg:y="-4.994cm"/>
          <draw:glue-point draw:id="11" svg:x="3.339cm" svg:y="-4.994cm"/>
          <draw:glue-point draw:id="12" svg:x="-4.943cm" svg:y="-3.326cm"/>
          <draw:glue-point draw:id="13" svg:x="-4.987cm" svg:y="3.326cm"/>
          <draw:glue-point draw:id="14" svg:x="4.946cm" svg:y="3.326cm"/>
          <draw:glue-point draw:id="15" svg:x="4.989cm" svg:y="-3.326cm"/>
          <text:p text:style-name="P44"><text:span text:style-name="T29">numstr = "-" + uitoa(nodo.val+1)*;</text:span><text:span text:style-name="T29"><text:line-break/></text:span><text:span text:style-name="T29">caratteri_scritti += </text:span><text:span text:style-name="T29"><text:line-break/></text:span><text:span text:style-name="T29">strlncpy(numstr, dest + c..scritti, dest_len – c..scritti)**;</text:span></text:p>
          <text:p text:style-name="P44"><text:span text:style-name="T29">nodo = nodo.prossimo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51" draw:text-style-name="P36" draw:layer="layout" draw:line-skew="-0.539cm" svg:x1="16.805cm" svg:y1="13.476cm" svg:x2="10.291cm" svg:y2="13.108cm" draw:start-shape="id93" draw:start-glue-point="6" draw:end-shape="id92" draw:end-glue-point="2" svg:d="M16805 13476h-6514v-368" svg:viewBox="0 0 6515 369">
          <text:p/>
        </draw:connector>
        <draw:frame draw:style-name="gr352" draw:text-style-name="P48" draw:layer="layout" svg:width="2.535cm" svg:height="0.601cm" svg:x="13.975cm" svg:y="12.65cm">
          <draw:text-box>
            <text:p text:style-name="P26"><text:span text:style-name="T29">[while nodo != 0]</text:span></text:p>
          </draw:text-box>
        </draw:frame>
        <draw:custom-shape draw:style-name="gr353" draw:text-style-name="P45" xml:id="id87" draw:id="id87" draw:layer="layout" svg:width="3.799cm" svg:height="0.949cm" draw:transform="skewX (0.00628318530717959) translate (9.028cm 15.685cm)">
          <draw:glue-point draw:id="4" svg:x="1.685cm" svg:y="-4.994cm"/>
          <draw:glue-point draw:id="5" svg:x="-1.622cm" svg:y="-4.994cm"/>
          <draw:glue-point draw:id="6" svg:x="-3.336cm" svg:y="4.994cm"/>
          <draw:glue-point draw:id="7" svg:x="3.281cm" svg:y="4.994cm"/>
          <draw:glue-point draw:id="8" svg:x="1.624cm" svg:y="4.994cm"/>
          <draw:glue-point draw:id="9" svg:x="-1.682cm" svg:y="4.994cm"/>
          <draw:glue-point draw:id="10" svg:x="-3.278cm" svg:y="-4.994cm"/>
          <draw:glue-point draw:id="11" svg:x="3.339cm" svg:y="-4.994cm"/>
          <draw:glue-point draw:id="12" svg:x="-4.943cm" svg:y="-3.326cm"/>
          <draw:glue-point draw:id="13" svg:x="-4.987cm" svg:y="3.326cm"/>
          <draw:glue-point draw:id="14" svg:x="4.946cm" svg:y="3.326cm"/>
          <draw:glue-point draw:id="15" svg:x="4.989cm" svg:y="-3.326cm"/>
          <text:p text:style-name="P44"><text:span text:style-name="T29">dest[caratteri_scritti] = 0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54" draw:text-style-name="P36" draw:layer="layout" svg:x1="13.751cm" svg:y1="16.176cm" svg:x2="12.827cm" svg:y2="16.159cm" draw:start-shape="id89" draw:start-glue-point="3" draw:end-shape="id87" draw:end-glue-point="1" svg:d="M13751 16176h-463v-17h-461" svg:viewBox="0 0 925 18">
          <text:p/>
        </draw:connector>
        <draw:frame draw:style-name="gr355" draw:text-style-name="P50" draw:layer="layout" svg:width="17.084cm" svg:height="1.612cm" svg:x="1.675cm" svg:y="16.59cm">
          <draw:text-box>
            <text:p>Procedure ispirate dalla libreria standard di c:</text:p>
            <text:p>*: uitoa(uint n) “unsigned int to ascii” calcola la stringa equivalente al numero passato in input<text:line-break/>**:strlncpy(char [] src, char [] dest, int dest_size): copia al massimo n – 1 caratteri da una stringa all’altra, null-termina la stringa e ritorna la lunghezza della stringa copiata</text:p>
          </draw:text-box>
        </draw:frame>
        <draw:frame draw:name="occurrence_decypher" draw:style-name="gr45" draw:text-style-name="P31" draw:layer="layout" svg:width="8.415cm" svg:height="0.543cm" svg:x="1.404cm" svg:y="18.225cm">
          <draw:text-box>
            <text:p text:style-name="P1"><text:span text:style-name="T25">occurrence_decypher:</text:span></text:p>
          </draw:text-box>
        </draw:frame>
        <draw:frame draw:style-name="gr356" draw:text-style-name="P83" draw:layer="layout" svg:width="18.237cm" svg:height="1.973cm" svg:x="1.536cm" svg:y="18.822cm">
          <draw:text-box>
            <text:p text:style-name="P76"><text:span text:style-name="T61">Un po’ pi</text:span><text:span text:style-name="T100">ù</text:span><text:span text:style-name="T101"> semplice della procedura associata, </text:span><text:span text:style-name="T102">occurrence_decypher</text:span><text:span text:style-name="T103"> calcola la grandezza della stringa decifrata chiamando </text:span><text:span text:style-name="T102">occurrence_plain_text_size</text:span><text:span text:style-name="T103"> per poi allocare spazio per la stringa decifrata e comporla con </text:span><text:span text:style-name="T102">occurrence_construct_plain_text</text:span><text:span text:style-name="T104">, il risultato viene ritornato.</text:span></text:p>
          </draw:text-box>
        </draw:frame>
        <draw:frame draw:style-name="gr357" draw:text-style-name="P50" draw:layer="layout" svg:width="16.392cm" svg:height="3.655cm" svg:x="1.548cm" svg:y="20.671cm">
          <draw:text-box>
            <text:p><text:span text:style-name="T105">(char [], int) occurrence_decypher(char [] src, int src_len) <text:s text:c="22"/>← </text:span>Pseudocodice</text:p>
            <text:p>{</text:p>
            <text:p><text:tab/>int dest_len = occurrence_plaintext_size(src, src_len);</text:p>
            <text:p><text:tab/>char [] dest = malloc(dest_len + 1);</text:p>
            <text:p><text:tab/>return (occurrence_construct_plain_text(src, dest), dest_len);</text:p>
            <text:p>}<text:line-break/></text:p>
          </draw:text-box>
        </draw:frame>
        <draw:frame draw:name="occurrence_decypher 1" draw:style-name="gr45" draw:text-style-name="P31" draw:layer="layout" svg:width="8.415cm" svg:height="0.543cm" svg:x="1.405cm" svg:y="23.426cm">
          <draw:text-box>
            <text:p text:style-name="P1"><text:span text:style-name="T25">occurrence_plain_text_size:</text:span></text:p>
          </draw:text-box>
        </draw:frame>
        <draw:frame draw:style-name="gr358" draw:text-style-name="P83" draw:layer="layout" svg:width="18.237cm" svg:height="1.119cm" svg:x="1.536cm" svg:y="24.123cm">
          <draw:text-box>
            <text:p text:style-name="P76"><text:span text:style-name="T106">Per calcolare la dimensione della stringa decifrata, si cerca il numero maggiore sulla stringa cirata</text:span></text:p>
          </draw:text-box>
        </draw:frame>
        <draw:frame draw:style-name="gr357" draw:text-style-name="P50" draw:layer="layout" svg:width="16.392cm" svg:height="3.655cm" svg:x="2.036cm" svg:y="24.842cm">
          <draw:text-box>
            <text:p text:style-name="P84"><text:span text:style-name="T105">int occurrence_plain_text_size(char [] src, int src_len) <text:s text:c="22"/>← </text:span>Pseudocodice</text:p>
            <text:p><text:span text:style-name="T105">{</text:span></text:p>
            <text:p><text:tab/>int max_num = 0;</text:p>
            <text:p><text:tab/>for (int i = 2; i &lt; src_len; i += strchr(src + i, ‘-’)* + 1)</text:p>
            <text:p><text:tab/><text:tab/>max_num = max(max_num, atoui(i)**);</text:p>
            <text:p><text:tab/>return (max_num);</text:p>
            <text:p>}<text:line-break/></text:p>
          </draw:text-box>
        </draw:frame>
        <draw:frame draw:style-name="gr355" draw:text-style-name="P50" draw:layer="layout" svg:width="17.084cm" svg:height="1.612cm" svg:x="3.075cm" svg:y="27.79cm">
          <draw:text-box>
            <text:p text:style-name="P84"><text:span text:style-name="T105">*:strchr(char [] str, char c) cerca la prima occorrenza del carattere nella stringa e ritorna il suo indice </text:span></text:p>
            <text:p><text:span text:style-name="T105">**: atoui(char [] str) “ascii to </text:span>unsigned int” calcola l’intero equivalente alla stringa passata in input<text:line-break/></text:p>
          </draw:text-box>
        </draw:frame>
      </draw:page>
      <draw:page draw:name="page10" draw:style-name="dp1" draw:master-page-name="master-page79">
        <draw:frame draw:name="occurrencce_construct_plain_text" draw:style-name="gr45" draw:text-style-name="P31" draw:layer="layout" svg:width="8.415cm" svg:height="0.543cm" svg:x="1.404cm" svg:y="2.826cm">
          <draw:text-box>
            <text:p text:style-name="P73"><text:span text:style-name="T54">occurrence_construct_plain_text:</text:span></text:p>
          </draw:text-box>
        </draw:frame>
        <draw:frame draw:style-name="gr15" draw:text-style-name="P15" draw:layer="layout" svg:width="0.943cm" svg:height="0.642cm" svg:x="1.478cm" svg:y="28.055cm">
          <draw:text-box>
            <text:p text:style-name="P1"><text:span text:style-name="T16">10</text:span></text:p>
          </draw:text-box>
        </draw:frame>
        <draw:frame draw:style-name="gr44" draw:text-style-name="P8" draw:layer="layout" svg:width="5.771cm" svg:height="0.543cm" svg:x="1.403cm" svg:y="2.028cm">
          <draw:text-box>
            <text:p text:style-name="P1"><text:span text:style-name="T7">Procedure notevoli: </text:span></text:p>
          </draw:text-box>
        </draw:frame>
        <draw:g draw:style-name="gr48" xml:id="id99" draw:id="id99">
          <draw:path draw:style-name="gr359" draw:text-style-name="P34" draw:layer="layout" svg:width="0.5cm" svg:height="0.5cm" svg:x="2.3cm" svg:y="5.602cm" svg:viewBox="0 0 501 501" svg:d="M501 251c0 43-12 87-34 125s-53 69-91 91-82 34-125 34c-44 0-88-12-126-34s-69-53-91-91-34-82-34-125c0-44 12-88 34-126s53-69 91-91 82-34 126-34c43 0 87 12 125 34s69 53 91 91 34 82 34 126z">
            <text:p/>
          </draw:path>
          <draw:custom-shape draw:style-name="gr360" draw:text-style-name="P35" draw:layer="layout" svg:width="0.25cm" svg:height="0.25cm" svg:x="2.425cm" svg:y="5.727cm">
            <text:p/>
            <draw:enhanced-geometry svg:viewBox="0 0 21600 21600" draw:type="rectangle" draw:enhanced-path="M 0 0 L 21600 0 21600 21600 0 21600 0 0 Z N"/>
          </draw:custom-shape>
        </draw:g>
        <draw:connector draw:style-name="gr361" draw:text-style-name="P59" draw:layer="layout" svg:x1="4.044cm" svg:y1="5.838cm" svg:x2="2.801cm" svg:y2="5.852cm" draw:start-shape="id98" draw:start-glue-point="3" draw:end-shape="id99" draw:end-glue-point="1" svg:d="M4044 5838h-628v14h-615" svg:viewBox="0 0 1244 15">
          <text:p/>
        </draw:connector>
        <draw:polygon draw:style-name="gr362" draw:text-style-name="P60" xml:id="id98" draw:id="id98" draw:layer="layout" svg:width="2.567cm" svg:height="1.422cm" svg:x="4.044cm" svg:y="5.127cm" svg:viewBox="0 0 2568 1423" draw:points="0,0 1604,0 1926,0 2567,0 2567,711 2568,712 2567,712 2567,1422 1926,1422 1926,1423 0,1423 642,712">
          <text:p text:style-name="P54"><text:span text:style-name="T29">In: src, </text:span></text:p>
          <text:p text:style-name="P54"><text:span text:style-name="T107">dest_len</text:span></text:p>
        </draw:polygon>
        <draw:custom-shape draw:style-name="gr363" draw:text-style-name="P45" xml:id="id100" draw:id="id100" draw:layer="layout" svg:width="5.062cm" svg:height="1.641cm" draw:transform="skewX (0.00628318530717959) translate (8.433cm 5.037cm)">
          <draw:glue-point draw:id="4" svg:x="1.685cm" svg:y="-4.994cm"/>
          <draw:glue-point draw:id="5" svg:x="-1.622cm" svg:y="-4.994cm"/>
          <draw:glue-point draw:id="6" svg:x="-3.336cm" svg:y="4.994cm"/>
          <draw:glue-point draw:id="7" svg:x="3.281cm" svg:y="4.994cm"/>
          <draw:glue-point draw:id="8" svg:x="1.624cm" svg:y="4.994cm"/>
          <draw:glue-point draw:id="9" svg:x="-1.682cm" svg:y="4.994cm"/>
          <draw:glue-point draw:id="10" svg:x="-3.278cm" svg:y="-4.994cm"/>
          <draw:glue-point draw:id="11" svg:x="3.339cm" svg:y="-4.994cm"/>
          <draw:glue-point draw:id="12" svg:x="-4.943cm" svg:y="-3.326cm"/>
          <draw:glue-point draw:id="13" svg:x="-4.987cm" svg:y="3.326cm"/>
          <draw:glue-point draw:id="14" svg:x="4.946cm" svg:y="3.326cm"/>
          <draw:glue-point draw:id="15" svg:x="4.989cm" svg:y="-3.326cm"/>
          <text:p text:style-name="P44"><text:span text:style-name="T29">i = 0;</text:span></text:p>
          <text:p text:style-name="P44"><text:span text:style-name="T29">dest = malloc(dest_len + 1);</text:span></text:p>
          <text:p text:style-name="P44"><text:span text:style-name="T29">next_space = strchr(src + 1, ' ') + 1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64" draw:text-style-name="P36" draw:layer="layout" svg:x1="8.423cm" svg:y1="5.857cm" svg:x2="6.612cm" svg:y2="5.838cm" draw:start-shape="id100" draw:start-glue-point="3" draw:end-shape="id98" draw:end-glue-point="1" svg:d="M8423 5857h-904v-19h-907" svg:viewBox="0 0 1812 20">
          <text:p/>
        </draw:connector>
        <draw:custom-shape draw:style-name="gr365" draw:text-style-name="P42" xml:id="id101" draw:id="id101" draw:layer="layout" svg:width="1cm" svg:height="1cm" svg:x="10.438cm" svg:y="8.2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draw:style-name="gr19">
          <draw:custom-shape draw:style-name="gr366" draw:text-style-name="P40" draw:layer="layout" svg:width="17.66cm" svg:height="7.22cm" svg:x="1.677cm" svg:y="7.095cm">
            <draw:glue-point draw:id="4" svg:x="3cm" svg:y="-5cm"/>
            <draw:glue-point draw:id="5" svg:x="-3cm" svg:y="-5cm"/>
            <draw:glue-point draw:id="6" svg:x="-3cm" svg:y="5cm"/>
            <draw:glue-point draw:id="7" svg:x="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7" draw:text-style-name="P61" draw:layer="layout" svg:width="5.456cm" svg:height="0.614cm" svg:x="1.677cm" svg:y="7.095cm">
            <text:p text:style-name="P44"><text:span text:style-name="T29">occurrence_construct_plain_text_loop</text:span></text:p>
            <draw:enhanced-geometry svg:viewBox="0 0 21600 21600" draw:mirror-horizontal="false" draw:mirror-vertical="false" draw:type="non-primitve" draw:enhanced-path="M 0 0 L 21600 0 19000 21600 0 21600 0 0 Z N"/>
          </draw:custom-shape>
        </draw:g>
        <draw:connector draw:style-name="gr368" draw:text-style-name="P36" draw:layer="layout" svg:x1="10.938cm" svg:y1="8.228cm" svg:x2="10.954cm" svg:y2="6.678cm" draw:start-shape="id101" draw:start-glue-point="4" draw:end-shape="id100" draw:end-glue-point="2" svg:d="M10938 8228v-780h16v-770" svg:viewBox="0 0 17 1551">
          <text:p/>
        </draw:connector>
        <draw:custom-shape draw:style-name="gr369" draw:text-style-name="P42" xml:id="id103" draw:id="id103" draw:layer="layout" svg:width="1cm" svg:height="1cm" svg:x="10.438cm" svg:y="13.4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70" draw:text-style-name="P86" draw:layer="layout" svg:width="1.245cm" svg:height="0.601cm" svg:x="11.216cm" svg:y="7.978cm">
          <draw:text-box>
            <text:p text:style-name="P85"><text:span text:style-name="T108">[falso]</text:span></text:p>
          </draw:text-box>
        </draw:frame>
        <draw:connector draw:style-name="gr371" draw:text-style-name="P36" draw:layer="layout" svg:x1="5.342cm" svg:y1="8.682cm" svg:x2="10.438cm" svg:y2="8.728cm" draw:start-shape="id102" draw:start-glue-point="1" draw:end-shape="id101" draw:end-glue-point="5" svg:d="M5342 8682h2542v46h2554" svg:viewBox="0 0 5097 47">
          <text:p/>
        </draw:connector>
        <draw:frame draw:style-name="gr372" draw:text-style-name="P48" draw:layer="layout" svg:width="3.363cm" svg:height="0.601cm" svg:x="7.671cm" svg:y="7.095cm">
          <draw:text-box>
            <text:p text:style-name="P26"><text:span text:style-name="T29">[src[next_group] != ‘\0’]</text:span></text:p>
          </draw:text-box>
        </draw:frame>
        <draw:frame draw:style-name="gr373" draw:text-style-name="P48" draw:layer="layout" svg:width="1.197cm" svg:height="0.668cm" svg:x="9.367cm" svg:y="7.928cm">
          <draw:text-box>
            <text:p text:style-name="P26"><text:span text:style-name="T29">[vero]</text:span></text:p>
          </draw:text-box>
        </draw:frame>
        <draw:connector draw:style-name="gr374" draw:text-style-name="P36" draw:layer="layout" draw:line-skew="6.943cm" svg:x1="11.438cm" svg:y1="13.928cm" svg:x2="11.438cm" svg:y2="8.728cm" draw:start-shape="id103" draw:start-glue-point="7" draw:end-shape="id101" draw:end-glue-point="7" svg:d="M11438 13928h7482v-5200h-7482" svg:viewBox="0 0 7483 5201">
          <text:p/>
        </draw:connector>
        <draw:connector draw:style-name="gr375" draw:text-style-name="P36" draw:layer="layout" svg:x1="10.928cm" svg:y1="14.986cm" svg:x2="10.938cm" svg:y2="14.428cm" draw:start-shape="id104" draw:start-glue-point="0" draw:end-shape="id103" draw:end-glue-point="6" svg:d="M10928 14986v-273h10v-285" svg:viewBox="0 0 11 559">
          <text:p/>
        </draw:connector>
        <draw:frame draw:style-name="gr376" draw:text-style-name="P48" draw:layer="layout" svg:width="1.715cm" svg:height="0.601cm" svg:x="8.837cm" svg:y="13.586cm">
          <draw:text-box>
            <text:p text:style-name="P26"><text:span text:style-name="T29">[end loop]</text:span></text:p>
          </draw:text-box>
        </draw:frame>
        <draw:custom-shape draw:style-name="gr377" draw:text-style-name="P45" xml:id="id106" draw:id="id106" draw:layer="layout" svg:width="2.757cm" svg:height="0.974cm" svg:x="13.952cm" svg:y="14.99cm">
          <text:p text:style-name="P44"><text:span text:style-name="T29">Out: dest</text:span></text:p>
          <draw:enhanced-geometry svg:viewBox="0 0 21600 21600" draw:text-areas="0 0 21600 21600" draw:type="pentagon-right" draw:modifiers="14755.0398839739" draw:enhanced-path="M 0 0 L ?f0 0 21600 10800 ?f0 21600 0 21600 Z N">
            <draw:equation draw:name="f0" draw:formula="$0 "/>
            <draw:handle draw:handle-range-x-minimum="0" draw:handle-range-x-maximum="21600" draw:handle-position="$0 top" draw:handle-position-x="$0" draw:handle-position-y="top"/>
          </draw:enhanced-geometry>
        </draw:custom-shape>
        <draw:g draw:style-name="gr78" xml:id="id105" draw:id="id105">
          <draw:path draw:style-name="gr378" draw:text-style-name="P49" draw:layer="layout" svg:width="0.5cm" svg:height="0.5cm" svg:x="17.5cm" svg:y="15.249cm" svg:viewBox="0 0 501 501" svg:d="M501 251c0 43-12 87-34 125s-53 69-91 91-82 34-125 34c-44 0-88-12-126-34s-69-53-91-91-34-82-34-125c0-44 12-88 34-126s53-69 91-91 82-34 126-34c43 0 87 12 125 34s69 53 91 91 34 82 34 126z">
            <text:p/>
          </draw:path>
          <draw:path draw:style-name="gr379" draw:text-style-name="P34" draw:layer="layout" svg:width="0.2cm" svg:height="0.2cm" svg:x="17.65cm" svg:y="15.399cm" svg:viewBox="0 0 201 201" svg:d="M201 101c0 17-5 34-13 50-9 15-22 28-37 37-16 8-33 13-50 13-18 0-35-5-51-13-15-9-28-22-37-37-8-16-13-33-13-50 0-18 5-35 13-51 9-15 22-28 37-37 16-8 33-13 51-13 17 0 34 5 50 13 15 9 28 22 37 37 8 16 13 33 13 51z">
            <text:p/>
          </draw:path>
        </draw:g>
        <draw:connector draw:style-name="gr380" draw:text-style-name="P36" draw:layer="layout" svg:x1="17.5cm" svg:y1="15.499cm" svg:x2="16.709cm" svg:y2="15.477cm" draw:start-shape="id105" draw:start-glue-point="3" draw:end-shape="id106" draw:end-glue-point="1" svg:d="M17500 15499h-395v-22h-396" svg:viewBox="0 0 792 23">
          <text:p/>
        </draw:connector>
        <draw:custom-shape draw:style-name="gr381" draw:text-style-name="P45" xml:id="id107" draw:id="id107" draw:layer="layout" svg:width="4.172cm" svg:height="1.379cm" draw:transform="skewX (0.00645771823237902) translate (14.421cm 9.941cm)">
          <draw:glue-point draw:id="4" svg:x="1.685cm" svg:y="-4.994cm"/>
          <draw:glue-point draw:id="5" svg:x="-1.622cm" svg:y="-4.994cm"/>
          <draw:glue-point draw:id="6" svg:x="-3.336cm" svg:y="4.994cm"/>
          <draw:glue-point draw:id="7" svg:x="3.281cm" svg:y="4.994cm"/>
          <draw:glue-point draw:id="8" svg:x="1.624cm" svg:y="4.994cm"/>
          <draw:glue-point draw:id="9" svg:x="-1.682cm" svg:y="4.994cm"/>
          <draw:glue-point draw:id="10" svg:x="-3.278cm" svg:y="-4.994cm"/>
          <draw:glue-point draw:id="11" svg:x="3.339cm" svg:y="-4.994cm"/>
          <draw:glue-point draw:id="12" svg:x="-4.943cm" svg:y="-3.326cm"/>
          <draw:glue-point draw:id="13" svg:x="-4.987cm" svg:y="3.326cm"/>
          <draw:glue-point draw:id="14" svg:x="4.946cm" svg:y="3.326cm"/>
          <draw:glue-point draw:id="15" svg:x="4.989cm" svg:y="-3.326cm"/>
          <text:p text:style-name="P44"><text:span text:style-name="T29">src += next_space + 1;</text:span></text:p>
          <text:p text:style-name="P44"><text:span text:style-name="T29">next_space = strchr(src, ' '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82" draw:text-style-name="P36" draw:layer="layout" draw:line-skew="-0.382cm" svg:x1="10.938cm" svg:y1="9.228cm" svg:x2="16.507cm" svg:y2="9.941cm" draw:start-shape="id101" draw:start-glue-point="6" draw:end-shape="id107" draw:end-glue-point="0" svg:d="M10938 9228v157h1994v28h3575v528" svg:viewBox="0 0 5570 714">
          <text:p/>
        </draw:connector>
        <draw:connector draw:style-name="gr383" draw:text-style-name="P36" draw:layer="layout" svg:x1="4.85cm" svg:y1="11.947cm" svg:x2="4.005cm" svg:y2="9.283cm" draw:start-shape="id108" draw:start-glue-point="5" draw:end-shape="id102" draw:end-glue-point="2" svg:d="M4850 11947h-845v-2664" svg:viewBox="0 0 846 2665">
          <text:p/>
        </draw:connector>
        <draw:connector draw:style-name="gr384" draw:text-style-name="P36" draw:layer="layout" svg:x1="16.498cm" svg:y1="11.32cm" svg:x2="13.424cm" svg:y2="13.156cm" draw:start-shape="id107" draw:start-glue-point="2" draw:end-shape="id109" draw:end-glue-point="7" svg:d="M16498 11320v1836h-3074" svg:viewBox="0 0 3075 1837">
          <text:p/>
        </draw:connector>
        <draw:frame draw:style-name="gr385" draw:text-style-name="P48" draw:layer="layout" svg:width="1.245cm" svg:height="0.668cm" svg:x="5.25cm" svg:y="12.517cm">
          <draw:text-box>
            <text:p text:style-name="P26"><text:span text:style-name="T29">[falso]</text:span></text:p>
          </draw:text-box>
        </draw:frame>
        <draw:custom-shape draw:style-name="gr386" draw:text-style-name="P45" xml:id="id102" draw:id="id102" draw:layer="layout" svg:width="2.657cm" svg:height="1.202cm" draw:transform="skewX (0.00628318530717959) translate (2.685cm 8.081cm)">
          <draw:glue-point draw:id="4" svg:x="1.685cm" svg:y="-4.994cm"/>
          <draw:glue-point draw:id="5" svg:x="-1.622cm" svg:y="-4.994cm"/>
          <draw:glue-point draw:id="6" svg:x="-3.336cm" svg:y="4.994cm"/>
          <draw:glue-point draw:id="7" svg:x="3.281cm" svg:y="4.994cm"/>
          <draw:glue-point draw:id="8" svg:x="1.624cm" svg:y="4.994cm"/>
          <draw:glue-point draw:id="9" svg:x="-1.682cm" svg:y="4.994cm"/>
          <draw:glue-point draw:id="10" svg:x="-3.278cm" svg:y="-4.994cm"/>
          <draw:glue-point draw:id="11" svg:x="3.339cm" svg:y="-4.994cm"/>
          <draw:glue-point draw:id="12" svg:x="-4.943cm" svg:y="-3.326cm"/>
          <draw:glue-point draw:id="13" svg:x="-4.987cm" svg:y="3.326cm"/>
          <draw:glue-point draw:id="14" svg:x="4.946cm" svg:y="3.326cm"/>
          <draw:glue-point draw:id="15" svg:x="4.989cm" svg:y="-3.326cm"/>
          <text:p text:style-name="P44"><text:span text:style-name="T29">c = src[0];</text:span></text:p>
          <text:p text:style-name="P44"><text:span text:style-name="T29">next_num = 2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87" draw:text-style-name="P36" draw:layer="layout" svg:x1="6.808cm" svg:y1="11.964cm" svg:x2="5.85cm" svg:y2="11.947cm" draw:start-shape="id110" draw:start-glue-point="3" draw:end-shape="id108" draw:end-glue-point="7" svg:d="M6808 11964h-472v-17h-486" svg:viewBox="0 0 959 18">
          <text:p/>
        </draw:connector>
        <draw:frame draw:style-name="gr388" draw:text-style-name="P48" draw:layer="layout" svg:width="1.245cm" svg:height="0.601cm" svg:x="5.55cm" svg:y="10.618cm">
          <draw:text-box>
            <text:p text:style-name="P26"><text:span text:style-name="T29">[vero]</text:span></text:p>
          </draw:text-box>
        </draw:frame>
        <draw:frame draw:style-name="gr389" draw:text-style-name="P48" draw:layer="layout" svg:width="2.487cm" svg:height="0.545cm" svg:x="2.628cm" svg:y="12.122cm">
          <draw:text-box>
            <text:p text:style-name="P26"><text:span text:style-name="T29">[next_num &lt;</text:span><text:span text:style-name="T29"><text:line-break/></text:span><text:span text:style-name="T29"> next_space?]</text:span></text:p>
          </draw:text-box>
        </draw:frame>
        <draw:custom-shape draw:style-name="gr390" draw:text-style-name="P45" xml:id="id104" draw:id="id104" draw:layer="layout" svg:width="3.799cm" svg:height="0.949cm" draw:transform="skewX (0.00628318530717959) translate (9.029cm 14.986cm)">
          <draw:glue-point draw:id="4" svg:x="1.685cm" svg:y="-4.994cm"/>
          <draw:glue-point draw:id="5" svg:x="-1.622cm" svg:y="-4.994cm"/>
          <draw:glue-point draw:id="6" svg:x="-3.336cm" svg:y="4.994cm"/>
          <draw:glue-point draw:id="7" svg:x="3.281cm" svg:y="4.994cm"/>
          <draw:glue-point draw:id="8" svg:x="1.624cm" svg:y="4.994cm"/>
          <draw:glue-point draw:id="9" svg:x="-1.682cm" svg:y="4.994cm"/>
          <draw:glue-point draw:id="10" svg:x="-3.278cm" svg:y="-4.994cm"/>
          <draw:glue-point draw:id="11" svg:x="3.339cm" svg:y="-4.994cm"/>
          <draw:glue-point draw:id="12" svg:x="-4.943cm" svg:y="-3.326cm"/>
          <draw:glue-point draw:id="13" svg:x="-4.987cm" svg:y="3.326cm"/>
          <draw:glue-point draw:id="14" svg:x="4.946cm" svg:y="3.326cm"/>
          <draw:glue-point draw:id="15" svg:x="4.989cm" svg:y="-3.326cm"/>
          <text:p text:style-name="P44"><text:span text:style-name="T29">dest[dest_len] = 0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91" draw:text-style-name="P36" draw:layer="layout" svg:x1="13.952cm" svg:y1="15.477cm" svg:x2="12.828cm" svg:y2="15.46cm" draw:start-shape="id106" draw:start-glue-point="3" draw:end-shape="id104" draw:end-glue-point="1" svg:d="M13952 15477h-563v-17h-561" svg:viewBox="0 0 1125 18">
          <text:p/>
        </draw:connector>
        <draw:custom-shape draw:style-name="gr392" draw:text-style-name="P42" xml:id="id109" draw:id="id109" draw:layer="layout" svg:width="1cm" svg:height="1cm" svg:x="12.424cm" svg:y="12.6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93" draw:text-style-name="P45" xml:id="id110" draw:id="id110" draw:layer="layout" svg:width="4.447cm" svg:height="1.126cm" draw:transform="skewX (0.00645771823237902) translate (6.815cm 11.401cm)">
          <draw:glue-point draw:id="4" svg:x="1.685cm" svg:y="-4.994cm"/>
          <draw:glue-point draw:id="5" svg:x="-1.622cm" svg:y="-4.994cm"/>
          <draw:glue-point draw:id="6" svg:x="-3.336cm" svg:y="4.994cm"/>
          <draw:glue-point draw:id="7" svg:x="3.281cm" svg:y="4.994cm"/>
          <draw:glue-point draw:id="8" svg:x="1.624cm" svg:y="4.994cm"/>
          <draw:glue-point draw:id="9" svg:x="-1.682cm" svg:y="4.994cm"/>
          <draw:glue-point draw:id="10" svg:x="-3.278cm" svg:y="-4.994cm"/>
          <draw:glue-point draw:id="11" svg:x="3.339cm" svg:y="-4.994cm"/>
          <draw:glue-point draw:id="12" svg:x="-4.943cm" svg:y="-3.326cm"/>
          <draw:glue-point draw:id="13" svg:x="-4.987cm" svg:y="3.326cm"/>
          <draw:glue-point draw:id="14" svg:x="4.946cm" svg:y="3.326cm"/>
          <draw:glue-point draw:id="15" svg:x="4.989cm" svg:y="-3.326cm"/>
          <text:p text:style-name="P44"><text:span text:style-name="T29">pos = atoui(src[next_num] - 1);</text:span><text:span text:style-name="T29"><text:line-break/></text:span><text:span text:style-name="T29">dest[pos] = c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94" draw:text-style-name="P36" draw:layer="layout" svg:x1="9.067cm" svg:y1="10.53cm" svg:x2="9.038cm" svg:y2="11.401cm" draw:start-shape="id111" draw:start-glue-point="2" draw:end-shape="id110" draw:end-glue-point="0" svg:d="M9067 10530v436h-29v435" svg:viewBox="0 0 30 872">
          <text:p/>
        </draw:connector>
        <draw:custom-shape draw:style-name="gr395" draw:text-style-name="P42" xml:id="id108" draw:id="id108" draw:layer="layout" svg:width="1cm" svg:height="1cm" svg:x="4.85cm" svg:y="11.4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96" draw:text-style-name="P45" xml:id="id111" draw:id="id111" draw:layer="layout" svg:width="3.728cm" svg:height="1.019cm" draw:transform="skewX (0.00645771823237902) translate (7.21cm 9.511cm)">
          <draw:glue-point draw:id="4" svg:x="1.685cm" svg:y="-4.994cm"/>
          <draw:glue-point draw:id="5" svg:x="-1.622cm" svg:y="-4.994cm"/>
          <draw:glue-point draw:id="6" svg:x="-3.336cm" svg:y="4.994cm"/>
          <draw:glue-point draw:id="7" svg:x="3.281cm" svg:y="4.994cm"/>
          <draw:glue-point draw:id="8" svg:x="1.624cm" svg:y="4.994cm"/>
          <draw:glue-point draw:id="9" svg:x="-1.682cm" svg:y="4.994cm"/>
          <draw:glue-point draw:id="10" svg:x="-3.278cm" svg:y="-4.994cm"/>
          <draw:glue-point draw:id="11" svg:x="3.339cm" svg:y="-4.994cm"/>
          <draw:glue-point draw:id="12" svg:x="-4.943cm" svg:y="-3.326cm"/>
          <draw:glue-point draw:id="13" svg:x="-4.987cm" svg:y="3.326cm"/>
          <draw:glue-point draw:id="14" svg:x="4.946cm" svg:y="3.326cm"/>
          <draw:glue-point draw:id="15" svg:x="4.989cm" svg:y="-3.326cm"/>
          <text:p text:style-name="P44"><text:span text:style-name="T29">next_num = strchr</text:span><text:span text:style-name="T29"><text:line-break/></text:span><text:span text:style-name="T29">(src + next_num, '-') + 1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97" draw:text-style-name="P36" draw:layer="layout" svg:x1="5.35cm" svg:y1="11.447cm" svg:x2="7.203cm" svg:y2="10.02cm" draw:start-shape="id108" draw:start-glue-point="4" draw:end-shape="id111" draw:end-glue-point="3" svg:d="M5350 11447v-1427h1853" svg:viewBox="0 0 1854 1428">
          <text:p/>
        </draw:connector>
        <draw:connector draw:style-name="gr398" draw:text-style-name="P36" draw:layer="layout" svg:x1="12.424cm" svg:y1="13.156cm" svg:x2="5.35cm" svg:y2="12.447cm" draw:start-shape="id109" draw:end-shape="id108" draw:end-glue-point="6" svg:d="M12424 13156h-7074v-709" svg:viewBox="0 0 7075 710">
          <text:p/>
        </draw:connector>
        <draw:frame draw:style-name="gr399" draw:text-style-name="P48" draw:layer="layout" svg:width="1.715cm" svg:height="0.601cm" svg:x="13.152cm" svg:y="12.555cm">
          <draw:text-box>
            <text:p text:style-name="P26"><text:span text:style-name="T29">[end loop]</text:span></text:p>
          </draw:text-box>
        </draw:frame>
        <draw:frame draw:style-name="gr400" draw:text-style-name="P87" draw:layer="layout" svg:width="18.237cm" svg:height="1.468cm" svg:x="1.538cm" svg:y="3.624cm">
          <draw:text-box>
            <text:p text:style-name="P73"><text:span text:style-name="T109">A </text:span><text:span text:style-name="T109">que</text:span><text:span text:style-name="T109">sto </text:span><text:span text:style-name="T109">pun</text:span><text:span text:style-name="T109">to </text:span><text:span text:style-name="T109">si </text:span><text:span text:style-name="T109">iter</text:span><text:span text:style-name="T109">a </text:span><text:span text:style-name="T109">sull</text:span><text:span text:style-name="T109">a </text:span><text:span text:style-name="T109">stri</text:span><text:span text:style-name="T109">nga </text:span><text:span text:style-name="T109">cifr</text:span><text:span text:style-name="T109">ata, </text:span><text:span text:style-name="T109">e </text:span><text:span text:style-name="T109">divi</text:span><text:span text:style-name="T109">den</text:span><text:span text:style-name="T109">dol</text:span><text:span text:style-name="T109">a in </text:span><text:span text:style-name="T109">por</text:span><text:span text:style-name="T109">zio</text:span><text:span text:style-name="T109">ni </text:span><text:span text:style-name="T109">div</text:span><text:span text:style-name="T109">ers</text:span><text:span text:style-name="T109">e in </text:span><text:span text:style-name="T109">bas</text:span><text:span text:style-name="T109">e </text:span><text:span text:style-name="T109">agli </text:span><text:span text:style-name="T109">spa</text:span><text:span text:style-name="T109">zi, </text:span><text:span text:style-name="T109">si </text:span><text:span text:style-name="T109">ins</text:span><text:span text:style-name="T109">eris</text:span><text:span text:style-name="T109">ce </text:span><text:span text:style-name="T109">il </text:span><text:span text:style-name="T109">car</text:span><text:span text:style-name="T109">atte</text:span><text:span text:style-name="T109">re </text:span><text:span text:style-name="T109">all’i</text:span><text:span text:style-name="T109">nizi</text:span><text:span text:style-name="T109">o in </text:span><text:span text:style-name="T109">ogn</text:span><text:span text:style-name="T109">i </text:span><text:span text:style-name="T109">pos</text:span><text:span text:style-name="T109">izio</text:span><text:span text:style-name="T109">ne </text:span><text:span text:style-name="T109">des</text:span><text:span text:style-name="T109">critt</text:span><text:span text:style-name="T109">a </text:span><text:span text:style-name="T109">da</text:span><text:span text:style-name="T109">gli </text:span><text:span text:style-name="T109">inte</text:span><text:span text:style-name="T109">ri </text:span><text:span text:style-name="T109">che </text:span><text:span text:style-name="T109">ap</text:span><text:span text:style-name="T109">pai</text:span><text:span text:style-name="T109">ono </text:span><text:span text:style-name="T109">suc</text:span><text:span text:style-name="T109">ces</text:span><text:span text:style-name="T109">siv</text:span><text:span text:style-name="T109">am</text:span><text:span text:style-name="T109">ent</text:span><text:span text:style-name="T109">e.</text:span></text:p>
          </draw:text-box>
        </draw:frame>
        <draw:frame draw:name="dictionary" draw:style-name="gr45" draw:text-style-name="P31" draw:layer="layout" svg:width="8.415cm" svg:height="0.543cm" svg:x="1.405cm" svg:y="15.727cm">
          <draw:text-box>
            <text:p text:style-name="P73"><text:span text:style-name="T54">dictionary:</text:span></text:p>
          </draw:text-box>
        </draw:frame>
        <draw:frame draw:style-name="gr400" draw:text-style-name="P87" draw:layer="layout" svg:width="18.237cm" svg:height="1.606cm" svg:x="1.539cm" svg:y="16.424cm">
          <draw:text-box>
            <text:p text:style-name="P73"><text:span text:style-name="T109">Equivale a chiamare </text:span><text:span text:style-name="T110"><text:a xlink:href="#str_map_alloc" xlink:type="simple">str_map_alloc</text:a></text:span><text:span text:style-name="T111"><text:s/>con (src, src_len, </text:span><text:span text:style-name="T110">dictionary_function</text:span><text:span text:style-name="T111">) come argomenti, la funzione viene chiamata sia in cifratura che decifrazione, in quanto equivale alla propria funzione inversa.</text:span></text:p>
          </draw:text-box>
        </draw:frame>
        <draw:frame draw:style-name="gr401" draw:text-style-name="P88" draw:layer="layout" svg:width="6.658cm" svg:height="1.789cm" svg:x="1.88cm" svg:y="18.071cm">
          <draw:image xlink:href="Pictures/10000001000001AC000000731F0ACCE0.png" xlink:type="simple" xlink:show="embed" xlink:actuate="onLoad" draw:mime-type="image/png">
            <text:p/>
          </draw:image>
        </draw:frame>
        <draw:frame draw:style-name="gr401" draw:text-style-name="P88" draw:layer="layout" svg:width="17.517cm" svg:height="1.629cm" svg:x="1.542cm" svg:y="20.155cm">
          <draw:image xlink:href="Pictures/10000001000004D400000073BC87C6F6.png" xlink:type="simple" xlink:show="embed" xlink:actuate="onLoad" draw:mime-type="image/png">
            <text:p/>
          </draw:image>
        </draw:frame>
        <draw:frame draw:name="dictionary_function" draw:style-name="gr45" draw:text-style-name="P31" draw:layer="layout" svg:width="8.415cm" svg:height="0.543cm" svg:x="1.406cm" svg:y="22.028cm">
          <draw:text-box>
            <text:p text:style-name="P73"><text:span text:style-name="T54">dictionary_function:</text:span></text:p>
          </draw:text-box>
        </draw:frame>
      </draw:page>
      <draw:page draw:name="page11" draw:style-name="dp1" draw:master-page-name="master-page79">
        <draw:frame draw:style-name="gr8" draw:text-style-name="P7" draw:layer="layout" svg:width="0.388cm" svg:height="0.437cm" svg:x="10.401cm" svg:y="27.996cm">
          <draw:text-box>
            <text:p text:style-name="P1"><text:span text:style-name="T16">8 </text:span></text:p>
          </draw:text-box>
        </draw:frame>
        <draw:frame draw:style-name="gr402" draw:text-style-name="P89" draw:layer="layout" svg:width="6.257cm" svg:height="0.543cm" svg:x="1.401cm" svg:y="2.026cm">
          <draw:text-box>
            <text:p text:style-name="P1"><text:span text:style-name="T112">Note e Modalità di Consegna </text:span></text:p>
          </draw:text-box>
        </draw:frame>
        <draw:frame draw:style-name="gr403" draw:text-style-name="P90" draw:layer="layout" svg:width="1.147cm" svg:height="0.501cm" svg:x="1.401cm" svg:y="3.043cm">
          <draw:text-box>
            <text:p text:style-name="P1"><text:span text:style-name="T113">Note <text:s/></text:span></text:p>
          </draw:text-box>
        </draw:frame>
        <draw:frame draw:style-name="gr404" draw:text-style-name="P91" draw:layer="layout" svg:width="0.422cm" svg:height="0.422cm" svg:x="1.401cm" svg:y="3.771cm">
          <draw:text-box>
            <text:p text:style-name="P1"><text:span text:style-name="T114">•</text:span></text:p>
          </draw:text-box>
        </draw:frame>
        <draw:frame draw:style-name="gr405" draw:text-style-name="P91" draw:layer="layout" svg:width="0.422cm" svg:height="0.467cm" svg:x="1.596cm" svg:y="3.683cm">
          <draw:text-box>
            <text:p text:style-name="P1"><text:span text:style-name="T115"><text:s/></text:span></text:p>
          </draw:text-box>
        </draw:frame>
        <draw:frame draw:style-name="gr406" draw:text-style-name="P91" draw:layer="layout" svg:width="18.315cm" svg:height="0.467cm" svg:x="2.036cm" svg:y="3.683cm">
          <draw:text-box>
            <text:p text:style-name="P1"><text:span text:style-name="T116">Seguire fedelmente tutte le specifiche dell’esercizio (incluse quelle relative ai nomi delle variabili e al </text:span></text:p>
          </draw:text-box>
        </draw:frame>
        <draw:frame draw:style-name="gr407" draw:text-style-name="P91" draw:layer="layout" svg:width="5.228cm" svg:height="0.467cm" svg:x="2.036cm" svg:y="4.276cm">
          <draw:text-box>
            <text:p text:style-name="P1"><text:span text:style-name="T116">formato del loro contenuto). <text:s/></text:span></text:p>
          </draw:text-box>
        </draw:frame>
        <draw:frame draw:style-name="gr404" draw:text-style-name="P91" draw:layer="layout" svg:width="0.422cm" svg:height="0.422cm" svg:x="1.401cm" svg:y="4.981cm">
          <draw:text-box>
            <text:p text:style-name="P1"><text:span text:style-name="T114">•</text:span></text:p>
          </draw:text-box>
        </draw:frame>
        <draw:frame draw:style-name="gr405" draw:text-style-name="P91" draw:layer="layout" svg:width="0.422cm" svg:height="0.467cm" svg:x="1.596cm" svg:y="4.894cm">
          <draw:text-box>
            <text:p text:style-name="P1"><text:span text:style-name="T115"><text:s/></text:span></text:p>
          </draw:text-box>
        </draw:frame>
        <draw:polygon draw:style-name="gr408" draw:text-style-name="P92" draw:layer="layout" svg:width="16.175cm" svg:height="0.029cm" svg:x="2.036cm" svg:y="5.321cm" svg:viewBox="0 0 16176 30" draw:points="0,0 16176,0 16176,30 0,30">
          <text:p/>
        </draw:polygon>
        <draw:frame draw:style-name="gr409" draw:text-style-name="P91" draw:layer="layout" svg:width="17.964cm" svg:height="0.467cm" svg:x="2.036cm" svg:y="4.894cm">
          <draw:text-box>
            <text:p text:style-name="P1"><text:span text:style-name="T116">Rendere il codice </text:span><text:span text:style-name="T117">modulare </text:span><text:span text:style-name="T116">utilizzando ove opportuno </text:span><text:span text:style-name="T117">chiamate a procedure </text:span><text:span text:style-name="T116">e </text:span><text:span text:style-name="T117">rispettando le </text:span></text:p>
          </draw:text-box>
        </draw:frame>
        <draw:polygon draw:style-name="gr408" draw:text-style-name="P92" draw:layer="layout" svg:width="8.462cm" svg:height="0.03cm" svg:x="2.036cm" svg:y="5.913cm" svg:viewBox="0 0 8463 31" draw:points="0,0 8463,0 8463,31 0,31">
          <text:p/>
        </draw:polygon>
        <draw:frame draw:style-name="gr410" draw:text-style-name="P91" draw:layer="layout" svg:width="17.666cm" svg:height="0.467cm" svg:x="2.036cm" svg:y="5.486cm">
          <draw:text-box>
            <text:p text:style-name="P1"><text:span text:style-name="T117">convenzioni fra procedura chiamante/chiamata</text:span><text:span text:style-name="T116">. La modularità del codice ed il rispetto delle </text:span></text:p>
          </draw:text-box>
        </draw:frame>
        <draw:frame draw:style-name="gr411" draw:text-style-name="P91" draw:layer="layout" svg:width="16.88cm" svg:height="0.467cm" svg:x="2.036cm" svg:y="6.079cm">
          <draw:text-box>
            <text:p text:style-name="P1"><text:span text:style-name="T116">convenzioni saranno aspetti fondamentali per ottenere un’ottima valutazione del progetto. Si </text:span></text:p>
          </draw:text-box>
        </draw:frame>
        <draw:frame draw:style-name="gr412" draw:text-style-name="P91" draw:layer="layout" svg:width="18.675cm" svg:height="0.467cm" svg:x="2.036cm" svg:y="6.676cm">
          <draw:text-box>
            <text:p text:style-name="P1"><text:span text:style-name="T116">richiede in particolare di </text:span><text:span text:style-name="T118">implementare ogni cifrario (ciascun algoritmo A-B-C-D-E, e le loro inversioni </text:span></text:p>
          </draw:text-box>
        </draw:frame>
        <draw:frame draw:style-name="gr413" draw:text-style-name="P91" draw:layer="layout" svg:width="16.827cm" svg:height="0.467cm" svg:x="2.036cm" svg:y="7.269cm">
          <draw:text-box>
            <text:p text:style-name="P1"><text:span text:style-name="T118">per la decifratura) come una procedura separata (chiamate con jal, non con delle branch). </text:span></text:p>
          </draw:text-box>
        </draw:frame>
        <draw:frame draw:style-name="gr404" draw:text-style-name="P91" draw:layer="layout" svg:width="0.422cm" svg:height="0.422cm" svg:x="1.401cm" svg:y="7.974cm">
          <draw:text-box>
            <text:p text:style-name="P1"><text:span text:style-name="T114">•</text:span></text:p>
          </draw:text-box>
        </draw:frame>
        <draw:frame draw:style-name="gr405" draw:text-style-name="P91" draw:layer="layout" svg:width="0.422cm" svg:height="0.467cm" svg:x="1.596cm" svg:y="7.887cm">
          <draw:text-box>
            <text:p text:style-name="P1"><text:span text:style-name="T115"><text:s/></text:span></text:p>
          </draw:text-box>
        </draw:frame>
        <draw:frame draw:style-name="gr414" draw:text-style-name="P91" draw:layer="layout" svg:width="17.521cm" svg:height="0.467cm" svg:x="2.036cm" svg:y="7.887cm">
          <draw:text-box>
            <text:p text:style-name="P1"><text:span text:style-name="T116">Co</text:span><text:span text:style-name="T116">mm</text:span><text:span text:style-name="T116">ent</text:span><text:span text:style-name="T116">are </text:span><text:span text:style-name="T116">in </text:span><text:span text:style-name="T116">mo</text:span><text:span text:style-name="T116">do </text:span><text:span text:style-name="T116">sig</text:span><text:span text:style-name="T116">nific</text:span><text:span text:style-name="T116">ativ</text:span><text:span text:style-name="T116">o </text:span><text:span text:style-name="T116">(no</text:span><text:span text:style-name="T116">n </text:span><text:span text:style-name="T116">co</text:span><text:span text:style-name="T116">mm</text:span><text:span text:style-name="T116">ent</text:span><text:span text:style-name="T116">are </text:span><text:span text:style-name="T118">add</text:span><text:span text:style-name="T118">i </text:span><text:span text:style-name="T118">s3, </text:span><text:span text:style-name="T118">s3, </text:span><text:span text:style-name="T118">1 </text:span><text:span text:style-name="T116">con </text:span><text:span text:style-name="T116">“so</text:span><text:span text:style-name="T116">mm</text:span><text:span text:style-name="T116">o </text:span><text:span text:style-name="T116">uno </text:span><text:span text:style-name="T116">ad </text:span><text:span text:style-name="T116">s3”.</text:span><text:span text:style-name="T116">... ). </text:span></text:p>
          </draw:text-box>
        </draw:frame>
        <draw:frame draw:style-name="gr415" draw:text-style-name="P90" draw:layer="layout" svg:width="4.625cm" svg:height="0.501cm" svg:x="1.401cm" svg:y="8.838cm">
          <draw:text-box>
            <text:p text:style-name="P1"><text:span text:style-name="T113">Detta</text:span><text:span text:style-name="T113">gli </text:span><text:span text:style-name="T113">sulla </text:span><text:span text:style-name="T113">Conse</text:span><text:span text:style-name="T113">gna</text:span></text:p>
          </draw:text-box>
        </draw:frame>
        <draw:frame draw:style-name="gr13" draw:text-style-name="P13" draw:layer="layout" svg:width="0.35cm" svg:height="0.391cm" svg:x="6.303cm" svg:y="8.934cm">
          <draw:text-box>
            <text:p text:style-name="P1"><text:span text:style-name="T119"><text:s/></text:span></text:p>
          </draw:text-box>
        </draw:frame>
        <draw:frame draw:style-name="gr404" draw:text-style-name="P91" draw:layer="layout" svg:width="0.422cm" svg:height="0.422cm" svg:x="1.405cm" svg:y="9.566cm">
          <draw:text-box>
            <text:p text:style-name="P1"><text:span text:style-name="T114">•</text:span></text:p>
          </draw:text-box>
        </draw:frame>
        <draw:frame draw:style-name="gr405" draw:text-style-name="P91" draw:layer="layout" svg:width="0.422cm" svg:height="0.467cm" svg:x="1.6cm" svg:y="9.478cm">
          <draw:text-box>
            <text:p text:style-name="P1"><text:span text:style-name="T115"><text:s/></text:span></text:p>
          </draw:text-box>
        </draw:frame>
        <draw:frame draw:style-name="gr416" draw:text-style-name="P91" draw:layer="layout" svg:width="18.708cm" svg:height="0.467cm" svg:x="2.036cm" svg:y="9.478cm">
          <draw:text-box>
            <text:p text:style-name="P1"><text:span text:style-name="T116">Per sostenere l'esame è necessario consegnare il codice e una relazione PDF sul progetto assegnato, </text:span></text:p>
          </draw:text-box>
        </draw:frame>
        <draw:frame draw:style-name="gr417" draw:text-style-name="P91" draw:layer="layout" svg:width="11.762cm" svg:height="0.467cm" svg:x="2.036cm" svg:y="10.067cm">
          <draw:text-box>
            <text:p text:style-name="P1"><text:span text:style-name="T116">oltre ad un breve video che spieghi il funzionamento del codice. <text:s/></text:span></text:p>
          </draw:text-box>
        </draw:frame>
        <draw:frame draw:style-name="gr404" draw:text-style-name="P91" draw:layer="layout" svg:width="0.422cm" svg:height="0.422cm" svg:x="1.405cm" svg:y="10.988cm">
          <draw:text-box>
            <text:p text:style-name="P1"><text:span text:style-name="T114">•</text:span></text:p>
          </draw:text-box>
        </draw:frame>
        <draw:frame draw:style-name="gr405" draw:text-style-name="P91" draw:layer="layout" svg:width="0.422cm" svg:height="0.467cm" svg:x="1.6cm" svg:y="10.901cm">
          <draw:text-box>
            <text:p text:style-name="P1"><text:span text:style-name="T115"><text:s/></text:span></text:p>
          </draw:text-box>
        </draw:frame>
        <draw:frame draw:style-name="gr418" draw:text-style-name="P91" draw:layer="layout" svg:width="16.991cm" svg:height="0.467cm" svg:x="2.036cm" svg:y="10.901cm">
          <draw:text-box>
            <text:p text:style-name="P1"><text:span text:style-name="T116">Il codice consegnato deve essere funzionante sul simulatore RIPES, usato durante le lezioni. </text:span></text:p>
          </draw:text-box>
        </draw:frame>
        <draw:frame draw:style-name="gr404" draw:text-style-name="P91" draw:layer="layout" svg:width="0.422cm" svg:height="0.422cm" svg:x="1.405cm" svg:y="11.814cm">
          <draw:text-box>
            <text:p text:style-name="P1"><text:span text:style-name="T114">•</text:span></text:p>
          </draw:text-box>
        </draw:frame>
        <draw:frame draw:style-name="gr405" draw:text-style-name="P91" draw:layer="layout" svg:width="0.422cm" svg:height="0.467cm" svg:x="1.6cm" svg:y="11.726cm">
          <draw:text-box>
            <text:p text:style-name="P1"><text:span text:style-name="T115"><text:s/></text:span></text:p>
          </draw:text-box>
        </draw:frame>
        <draw:frame draw:style-name="gr419" draw:text-style-name="P91" draw:layer="layout" svg:width="17.777cm" svg:height="0.467cm" svg:x="2.036cm" svg:y="11.726cm">
          <draw:text-box>
            <text:p text:style-name="P1"><text:span text:style-name="T116">La scadenza esatta della consegna verrà resa nota di volta in volta, in base alle date dell’appello. </text:span></text:p>
          </draw:text-box>
        </draw:frame>
        <draw:frame draw:style-name="gr404" draw:text-style-name="P91" draw:layer="layout" svg:width="0.422cm" svg:height="0.422cm" svg:x="1.405cm" svg:y="12.644cm">
          <draw:text-box>
            <text:p text:style-name="P1"><text:span text:style-name="T114">•</text:span></text:p>
          </draw:text-box>
        </draw:frame>
        <draw:frame draw:style-name="gr405" draw:text-style-name="P91" draw:layer="layout" svg:width="0.422cm" svg:height="0.467cm" svg:x="1.6cm" svg:y="12.556cm">
          <draw:text-box>
            <text:p text:style-name="P1"><text:span text:style-name="T115"><text:s/></text:span></text:p>
          </draw:text-box>
        </draw:frame>
        <draw:frame draw:style-name="gr420" draw:text-style-name="P91" draw:layer="layout" svg:width="18.185cm" svg:height="0.467cm" svg:x="2.036cm" svg:y="12.556cm">
          <draw:text-box>
            <text:p text:style-name="P1"><text:span text:style-name="T116">Discussione e valutazione: la discussione degli elaborati avverrà contestualmente all’esame orale e </text:span></text:p>
          </draw:text-box>
        </draw:frame>
        <draw:polygon draw:style-name="gr408" draw:text-style-name="P92" draw:layer="layout" svg:width="13.669cm" svg:height="0.029cm" svg:x="2.036cm" svg:y="13.576cm" svg:viewBox="0 0 13670 30" draw:points="0,0 13670,0 13670,30 0,30">
          <text:p/>
        </draw:polygon>
        <draw:frame draw:style-name="gr421" draw:text-style-name="P91" draw:layer="layout" svg:width="15.936cm" svg:height="0.467cm" svg:x="2.036cm" svg:y="13.149cm">
          <draw:text-box>
            <text:p text:style-name="P1"><text:span text:style-name="T117">prevede anche domande su tutti gli argomenti di laboratorio trattati a lezione</text:span><text:span text:style-name="T116">. <text:s/></text:span></text:p>
          </draw:text-box>
        </draw:frame>
        <draw:frame draw:style-name="gr422" draw:text-style-name="P90" draw:layer="layout" svg:width="5.041cm" svg:height="0.501cm" svg:x="1.401cm" svg:y="14.096cm">
          <draw:text-box>
            <text:p text:style-name="P1"><text:span text:style-name="T113">Struttura della Consegna </text:span></text:p>
          </draw:text-box>
        </draw:frame>
        <draw:frame draw:style-name="gr423" draw:text-style-name="P91" draw:layer="layout" svg:width="18.32cm" svg:height="0.467cm" svg:x="1.401cm" svg:y="14.715cm">
          <draw:text-box>
            <text:p text:style-name="P1"><text:span text:style-name="T116">La consegna dovrà consistere di un unico achivio contenente 3 componenti. L’archivio dovrà essere </text:span></text:p>
          </draw:text-box>
        </draw:frame>
        <draw:frame draw:style-name="gr424" draw:text-style-name="P91" draw:layer="layout" svg:width="17.934cm" svg:height="0.467cm" svg:x="1.401cm" svg:y="15.308cm">
          <draw:text-box>
            <text:p text:style-name="P1"><text:span text:style-name="T116">caricato sul sito moodle del corso seguendo il link che verrà reso disponibile alla pagina del corso. </text:span></text:p>
          </draw:text-box>
        </draw:frame>
        <draw:frame draw:style-name="gr404" draw:text-style-name="P91" draw:layer="layout" svg:width="0.422cm" svg:height="0.422cm" svg:x="1.405cm" svg:y="16.225cm">
          <draw:text-box>
            <text:p text:style-name="P1"><text:span text:style-name="T114">•</text:span></text:p>
          </draw:text-box>
        </draw:frame>
        <draw:frame draw:style-name="gr405" draw:text-style-name="P91" draw:layer="layout" svg:width="0.422cm" svg:height="0.467cm" svg:x="1.6cm" svg:y="16.137cm">
          <draw:text-box>
            <text:p text:style-name="P1"><text:span text:style-name="T115"><text:s/></text:span></text:p>
          </draw:text-box>
        </draw:frame>
        <draw:frame draw:style-name="gr425" draw:text-style-name="P91" draw:layer="layout" svg:width="7.44cm" svg:height="0.467cm" svg:x="2.036cm" svg:y="16.137cm">
          <draw:text-box>
            <text:p text:style-name="P1"><text:span text:style-name="T116">Un file .s contenente il </text:span><text:span text:style-name="T117">codice </text:span><text:span text:style-name="T116">assembly </text:span></text:p>
          </draw:text-box>
        </draw:frame>
        <draw:frame draw:style-name="gr404" draw:text-style-name="P91" draw:layer="layout" svg:width="0.422cm" svg:height="0.422cm" svg:x="1.405cm" svg:y="17.055cm">
          <draw:text-box>
            <text:p text:style-name="P1"><text:span text:style-name="T114">•</text:span></text:p>
          </draw:text-box>
        </draw:frame>
        <draw:frame draw:style-name="gr405" draw:text-style-name="P91" draw:layer="layout" svg:width="0.422cm" svg:height="0.467cm" svg:x="1.6cm" svg:y="16.967cm">
          <draw:text-box>
            <text:p text:style-name="P1"><text:span text:style-name="T115"><text:s/></text:span></text:p>
          </draw:text-box>
        </draw:frame>
        <draw:frame draw:style-name="gr426" draw:text-style-name="P91" draw:layer="layout" svg:width="17.836cm" svg:height="0.467cm" svg:x="2.036cm" svg:y="16.967cm">
          <draw:text-box>
            <text:p text:style-name="P1"><text:span text:style-name="T116">un </text:span><text:span text:style-name="T117">breve video </text:span><text:span text:style-name="T116">(max 5 minuti) dove si registra lo schermo del dispositivo che avete utilizzato per </text:span></text:p>
          </draw:text-box>
        </draw:frame>
        <draw:frame draw:style-name="gr427" draw:text-style-name="P91" draw:layer="layout" svg:width="18.36cm" svg:height="0.467cm" svg:x="2.036cm" svg:y="17.56cm">
          <draw:text-box>
            <text:p text:style-name="P1"><text:span text:style-name="T116">l’implementazione durante l’esecuzione del programma, commentandone il funzionamento in base a </text:span></text:p>
          </draw:text-box>
        </draw:frame>
        <draw:frame draw:style-name="gr428" draw:text-style-name="P91" draw:layer="layout" svg:width="6.137cm" svg:height="0.467cm" svg:x="2.036cm" svg:y="18.153cm">
          <draw:text-box>
            <text:p text:style-name="P1"><text:span text:style-name="T116">2-3 combinazioni di input diverse </text:span></text:p>
          </draw:text-box>
        </draw:frame>
        <draw:frame draw:style-name="gr404" draw:text-style-name="P91" draw:layer="layout" svg:width="0.422cm" svg:height="0.422cm" svg:x="1.405cm" svg:y="19.07cm">
          <draw:text-box>
            <text:p text:style-name="P1"><text:span text:style-name="T114">•</text:span></text:p>
          </draw:text-box>
        </draw:frame>
        <draw:frame draw:style-name="gr405" draw:text-style-name="P91" draw:layer="layout" svg:width="0.422cm" svg:height="0.467cm" svg:x="1.6cm" svg:y="18.982cm">
          <draw:text-box>
            <text:p text:style-name="P1"><text:span text:style-name="T115"><text:s/></text:span></text:p>
          </draw:text-box>
        </draw:frame>
        <draw:frame draw:style-name="gr429" draw:text-style-name="P91" draw:layer="layout" svg:width="9.83cm" svg:height="0.467cm" svg:x="2.036cm" svg:y="18.982cm">
          <draw:text-box>
            <text:p text:style-name="P1"><text:span text:style-name="T116">la </text:span><text:span text:style-name="T117">relazione </text:span><text:span text:style-name="T116">in formato PDF, strutturata come segue. </text:span></text:p>
          </draw:text-box>
        </draw:frame>
        <draw:frame draw:style-name="gr430" draw:text-style-name="P91" draw:layer="layout" svg:width="0.449cm" svg:height="0.467cm" svg:x="2.036cm" svg:y="19.787cm">
          <draw:text-box>
            <text:p text:style-name="P1"><text:span text:style-name="T116">1. </text:span></text:p>
          </draw:text-box>
        </draw:frame>
        <draw:frame draw:style-name="gr431" draw:text-style-name="P91" draw:layer="layout" svg:width="12.596cm" svg:height="0.467cm" svg:x="2.671cm" svg:y="19.787cm">
          <draw:text-box>
            <text:p text:style-name="P1"><text:span text:style-name="T117">Informazioni </text:span><text:span text:style-name="T116">su autore, indirizzo mail, matricola e data di consegna </text:span></text:p>
          </draw:text-box>
        </draw:frame>
        <draw:frame draw:style-name="gr430" draw:text-style-name="P91" draw:layer="layout" svg:width="0.449cm" svg:height="0.467cm" svg:x="2.036cm" svg:y="20.595cm">
          <draw:text-box>
            <text:p text:style-name="P1"><text:span text:style-name="T116">2. </text:span></text:p>
          </draw:text-box>
        </draw:frame>
        <draw:frame draw:style-name="gr432" draw:text-style-name="P91" draw:layer="layout" svg:width="14.619cm" svg:height="0.467cm" svg:x="2.671cm" svg:y="20.595cm">
          <draw:text-box>
            <text:p text:style-name="P1"><text:span text:style-name="T117">Descrizione </text:span><text:span text:style-name="T116">della soluzione adottata, trattando principalmente i seguenti punti: </text:span></text:p>
          </draw:text-box>
        </draw:frame>
        <draw:frame draw:style-name="gr433" draw:text-style-name="P91" draw:layer="layout" svg:width="0.444cm" svg:height="0.467cm" svg:x="3.306cm" svg:y="21.4cm">
          <draw:text-box>
            <text:p text:style-name="P1"><text:span text:style-name="T116">a. </text:span></text:p>
          </draw:text-box>
        </draw:frame>
        <draw:frame draw:style-name="gr434" draw:text-style-name="P91" draw:layer="layout" svg:width="13.652cm" svg:height="0.467cm" svg:x="3.941cm" svg:y="21.4cm">
          <draw:text-box>
            <text:p text:style-name="P1"><text:span text:style-name="T116">Descrizione ad alto livello della struttura del codice, di ciascun algoritmo di </text:span></text:p>
          </draw:text-box>
        </draw:frame>
        <draw:frame draw:style-name="gr435" draw:text-style-name="P91" draw:layer="layout" svg:width="15.929cm" svg:height="0.467cm" svg:x="3.941cm" svg:y="21.992cm">
          <draw:text-box>
            <text:p text:style-name="P1"><text:span text:style-name="T116">cifratura/decifratura, di altre eventuali procedure e del main, in linguaggio naturale, con </text:span></text:p>
          </draw:text-box>
        </draw:frame>
        <draw:frame draw:style-name="gr436" draw:text-style-name="P91" draw:layer="layout" svg:width="6.73cm" svg:height="0.467cm" svg:x="3.941cm" svg:y="22.589cm">
          <draw:text-box>
            <text:p text:style-name="P1"><text:span text:style-name="T116">flow-chart, in pseudo-linguaggio, etc </text:span></text:p>
          </draw:text-box>
        </draw:frame>
        <draw:frame draw:style-name="gr437" draw:text-style-name="P91" draw:layer="layout" svg:width="0.45cm" svg:height="0.467cm" svg:x="3.306cm" svg:y="23.393cm">
          <draw:text-box>
            <text:p text:style-name="P1"><text:span text:style-name="T116">b. </text:span></text:p>
          </draw:text-box>
        </draw:frame>
        <draw:frame draw:style-name="gr438" draw:text-style-name="P91" draw:layer="layout" svg:width="14.1cm" svg:height="0.467cm" svg:x="3.941cm" svg:y="23.393cm">
          <draw:text-box>
            <text:p text:style-name="P1"><text:span text:style-name="T116">Uso dei registri e memoria (stack, piuttosto che memoria statica o dinamica) <text:s/></text:span></text:p>
          </draw:text-box>
        </draw:frame>
        <draw:frame draw:style-name="gr430" draw:text-style-name="P91" draw:layer="layout" svg:width="0.449cm" svg:height="0.467cm" svg:x="2.036cm" svg:y="24.198cm">
          <draw:text-box>
            <text:p text:style-name="P1"><text:span text:style-name="T116">3. </text:span></text:p>
          </draw:text-box>
        </draw:frame>
        <draw:frame draw:style-name="gr439" draw:text-style-name="P91" draw:layer="layout" svg:width="18.251cm" svg:height="0.467cm" svg:x="2.671cm" svg:y="24.198cm">
          <draw:text-box>
            <text:p text:style-name="P1"><text:span text:style-name="T117">Test di corretto funzionamento</text:span><text:span text:style-name="T116">, per fornire evidenze del corretto funzionamento del programma, </text:span></text:p>
          </draw:text-box>
        </draw:frame>
        <draw:frame draw:style-name="gr440" draw:text-style-name="P91" draw:layer="layout" svg:width="3.895cm" svg:height="0.467cm" svg:x="2.671cm" svg:y="24.795cm">
          <draw:text-box>
            <text:p text:style-name="P1"><text:span text:style-name="T116">usando diversi input.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Arial" svg:font-family="Arial"/>
    <style:font-face style:name="Calibri" svg:font-family="Calibri"/>
    <style:font-face style:name="Cambria" svg:font-family="Cambria"/>
    <style:font-face style:name="FreeSans" svg:font-family="FreeSans" style:font-adornments="Regular" style:font-family-generic="swiss" style:font-pitch="variable"/>
    <style:font-face style:name="FreeSans1" svg:font-family="FreeSans" style:font-family-generic="swiss"/>
    <style:font-face style:name="FreeSans2" svg:font-family="FreeSans" style:font-family-generic="swiss" style:font-pitch="variable"/>
    <style:font-face style:name="FreeSans3" svg:font-family="FreeSans" style:font-family-generic="roman" style:font-pitch="variable"/>
    <style:font-face style:name="FreeSans4" svg:font-family="FreeSans" style:font-family-generic="system" style:font-pitch="variable"/>
    <style:font-face style:name="FreeSerif" svg:font-family="FreeSerif" style:font-family-generic="roman" style:font-pitch="variable"/>
    <style:font-face style:name="FreeSerif1" svg:font-family="FreeSerif" style:font-family-generic="roman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ymbol" svg:font-family="Symbol"/>
    <style:font-face style:name="TexMaths Symbols" svg:font-family="'TexMaths Symbols'"/>
    <style:font-face style:name="TexMaths Symbols1" svg:font-family="'TexMaths Symbols'" style:font-pitch="variable"/>
    <style:font-face style:name="Unifont" svg:font-family="Unifont" style:font-family-generic="system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Navigation" svg:viewBox="0 0 786 1228" svg:d="M151 1228l-76-25-75-25 318-952 76-226 75 226 317 952-76 25-75 25-162-486v462h-80-79v-464z"/>
    <draw:marker draw:name="Square_20_45" draw:display-name="Square 45" svg:viewBox="0 0 1131 1131" svg:d="M0 564l564 567 567-567-567-564z"/>
    <draw:marker draw:name="Square_20_45_20_unfilled" draw:display-name="Square 45 unfilled" svg:viewBox="0 0 3000 3000" svg:d="M1500 3000l-1500-1500 1500-1500 1500 1500zM1500 2715l-1215-1215 1215-1215 1215 1215z"/>
    <draw:marker draw:name="UML_20_Arrow" draw:display-name="UML Arrow" svg:viewBox="-0.0901699437494742 0 406.180339887499 756.090169943749" svg:d="M105 715c-2 9-7 17-13 24-7 7-15 12-23 15-9 2-19 3-28 1s-17-7-24-13c-7-7-12-15-15-23-2-9-3-19-1-28l150-650c2-5 3-10 6-14 5-9 11-15 20-20 8-5 17-7 26-7s18 2 27 7c8 5 14 11 19 20 3 4 4 9 6 14l150 650c2 9 1 19-1 28-3 8-8 16-15 23-7 6-15 11-24 13s-19 1-28-1c-8-3-16-8-23-15-6-7-11-15-13-24l-44-194v232h-53-53v-237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FreeSerif" fo:font-size="24pt" fo:language="en" fo:country="US" style:font-name-asian="Adwaita Sans" style:font-size-asian="24pt" style:language-asian="zh" style:country-asian="CN" style:font-name-complex="FreeSans4" style:font-size-complex="24pt" style:language-complex="hi" style:country-complex="IN"/>
    </style:default-style>
    <style:style style:name="standard" style:family="graphic">
      <style:graphic-properties draw:stroke-dash="Dashed_20__28_var_29__20_4" draw:fill="solid" draw:fill-color="#729fcf" draw:shadow-color="#000000"/>
      <style:text-properties style:font-name="FreeSans" fo:font-family="FreeSans" style:font-style-name="Regular" style:font-family-generic="swiss" style:font-pitch="variable" fo:font-size="10pt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graphic-properties draw:fill="none" draw:fill-color="#ffffff" loext:fill-use-slide-background="false" draw:shadow-color="#000000"/>
      <style:paragraph-properties fo:margin-top="0cm" fo:margin-bottom="0.076cm" fo:line-height="115%" style:text-autospace="none"/>
      <style:text-properties style:font-name="FreeSans" fo:font-family="FreeSans" style:font-style-name="Regular" style:font-family-generic="swiss" style:font-pitch="variable" fo:font-size="12pt"/>
    </style:style>
    <style:style style:name="Endnote_20_Characters" style:display-name="Endnote Characters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Footnote_20_Characters" style:display-name="Footnote Characters" style:family="graphic">
      <style:paragraph-properties style:text-autospace="none"/>
    </style:style>
    <style:style style:name="Heading" style:family="graphic">
      <style:paragraph-properties fo:margin-top="0.746cm" fo:margin-bottom="0.374cm" style:text-autospace="none"/>
      <style:text-properties style:font-name="FreeSans2" fo:font-family="FreeSans" style:font-family-generic="swiss" style:font-pitch="variable" fo:font-size="14pt" style:font-name-asian="WenQuanYi Micro Hei1" style:font-family-asian="'WenQuanYi Micro Hei'" style:font-pitch-asian="variable" style:font-name-complex="FreeSans2" style:font-family-complex="FreeSans" style:font-family-generic-complex="swiss" style:font-pitch-complex="variable" style:font-size-complex="14pt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FreeSans1" style:font-family-complex="FreeSans" style:font-family-generic-complex="swiss"/>
    </style:style>
    <style:style style:name="List" style:family="graphic">
      <style:paragraph-properties style:text-autospace="none"/>
      <style:text-properties style:font-name-complex="FreeSans1" style:font-family-complex="FreeSans" style:font-family-generic-complex="swiss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Normal" style:family="graphic">
      <style:graphic-properties style:writing-mode="lr-tb"/>
      <style:paragraph-properties style:text-autospace="none"/>
      <style:text-properties style:use-window-font-color="true" loext:opacity="0%" style:font-name="FreeSerif" fo:font-family="FreeSerif" style:font-family-generic="roman" style:font-pitch="variable" fo:font-size="12pt" fo:language="en" fo:country="US" style:letter-kerning="true" style:font-name-asian="WenQuanYi Micro Hei1" style:font-family-asian="'WenQuanYi Micro Hei'" style:font-pitch-asian="variable" style:language-asian="zh" style:country-asian="CN" style:font-name-complex="FreeSerif" style:font-family-complex="FreeSerif" style:font-family-generic-complex="roman" style:font-pitch-complex="variable" style:font-size-complex="12pt" style:language-complex="en" style:country-complex="US"/>
    </style:style>
    <style:style style:name="caption" style:family="graphic">
      <style:paragraph-properties fo:margin-top="0.051cm" fo:margin-bottom="0.051cm" style:text-autospace="none"/>
      <style:text-properties style:font-name="FreeSans" fo:font-family="FreeSans" style:font-style-name="Regular" style:font-family-generic="swiss" style:font-pitch="variable" fo:font-size="10pt" fo:font-style="normal" style:font-size-asian="12pt" style:font-style-asian="italic" style:font-name-complex="FreeSans1" style:font-family-complex="FreeSans" style:font-family-generic-complex="swiss" style:font-size-complex="12pt" style:font-style-complex="italic"/>
    </style:style>
  </office:styles>
  <office:automatic-styles>
    <style:page-layout style:name="PM0">
      <style:page-layout-properties fo:margin-top="2cm" fo:margin-bottom="1cm" fo:margin-left="1.3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79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6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4.2$Linux_X86_64 LibreOffice_project/620$Build-2</meta:generator>
    <meta:document-statistic meta:object-count="537"/>
  </office:meta>
</office:document-meta>
</file>