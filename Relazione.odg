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A300000073D2B6E90F.png" manifest:media-type="image/png"/>
  <manifest:file-entry manifest:full-path="Pictures/10000001000001AC000000731F0ACCE0.png" manifest:media-type="image/png"/>
  <manifest:file-entry manifest:full-path="Pictures/10000001000001800000004F28348659.png" manifest:media-type="image/png"/>
  <manifest:file-entry manifest:full-path="Pictures/100000010000012200000050F922DA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Calibri" svg:font-family="Calibri"/>
    <style:font-face style:name="Cambria" svg:font-family="Cambria"/>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adornments="Regular" style:font-family-generic="swiss" style:font-pitch="variable"/>
    <style:font-face style:name="FreeSans4" svg:font-family="FreeSans" style:font-family-generic="system" style:font-pitch="variable"/>
    <style:font-face style:name="FreeSerif" svg:font-family="FreeSerif" style:font-family-generic="roman" style:font-pitch="variable"/>
    <style:font-face style:name="FreeSerif1" svg:font-family="FreeSerif" style:font-family-generic="roma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exMaths Symbols" svg:font-family="'TexMaths Symbols'"/>
    <style:font-face style:name="TexMaths Symbols1" svg:font-family="'TexMaths Symbols'" style:font-pitch="variable"/>
    <style:font-face style:name="Unifont" svg:font-family="Unifont" style:font-family-generic="system"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32cm" fo:min-width="11.644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932cm" fo:min-width="13.478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932cm" fo:min-width="7.189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32cm" fo:min-width="0.846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158cm" fo:min-width="0.139cm" fo:padding-top="0cm" fo:padding-bottom="0cm" fo:padding-left="0cm" fo:padding-right="0cm" loext:decorative="false"/>
      <style:paragraph-properties style:writing-mode="lr-tb"/>
    </style:style>
    <style:style style:name="gr6" style:family="graphic" style:parent-style-name="standard">
      <style:graphic-properties draw:stroke="none" draw:fill="solid" draw:fill-color="#4f81bd" loext:decorative="false"/>
    </style:style>
    <style:style style:name="gr7" style:family="graphic" style:parent-style-name="standard">
      <style:graphic-properties draw:stroke="none" draw:fill="none" draw:textarea-horizontal-align="left" draw:textarea-vertical-align="top" draw:auto-grow-height="true" draw:auto-grow-width="true" fo:min-height="1.089cm" fo:min-width="7.941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37cm" fo:min-width="0.388cm" fo:padding-top="0cm" fo:padding-bottom="0cm" fo:padding-left="0cm" fo:padding-right="0cm" loext:decorative="false"/>
      <style:paragraph-properties style:writing-mode="lr-tb"/>
    </style:style>
    <style:style style:name="gr9" style:family="graphic" style:parent-style-name="Heading">
      <style:graphic-properties draw:stroke="none" draw:fill="none" draw:textarea-horizontal-align="left" draw:textarea-vertical-align="top" draw:auto-grow-height="true" draw:auto-grow-width="true" fo:min-height="0.543cm" fo:min-width="5.175cm" fo:padding-top="0cm" fo:padding-bottom="0cm" fo:padding-left="0cm" fo:padding-right="0cm" loext:decorative="false"/>
      <style:paragraph-properties style:writing-mode="lr-tb"/>
    </style:style>
    <style:style style:name="gr10" style:family="graphic" style:parent-style-name="Body_20_Text">
      <style:graphic-properties draw:stroke="none" draw:textarea-horizontal-align="left" draw:textarea-vertical-align="top" draw:auto-grow-height="false" draw:auto-grow-width="false" fo:min-height="3.308cm" fo:min-width="14.821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loext:decorative="false"/>
    </style:style>
    <style:style style:name="gr12" style:family="graphic" style:parent-style-name="standard">
      <style:graphic-properties draw:stroke="none" draw:fill="none" draw:textarea-horizontal-align="justify" draw:textarea-vertical-align="middle" draw:auto-grow-height="false" draw:auto-grow-width="true" fo:min-height="0.551cm" fo:min-width="17.094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91cm" fo:min-width="0.35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43cm" fo:min-width="5.858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642cm" fo:min-width="0.943cm" fo:padding-top="0cm" fo:padding-bottom="0cm" fo:padding-left="0cm" fo:padding-right="0cm" loext:decorative="false"/>
      <style:paragraph-properties style:writing-mode="lr-tb"/>
    </style:style>
    <style:style style:name="gr16" style:family="graphic" style:parent-style-name="Body_20_Text">
      <style:graphic-properties draw:stroke="none" draw:textarea-horizontal-align="left" draw:textarea-vertical-align="top" draw:auto-grow-height="true" draw:auto-grow-width="true" fo:min-height="0.536cm" fo:min-width="0.139cm" fo:padding-top="0cm" fo:padding-bottom="0cm" fo:padding-left="0cm" fo:padding-right="0cm" loext:decorative="false"/>
      <style:paragraph-properties style:writing-mode="lr-tb"/>
    </style:style>
    <style:style style:name="gr17" style:family="graphic" style:parent-style-name="Body_20_Text">
      <style:graphic-properties draw:stroke="none" draw:textarea-horizontal-align="left" draw:textarea-vertical-align="top" draw:auto-grow-height="true" draw:auto-grow-width="true" fo:min-height="0.536cm" fo:min-width="0.35cm" fo:padding-top="0cm" fo:padding-bottom="0cm" fo:padding-left="0cm" fo:padding-right="0cm" loext:decorative="false"/>
      <style:paragraph-properties style:writing-mode="lr-tb"/>
    </style:style>
    <style:style style:name="gr18" style:family="graphic" style:parent-style-name="Heading">
      <style:graphic-properties draw:stroke="none" draw:fill="none" draw:textarea-horizontal-align="left" draw:textarea-vertical-align="top" draw:auto-grow-height="true" draw:auto-grow-width="true" fo:min-height="0.543cm" fo:min-width="15.939cm" fo:padding-top="0cm" fo:padding-bottom="0cm" fo:padding-left="0cm" fo:padding-right="0cm" loext:decorative="false"/>
      <style:paragraph-properties style:writing-mode="lr-tb"/>
    </style:style>
    <style:style style:name="gr19" style:family="graphic">
      <style:graphic-properties style:writing-mode="lr-tb"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25" style:family="graphic" style:parent-style-name="Body_20_Text">
      <style:graphic-properties draw:stroke="none" draw:textarea-horizontal-align="left" draw:textarea-vertical-align="top" draw:auto-grow-height="true" draw:auto-grow-width="true" fo:min-height="0.536cm" fo:min-width="0.422cm" fo:padding-top="0cm" fo:padding-bottom="0cm" fo:padding-left="0cm" fo:padding-right="0cm"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opacity="66%"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769cm" fo:padding-top="0cm" fo:padding-bottom="0cm" fo:padding-left="0cm" fo:padding-right="0cm" fo:wrap-option="wrap" draw:shadow="hidden" draw:shadow-offset-x="0.2cm" draw:shadow-offset-y="0.2cm" draw:shadow-color="#808080" loext:decorative="false"/>
      <style:paragraph-properties style:writing-mode="lr-tb"/>
    </style:style>
    <style:style style:name="gr36" style:family="graphic" style:parent-style-name="standard" style:list-style-name="L2">
      <style:graphic-properties draw:stroke="solid" draw:stroke-dash="Dashed_20__28_var_29__20_4" svg:stroke-width="0.053cm" svg:stroke-color="#000000" draw:marker-start="" draw:marker-start-width="0.4cm" draw:marker-start-center="false" draw:marker-end="Square_20_45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3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42" style:family="graphic" style:parent-style-name="Body_20_Text" style:list-style-name="L2">
      <style:graphic-properties draw:stroke="none" svg:stroke-width="0cm" svg:stroke-color="#000000" draw:marker-start="" draw:marker-start-width="0.2cm" draw:marker-start-center="false" draw:marker-end="" draw:marker-end-width="0.2cm" draw:marker-end-center="false" draw:textarea-horizontal-align="justify" fo:min-height="0.536cm" fo:padding-top="0cm" fo:padding-bottom="0cm" fo:padding-left="0cm" fo:padding-right="0cm" fo:wrap-option="wrap" draw:shadow="hidden" draw:shadow-offset-x="0.2cm" draw:shadow-offset-y="0.2cm" draw:shadow-color="#808080" loext:decorative="false"/>
      <style:paragraph-properties style:writing-mode="lr-tb"/>
    </style:style>
    <style:style style:name="gr43" style:family="graphic" style:parent-style-name="Body_20_Text" style:list-style-name="L2">
      <style:graphic-properties draw:stroke="solid" draw:stroke-dash="Dashed_20__28_var_29__20_4" svg:stroke-width="0.053cm" svg:stroke-color="#000000" draw:marker-start="" draw:marker-start-width="0.4cm" draw:marker-start-center="false" draw:marker-end="Square_20_45"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 style:family="graphic" style:parent-style-name="Heading">
      <style:graphic-properties draw:stroke="none" draw:fill="none" draw:textarea-horizontal-align="left" draw:textarea-vertical-align="top" draw:auto-grow-height="true" draw:auto-grow-width="true" fo:min-height="0.543cm" fo:min-width="5.771cm" fo:padding-top="0cm" fo:padding-bottom="0cm" fo:padding-left="0cm" fo:padding-right="0cm" loext:decorative="false"/>
      <style:paragraph-properties style:writing-mode="lr-tb"/>
    </style:style>
    <style:style style:name="gr45" style:family="graphic" style:parent-style-name="Heading">
      <style:graphic-properties draw:stroke="none" draw:fill="none" draw:textarea-horizontal-align="left" draw:textarea-vertical-align="top" draw:auto-grow-height="true" draw:auto-grow-width="true" fo:min-height="0.543cm" fo:min-width="8.415cm" fo:padding-top="0cm" fo:padding-bottom="0cm" fo:padding-left="0cm" fo:padding-right="0cm" loext:decorative="false"/>
      <style:paragraph-properties style:writing-mode="lr-tb"/>
    </style:style>
    <style:style style:name="gr46" style:family="graphic" style:parent-style-name="Body_20_Text">
      <style:graphic-properties draw:stroke="none" svg:stroke-color="#000000" draw:auto-grow-height="true" draw:auto-grow-width="false" fo:min-height="2.072cm" loext:decorative="false"/>
      <style:paragraph-properties style:writing-mode="lr-tb"/>
    </style:style>
    <style:style style:name="gr47" style:family="graphic" style:parent-style-name="caption">
      <style:graphic-properties draw:stroke="none" svg:stroke-color="#000000" draw:fill="none" draw:fill-color="#ffffff" draw:auto-grow-height="true" draw:auto-grow-width="false" fo:min-height="1.865cm" loext:decorative="false"/>
      <style:paragraph-properties style:writing-mode="lr-tb"/>
    </style:style>
    <style:style style:name="gr48" style:family="graphic">
      <style:graphic-properties style:protect="size" style:writing-mode="lr-tb" loext:decorative="false"/>
    </style:style>
    <style:style style:name="gr49"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34cm" fo:min-width="4.5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389cm" fo:min-width="4.8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15cm" fo:min-width="2.13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3.632cm" fo:min-width="17.93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89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76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74cm" fo:min-width="4.30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55cm" fo:min-width="5.78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62cm" fo:min-width="5.9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84cm" fo:min-width="6.1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8" style:family="graphic">
      <style:graphic-properties style:protect="size" loext:decorative="false"/>
    </style:style>
    <style:style style:name="gr7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83cm" fo:min-width="2.23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0" style:family="graphic" style:parent-style-name="standard">
      <style:graphic-properties draw:stroke="none" draw:fill="none" draw:fill-color="#ffffff" fo:min-height="0.62cm"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cm" fo:min-width="4.9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26cm" fo:min-width="4.57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68cm" fo:min-width="5.21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26cm" fo:min-width="4.39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9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1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86cm" fo:min-width="1.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1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59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2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308cm" fo:min-width="2.44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83cm" fo:min-width="3.37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308cm" fo:min-width="3.07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5cm" fo:min-width="1.7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3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3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0" style:family="graphic" style:parent-style-name="Body_20_Text">
      <style:graphic-properties draw:stroke="none" svg:stroke-color="#000000" draw:auto-grow-height="true" draw:auto-grow-width="false" fo:min-height="1.819cm" loext:decorative="false"/>
      <style:paragraph-properties style:writing-mode="lr-tb"/>
    </style:style>
    <style:style style:name="gr141" style:family="graphic" style:parent-style-name="caption">
      <style:graphic-properties draw:stroke="none" svg:stroke-color="#000000" draw:fill="none" draw:fill-color="#ffffff" draw:auto-grow-height="true" draw:auto-grow-width="false" fo:min-height="4.195cm" loext:decorative="false"/>
      <style:paragraph-properties style:writing-mode="lr-tb"/>
    </style:style>
    <style:style style:name="gr142" style:family="graphic" style:parent-style-name="Body_20_Text">
      <style:graphic-properties draw:stroke="none" svg:stroke-color="#000000" draw:auto-grow-height="true" draw:auto-grow-width="false" fo:min-height="2.285cm" loext:decorative="false"/>
      <style:paragraph-properties style:writing-mode="lr-tb"/>
    </style:style>
    <style:style style:name="gr14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14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145"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3cm" fo:min-width="2.4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435cm" fo:min-width="11.10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5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62cm" fo:min-width="2.4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5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06cm" fo:min-width="2.52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6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584cm" fo:min-width="2.059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6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16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69" style:family="graphic" style:parent-style-name="Heading">
      <style:graphic-properties draw:stroke="none" draw:fill="none" draw:textarea-horizontal-align="left" draw:textarea-vertical-align="top" draw:auto-grow-height="true" draw:auto-grow-width="true" fo:min-height="0.543cm" fo:min-width="3.213cm" fo:padding-top="0cm" fo:padding-bottom="0cm" fo:padding-left="0cm" fo:padding-right="0cm" loext:decorative="false"/>
      <style:paragraph-properties style:writing-mode="lr-tb"/>
    </style:style>
    <style:style style:name="gr170" style:family="graphic" style:parent-style-name="Body_20_Text">
      <style:graphic-properties draw:stroke="none" svg:stroke-color="#000000" draw:auto-grow-height="true" draw:auto-grow-width="false" fo:min-height="6.038cm" loext:decorative="false"/>
      <style:paragraph-properties style:writing-mode="lr-tb"/>
    </style:style>
    <style:style style:name="gr171" style:family="graphic" style:parent-style-name="Heading">
      <style:graphic-properties draw:stroke="none" draw:fill="none" draw:textarea-horizontal-align="left" draw:textarea-vertical-align="top" draw:auto-grow-height="true" draw:auto-grow-width="true" fo:min-height="0.543cm" fo:min-width="7.789cm" fo:padding-top="0cm" fo:padding-bottom="0cm" fo:padding-left="0cm" fo:padding-right="0cm" loext:decorative="false"/>
      <style:paragraph-properties style:writing-mode="lr-tb"/>
    </style:style>
    <style:style style:name="gr172" style:family="graphic" style:parent-style-name="Body_20_Text">
      <style:graphic-properties draw:stroke="none" svg:stroke-color="#000000" draw:auto-grow-height="true" draw:auto-grow-width="false" fo:min-height="7.567cm" loext:decorative="false"/>
      <style:paragraph-properties style:writing-mode="lr-tb"/>
    </style:style>
    <style:style style:name="gr1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4" style:family="graphic" style:parent-style-name="Body_20_Text">
      <style:graphic-properties draw:stroke="none" svg:stroke-color="#000000" draw:auto-grow-height="true" draw:auto-grow-width="false" fo:min-height="6.497cm" loext:decorative="false"/>
      <style:paragraph-properties style:writing-mode="lr-tb"/>
    </style:style>
    <style:style style:name="gr175" style:family="graphic" style:parent-style-name="caption">
      <style:graphic-properties draw:stroke="none" svg:stroke-color="#000000" draw:fill="none" draw:fill-color="#ffffff" draw:auto-grow-height="true" draw:auto-grow-width="false" fo:min-height="9.652cm" loext:decorative="false"/>
      <style:paragraph-properties style:writing-mode="lr-tb"/>
    </style:style>
    <style:style style:name="gr176" style:family="graphic" style:parent-style-name="caption">
      <style:graphic-properties draw:stroke="none" svg:stroke-color="#000000" draw:fill="none" draw:fill-color="#ffffff" draw:auto-grow-height="true" draw:auto-grow-width="false" fo:min-height="1.171cm" loext:decorative="false"/>
      <style:paragraph-properties style:writing-mode="lr-tb"/>
    </style:style>
    <style:style style:name="gr177" style:family="graphic" style:parent-style-name="caption">
      <style:graphic-properties draw:stroke="none" svg:stroke-color="#000000" draw:fill="none" draw:fill-color="#ffffff" draw:auto-grow-height="true" draw:auto-grow-width="false" fo:min-height="6.991cm" loext:decorative="false"/>
      <style:paragraph-properties style:writing-mode="lr-tb"/>
    </style:style>
    <style:style style:name="gr17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17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1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197cm" fo:min-width="1.684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18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18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1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46cm" fo:min-width="3.6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19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7" style:family="graphic" style:parent-style-name="Body_20_Text">
      <style:graphic-properties draw:stroke="none" svg:stroke-color="#000000" draw:auto-grow-height="true" draw:auto-grow-width="false" fo:min-height="1.071cm" loext:decorative="false"/>
      <style:paragraph-properties style:writing-mode="lr-tb"/>
    </style:style>
    <style:style style:name="gr198" style:family="graphic" style:parent-style-name="Heading">
      <style:graphic-properties draw:stroke="none" draw:fill="none" draw:textarea-horizontal-align="left" draw:textarea-vertical-align="top" draw:auto-grow-height="true" draw:auto-grow-width="true" fo:min-height="0.543cm" fo:min-width="8.588cm" fo:padding-top="0cm" fo:padding-bottom="0cm" fo:padding-left="0cm" fo:padding-right="0cm" loext:decorative="false"/>
      <style:paragraph-properties style:writing-mode="lr-tb"/>
    </style:style>
    <style:style style:name="gr199" style:family="graphic" style:parent-style-name="Body_20_Text">
      <style:graphic-properties draw:stroke="none" svg:stroke-color="#000000" draw:textarea-horizontal-align="left" draw:auto-grow-height="true" draw:auto-grow-width="false" fo:min-height="0.68cm" loext:decorative="false"/>
      <style:paragraph-properties style:writing-mode="lr-tb"/>
    </style:style>
    <style:style style:name="gr200" style:family="graphic" style:parent-style-name="Body_20_Text">
      <style:graphic-properties draw:stroke="none" svg:stroke-color="#000000" draw:auto-grow-height="true" draw:auto-grow-width="false" fo:min-height="1.147cm" loext:decorative="false"/>
      <style:paragraph-properties style:writing-mode="lr-tb"/>
    </style:style>
    <style:style style:name="gr201" style:family="graphic" style:parent-style-name="caption">
      <style:graphic-properties draw:stroke="none" svg:stroke-color="#000000" draw:fill="none" draw:fill-color="#ffffff" draw:auto-grow-height="true" draw:auto-grow-width="false" fo:min-height="5.593cm" loext:decorative="false"/>
      <style:paragraph-properties style:writing-mode="lr-tb"/>
    </style:style>
    <style:style style:name="gr202" style:family="graphic" style:parent-style-name="Heading">
      <style:graphic-properties draw:stroke="none" draw:fill="none" draw:textarea-horizontal-align="left" draw:textarea-vertical-align="top" draw:auto-grow-height="true" draw:auto-grow-width="true" fo:min-height="0.543cm" fo:min-width="8.601cm" fo:padding-top="0cm" fo:padding-bottom="0cm" fo:padding-left="0cm" fo:padding-right="0cm" loext:decorative="false"/>
      <style:paragraph-properties style:writing-mode="lr-tb"/>
    </style:style>
    <style:style style:name="gr20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0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49cm" fo:min-width="1.31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967cm" fo:min-width="1.365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1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14"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15"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1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60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4.08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2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3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2.95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04cm" fo:min-width="2.64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39cm" fo:min-width="2.83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08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4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46" style:family="graphic" style:parent-style-name="Body_20_Text">
      <style:graphic-properties draw:stroke="none" svg:stroke-color="#000000" draw:auto-grow-height="true" draw:auto-grow-width="false" fo:min-height="4.867cm" loext:decorative="false"/>
      <style:paragraph-properties style:writing-mode="lr-tb"/>
    </style:style>
    <style:style style:name="gr24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4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2cm" fo:min-width="3.5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12cm" fo:min-width="4.5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93cm" fo:min-width="5.70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033cm" fo:min-width="1.882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5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5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59"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60"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6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62" style:family="graphic" style:parent-style-name="Heading">
      <style:graphic-properties draw:stroke="none" draw:fill="none" draw:textarea-horizontal-align="left" draw:textarea-vertical-align="top" draw:auto-grow-height="true" draw:auto-grow-width="true" fo:min-height="0.543cm" fo:min-width="10.763cm" fo:padding-top="0cm" fo:padding-bottom="0cm" fo:padding-left="0cm" fo:padding-right="0cm" loext:decorative="false"/>
      <style:paragraph-properties style:writing-mode="lr-tb"/>
    </style:style>
    <style:style style:name="gr263" style:family="graphic" style:parent-style-name="Body_20_Text">
      <style:graphic-properties draw:stroke="none" svg:stroke-color="#000000" draw:auto-grow-height="true" draw:auto-grow-width="false" fo:min-height="4.816cm" loext:decorative="false"/>
      <style:paragraph-properties style:writing-mode="lr-tb"/>
    </style:style>
    <style:style style:name="gr264" style:family="graphic" style:parent-style-name="Body_20_Text">
      <style:graphic-properties draw:stroke="none" svg:stroke-color="#000000" draw:auto-grow-height="true" draw:auto-grow-width="false" fo:min-height="0.536cm" loext:decorative="false"/>
      <style:paragraph-properties style:writing-mode="lr-tb"/>
    </style:style>
    <style:style style:name="gr265" style:family="graphic" style:parent-style-name="Body_20_Text">
      <style:graphic-properties draw:stroke="none" svg:stroke-color="#000000" draw:auto-grow-height="true" draw:auto-grow-width="false" fo:min-height="3.313cm" loext:decorative="false"/>
      <style:paragraph-properties style:writing-mode="lr-tb"/>
    </style:style>
    <style:style style:name="gr266"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267"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268"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6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27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3cm" fo:min-width="2.8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7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6.479cm" fo:min-width="16.12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7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7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7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88cm" fo:min-width="2.82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7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584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287"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288"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2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9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9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9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0.83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2.24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2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4.04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29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0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592cm" fo:min-width="3.30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6" style:family="graphic" style:parent-style-name="caption">
      <style:graphic-properties draw:stroke="none" svg:stroke-color="#000000" draw:fill="none" draw:fill-color="#ffffff" draw:auto-grow-height="true" draw:auto-grow-width="false" fo:min-height="1.315cm" loext:decorative="false"/>
      <style:paragraph-properties style:writing-mode="lr-tb"/>
    </style:style>
    <style:style style:name="gr307" style:family="graphic" style:parent-style-name="Body_20_Text">
      <style:graphic-properties draw:stroke="none" svg:stroke-color="#000000" draw:auto-grow-height="true" draw:auto-grow-width="false" fo:min-height="7.605cm" loext:decorative="false"/>
      <style:paragraph-properties style:writing-mode="lr-tb"/>
    </style:style>
    <style:style style:name="gr308" style:family="graphic" style:parent-style-name="standard">
      <style:graphic-properties draw:stroke="none" draw:fill="none" fo:min-height="1.433cm" loext:decorative="false"/>
      <style:paragraph-properties style:writing-mode="lr-tb"/>
    </style:style>
    <style:style style:name="gr309" style:family="graphic" style:parent-style-name="standard">
      <style:graphic-properties draw:stroke="none" draw:fill="none" fo:min-height="1.337cm" loext:decorative="false"/>
      <style:paragraph-properties style:writing-mode="lr-tb"/>
    </style:style>
    <style:style style:name="gr310" style:family="graphic" style:parent-style-name="Heading">
      <style:graphic-properties draw:stroke="none" draw:fill="none" draw:textarea-horizontal-align="left" draw:textarea-vertical-align="top" draw:auto-grow-height="true" draw:auto-grow-width="true" fo:min-height="0.624cm" fo:min-width="8.46cm" fo:padding-top="0cm" fo:padding-bottom="0cm" fo:padding-left="0cm" fo:padding-right="0cm" loext:decorative="false"/>
      <style:paragraph-properties style:writing-mode="lr-tb"/>
    </style:style>
    <style:style style:name="gr311" style:family="graphic" style:parent-style-name="Body_20_Text">
      <style:graphic-properties draw:stroke="none" svg:stroke-color="#000000" draw:auto-grow-height="true" draw:auto-grow-width="false" fo:min-height="2.141cm" loext:decorative="false"/>
      <style:paragraph-properties style:writing-mode="lr-tb"/>
    </style:style>
    <style:style style:name="gr312"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313"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314"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3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11cm" fo:min-width="4.46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6.859cm" fo:min-width="17.5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2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2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331"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332"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33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3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66cm" fo:min-width="0.83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3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41cm" fo:min-width="3.87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4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4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5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98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5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01cm" fo:min-width="4.27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6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3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6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4" style:family="graphic" style:parent-style-name="caption">
      <style:graphic-properties draw:stroke="none" svg:stroke-color="#000000" draw:fill="none" draw:fill-color="#ffffff" draw:auto-grow-height="true" draw:auto-grow-width="false" fo:min-height="1.612cm" loext:decorative="false"/>
      <style:paragraph-properties style:writing-mode="lr-tb"/>
    </style:style>
    <style:style style:name="gr365" style:family="graphic" style:parent-style-name="Body_20_Text">
      <style:graphic-properties draw:stroke="none" svg:stroke-color="#000000" draw:auto-grow-height="true" draw:auto-grow-width="false" fo:min-height="1.973cm" loext:decorative="false"/>
      <style:paragraph-properties style:writing-mode="lr-tb"/>
    </style:style>
    <style:style style:name="gr366" style:family="graphic" style:parent-style-name="caption">
      <style:graphic-properties draw:stroke="none" svg:stroke-color="#000000" draw:fill="none" draw:fill-color="#ffffff" draw:auto-grow-height="true" draw:auto-grow-width="false" fo:min-height="3.655cm" loext:decorative="false"/>
      <style:paragraph-properties style:writing-mode="lr-tb"/>
    </style:style>
    <style:style style:name="gr367" style:family="graphic" style:parent-style-name="Body_20_Text">
      <style:graphic-properties draw:stroke="none" svg:stroke-color="#000000" draw:auto-grow-height="true" draw:auto-grow-width="false" fo:min-height="1.119cm" loext:decorative="false"/>
      <style:paragraph-properties style:writing-mode="lr-tb"/>
    </style:style>
    <style:style style:name="gr36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36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370"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3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245cm" fo:min-width="4.42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7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016cm" fo:min-width="17.20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7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7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37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86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387"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388"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3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011cm" fo:min-width="3.56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9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54cm" fo:min-width="2.0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39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9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98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88cm" fo:min-width="3.869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0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93cm" fo:min-width="3.16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0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09" style:family="graphic" style:parent-style-name="Body_20_Text">
      <style:graphic-properties draw:stroke="none" svg:stroke-color="#000000" draw:auto-grow-height="true" draw:auto-grow-width="false" fo:min-height="1.468cm" loext:decorative="false"/>
      <style:paragraph-properties style:writing-mode="lr-tb"/>
    </style:style>
    <style:style style:name="gr410" style:family="graphic" style:parent-style-name="Body_20_Text">
      <style:graphic-properties draw:stroke="none" svg:stroke-color="#000000" draw:auto-grow-height="true" draw:auto-grow-width="false" fo:min-height="1.606cm" loext:decorative="false"/>
      <style:paragraph-properties style:writing-mode="lr-tb"/>
    </style:style>
    <style:style style:name="gr411"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1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1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1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1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20"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21"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2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89cm" fo:min-width="3.19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2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2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1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3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3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35"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3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13cm" fo:min-width="4.492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88cm" fo:min-width="14.31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4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4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52"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53"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5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385cm" fo:min-width="1.17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5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54cm" fo:min-width="3.4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5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31cm" fo:min-width="3.2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6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1"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46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463"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46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6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6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6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7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76"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77"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7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01cm" fo:min-width="2.41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899cm" fo:min-width="4.86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8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485"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486"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8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49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9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64cm" fo:min-width="2.676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49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3cm" fo:min-width="5.09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0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9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4.52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0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1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15"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51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1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2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2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01cm" fo:min-width="2.415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52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52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53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3.0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3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3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53cm" fo:min-width="5.43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3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993cm" fo:min-width="2.603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3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4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738cm" fo:min-width="16.8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4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2" style:family="graphic" style:parent-style-name="Heading">
      <style:graphic-properties draw:stroke="none" draw:fill="none" draw:textarea-horizontal-align="left" draw:textarea-vertical-align="top" draw:auto-grow-height="true" draw:auto-grow-width="true" fo:min-height="0.543cm" fo:min-width="2.567cm" fo:padding-top="0cm" fo:padding-bottom="0cm" fo:padding-left="0cm" fo:padding-right="0cm" loext:decorative="false"/>
      <style:paragraph-properties style:writing-mode="lr-tb"/>
    </style:style>
    <style:style style:name="gr553"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solid" draw:fill-color="#000000" loext:fill-use-slide-background="false" draw:textarea-horizontal-align="justify" draw:textarea-vertical-align="middle" draw:auto-grow-height="false" fo:min-height="0.104cm" fo:min-width="0cm" fo:padding-top="0.139cm" fo:padding-bottom="0.139cm" fo:padding-left="0.264cm" fo:padding-right="0.264cm" fo:wrap-option="wrap" draw:shadow="hidden" draw:shadow-offset-x="0.2cm" draw:shadow-offset-y="0.2cm" draw:shadow-color="#808080" style:protect="size" loext:decorative="false"/>
    </style:style>
    <style:style style:name="gr55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loext:decorative="false"/>
    </style:style>
    <style:style style:name="gr555" style:family="graphic" style:parent-style-name="Graphic"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right" draw:textarea-vertical-align="middle" draw:auto-grow-height="false" fo:min-height="2.191cm" fo:min-width="4.481cm" fo:padding-top="0.152cm" fo:padding-bottom="0.152cm" fo:padding-left="0.6cm" fo:padding-right="0.2cm" fo:wrap-option="wrap" draw:shadow="hidden" draw:shadow-offset-x="0.2cm" draw:shadow-offset-y="0.2cm" draw:shadow-color="#808080" loext:decorative="false"/>
      <style:paragraph-properties style:writing-mode="lr-tb"/>
    </style:style>
    <style:style style:name="gr557"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5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6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2"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59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6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6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671cm" fo:min-width="2.181cm" fo:padding-top="0.152cm" fo:padding-bottom="0.152cm" fo:padding-left="0.3cm" fo:padding-right="0.277cm" fo:wrap-option="wrap" draw:shadow="hidden" draw:shadow-offset-x="0.2cm" draw:shadow-offset-y="0.2cm" draw:shadow-color="#808080" style:writing-mode="lr-tb" loext:decorative="false"/>
      <style:paragraph-properties style:writing-mode="lr-tb"/>
    </style:style>
    <style:style style:name="gr568" style:family="graphic" style:parent-style-name="standard" style:list-style-name="L3">
      <style:graphic-properties draw:stroke="solid" svg:stroke-width="0.053cm" svg:stroke-color="#000000" draw:marker-start="" draw:marker-start-width="0.28cm" draw:marker-start-center="false" draw:marker-end="" draw:marker-end-width="0.28cm" draw:marker-end-center="false" draw:fill="none" draw:fill-color="#729fcf" loext:fill-use-slide-background="false" draw:textarea-horizontal-align="justify" draw:textarea-vertical-align="middle" draw:auto-grow-height="false" fo:min-height="0.05cm" fo:min-width="0cm" fo:padding-top="0.152cm" fo:padding-bottom="0.152cm" fo:padding-left="0.277cm" fo:padding-right="0.277cm" fo:wrap-option="wrap" draw:shadow="hidden" draw:shadow-offset-x="0.2cm" draw:shadow-offset-y="0.2cm" draw:shadow-color="#808080" loext:decorative="false"/>
    </style:style>
    <style:style style:name="gr569" style:family="graphic" style:parent-style-name="standard" style:list-style-name="L3">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57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883cm" fo:min-width="3.14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28cm" fo:min-width="4.2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7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7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1.29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7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7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1.419cm" fo:min-width="5.2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8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8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82cm" fo:min-width="3.97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8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6"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3.3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88"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9"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0"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9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2.05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697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textarea-vertical-align="middle" draw:auto-grow-height="false" draw:auto-grow-width="true" fo:min-height="0.702cm" fo:min-width="0.7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71cm" fo:min-width="3.17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9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776cm" fo:min-width="3.371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59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618cm" fo:min-width="3.954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59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98cm" fo:min-width="0.048cm" fo:padding-top="0.101cm" fo:padding-bottom="0.101cm" fo:padding-left="0.226cm" fo:padding-right="0.226cm" fo:wrap-option="wrap" draw:shadow="hidden" draw:shadow-offset-x="0.2cm" draw:shadow-offset-y="0.2cm" draw:shadow-color="#808080" style:protect="size" loext:decorative="false"/>
    </style:style>
    <style:style style:name="gr601"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center" draw:textarea-vertical-align="middle" draw:auto-grow-height="false" fo:min-height="0.456cm" fo:min-width="2.388cm" fo:padding-top="0.106cm" fo:padding-bottom="0.106cm" fo:padding-left="0.226cm" fo:padding-right="0.226cm" fo:wrap-option="wrap" draw:shadow="hidden" draw:shadow-offset-x="0.2cm" draw:shadow-offset-y="0.2cm" draw:shadow-color="#808080" style:writing-mode="lr-tb" loext:decorative="false"/>
      <style:paragraph-properties style:writing-mode="lr-tb"/>
    </style:style>
    <style:style style:name="gr603"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4"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5" style:family="graphic" style:parent-style-name="standard" style:list-style-name="L2">
      <style:graphic-properties draw:stroke="solid" draw:stroke-dash="Dashed_20__28_var_29__20_4" svg:stroke-width="0.053cm" svg:stroke-color="#000000" draw:marker-start="Navigation" draw:marker-start-width="0.3cm" draw:marker-start-center="false" draw:marker-en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6" style:family="graphic" style:parent-style-name="standard">
      <style:graphic-properties draw:stroke="none" draw:fill="none" draw:textarea-horizontal-align="left" draw:textarea-vertical-align="top" draw:auto-grow-height="true" draw:auto-grow-width="true" fo:min-height="0.543cm" fo:min-width="6.257cm" fo:padding-top="0cm" fo:padding-bottom="0cm" fo:padding-left="0cm" fo:padding-right="0cm" loext:decorative="false"/>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501cm" fo:min-width="1.147cm" fo:padding-top="0cm" fo:padding-bottom="0cm" fo:padding-left="0cm" fo:padding-right="0cm" loext:decorative="false"/>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67cm" fo:min-width="0.422cm" fo:padding-top="0cm" fo:padding-bottom="0cm" fo:padding-left="0cm" fo:padding-right="0cm" loext:decorative="false"/>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67cm" fo:min-width="18.315cm" fo:padding-top="0cm" fo:padding-bottom="0cm" fo:padding-left="0cm" fo:padding-right="0cm" loext:decorative="false"/>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67cm" fo:min-width="5.228cm" fo:padding-top="0cm" fo:padding-bottom="0cm" fo:padding-left="0cm" fo:padding-right="0cm" loext:decorative="false"/>
      <style:paragraph-properties style:writing-mode="lr-tb"/>
    </style:style>
    <style:style style:name="gr612" style:family="graphic" style:parent-style-name="standard">
      <style:graphic-properties draw:stroke="none" draw:fill="solid" draw:fill-color="#000000" loext:decorative="false"/>
    </style:style>
    <style:style style:name="gr613" style:family="graphic" style:parent-style-name="standard">
      <style:graphic-properties draw:stroke="none" draw:fill="none" draw:textarea-horizontal-align="left" draw:textarea-vertical-align="top" draw:auto-grow-height="true" draw:auto-grow-width="true" fo:min-height="0.467cm" fo:min-width="17.964cm" fo:padding-top="0cm" fo:padding-bottom="0cm" fo:padding-left="0cm" fo:padding-right="0cm" loext:decorative="false"/>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67cm" fo:min-width="17.666cm" fo:padding-top="0cm" fo:padding-bottom="0cm" fo:padding-left="0cm" fo:padding-right="0cm" loext:decorative="false"/>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67cm" fo:min-width="16.88cm" fo:padding-top="0cm" fo:padding-bottom="0cm" fo:padding-left="0cm" fo:padding-right="0cm" loext:decorative="false"/>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67cm" fo:min-width="18.675cm" fo:padding-top="0cm" fo:padding-bottom="0cm" fo:padding-left="0cm" fo:padding-right="0cm" loext:decorative="false"/>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67cm" fo:min-width="16.827cm" fo:padding-top="0cm" fo:padding-bottom="0cm" fo:padding-left="0cm" fo:padding-right="0cm" loext:decorative="false"/>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67cm" fo:min-width="17.521cm" fo:padding-top="0cm" fo:padding-bottom="0cm" fo:padding-left="0cm" fo:padding-right="0cm" loext:decorative="false"/>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501cm" fo:min-width="4.625cm" fo:padding-top="0cm" fo:padding-bottom="0cm" fo:padding-left="0cm" fo:padding-right="0cm" loext:decorative="false"/>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67cm" fo:min-width="18.708cm" fo:padding-top="0cm" fo:padding-bottom="0cm" fo:padding-left="0cm" fo:padding-right="0cm" loext:decorative="false"/>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67cm" fo:min-width="11.762cm" fo:padding-top="0cm" fo:padding-bottom="0cm" fo:padding-left="0cm" fo:padding-right="0cm" loext:decorative="false"/>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67cm" fo:min-width="16.991cm" fo:padding-top="0cm" fo:padding-bottom="0cm" fo:padding-left="0cm" fo:padding-right="0cm" loext:decorative="false"/>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67cm" fo:min-width="17.777cm" fo:padding-top="0cm" fo:padding-bottom="0cm" fo:padding-left="0cm" fo:padding-right="0cm" loext:decorative="false"/>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67cm" fo:min-width="18.185cm" fo:padding-top="0cm" fo:padding-bottom="0cm" fo:padding-left="0cm" fo:padding-right="0cm" loext:decorative="false"/>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67cm" fo:min-width="15.936cm" fo:padding-top="0cm" fo:padding-bottom="0cm" fo:padding-left="0cm" fo:padding-right="0cm" loext:decorative="false"/>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501cm" fo:min-width="5.041cm" fo:padding-top="0cm" fo:padding-bottom="0cm" fo:padding-left="0cm" fo:padding-right="0cm" loext:decorative="false"/>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67cm" fo:min-width="18.32cm" fo:padding-top="0cm" fo:padding-bottom="0cm" fo:padding-left="0cm" fo:padding-right="0cm" loext:decorative="false"/>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67cm" fo:min-width="17.934cm" fo:padding-top="0cm" fo:padding-bottom="0cm" fo:padding-left="0cm" fo:padding-right="0cm" loext:decorative="false"/>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67cm" fo:min-width="7.44cm" fo:padding-top="0cm" fo:padding-bottom="0cm" fo:padding-left="0cm" fo:padding-right="0cm" loext:decorative="false"/>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67cm" fo:min-width="17.836cm" fo:padding-top="0cm" fo:padding-bottom="0cm" fo:padding-left="0cm" fo:padding-right="0cm" loext:decorative="false"/>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67cm" fo:min-width="18.36cm" fo:padding-top="0cm" fo:padding-bottom="0cm" fo:padding-left="0cm" fo:padding-right="0cm" loext:decorative="false"/>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467cm" fo:min-width="6.137cm" fo:padding-top="0cm" fo:padding-bottom="0cm" fo:padding-left="0cm" fo:padding-right="0cm" loext:decorative="false"/>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467cm" fo:min-width="9.83cm" fo:padding-top="0cm" fo:padding-bottom="0cm" fo:padding-left="0cm" fo:padding-right="0cm" loext:decorative="false"/>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467cm" fo:min-width="0.449cm" fo:padding-top="0cm" fo:padding-bottom="0cm" fo:padding-left="0cm" fo:padding-right="0cm" loext:decorative="false"/>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467cm" fo:min-width="12.596cm" fo:padding-top="0cm" fo:padding-bottom="0cm" fo:padding-left="0cm" fo:padding-right="0cm" loext:decorative="false"/>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467cm" fo:min-width="14.619cm" fo:padding-top="0cm" fo:padding-bottom="0cm" fo:padding-left="0cm" fo:padding-right="0cm" loext:decorative="false"/>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467cm" fo:min-width="0.444cm" fo:padding-top="0cm" fo:padding-bottom="0cm" fo:padding-left="0cm" fo:padding-right="0cm" loext:decorative="false"/>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67cm" fo:min-width="13.652cm" fo:padding-top="0cm" fo:padding-bottom="0cm" fo:padding-left="0cm" fo:padding-right="0cm" loext:decorative="false"/>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67cm" fo:min-width="15.929cm" fo:padding-top="0cm" fo:padding-bottom="0cm" fo:padding-left="0cm" fo:padding-right="0cm" loext:decorative="false"/>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67cm" fo:min-width="6.73cm" fo:padding-top="0cm" fo:padding-bottom="0cm" fo:padding-left="0cm" fo:padding-right="0cm" loext:decorative="false"/>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67cm" fo:min-width="0.45cm" fo:padding-top="0cm" fo:padding-bottom="0cm" fo:padding-left="0cm" fo:padding-right="0cm" loext:decorative="false"/>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67cm" fo:min-width="14.1cm" fo:padding-top="0cm" fo:padding-bottom="0cm" fo:padding-left="0cm" fo:padding-right="0cm" loext:decorative="false"/>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67cm" fo:min-width="18.251cm" fo:padding-top="0cm" fo:padding-bottom="0cm" fo:padding-left="0cm" fo:padding-right="0cm" loext:decorative="false"/>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67cm" fo:min-width="3.895cm" fo:padding-top="0cm" fo:padding-bottom="0cm" fo:padding-left="0cm" fo:padding-right="0cm"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text-properties style:font-name="FreeSerif" fo:font-size="24pt" style:font-size-asian="24pt" style:font-size-complex="24pt"/>
    </style:style>
    <style:style style:name="P3" style:family="paragraph">
      <loext:graphic-properties draw:fill="none"/>
      <style:text-properties fo:font-size="24pt" style:font-size-asian="24pt" style:font-size-complex="24pt"/>
    </style:style>
    <style:style style:name="P4" style:family="paragraph">
      <loext:graphic-properties draw:fill="none"/>
      <style:text-properties fo:font-size="3.90000009536743pt" style:font-size-asian="3.90000009536743pt" style:font-size-complex="3.90000009536743pt"/>
    </style:style>
    <style:style style:name="P5" style:family="paragraph">
      <loext:graphic-properties draw:fill="solid" draw:fill-color="#4f81bd"/>
    </style:style>
    <style:style style:name="P6" style:family="paragraph">
      <loext:graphic-properties draw:fill="none"/>
      <style:text-properties style:font-name="FreeSerif" fo:font-size="27.8999996185303pt" style:font-size-asian="27.8999996185303pt" style:font-size-complex="27.8999996185303pt"/>
    </style:style>
    <style:style style:name="P7" style:family="paragraph">
      <loext:graphic-properties draw:fill="none"/>
      <style:text-properties fo:font-size="11.1000003814697pt" style:font-size-asian="11.1000003814697pt" style:font-size-complex="11.1000003814697pt"/>
    </style:style>
    <style:style style:name="P8" style:family="paragraph">
      <loext:graphic-properties draw:fill="none"/>
      <style:text-properties style:font-size-asian="14.1000003814697pt"/>
    </style:style>
    <style:style style:name="P9" style:family="paragraph">
      <style:paragraph-properties fo:text-align="start"/>
      <style:text-properties style:font-size-asian="12pt" style:font-size-complex="12pt"/>
    </style:style>
    <style:style style:name="P10" style:family="paragraph">
      <loext:graphic-properties draw:fill="solid" draw:fill-color="#ffffff"/>
    </style:style>
    <style:style style:name="P11" style:family="paragraph">
      <style:paragraph-properties fo:text-align="center" style:writing-mode="lr-tb"/>
    </style:style>
    <style:style style:name="P12" style:family="paragraph">
      <loext:graphic-properties draw:fill="none"/>
      <style:paragraph-properties fo:text-align="center"/>
      <style:text-properties fo:font-size="9.89999961853027pt" style:font-size-asian="9.89999961853027pt" style:font-size-complex="9.89999961853027pt"/>
    </style:style>
    <style:style style:name="P13" style:family="paragraph">
      <loext:graphic-properties draw:fill="none"/>
      <style:text-properties fo:font-size="9.89999961853027pt" style:font-size-asian="9.89999961853027pt" style:font-size-complex="9.89999961853027pt"/>
    </style:style>
    <style:style style:name="P14" style:family="paragraph">
      <loext:graphic-properties draw:fill="none"/>
      <style:text-properties fo:color="#77bc65" loext:opacity="100%" style:font-name="FreeSerif" fo:font-size="14.1000003814697pt" style:font-size-asian="14.1000003814697pt" style:font-size-complex="14.1000003814697pt"/>
    </style:style>
    <style:style style:name="P15" style:family="paragraph">
      <loext:graphic-properties draw:fill="none"/>
      <style:paragraph-properties fo:text-align="start"/>
      <style:text-properties fo:font-size="11.1000003814697pt" style:font-size-asian="11.1000003814697pt" style:font-size-complex="11.1000003814697pt"/>
    </style:style>
    <style:style style:name="P16" style:family="paragraph">
      <style:text-properties style:font-size-asian="3.90000009536743pt" style:font-size-complex="3.90000009536743pt"/>
    </style:style>
    <style:style style:name="P17" style:family="paragraph">
      <style:text-properties style:font-size-asian="9.89999961853027pt" style:font-size-complex="9.89999961853027pt"/>
    </style:style>
    <style:style style:name="P18" style:family="paragraph">
      <loext:graphic-properties draw:fill="none"/>
      <style:paragraph-properties fo:text-align="start"/>
      <style:text-properties fo:color="#c9211e" loext:opacity="100%" style:font-size-asian="14.1000003814697pt"/>
    </style:style>
    <style:style style:name="P1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0"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text-indent="0cm" style:writing-mode="lr-tb"/>
    </style:style>
    <style:style style:name="P25" style:family="paragraph">
      <style:paragraph-properties fo:margin-left="0cm" fo:margin-right="0cm" fo:text-indent="0cm"/>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style:text-properties style:font-size-asian="12pt" style:font-size-complex="12pt"/>
    </style:style>
    <style:style style:name="P29" style:family="paragraph">
      <loext:graphic-properties draw:fill="solid" draw:fill-color="#ffffff" draw:opacity="66%"/>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0" style:family="paragraph">
      <style:paragraph-properties fo:margin-left="0cm" fo:margin-right="0cm" fo:text-align="center" fo:text-indent="0cm"/>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style:text-properties style:font-size-asian="13pt"/>
    </style:style>
    <style:style style:name="P32" style:family="paragraph">
      <style:paragraph-properties fo:text-align="start"/>
    </style:style>
    <style:style style:name="P33" style:family="paragraph">
      <loext:graphic-properties draw:fill="none" draw:fill-color="#ffffff"/>
      <style:paragraph-properties fo:text-align="start"/>
    </style:style>
    <style:style style:name="P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Unifont"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writing-mode="lr-tb"/>
      <style:text-properties fo:font-size="8pt" style:font-size-asian="8pt" style:font-size-complex="8pt"/>
    </style:style>
    <style:style style:name="P4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style:style>
    <style:style style:name="P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writing-mode="lr-tb"/>
    </style:style>
    <style:style style:name="P5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5" style:family="paragraph">
      <style:paragraph-properties fo:text-align="start"/>
      <style:text-properties fo:font-weight="normal" style:font-size-asian="22pt" style:font-weight-asian="normal" style:font-size-complex="22pt" style:font-weight-complex="normal"/>
    </style:style>
    <style:style style:name="P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8" style:family="paragraph">
      <loext:graphic-properties draw:fill="none"/>
      <style:paragraph-properties fo:text-align="start"/>
      <style:text-properties style:font-size-asian="13pt"/>
    </style:style>
    <style:style style:name="P59" style:family="paragraph">
      <style:paragraph-properties fo:text-align="start"/>
      <style:text-properties fo:font-weight="normal" style:font-size-asian="12pt" style:font-weight-asian="normal" style:font-size-complex="12pt" style:font-weight-complex="normal"/>
    </style:style>
    <style:style style:name="P60" style:family="paragraph">
      <loext:graphic-properties draw:fill="none"/>
      <style:paragraph-properties fo:text-align="center"/>
    </style:style>
    <style:style style:name="P6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start" fo:text-indent="0cm" style:writing-mode="lr-tb"/>
    </style:style>
    <style:style style:name="P64" style:family="paragraph">
      <style:paragraph-properties fo:margin-left="0cm" fo:margin-right="0cm" fo:margin-top="0.42cm" fo:margin-bottom="0.35cm" fo:line-height="100%" fo:text-indent="0cm" style:writing-mode="lr-tb"/>
    </style:style>
    <style:style style:name="P65" style:family="paragraph">
      <style:paragraph-properties fo:text-align="left" style:writing-mode="lr-tb"/>
    </style:style>
    <style:style style:name="P66" style:family="paragraph">
      <style:paragraph-properties fo:text-align="left"/>
    </style:style>
    <style:style style:name="P67" style:family="paragraph">
      <style:paragraph-properties fo:margin-left="0cm" fo:margin-right="0cm" fo:text-align="left" fo:text-indent="0cm" style:writing-mode="lr-tb"/>
    </style:style>
    <style:style style:name="P68" style:family="paragraph">
      <style:paragraph-properties fo:margin-left="0cm" fo:margin-right="0cm" fo:text-align="left" fo:text-indent="0cm"/>
    </style:style>
    <style:style style:name="P69" style:family="paragraph">
      <style:paragraph-properties fo:margin-top="0.051cm" fo:margin-bottom="0.051cm" fo:line-height="115%" fo:text-align="start" style:text-autospace="none" style:writing-mode="lr-tb"/>
    </style:style>
    <style:style style:name="P70" style:family="paragraph">
      <style:paragraph-properties fo:margin-left="0cm" fo:margin-right="0cm" fo:margin-top="0.051cm" fo:margin-bottom="0.051cm" fo:line-height="115%" fo:text-align="start" fo:text-indent="0cm" style:text-autospace="none"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71" style:family="paragraph">
      <loext:graphic-properties draw:fill="solid" draw:fill-color="#ffffff"/>
      <style:paragraph-properties fo:margin-left="0cm" fo:margin-right="0cm" fo:margin-top="0.051cm" fo:margin-bottom="0.051cm" fo:line-height="115%" fo:text-align="start" fo:text-indent="0cm" style:text-autospace="none" style:writing-mode="lr-tb"/>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72" style:family="paragraph">
      <style:paragraph-properties fo:margin-top="0.42cm" fo:margin-bottom="0.35cm" fo:line-height="115%" fo:text-align="start" style:text-autospace="none" style:writing-mode="lr-tb"/>
    </style:style>
    <style:style style:name="P73" style:family="paragraph">
      <style:paragraph-properties fo:margin-top="0.42cm" fo:margin-bottom="0.35cm" fo:line-height="115%" fo:text-align="start" style:text-autospace="none"/>
      <style:text-properties fo:font-size="22pt" fo:font-weight="bold" style:font-size-asian="22pt" style:font-weight-asian="bold" style:font-size-complex="22pt" style:font-weight-complex="bold"/>
    </style:style>
    <style:style style:name="P74" style:family="paragraph">
      <style:paragraph-properties fo:margin-left="1cm" fo:margin-right="0cm" fo:margin-top="0.051cm" fo:margin-bottom="0.051cm" fo:line-height="115%" fo:text-align="start" fo:text-indent="0cm" style:text-autospace="none" style:writing-mode="lr-tb"/>
    </style:style>
    <style:style style:name="P75" style:family="paragraph">
      <style:paragraph-properties fo:margin-left="1cm" fo:margin-right="0cm" fo:margin-top="0.42cm" fo:margin-bottom="0.35cm" fo:line-height="115%" fo:text-align="start" fo:text-indent="0cm" style:text-autospace="none" style:writing-mode="lr-tb"/>
    </style:style>
    <style:style style:name="P76" style:family="paragraph">
      <loext:graphic-properties draw:fill="none"/>
      <style:text-properties fo:font-size="16pt" style:font-size-asian="16pt" style:font-size-complex="16pt"/>
    </style:style>
    <style:style style:name="P77" style:family="paragraph">
      <loext:graphic-properties draw:fill="none"/>
      <style:text-properties fo:font-size="10pt" style:font-size-asian="10pt" style:font-size-complex="10pt"/>
    </style:style>
    <style:style style:name="P78" style:family="paragraph">
      <loext:graphic-properties draw:fill="none"/>
      <style:text-properties fo:color="#4f81bd" loext:opacity="100%" style:font-size-asian="13pt"/>
    </style:style>
    <style:style style:name="P79" style:family="paragraph">
      <style:paragraph-properties fo:margin-top="0.42cm" fo:margin-bottom="0.35cm" fo:line-height="115%" fo:text-align="start" style:text-autospace="none"/>
      <style:text-properties fo:font-size="10pt" style:font-size-asian="10pt" style:font-size-complex="10pt"/>
    </style:style>
    <style:style style:name="P80" style:family="paragraph">
      <style:paragraph-properties fo:margin-top="0.051cm" fo:margin-bottom="0.051cm" style:text-autospace="none"/>
    </style:style>
    <style:style style:name="P8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ans1"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82" style:family="paragraph">
      <style:paragraph-properties fo:margin-top="0.051cm" fo:margin-bottom="0.051cm" fo:line-height="115%" fo:text-align="start" style:text-autospace="none"/>
    </style:style>
    <style:style style:name="P83" style:family="paragraph">
      <loext:graphic-properties draw:fill="none"/>
      <style:paragraph-properties fo:margin-top="0.051cm" fo:margin-bottom="0.051cm" fo:line-height="115%" fo:text-align="start" style:text-autospace="none"/>
      <style:text-properties style:font-size-asian="13pt"/>
    </style:style>
    <style:style style:name="P84" style:family="paragraph">
      <loext:graphic-properties draw:fill="none"/>
      <style:text-properties fo:font-size="14.1000003814697pt" style:font-size-asian="14.1000003814697pt" style:font-size-complex="14.1000003814697pt"/>
    </style:style>
    <style:style style:name="P85" style:family="paragraph">
      <loext:graphic-properties draw:fill="none"/>
      <style:text-properties fo:font-size="13pt" style:font-size-asian="13pt" style:font-size-complex="13pt"/>
    </style:style>
    <style:style style:name="P86" style:family="paragraph">
      <loext:graphic-properties draw:fill="none"/>
      <style:text-properties fo:font-size="12pt" style:font-size-asian="12pt" style:font-size-complex="12pt"/>
    </style:style>
    <style:style style:name="P87" style:family="paragraph">
      <loext:graphic-properties draw:fill="solid" draw:fill-color="#000000"/>
    </style:style>
    <style:style style:name="T1" style:family="text">
      <style:text-properties fo:color="#17365d" loext:opacity="100%" style:font-name="FreeSerif" fo:font-size="24pt" fo:font-style="italic" fo:font-weight="bold" style:font-name-asian="Cambria" style:font-size-asian="24pt" style:font-style-asian="italic" style:font-weight-asian="bold" style:font-name-complex="Cambria" style:font-size-complex="24pt" style:font-style-complex="italic" style:font-weight-complex="bold"/>
    </style:style>
    <style:style style:name="T2" style:family="text">
      <style:text-properties fo:color="#17365d" loext:opacity="100%" style:font-name="FreeSerif" fo:font-size="24pt" fo:font-weight="normal" style:font-name-asian="Cambria" style:font-size-asian="24pt" style:font-weight-asian="normal" style:font-name-complex="Cambria" style:font-size-complex="24pt" style:font-weight-complex="normal"/>
    </style:style>
    <style:style style:name="T3" style:family="text">
      <style:text-properties fo:color="#17365d" loext:opacity="100%" style:font-name="Cambria" fo:font-size="24pt" fo:font-weight="normal" style:font-name-asian="Cambria" style:font-size-asian="24pt" style:font-weight-asian="normal" style:font-name-complex="Cambria" style:font-size-complex="24pt" style:font-weight-complex="normal"/>
    </style:style>
    <style:style style:name="T4" style:family="text">
      <style:text-properties fo:color="#17365d" loext:opacity="100%" style:font-name="Cambria" fo:font-size="3.90000009536743pt" fo:font-weight="normal" style:font-name-asian="Cambria" style:font-size-asian="3.90000009536743pt" style:font-weight-asian="normal" style:font-name-complex="Cambria" style:font-size-complex="3.90000009536743pt" style:font-weight-complex="normal"/>
    </style:style>
    <style:style style:name="T5" style:family="text">
      <style:text-properties fo:color="#17365d" loext:opacity="100%" style:font-name="FreeSerif" fo:font-size="27.8999996185303pt" fo:font-weight="normal" style:font-name-asian="Cambria" style:font-size-asian="27.8999996185303pt" style:font-weight-asian="normal" style:font-name-complex="Cambria" style:font-size-complex="27.8999996185303pt" style:font-weight-complex="normal"/>
    </style:style>
    <style:style style:name="T6" style:family="text">
      <style:text-properties fo:color="#000000" loext:opacity="100%" style:font-name="Calibri" fo:font-size="11.1000003814697pt" fo:font-style="italic" fo:font-weight="normal" style:font-name-asian="Calibri" style:font-size-asian="11.1000003814697pt" style:font-style-asian="italic" style:font-weight-asian="normal" style:font-name-complex="Calibri" style:font-size-complex="11.1000003814697pt" style:font-style-complex="italic" style:font-weight-complex="normal"/>
    </style:style>
    <style:style style:name="T7" style:family="text">
      <style:text-properties fo:color="#365f91" loext:opacity="100%" fo:font-weight="bold" style:font-size-asian="14.1000003814697pt" style:font-weight-asian="bold" style:font-weight-complex="bold"/>
    </style:style>
    <style:style style:name="T8" style:family="text">
      <style:text-properties fo:color="#000000" loext:opacity="100%" fo:font-weight="normal" style:font-name-asian="Calibri" style:font-size-asian="12pt" style:font-weight-asian="normal" style:font-name-complex="Calibri" style:font-size-complex="12pt" style:font-weight-complex="normal"/>
    </style:style>
    <style:style style:name="T9" style:family="text">
      <style:text-properties fo:color="#c9211e" loext:opacity="100%" fo:font-weight="bold" style:font-name-asian="Calibri" style:font-size-asian="12pt" style:font-weight-asian="bold" style:font-name-complex="Calibri" style:font-size-complex="12pt" style:font-weight-complex="bold"/>
    </style:style>
    <style:style style:name="T10" style:family="text">
      <style:text-properties fo:color="#77bc65" loext:opacity="100%" fo:font-weight="bold" style:font-name-asian="Calibri" style:font-size-asian="12pt" style:font-weight-asian="bold" style:font-name-complex="Calibri" style:font-size-complex="12pt" style:font-weight-complex="bold"/>
    </style:style>
    <style:style style:name="T11" style:family="text">
      <style:text-properties fo:color="#5983b0" loext:opacity="100%" fo:font-weight="bold" style:font-name-asian="Calibri" style:font-size-asian="12pt" style:font-weight-asian="bold" style:font-name-complex="Calibri" style:font-size-complex="12pt" style:font-weight-complex="bold"/>
    </style:style>
    <style:style style:name="T12" style:family="text">
      <style:text-properties fo:color="#000000" loext:opacity="100%" style:font-name="FreeSerif" fo:font-size="9.89999961853027pt" fo:font-weight="normal" style:font-name-asian="Calibri" style:font-size-asian="9.89999961853027pt" style:font-weight-asian="normal" style:font-name-complex="Calibri" style:font-size-complex="9.89999961853027pt" style:font-weight-complex="normal"/>
    </style:style>
    <style:style style:name="T13" style:family="text">
      <style:text-properties fo:color="#000000" loext:opacity="100%" style:font-name="Calibri" fo:font-size="9.89999961853027pt" fo:font-weight="normal" style:font-name-asian="Calibri" style:font-size-asian="9.89999961853027pt" style:font-weight-asian="normal" style:font-name-complex="Calibri" style:font-size-complex="9.89999961853027pt" style:font-weight-complex="normal"/>
    </style:style>
    <style:style style:name="T14" style:family="text">
      <style:text-properties fo:color="#77bc65" loext:opacity="100%" style:font-name="FreeSerif" fo:font-size="14.1000003814697pt" fo:font-weight="bold" style:font-name-asian="Cambria" style:font-size-asian="14.1000003814697pt" style:font-weight-asian="bold" style:font-name-complex="Cambria" style:font-size-complex="14.1000003814697pt" style:font-weight-complex="bold"/>
    </style:style>
    <style:style style:name="T15" style:family="text">
      <style:text-properties style:use-window-font-color="true" loext:opacity="0%" fo:font-weight="normal" style:font-name-asian="Calibri" style:font-size-asian="12pt" style:font-weight-asian="normal" style:font-name-complex="Calibri" style:font-size-complex="12pt" style:font-weight-complex="normal"/>
    </style:style>
    <style:style style:name="T16" style:family="text">
      <style:text-properties fo:color="#000000" loext:opacity="100%" style:font-name="Calibri" fo:font-size="11.1000003814697pt" fo:font-weight="normal" style:font-name-asian="Calibri" style:font-size-asian="11.1000003814697pt" style:font-weight-asian="normal" style:font-name-complex="Calibri" style:font-size-complex="11.1000003814697pt" style:font-weight-complex="normal"/>
    </style:style>
    <style:style style:name="T17" style:family="text">
      <style:text-properties fo:color="#17365d" loext:opacity="100%" fo:font-weight="normal" style:font-name-asian="Cambria" style:font-size-asian="3.90000009536743pt" style:font-weight-asian="normal" style:font-name-complex="Cambria" style:font-size-complex="3.90000009536743pt" style:font-weight-complex="normal"/>
    </style:style>
    <style:style style:name="T18" style:family="text">
      <style:text-properties fo:color="#000000" loext:opacity="100%" fo:font-weight="normal" style:font-name-asian="Calibri" style:font-size-asian="9.89999961853027pt" style:font-weight-asian="normal" style:font-name-complex="Calibri" style:font-size-complex="9.89999961853027pt" style:font-weight-complex="normal"/>
    </style:style>
    <style:style style:name="T19" style:family="text">
      <style:text-properties fo:color="#c9211e" loext:opacity="100%" fo:font-weight="bold" style:font-size-asian="14.1000003814697pt" style:font-weight-asian="bold"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77bc65" loext:opacity="100%" style:text-outline="false" style:text-line-through-style="none" style:text-line-through-type="none" style:font-name="Calibri" fo:font-size="12pt"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25" style:family="text">
      <style:text-properties fo:color="#4f81bd" loext:opacity="100%" fo:font-weight="bold" style:font-size-asian="13pt" style:font-weight-asian="bold" style:font-weight-complex="bold"/>
    </style:style>
    <style:style style:name="T26" style:family="text">
      <style:text-properties fo:color="#000000" loext:opacity="100%" fo:font-weight="normal" style:font-name-asian="Calibri" style:font-weight-asian="normal" style:font-weight-complex="normal"/>
    </style:style>
    <style:style style:name="T27" style:family="text">
      <style:text-properties fo:color="#c9211e" loext:opacity="100%" fo:font-weight="bold" style:font-name-asian="Calibri" style:font-weight-asian="bold"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729fcf"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30" style:family="text">
      <style:text-properties fo:font-variant="normal" fo:text-transform="none" fo:color="#c9211e"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1" style:family="text">
      <style:text-properties fo:font-variant="normal" fo:text-transform="none" fo:color="#729fcf"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2" style:family="text">
      <style:text-properties fo:font-variant="normal" fo:text-transform="none" fo:color="#77bc65" loext:opacity="100%" style:text-outline="false" style:text-line-through-style="none" style:text-line-through-type="none" style:font-name="Calibri" fo:font-size="8pt" fo:language="zxx" fo:country="none" fo:font-style="normal" fo:text-shadow="none" style:text-underline-style="none" fo:font-weight="bold" style:letter-kerning="true" style:font-name-asian="Calibri" style:font-size-asian="8pt" style:font-style-asian="normal" style:font-weight-asian="bold" style:font-name-complex="Calibri" style:font-size-complex="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Calibri" fo:font-size="8pt" fo:language="zxx" fo:country="none" fo:font-style="normal" fo:text-shadow="none" style:text-underline-style="none" fo:font-weight="normal" style:letter-kerning="true" style:font-name-asian="Calibri" style:font-size-asian="8pt" style:font-style-asian="normal" style:font-weight-asian="normal" style:font-name-complex="Calibri" style:font-size-complex="8pt" style:font-style-complex="normal" style:font-weight-complex="normal" style:text-emphasize="none" style:font-relief="none" style:text-overline-style="none" style:text-overline-color="font-color"/>
    </style:style>
    <style:style style:name="T35" style:family="text">
      <style:text-properties fo:font-weight="normal" style:font-name-asian="Calibri" style:font-size-asian="12pt" style:font-weight-asian="normal" style:font-name-complex="Calibri" style:font-size-complex="12pt" style:font-weight-complex="normal"/>
    </style:style>
    <style:style style:name="T36" style:family="text">
      <style:text-properties fo:color="#729fcf" loext:opacity="100%" fo:font-weight="bold" style:font-name-asian="Calibri" style:font-size-asian="12pt" style:font-weight-asian="bold" style:font-name-complex="Calibri" style:font-size-complex="12pt" style:font-weight-complex="bold"/>
    </style:style>
    <style:style style:name="T37" style:family="text">
      <style:text-properties fo:font-weight="normal" style:font-name-asian="FreeSerif1" style:font-size-asian="12pt" style:font-weight-asian="normal" style:font-name-complex="FreeSerif1" style:font-size-complex="12pt" style:font-weight-complex="normal"/>
    </style:style>
    <style:style style:name="T38" style:family="text">
      <style:text-properties fo:font-weight="bold" style:font-name-asian="Calibri" style:font-size-asian="12pt" style:font-weight-asian="bold" style:font-name-complex="Calibri" style:font-size-complex="12pt" style:font-weight-complex="bold"/>
    </style:style>
    <style:style style:name="T39" style:family="text">
      <style:text-properties fo:color="#000000" loext:opacity="100%" fo:font-style="normal"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40" style:family="text">
      <style:text-properties fo:color="#000000" loext:opacity="100%" fo:font-style="normal" style:text-underline-style="none"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41" style:family="text">
      <style:text-properties fo:color="#000000" loext:opacity="100%" fo:font-style="normal" style:text-underline-style="none" fo:font-weight="normal" style:font-name-asian="FreeSerif1" style:font-size-asian="12pt" style:font-style-asian="normal" style:font-weight-asian="normal" style:font-name-complex="FreeSerif1" style:font-size-complex="12pt" style:font-style-complex="normal" style:font-weight-complex="normal"/>
    </style:style>
    <style:style style:name="T42" style:family="text">
      <style:text-properties fo:color="#000000" loext:opacity="100%" style:text-position="sub 58%" fo:font-style="normal" style:text-underline-style="none"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43" style:family="text">
      <style:text-properties fo:color="#000000" loext:opacity="100%" style:text-position="0% 100%" fo:font-style="normal" style:text-underline-style="none"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44" style:family="text">
      <style:text-properties fo:color="#000000" loext:opacity="100%" style:text-position="0% 100%"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5" style:family="text">
      <style:text-properties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729fcf" loext:opacity="100%" style:text-outline="false" style:text-line-through-style="none" style:text-line-through-type="none"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fo:language="zxx" fo:country="none" fo:font-style="normal" fo:text-shadow="none" style:text-underline-style="none" fo:font-weight="normal" style:letter-kerning="true" style:font-name-asian="FreeSerif1" style:font-size-asian="12pt" style:font-style-asian="normal" style:font-weight-asian="normal" style:font-name-complex="FreeSerif1"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77bc65" loext:opacity="100%" style:text-outline="false" style:text-line-through-style="none" style:text-line-through-type="none"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fo:language="zxx" fo:country="none" fo:text-shadow="none" style:text-underline-style="none" fo:font-weight="normal" style:letter-kerning="true" style:font-name-asian="FreeSerif1" style:font-weight-asian="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fo:language="zxx" fo:country="none"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52" style:family="text">
      <style:text-properties style:font-name-asian="Calibri" style:font-size-asian="12pt" style:font-name-complex="Calibri" style:font-size-complex="12pt"/>
    </style:style>
    <style:style style:name="T53" style:family="text">
      <style:text-properties style:font-name="FreeSans3" fo:font-size="12pt" style:font-name-asian="Calibri" style:font-size-asian="12pt" style:font-name-complex="Calibri" style:font-size-complex="12pt"/>
    </style:style>
    <style:style style:name="T54"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style:font-name-asian="FreeSerif1" style:font-size-asian="12pt" style:font-weight-asian="normal" style:font-name-complex="Calibri" style:font-size-complex="12pt"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Free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729fcf" loext:opacity="100%" style:text-outline="false" style:text-line-through-style="none" style:text-line-through-type="none" style:font-name="FreeSans3"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Free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c9211e" loext:opacity="100%" style:text-outline="false" style:text-line-through-style="none" style:text-line-through-type="none" style:font-name="FreeSans3"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FreeSans3" fo:font-size="12pt" fo:language="zxx" fo:country="none" fo:font-style="italic" fo:text-shadow="none" style:text-underline-style="none" fo:font-weight="normal" style:letter-kerning="true" style:font-name-asian="Noto Sans CJK SC"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fo:language="zxx" fo:country="none" fo:text-shadow="none" style:text-underline-style="none" fo:font-weight="normal" style:letter-kerning="true" style:font-name-asian="FreeSerif1" style:font-size-asian="12pt" style:font-weight-asian="normal" style:font-name-complex="Calibri" style:font-size-complex="12pt" style:font-weight-complex="normal" style:text-emphasize="none" style:font-relief="none" style:text-overline-style="none" style:text-overline-color="font-color"/>
    </style:style>
    <style:style style:name="T61" style:family="text">
      <style:text-properties fo:font-variant="normal" fo:text-transform="none" fo:color="#c9211e"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loext:opacity="100%" style:text-outline="false" style:text-line-through-style="none" style:text-line-through-type="none" style:font-name="FreeSans3"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FreeSans3"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font-name="FreeSans3" fo:font-size="12pt" fo:language="zxx" fo:country="none" fo:font-style="normal" fo:text-shadow="none" style:text-underline-style="none" fo:font-weight="normal" style:letter-kerning="true" style:font-name-asian="FreeSerif1"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c9211e" loext:opacity="100%" style:text-outline="false" style:text-line-through-style="none" style:text-line-through-type="none" style:font-name="FreeSans3" fo:font-size="12pt" fo:language="zxx" fo:country="none"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font-name="FreeSans3" fo:font-size="12pt" fo:language="zxx" fo:country="none"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font-name="FreeSans3" fo:font-size="12pt" fo:language="zxx" fo:country="none" fo:font-style="italic" fo:text-shadow="none" style:text-underline-style="none" fo:font-weight="normal" style:letter-kerning="true" style:font-name-asian="Calibri" style:font-size-asian="12pt" style:font-style-asian="italic" style:font-weight-asian="normal" style:font-name-complex="Calibri" style:font-size-complex="12pt" style:font-style-complex="italic" style:font-weight-complex="normal" style:text-emphasize="none" style:font-relief="none" style:text-overline-style="none" style:text-overline-color="font-color"/>
    </style:style>
    <style:style style:name="T69" style:family="text">
      <style:text-properties fo:font-variant="normal" fo:text-transform="none" fo:color="#c9211e" loext:opacity="100%" style:text-outline="false" style:text-line-through-style="none" style:text-line-through-type="none" style:font-name="FreeSans3" fo:font-size="12pt" fo:language="zxx" fo:country="none" fo:font-style="normal" fo:text-shadow="none" style:text-underline-style="none" fo:font-weight="bold" style:letter-kerning="true" style:font-name-asian="Calibri" style:font-size-asian="12pt" style:font-style-asian="normal" style:font-weight-asian="normal" style:font-name-complex="Calibri"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fo:color="#c9211e" loext:opacity="100%" style:text-outline="false" style:text-line-through-style="none" style:text-line-through-type="none" style:font-name="FreeSans3"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fo:background-color="transparent" style:font-size-asian="12pt" style:font-weight-asian="normal" style:font-size-complex="12pt"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fo:background-color="#729fcf" style:font-size-asian="12pt" style:font-weight-asian="normal" style:font-size-complex="12pt" style:font-weight-complex="normal" style:text-emphasize="none" style:font-relief="none" style:text-overline-style="none" style:text-overline-color="font-color"/>
    </style:style>
    <style:style style:name="T74" style:family="text">
      <style:text-properties fo:font-variant="normal" fo:text-transform="none" style:text-outline="false" style:text-line-through-style="none" style:text-line-through-type="none" style:font-name="FreeSans1" fo:font-size="12pt"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normal" style:letter-kerning="true" fo:background-color="#729fcf" style:font-size-asian="12pt" style:font-weight-asian="normal" style:font-size-complex="12pt" style:font-weight-complex="normal" style:text-emphasize="none" style:font-relief="none" style:text-overline-style="none" style:text-overline-color="font-color"/>
    </style:style>
    <style:style style:name="T76" style:family="text">
      <style:text-properties fo:font-variant="normal" fo:text-transform="none" style:text-outline="false" style:text-line-through-style="none" style:text-line-through-type="none" style:font-name="FreeSans1" fo:font-size="12pt" fo:language="zxx" fo:country="none" fo:font-style="normal" fo:text-shadow="none" style:text-underline-style="none" fo:font-weight="normal" style:letter-kerning="true" fo:background-color="transparent"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FreeSans1" fo:font-size="12pt" fo:language="zxx" fo:country="none" fo:font-style="normal" fo:text-shadow="none" style:text-underline-style="none" fo:font-weight="normal" style:letter-kerning="true" fo:background-color="#e96666"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78"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normal" style:letter-kerning="true" fo:background-color="#5eb91e" style:font-size-asian="12pt" style:font-weight-asian="normal" style:font-size-complex="12pt" style:font-weight-complex="normal" style:text-emphasize="none" style:font-relief="none" style:text-overline-style="none" style:text-overline-color="font-color"/>
    </style:style>
    <style:style style:name="T79" style:family="text">
      <style:text-properties fo:font-variant="normal" fo:text-transform="none" style:text-outline="false" style:text-line-through-style="none" style:text-line-through-type="none" style:font-name="FreeSans1" fo:font-size="12pt" fo:language="zxx" fo:country="none" fo:font-style="normal" fo:text-shadow="none" style:text-underline-style="none" fo:font-weight="normal" style:letter-kerning="true" fo:background-color="#5eb91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0" style:family="text">
      <style:text-properties fo:font-variant="normal" fo:text-transform="none" style:text-outline="false" style:text-line-through-style="none" style:text-line-through-type="none" style:text-position="0% 100%" style:font-name="TexMaths Symbols" fo:font-size="12pt" fo:letter-spacing="normal"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text-outline="false" style:text-line-through-style="none" style:text-line-through-type="none" style:text-position="super 58%" style:font-name="TexMaths Symbols" fo:font-size="12pt" fo:letter-spacing="normal"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style:text-outline="false" style:text-line-through-style="none" style:text-line-through-type="none" style:text-position="0% 100%" style:font-name="TexMaths Symbols" fo:font-size="12pt"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style:text-outline="false" style:text-line-through-style="none" style:text-line-through-type="none" style:text-position="sub 58%" style:font-name="TexMaths Symbols" fo:font-size="12pt"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text-position="super 58%" style:font-name="TexMaths Symbols" fo:font-size="12pt" fo:letter-spacing="-0.471cm"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text-position="0% 100%" style:font-name="TexMaths Symbols1" fo:font-size="12pt" fo:letter-spacing="normal"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text-position="sub 58%" style:font-name="TexMaths Symbols1" fo:font-size="12pt" fo:letter-spacing="normal" fo:language="zxx" fo:country="none" fo:font-style="normal" fo:text-shadow="none" style:text-underline-style="none" fo:font-weight="normal" style:letter-kerning="true" style:font-name-asian="TexMaths Symbols" style:font-size-asian="12pt" style:font-style-asian="normal" style:font-weight-asian="normal" style:font-name-complex="TexMaths Symbols"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text-position="0% 100%" style:font-name="TexMaths Symbols" fo:font-size="16pt" fo:language="zxx" fo:country="none" fo:font-style="normal" fo:text-shadow="none" style:text-underline-style="none" fo:font-weight="normal" style:letter-kerning="tru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text-position="0% 100%" style:font-name="TexMaths Symbols" fo:font-size="16pt" fo:language="zxx" fo:country="none" fo:font-style="normal" fo:text-shadow="none" style:text-underline-style="none" fo:font-weight="normal" style:letter-kerning="true" fo:background-color="#729fcf"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text-position="0% 100%" style:font-name="TexMaths Symbols" fo:font-size="16pt" fo:letter-spacing="normal" fo:language="zxx" fo:country="none" fo:font-style="normal" fo:text-shadow="none" style:text-underline-style="none" fo:font-weight="normal" style:letter-kerning="true" fo:background-color="#729fcf"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loext:opacity="100%" style:text-outline="false" style:text-line-through-style="none" style:text-line-through-type="none" style:text-position="0% 100%" style:font-name="TexMaths Symbols" fo:font-size="16pt" fo:letter-spacing="normal" fo:language="zxx" fo:country="none" fo:font-style="normal" fo:text-shadow="none" style:text-underline-style="none" fo:font-weight="normal" style:letter-kerning="true" fo:background-color="#e96666"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loext:opacity="100%" style:text-outline="false" style:text-line-through-style="none" style:text-line-through-type="none" style:text-position="0% 100%" style:font-name="TexMaths Symbols" fo:font-size="16pt" fo:letter-spacing="normal" fo:language="zxx" fo:country="none" fo:font-style="normal" fo:text-shadow="none" style:text-underline-style="none" fo:font-weight="normal" style:letter-kerning="true" fo:background-color="transparent"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2" style:family="text">
      <style:text-properties fo:font-variant="normal" fo:text-transform="none" style:text-outline="false" style:text-line-through-style="none" style:text-line-through-type="none" style:text-position="0% 100%" style:font-name="TexMaths Symbols" fo:font-size="16pt" fo:language="zxx" fo:country="none" fo:font-style="normal" fo:text-shadow="none" style:text-underline-style="none" fo:font-weight="normal" style:letter-kerning="true" fo:background-color="#5eb91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text-position="sub 58%" style:font-name="TexMaths Symbols" fo:font-size="16pt" fo:language="zxx" fo:country="none" fo:font-style="normal" fo:text-shadow="none" style:text-underline-style="none" fo:font-weight="normal" style:letter-kerning="tru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text-position="super 58%" style:font-name="TexMaths Symbols" fo:font-size="16pt" fo:letter-spacing="-0.471cm" fo:language="zxx" fo:country="none" fo:font-style="normal" fo:text-shadow="none" style:text-underline-style="none" fo:font-weight="normal" style:letter-kerning="tru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5" style:family="text">
      <style:text-properties fo:font-variant="normal" fo:text-transform="none" style:text-outline="false" style:text-line-through-style="none" style:text-line-through-type="none" style:text-position="0% 100%" style:font-name="TexMaths Symbols" fo:font-size="16pt" fo:letter-spacing="normal" fo:language="zxx" fo:country="none" fo:font-style="normal" fo:text-shadow="none" style:text-underline-style="none" fo:font-weight="normal" style:letter-kerning="tru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6" style:family="text">
      <style:text-properties fo:font-variant="normal" fo:text-transform="none" style:text-outline="false" style:text-line-through-style="none" style:text-line-through-type="none" style:text-position="super 58%" style:font-name="TexMaths Symbols" fo:font-size="16pt" fo:letter-spacing="normal" fo:language="zxx" fo:country="none" fo:font-style="normal" fo:text-shadow="none" style:text-underline-style="none" fo:font-weight="normal" style:letter-kerning="true" style:font-name-asian="TexMaths Symbols" style:font-size-asian="16pt" style:font-style-asian="normal" style:font-weight-asian="normal" style:font-name-complex="TexMaths Symbols" style:font-size-complex="16pt" style:font-style-complex="normal" style:font-weight-complex="normal" style:text-emphasize="none" style:font-relief="none" style:text-overline-style="none" style:text-overline-color="font-color"/>
    </style:style>
    <style:style style:name="T97" style:family="text">
      <style:text-properties fo:font-variant="normal" fo:text-transform="none" style:text-outline="false" style:text-line-through-style="none" style:text-line-through-type="none" style:font-name="TexMaths Symbols" fo:font-size="8pt" fo:language="zxx" fo:country="none" fo:font-style="normal" fo:text-shadow="none" style:text-underline-style="none" fo:font-weight="normal" style:letter-kerning="true" style:font-name-asian="TexMaths Symbols" style:font-size-asian="8pt" style:font-style-asian="normal" style:font-weight-asian="normal" style:font-name-complex="TexMaths Symbols" style:font-size-complex="8pt" style:font-style-complex="normal" style:font-weight-complex="normal" style:text-emphasize="none" style:font-relief="none" style:text-overline-style="none" style:text-overline-color="font-color"/>
    </style:style>
    <style:style style:name="T98" style:family="text">
      <style:text-properties fo:font-variant="normal" fo:text-transform="none" style:text-outline="false" style:text-line-through-style="none" style:text-line-through-type="none" style:text-position="0% 100%" style:font-name="TexMaths Symbols" fo:font-size="8pt" fo:language="zxx" fo:country="none" fo:font-style="normal" fo:text-shadow="none" style:text-underline-style="none" fo:font-weight="normal" style:letter-kerning="true" style:font-name-asian="TexMaths Symbols" style:font-size-asian="8pt" style:font-style-asian="normal" style:font-weight-asian="normal" style:font-name-complex="TexMaths Symbols" style:font-size-complex="8pt" style:font-style-complex="normal" style:font-weight-complex="normal" style:text-emphasize="none" style:font-relief="none" style:text-overline-style="none" style:text-overline-color="font-color"/>
    </style:style>
    <style:style style:name="T99" style:family="text">
      <style:text-properties fo:font-variant="normal" fo:text-transform="none" style:text-outline="false" style:text-line-through-style="none" style:text-line-through-type="none" style:text-position="0% 100%" style:font-name="TexMaths Symbols1" fo:font-size="8pt" fo:letter-spacing="normal" fo:language="zxx" fo:country="none" fo:font-style="normal" fo:text-shadow="none" style:text-underline-style="none" fo:font-weight="normal" style:letter-kerning="true" style:font-name-asian="TexMaths Symbols" style:font-size-asian="8pt" style:font-style-asian="normal" style:font-weight-asian="normal" style:font-name-complex="TexMaths Symbols" style:font-size-complex="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sub 58%" style:font-name="TexMaths Symbols1" fo:font-size="8pt" fo:letter-spacing="normal" fo:language="zxx" fo:country="none" fo:font-style="normal" fo:text-shadow="none" style:text-underline-style="none" fo:font-weight="normal" style:letter-kerning="true" style:font-name-asian="TexMaths Symbols" style:font-size-asian="8pt" style:font-style-asian="normal" style:font-weight-asian="normal" style:font-name-complex="TexMaths Symbols" style:font-size-complex="8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729fcf" loext:opacity="100%" style:text-outline="false" style:text-line-through-style="none" style:text-line-through-type="none" fo:language="zxx" fo:country="none" fo:font-style="normal" fo:text-shadow="none" style:text-underline-style="none" fo:font-weight="bold" style:letter-kerning="true" style:font-size-asian="12pt" style:font-style-asian="normal" style:font-weight-asian="bold" style:font-style-complex="normal" style:font-weight-complex="bold" style:text-emphasize="none" style:font-relief="none" style:text-overline-style="none" style:text-overline-color="font-color"/>
    </style:style>
    <style:style style:name="T102" style:family="text">
      <style:text-properties fo:font-variant="normal" fo:text-transform="none" style:text-outline="false" style:text-line-through-style="none" style:text-line-through-type="none" style:font-name="FreeSans"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03"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04" style:family="text">
      <style:text-properties fo:font-variant="normal" fo:text-transform="none" fo:color="#729fcf" loext:opacity="100%" style:text-outline="false" style:text-line-through-style="none" style:text-line-through-type="none" style:font-name="FreeSans3" fo:font-size="12pt" fo:language="zxx" fo:country="none" fo:text-shadow="none" style:text-underline-style="none" fo:font-weight="bold" style:letter-kerning="true" style:font-name-asian="FreeSans" style:font-size-asian="12pt" style:font-weight-asian="bold" style:font-name-complex="FreeSans" style:font-size-complex="12pt"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reeSans3"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06"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07" style:family="text">
      <style:text-properties style:font-name="FreeSans3" fo:font-size="10pt" fo:font-style="normal" style:font-size-asian="12pt" style:font-style-asian="italic" style:font-name-complex="FreeSans" style:font-size-complex="12pt" style:font-style-complex="italic"/>
    </style:style>
    <style:style style:name="T108" style:family="text">
      <style:text-properties fo:font-variant="normal" fo:text-transform="none" style:text-outline="false" style:text-line-through-style="none" style:text-line-through-type="none"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09" style:family="text">
      <style:text-properties fo:font-variant="normal" fo:text-transform="none" style:text-outline="false" style:text-line-through-style="none" style:text-line-through-type="none" style:font-name="Liberation Sans" fo:font-size="8pt" fo:language="zxx" fo:country="none" fo:font-style="normal" fo:text-shadow="none" style:text-underline-style="none" style:letter-kerning="true" style:font-name-asian="Noto Sans CJK SC" style:font-size-asian="8pt" style:font-style-asian="normal" style:font-name-complex="Noto Sans Devanagari" style:font-size-complex="8pt" style:font-style-complex="normal"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FreeSans1"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text-outline="false" style:text-line-through-style="none" style:text-line-through-type="none" style:font-name="FreeSans3"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12" style:family="text">
      <style:text-properties fo:font-variant="normal" fo:text-transform="none" fo:color="#729fcf" loext:opacity="100%" style:text-outline="false" style:text-line-through-style="none" style:text-line-through-type="none" style:font-name="FreeSans3"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font-name="FreeSans3"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114" style:family="text">
      <style:text-properties fo:font-variant="normal" fo:text-transform="none" style:text-outline="false" style:text-line-through-style="none" style:text-line-through-type="none" style:font-name="FreeSans1" fo:font-size="12pt" fo:language="zxx" fo:country="none" fo:text-shadow="none" style:text-underline-style="none" style:letter-kerning="true" style:font-size-asian="12pt" style:font-size-complex="12pt" style:text-emphasize="none" style:font-relief="none" style:text-overline-style="none" style:text-overline-color="font-color"/>
    </style:style>
    <style:style style:name="T115" style:family="text">
      <style:text-properties fo:font-variant="normal" fo:text-transform="none" fo:color="#ff0000" loext:opacity="100%" style:text-outline="false" style:text-line-through-style="none" style:text-line-through-type="none" style:font-name="FreeSans1"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6" style:family="text">
      <style:text-properties fo:font-variant="normal" fo:text-transform="none" fo:color="#000000" loext:opacity="100%" style:text-outline="false" style:text-line-through-style="none" style:text-line-through-type="none" style:font-name="FreeSans1" fo:font-size="12pt" fo:language="zxx" fo:country="none"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font-name="FreeSans1"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8" style:family="text">
      <style:text-properties fo:font-variant="normal" fo:text-transform="none" fo:color="#729fcf" loext:opacity="100%" style:text-outline="false" style:text-line-through-style="none" style:text-line-through-type="none" style:font-name="FreeSans1"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font-name="FreeSans1"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font-name="FreeSans1" fo:font-size="12pt" fo:language="zxx" fo:country="none" fo:text-shadow="none" style:text-underline-style="none" fo:font-weight="bold" style:letter-kerning="true" style:font-name-asian="FreeSans" style:font-size-asian="12pt" style:font-weight-asian="bold" style:font-name-complex="FreeSans" style:font-size-complex="12pt" style:font-weight-complex="bold"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font-name="FreeSans1" fo:font-size="12pt" fo:language="zxx" fo:country="none" fo:font-style="italic" fo:text-shadow="none" style:text-underline-style="none" fo:font-weight="bold" style:letter-kerning="true" style:font-name-asian="FreeSans" style:font-size-asian="12pt" style:font-style-asian="italic" style:font-weight-asian="bold" style:font-name-complex="FreeSans" style:font-size-complex="12pt" style:font-style-complex="italic" style:font-weight-complex="bold"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font-name="FreeSans1" fo:font-size="12pt" fo:language="zxx" fo:country="none" fo:font-style="normal" fo:text-shadow="none" style:text-underline-style="none" fo:font-weight="bold" style:letter-kerning="true" style:font-name-asian="Free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style:font-name="FreeSans1" fo:font-size="12pt" fo:language="zxx" fo:country="none"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0000" loext:opacity="100%" style:text-outline="false" style:text-line-through-style="none" style:text-line-through-type="none" style:font-name="FreeSans1" fo:font-size="12pt" fo:language="zxx" fo:country="none" fo:font-style="normal" fo:text-shadow="none" style:text-underline-style="none" fo:font-weight="normal" style:letter-kerning="true" style:font-name-asian="FreeSerif1" style:font-size-asian="12pt" style:font-style-asian="normal" style:font-weight-asian="normal" style:font-name-complex="FreeSerif1"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loext:opacity="100%" style:text-outline="false" style:text-line-through-style="none" style:text-line-through-type="none" style:font-name="FreeSans" fo:font-size="12pt" fo:language="zxx" fo:country="none"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ff0000" loext:opacity="100%" style:text-outline="false" style:text-line-through-style="none" style:text-line-through-type="none" style:font-name="FreeSans1" fo:font-size="12pt" fo:language="zxx" fo:country="none" fo:font-style="normal" fo:text-shadow="none" style:text-underline-style="none" fo:font-weight="bold" style:letter-kerning="true" style:font-name-asian="Free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27"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font-name="Liberation Sans" fo:font-size="7pt" fo:language="zxx" fo:country="none" fo:font-style="normal" fo:text-shadow="none" style:text-underline-style="none" fo:font-weight="normal" style:letter-kerning="true" style:font-name-asian="Noto Sans CJK SC"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129" style:family="text">
      <style:text-properties fo:font-variant="normal" fo:text-transform="none" fo:color="#ff0000" loext:opacity="100%" style:text-outline="false" style:text-line-through-style="none" style:text-line-through-type="none" style:font-name="FreeSans1" fo:font-size="7pt" fo:language="zxx" fo:country="none" fo:font-style="normal" fo:text-shadow="none" style:text-underline-style="none" fo:font-weight="bold" style:letter-kerning="true" style:font-name-asian="Noto Sans CJK SC" style:font-size-asian="7pt" style:font-style-asian="normal" style:font-weight-asian="bold" style:font-name-complex="Noto Sans Devanagari" style:font-size-complex="7pt" style:font-style-complex="normal" style:font-weight-complex="bold" style:text-emphasize="none" style:font-relief="none" style:text-overline-style="none" style:text-overline-color="font-color"/>
    </style:style>
    <style:style style:name="T130" style:family="text">
      <style:text-properties fo:font-variant="normal" fo:text-transform="none" style:text-outline="false" style:text-line-through-style="none" style:text-line-through-type="none" style:font-name="FreeSans3" fo:font-size="12pt" fo:language="zxx" fo:country="none"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FreeSans" fo:font-size="12pt" fo:language="zxx" fo:country="none" fo:text-shadow="none" style:text-underline-style="none" fo:font-weight="normal" style:letter-kerning="true" style:font-name-asian="FreeSans" style:font-size-asian="12pt" style:font-weight-asian="normal" style:font-name-complex="FreeSans" style:font-size-complex="12pt" style:font-weight-complex="normal" style:text-emphasize="none" style:font-relief="none" style:text-overline-style="none" style:text-overline-color="font-color"/>
    </style:style>
    <style:style style:name="T132"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ff0000" loext:opacity="100%" style:text-outline="false" style:text-line-through-style="none" style:text-line-through-type="none" style:font-name="Liberation Sans" fo:font-size="8pt" fo:language="zxx" fo:country="none" fo:font-style="normal" fo:text-shadow="none" style:text-underline-style="none" style:letter-kerning="true" style:font-name-asian="Noto Sans CJK SC" style:font-size-asian="8pt" style:font-style-asian="normal" style:font-name-complex="Noto Sans Devanagari" style:font-size-complex="8pt" style:font-style-complex="normal" style:text-emphasize="none" style:font-relief="none" style:text-overline-style="none" style:text-overline-color="font-color"/>
    </style:style>
    <style:style style:name="T134" style:family="text">
      <style:text-properties fo:color="#365f91" loext:opacity="100%" style:font-name="Cambria" fo:font-size="14.1000003814697pt" fo:font-weight="bold" style:font-name-asian="Cambria" style:font-size-asian="14.1000003814697pt" style:font-weight-asian="bold" style:font-name-complex="Cambria" style:font-size-complex="14.1000003814697pt" style:font-weight-complex="bold"/>
    </style:style>
    <style:style style:name="T135" style:family="text">
      <style:text-properties fo:color="#4f81bd" loext:opacity="100%" style:font-name="Cambria" fo:font-size="13pt" fo:font-weight="bold" style:font-name-asian="Cambria" style:font-size-asian="13pt" style:font-weight-asian="bold" style:font-name-complex="Cambria" style:font-size-complex="13pt" style:font-weight-complex="bold"/>
    </style:style>
    <style:style style:name="T136" style:family="text">
      <style:text-properties fo:color="#000000" loext:opacity="100%" style:font-name="Symbol" fo:font-size="12pt" fo:font-weight="normal" style:font-name-asian="Symbol" style:font-size-asian="12pt" style:font-weight-asian="normal" style:font-name-complex="Symbol" style:font-size-complex="12pt" style:font-weight-complex="normal"/>
    </style:style>
    <style:style style:name="T137"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138" style:family="text">
      <style:text-properties fo:color="#000000" loext:opacity="100%" style:font-name="Calibri" fo:font-size="12pt" fo:font-weight="normal" style:font-name-asian="Calibri" style:font-size-asian="12pt" style:font-weight-asian="normal" style:font-name-complex="Calibri" style:font-size-complex="12pt" style:font-weight-complex="normal"/>
    </style:style>
    <style:style style:name="T139" style:family="text">
      <style:text-properties fo:color="#000000" loext:opacity="100%" style:font-name="Calibri" fo:font-size="12pt" fo:font-weight="bold" style:font-name-asian="Calibri" style:font-size-asian="12pt" style:font-weight-asian="bold" style:font-name-complex="Calibri" style:font-size-complex="12pt" style:font-weight-complex="bold"/>
    </style:style>
    <style:style style:name="T140" style:family="text">
      <style:text-properties fo:color="#000000" loext:opacity="100%" style:font-name="Calibri" fo:font-size="12pt"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T141" style:family="text">
      <style:text-properties fo:color="#4f81bd" loext:opacity="100%" style:font-name="Cambria" fo:font-size="9.89999961853027pt" fo:font-weight="bold" style:font-name-asian="Cambria" style:font-size-asian="9.89999961853027pt" style:font-weight-asian="bold" style:font-name-complex="Cambria" style:font-size-complex="9.8999996185302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11.644cm" svg:height="0.932cm" svg:x="4.453cm" svg:y="2.04cm">
          <draw:text-box>
            <text:p text:style-name="P1"><text:span text:style-name="T1">Progetto Assembly RISC-V </text:span><text:span text:style-name="T2">per il <text:s/></text:span></text:p>
          </draw:text-box>
        </draw:frame>
        <draw:frame draw:style-name="gr2" draw:text-style-name="P2" draw:layer="layout" svg:width="13.478cm" svg:height="0.932cm" svg:x="3.412cm" svg:y="3.035cm">
          <draw:text-box>
            <text:p text:style-name="P1"><text:span text:style-name="T2">Corso di Architetture degli Elaboratori <text:s/></text:span></text:p>
          </draw:text-box>
        </draw:frame>
        <draw:frame draw:style-name="gr3" draw:text-style-name="P2" draw:layer="layout" svg:width="7.189cm" svg:height="0.932cm" svg:x="6.934cm" svg:y="4.026cm">
          <draw:text-box>
            <text:p text:style-name="P1"><text:span text:style-name="T2">– A.A. 2025/2026 – <text:s/></text:span></text:p>
          </draw:text-box>
        </draw:frame>
        <draw:frame draw:style-name="gr4" draw:text-style-name="P3" draw:layer="layout" svg:width="0.846cm" svg:height="0.932cm" svg:x="10.499cm" svg:y="4.352cm">
          <draw:text-box>
            <text:p text:style-name="P1"><text:span text:style-name="T3"><text:s/></text:span></text:p>
          </draw:text-box>
        </draw:frame>
        <draw:frame draw:style-name="gr5" draw:text-style-name="P4" draw:layer="layout" svg:width="0.139cm" svg:height="0.158cm" svg:x="10.693cm" svg:y="4.988cm">
          <draw:text-box>
            <text:p text:style-name="P1"><text:span text:style-name="T4"><text:s/></text:span></text:p>
          </draw:text-box>
        </draw:frame>
        <draw:polygon draw:style-name="gr6" draw:text-style-name="P5" draw:layer="layout" svg:width="18.301cm" svg:height="0.033cm" svg:x="1.35cm" svg:y="6.443cm" svg:viewBox="0 0 18302 34" draw:points="0,0 18302,0 18302,34 0,34">
          <text:p/>
        </draw:polygon>
        <draw:frame draw:style-name="gr7" draw:text-style-name="P6" draw:layer="layout" svg:width="7.941cm" svg:height="1.089cm" svg:x="6.447cm" svg:y="5.196cm">
          <draw:text-box>
            <text:p text:style-name="P1"><text:span text:style-name="T5">Messaggi in Codice </text:span></text:p>
          </draw:text-box>
        </draw:frame>
        <draw:frame draw:style-name="gr8" draw:text-style-name="P7" draw:layer="layout" svg:width="0.388cm" svg:height="0.437cm" svg:x="19.55cm" svg:y="9.407cm">
          <draw:text-box>
            <text:p text:style-name="P1"><text:span text:style-name="T6"><text:s/></text:span></text:p>
          </draw:text-box>
        </draw:frame>
        <draw:frame draw:style-name="gr9" draw:text-style-name="P8" draw:layer="layout" svg:width="5.175cm" svg:height="0.543cm" svg:x="1.401cm" svg:y="9.477cm">
          <draw:text-box>
            <text:p text:style-name="P1"><text:span text:style-name="T7">Struttura del codice</text:span></text:p>
          </draw:text-box>
        </draw:frame>
        <draw:frame draw:style-name="gr10" draw:text-style-name="P9" draw:layer="layout" svg:width="18.314cm" svg:height="2.356cm" svg:x="1.401cm" svg:y="10.239cm">
          <draw:text-box>
            <text:p text:style-name="P1"><text:span text:style-name="T8">Iniziando dalla procedura _start, Il programma chiama una procedura per inizializzare sulla stack la sttuttura </text:span><text:span text:style-name="T9"><text:a xlink:href="#cypher_data" xlink:type="simple">cypher_data</text:a></text:span><text:span text:style-name="T8">, carica l’indirizzo della stringa </text:span><text:span text:style-name="T10"><text:a xlink:href="#Parametri del programma" xlink:type="simple">myplaintext</text:a></text:span><text:span text:style-name="T8">, e un valore booleano, I quali vengono utilizzati come argomenti della procedura </text:span><text:span text:style-name="T11"><text:a xlink:href="#cypher_iter" xlink:type="simple">cypher_iter</text:a></text:span><text:span text:style-name="T8">, la quale determina la sequenza di procedure di cifratura e decifratura che verranno chiamate.</text:span></text:p>
          </draw:text-box>
        </draw:frame>
        <draw:polygon draw:style-name="gr11" draw:text-style-name="P10" draw:layer="layout" svg:width="18.314cm" svg:height="1.979cm" draw:transform="skewX (0.00296705972839036) rotate (0.00314159265358979) translate (1.39965477405974cm 7.00700108456285cm)" svg:viewBox="0 0 18315 1980" draw:points="0,0 18315,2 18315,1980 0,1978">
          <text:p/>
        </draw:polygon>
        <draw:frame draw:style-name="gr12" draw:text-style-name="P12" draw:layer="layout" svg:width="17.094cm" svg:height="0.551cm" svg:x="1.668cm" svg:y="7.264cm">
          <draw:text-box>
            <text:p text:style-name="P11"><text:span text:style-name="T12">Autore: Federico Carlo Martini <text:s/></text:span><text:span text:style-name="T12"><text:a xlink:href="mailto:federico.martini3@edu.unifi.it" xlink:type="simple">federico.martini3@edu.unifi.it</text:a></text:span><text:span text:style-name="T12"><text:s/>Matricola: 7190724 data:</text:span></text:p>
          </draw:text-box>
        </draw:frame>
        <draw:frame draw:style-name="gr13" draw:text-style-name="P13" draw:layer="layout" svg:width="0.35cm" svg:height="0.391cm" svg:x="1.668cm" svg:y="8.019cm">
          <draw:text-box>
            <text:p text:style-name="P1"><text:span text:style-name="T13"><text:s/></text:span></text:p>
          </draw:text-box>
        </draw:frame>
        <draw:frame draw:style-name="gr14" draw:text-style-name="P14" draw:layer="layout" svg:width="5.858cm" svg:height="0.543cm" svg:x="1.4cm" svg:y="12.712cm">
          <draw:text-box>
            <text:p text:style-name="P1"><text:span text:style-name="T14">Parametri del programma: </text:span></text:p>
          </draw:text-box>
        </draw:frame>
        <draw:frame draw:name="Parametri del programma" draw:style-name="gr10" draw:text-style-name="P9" draw:layer="layout" svg:width="18.314cm" svg:height="1.813cm" svg:x="1.401cm" svg:y="13.34cm">
          <draw:text-box>
            <text:p text:style-name="P1"><text:span text:style-name="T10">myplaintext: </text:span><text:span text:style-name="T15">Satringa di input del programma, oggetto delle procedure di cifratura</text:span><text:span text:style-name="T15"><text:line-break/></text:span><text:span text:style-name="T10">sostK: </text:span><text:span text:style-name="T15">Valore numerico usato come parametro dal </text:span><text:span text:style-name="T11"><text:a xlink:href="#caesar_encrypt" xlink:type="simple">cifrario di Cesare</text:a></text:span><text:span text:style-name="T11"><text:line-break/></text:span><text:span text:style-name="T10">blocKey: </text:span><text:span text:style-name="T15">Stringa parametro del </text:span><text:span text:style-name="T11"><text:a xlink:href="#block_encrypt" xlink:type="simple">cifrario a blocchi</text:a></text:span><text:span text:style-name="T11"><text:line-break/></text:span><text:span text:style-name="T10">mycypher: </text:span><text:span text:style-name="T15">Stringa di caratteri tra {A, B, C, D, E} che determina la sequenza di procedure chiamate</text:span></text:p>
          </draw:text-box>
        </draw:frame>
        <draw:frame draw:style-name="gr15" draw:text-style-name="P15" draw:layer="layout" svg:width="0.943cm" svg:height="0.642cm" svg:x="1.475cm" svg:y="28.154cm">
          <draw:text-box>
            <text:p text:style-name="P1"><text:span text:style-name="T16">1</text:span></text:p>
          </draw:text-box>
        </draw:frame>
      </draw:page>
      <draw:page draw:name="page2" draw:style-name="dp1" draw:master-page-name="master-page3">
        <draw:frame draw:style-name="gr16" draw:text-style-name="P16" draw:layer="layout" svg:width="0.139cm" svg:height="0.536cm" svg:x="10.893cm" svg:y="8.988cm">
          <draw:text-box>
            <text:p text:style-name="P1"><text:span text:style-name="T17"><text:s/></text:span></text:p>
          </draw:text-box>
        </draw:frame>
        <draw:frame draw:style-name="gr8" draw:text-style-name="P7" draw:layer="layout" svg:width="0.388cm" svg:height="0.437cm" svg:x="19.55cm" svg:y="10.207cm">
          <draw:text-box>
            <text:p text:style-name="P1"><text:span text:style-name="T6"><text:s/></text:span></text:p>
          </draw:text-box>
        </draw:frame>
        <draw:frame draw:style-name="gr17" draw:text-style-name="P17" draw:layer="layout" svg:width="0.35cm" svg:height="0.536cm" svg:x="1.868cm" svg:y="12.019cm">
          <draw:text-box>
            <text:p text:style-name="P1"><text:span text:style-name="T18"><text:s/></text:span></text:p>
          </draw:text-box>
        </draw:frame>
        <draw:frame draw:style-name="gr18" draw:text-style-name="P18" draw:layer="layout" svg:width="15.939cm" svg:height="0.543cm" svg:x="1.935cm" svg:y="2.117cm">
          <draw:text-box>
            <text:p text:style-name="P1"><text:span text:style-name="T19">Strutture dati utilizzate: </text:span></text:p>
          </draw:text-box>
        </draw:frame>
        <draw:frame draw:name="heap_chunk" draw:style-name="gr10" draw:text-style-name="P9" draw:layer="layout" svg:width="6.983cm" svg:height="1.522cm" svg:x="1.6cm" svg:y="7.87cm">
          <draw:text-box>
            <text:p text:style-name="P1"><text:span text:style-name="T9">heap_chunk: </text:span><text:span text:style-name="T15">struttura di 12+ byte che organizza una zona di memoria</text:span></text:p>
            <text:p text:style-name="P1"><text:span text:style-name="T15"/></text:p>
            <text:p text:style-name="P1"><text:span text:style-name="T15"/></text:p>
            <text:p text:style-name="P1"><text:span text:style-name="T11"/></text:p>
          </draw:text-box>
        </draw:frame>
        <draw:g draw:style-name="gr19" xml:id="id1" draw:id="id1">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0" draw:text-style-name="P20" draw:layer="layout" svg:width="8.89cm" svg:height="0.671cm" svg:x="8.92cm" svg:y="7.27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heap_chunk</text:span></text:p>
            <draw:enhanced-geometry svg:viewBox="0 0 21600 21600" draw:mirror-horizontal="false" draw:mirror-vertical="false" draw:type="rectangle" draw:enhanced-path="M 0 0 L 21600 0 21600 21600 0 21600 0 0 Z N"/>
          </draw:custom-shape>
          <draw:custom-shape draw:style-name="gr21" draw:text-style-name="P22" draw:layer="layout" svg:width="8.89cm" svg:height="2.069cm" svg:x="8.92cm" svg:y="7.941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 [byte 0-3] : indirizzo del chunk precedente</text:span></text:p>
            <text:p text:style-name="P21"><text:span text:style-name="T20">- [byte 4-7]: bool -&gt; blocco occupato / libero</text:span></text:p>
            <text:p text:style-name="P21"><text:span text:style-name="T20">- [byte 8-11]: dimensione allocabile x</text:span><text:span text:style-name="T20"><text:line-break/></text:span><text:span text:style-name="T20">- [byte 12-[x+12]]: memoria allocabile</text:span></text:p>
            <draw:enhanced-geometry svg:viewBox="0 0 21600 21600" draw:mirror-horizontal="false" draw:mirror-vertical="false" draw:type="rectangle" draw:enhanced-path="M 0 0 L 21600 0 21600 21600 0 21600 0 0 Z N"/>
          </draw:custom-shape>
        </draw:g>
        <draw:connector draw:style-name="gr22" draw:text-style-name="P23" draw:layer="layout" svg:x1="17.81cm" svg:y1="8.64cm" svg:x2="13.365cm" svg:y2="10.01cm" draw:start-shape="id1" draw:end-shape="id1" draw:end-glue-point="2" svg:d="M17810 8640h527v1896h-4972v-526" svg:viewBox="0 0 4973 1897">
          <text:p/>
        </draw:connector>
        <draw:frame draw:style-name="gr23" draw:text-style-name="P25" draw:layer="layout" svg:width="0.711cm" svg:height="0.536cm" svg:x="12.192cm" svg:y="10.219cm">
          <draw:text-box>
            <text:p text:style-name="P24"><text:span text:style-name="T21">0..1</text:span></text:p>
          </draw:text-box>
        </draw:frame>
        <draw:frame draw:style-name="gr24" draw:text-style-name="P27" draw:layer="layout" svg:width="0.711cm" svg:height="0.475cm" svg:x="18.906cm" svg:y="8.128cm">
          <draw:text-box>
            <text:p text:style-name="P26"><text:span text:style-name="T22">0..1</text:span></text:p>
          </draw:text-box>
        </draw:frame>
        <draw:frame draw:style-name="gr25" draw:text-style-name="P28" draw:layer="layout" svg:width="0.422cm" svg:height="0.536cm" svg:x="13.15cm" svg:y="23.533cm">
          <draw:text-box>
            <text:p text:style-name="P1"><text:span text:style-name="T8"><text:s/></text:span></text:p>
          </draw:text-box>
        </draw:frame>
        <draw:frame draw:style-name="gr8" draw:text-style-name="P7" draw:layer="layout" svg:width="0.388cm" svg:height="0.437cm" svg:x="18.789cm" svg:y="12.585cm">
          <draw:text-box>
            <text:p text:style-name="P1"><text:span text:style-name="T16"><text:s/></text:span></text:p>
          </draw:text-box>
        </draw:frame>
        <draw:frame draw:style-name="gr8" draw:text-style-name="P7" draw:layer="layout" svg:width="0.388cm" svg:height="0.437cm" svg:x="15.605cm" svg:y="14.503cm">
          <draw:text-box>
            <text:p text:style-name="P1"><text:span text:style-name="T16"><text:s/></text:span></text:p>
          </draw:text-box>
        </draw:frame>
        <draw:frame draw:name="cypher_data" draw:style-name="gr10" draw:text-style-name="P9" draw:layer="layout" svg:width="8.789cm" svg:height="1.522cm" svg:x="1.602cm" svg:y="12.171cm">
          <draw:text-box>
            <text:p text:style-name="P1"><text:span text:style-name="T9">cypher_data:</text:span><text:span text:style-name="T10"> </text:span><text:span text:style-name="T15">Sruttura di 16 byte contenente I parametri per la procedura </text:span><text:span text:style-name="T11"><text:a xlink:href="#cypher_iter" xlink:type="simple">cypher_iter</text:a></text:span></text:p>
            <text:p text:style-name="P1"><text:span text:style-name="T9"/></text:p>
            <text:p text:style-name="P1"><text:span text:style-name="T11"/></text:p>
          </draw:text-box>
        </draw:frame>
        <draw:g draw:style-name="gr19">
          <draw:glue-point draw:id="4" svg:x="-3cm" svg:y="4.701cm"/>
          <draw:glue-point draw:id="5" svg:x="-1cm" svg:y="4.776cm"/>
          <draw:glue-point draw:id="6" svg:x="0.995cm" svg:y="4.85cm"/>
          <draw:glue-point draw:id="7" svg:x="2.995cm" svg:y="4.925cm"/>
          <draw:glue-point draw:id="8" svg:x="-0.001cm" svg:y="-0.655cm" draw:align="bottom-right"/>
          <draw:glue-point draw:id="9" svg:x="0cm" svg:y="-0.725cm" draw:align="bottom-left"/>
          <draw:glue-point draw:id="10" svg:x="-3cm" svg:y="-4.925cm"/>
          <draw:glue-point draw:id="11" svg:x="-1cm" svg:y="-4.85cm"/>
          <draw:glue-point draw:id="12" svg:x="0.995cm" svg:y="-4.776cm"/>
          <draw:glue-point draw:id="13" svg:x="2.995cm" svg:y="-4.701cm"/>
          <draw:glue-point draw:id="14" svg:x="-0.001cm" svg:y="0.706cm" draw:align="top-right"/>
          <draw:glue-point draw:id="15" svg:x="0cm" svg:y="0.636cm" draw:align="top-left"/>
          <draw:custom-shape draw:style-name="gr26" draw:text-style-name="P20" draw:layer="layout" svg:width="9.208cm" svg:height="0.671cm" svg:x="10.508cm" svg:y="11.685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cypher_data</text:span></text:p>
            <draw:enhanced-geometry svg:viewBox="0 0 21600 21600" draw:mirror-horizontal="false" draw:mirror-vertical="false" draw:type="rectangle" draw:enhanced-path="M 0 0 L 21600 0 21600 21600 0 21600 0 0 Z N"/>
          </draw:custom-shape>
          <draw:custom-shape draw:style-name="gr27" draw:text-style-name="P29" draw:layer="layout" svg:width="9.208cm" svg:height="2.069cm" svg:x="10.508cm" svg:y="12.356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dirizzo di </text:span><text:span text:style-name="T23"><text:a xlink:href="#Parametri del programma" xlink:type="simple">mycypher</text:a></text:span></text:p>
            <text:p text:style-name="P21"><text:span text:style-name="T20">-[byte 4-7] : copia di </text:span><text:span text:style-name="T23"><text:a xlink:href="#Parametri del programma" xlink:type="simple">sostK</text:a></text:span></text:p>
            <text:p text:style-name="P21"><text:span text:style-name="T20">-[byte 8-11] : indirizzo di </text:span><text:span text:style-name="T23"><text:a xlink:href="#Parametri del programma" xlink:type="simple">blocKey</text:a></text:span></text:p>
            <text:p text:style-name="P21"><text:span text:style-name="T20">-[byte 12-15] : indirizzo di </text:span><text:span text:style-name="T24"><text:a xlink:href="#dictionary_function" xlink:type="simple">dictionary_function</text:a></text:span></text:p>
            <draw:enhanced-geometry svg:viewBox="0 0 21600 21600" draw:mirror-horizontal="false" draw:mirror-vertical="false" draw:type="rectangle" draw:enhanced-path="M 0 0 L 21600 0 21600 21600 0 21600 0 0 Z N"/>
          </draw:custom-shape>
        </draw:g>
        <draw:frame draw:name="mem_arena" draw:style-name="gr10" draw:text-style-name="P9" draw:layer="layout" svg:width="8.789cm" svg:height="1.522cm" svg:x="1.603cm" svg:y="15.271cm">
          <draw:text-box>
            <text:p text:style-name="P1"><text:span text:style-name="T9">mem_arena:</text:span><text:span text:style-name="T10"> </text:span><text:span text:style-name="T15">Sruttura di grandezza variabile, utilizzata per richieste di memoria in gruppo, con una richiesta di x byte: il programma alloca x + 8 byte e permette di ottenere porzioni della memoria richiesta <text:s/>successivamente</text:span></text:p>
            <text:p text:style-name="P1"><text:span text:style-name="T9"/></text:p>
            <text:p text:style-name="P1"><text:span text:style-name="T11"/></text:p>
          </draw:text-box>
        </draw:frame>
        <draw:g draw:style-name="gr19">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8" draw:text-style-name="P20" draw:layer="layout" svg:width="8.255cm" svg:height="0.671cm" svg:x="10.508cm" svg:y="15.252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mem_arena</text:span></text:p>
            <draw:enhanced-geometry svg:viewBox="0 0 21600 21600" draw:mirror-horizontal="false" draw:mirror-vertical="false" draw:type="rectangle" draw:enhanced-path="M 0 0 L 21600 0 21600 21600 0 21600 0 0 Z N"/>
          </draw:custom-shape>
          <draw:custom-shape draw:style-name="gr29" draw:text-style-name="P22" draw:layer="layout" svg:width="8.255cm" svg:height="1.603cm" svg:x="10.508cm" svg:y="15.923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tero: numero di byte utilizzati</text:span></text:p>
            <text:p text:style-name="P21"><text:span text:style-name="T20">-[byte 4-7] : intero: grandezza arena</text:span></text:p>
            <text:p text:style-name="P21"><text:span text:style-name="T20">-[byte 8-x] : memoria allocabile</text:span></text:p>
            <draw:enhanced-geometry svg:viewBox="0 0 21600 21600" draw:mirror-horizontal="false" draw:mirror-vertical="false" draw:type="rectangle" draw:enhanced-path="M 0 0 L 21600 0 21600 21600 0 21600 0 0 Z N"/>
          </draw:custom-shape>
        </draw:g>
        <draw:frame draw:name="occurrence_map" draw:style-name="gr10" draw:text-style-name="P9" draw:layer="layout" svg:width="8.789cm" svg:height="1.522cm" svg:x="1.604cm" svg:y="19.188cm">
          <draw:text-box>
            <text:p text:style-name="P1"><text:span text:style-name="T9">occurrence_map:</text:span><text:span text:style-name="T10"> </text:span><text:span text:style-name="T15">struttura di 384 byte:(carattere massimo – carattere minimo + 1) * 4.</text:span></text:p>
            <text:p text:style-name="P1"><text:span text:style-name="T15">Consiste in un array di puntatori a liste concatenate, ogni elemento “I” corrisponde alla lista di occorrenze del carattere ascii(i + 32), in caso in cui non ci siano occorrenze del carattere, la lista risulta nulla</text:span></text:p>
          </draw:text-box>
        </draw:frame>
        <draw:g draw:style-name="gr19" xml:id="id3" draw:id="id3">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0" draw:text-style-name="P20" draw:layer="layout" svg:width="8.573cm" svg:height="0.671cm" svg:x="10.508cm" svg:y="19.838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occurrence_map</text:span></text:p>
            <draw:enhanced-geometry svg:viewBox="0 0 21600 21600" draw:mirror-horizontal="false" draw:mirror-vertical="false" draw:type="rectangle" draw:enhanced-path="M 0 0 L 21600 0 21600 21600 0 21600 0 0 Z N"/>
          </draw:custom-shape>
          <draw:custom-shape draw:style-name="gr31" draw:text-style-name="P22" draw:layer="layout" svg:width="8.573cm" svg:height="0.671cm" svg:x="10.508cm" svg:y="20.509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83] : list_node[96] </text:span></text:p>
            <draw:enhanced-geometry svg:viewBox="0 0 21600 21600" draw:mirror-horizontal="false" draw:mirror-vertical="false" draw:type="rectangle" draw:enhanced-path="M 0 0 L 21600 0 21600 21600 0 21600 0 0 Z N"/>
          </draw:custom-shape>
        </draw:g>
        <draw:frame draw:name="list_node" draw:style-name="gr10" draw:text-style-name="P9" draw:layer="layout" svg:width="8.789cm" svg:height="1.522cm" svg:x="1.705cm" svg:y="23.988cm">
          <draw:text-box>
            <text:p text:style-name="P1"><text:span text:style-name="T9">list_node:</text:span><text:span text:style-name="T10"> </text:span><text:span text:style-name="T15">Struttura di 8 byte che indica una singola occorrenza di un carattere nel testo da cifrare</text:span></text:p>
          </draw:text-box>
        </draw:frame>
        <draw:g draw:style-name="gr19" xml:id="id2" draw:id="id2">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2" draw:text-style-name="P20" draw:layer="layout" svg:width="8.059cm" svg:height="0.671cm" svg:x="11.021cm" svg:y="23.545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list_node</text:span></text:p>
            <draw:enhanced-geometry svg:viewBox="0 0 21600 21600" draw:mirror-horizontal="false" draw:mirror-vertical="false" draw:type="rectangle" draw:enhanced-path="M 0 0 L 21600 0 21600 21600 0 21600 0 0 Z N"/>
          </draw:custom-shape>
          <draw:custom-shape draw:style-name="gr33" draw:text-style-name="P22" draw:layer="layout" svg:width="8.059cm" svg:height="1.137cm" svg:x="11.021cm" svg:y="24.216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byte 0-3] = indice di occorrenza</text:span></text:p>
            <text:p text:style-name="P21"><text:span text:style-name="T20">-[byte 4-7] = indirizzo del prossimo nodo</text:span></text:p>
            <draw:enhanced-geometry svg:viewBox="0 0 21600 21600" draw:mirror-horizontal="false" draw:mirror-vertical="false" draw:type="rectangle" draw:enhanced-path="M 0 0 L 21600 0 21600 21600 0 21600 0 0 Z N"/>
          </draw:custom-shape>
        </draw:g>
        <draw:connector draw:style-name="gr34" draw:text-style-name="P23" draw:layer="layout" svg:x1="15.05cm" svg:y1="23.545cm" svg:x2="13.937cm" svg:y2="21.18cm" draw:start-shape="id2" draw:start-glue-point="0" draw:end-shape="id3" draw:end-glue-point="5" svg:d="M15050 23545v-1183h-1113v-1182" svg:viewBox="0 0 1114 2366">
          <text:p/>
        </draw:connector>
        <draw:frame draw:style-name="gr35" draw:text-style-name="P25" draw:layer="layout" svg:width="0.69cm" svg:height="0.769cm" svg:x="12.972cm" svg:y="21.482cm">
          <draw:text-box>
            <text:p text:style-name="P24"><text:span text:style-name="T21">1..1</text:span></text:p>
          </draw:text-box>
        </draw:frame>
        <draw:connector draw:style-name="gr36" draw:text-style-name="P23" draw:layer="layout" svg:x1="17.023cm" svg:y1="25.376cm" svg:x2="15.05cm" svg:y2="25.353cm" draw:end-shape="id2" svg:d="M17023 25376v503h-1973v-526" svg:viewBox="0 0 1974 527">
          <text:p/>
        </draw:connector>
        <draw:frame draw:style-name="gr37" draw:text-style-name="P25" draw:layer="layout" svg:width="0.711cm" svg:height="0.536cm" svg:x="14.01cm" svg:y="25.54cm">
          <draw:text-box>
            <text:p text:style-name="P24"><text:span text:style-name="T21">0..1</text:span></text:p>
          </draw:text-box>
        </draw:frame>
        <draw:frame draw:style-name="gr38" draw:text-style-name="P27" draw:layer="layout" svg:width="0.711cm" svg:height="0.475cm" svg:x="15.195cm" svg:y="23.056cm">
          <draw:text-box>
            <text:p text:style-name="P26"><text:span text:style-name="T22">0..*</text:span></text:p>
          </draw:text-box>
        </draw:frame>
        <draw:frame draw:name="heap" draw:style-name="gr10" draw:text-style-name="P9" draw:layer="layout" svg:width="8.49cm" svg:height="1.522cm" svg:x="1.601cm" svg:y="3.971cm">
          <draw:text-box>
            <text:p text:style-name="P1"><text:span text:style-name="T9">heap: </text:span><text:span text:style-name="T15">Raccoglie la memoria allocata dinamicamente dal programma, unico nel programma, se necessario viene esteso con la syscall “brk”, e heap_size aggiornata di conseguenza</text:span></text:p>
          </draw:text-box>
        </draw:frame>
        <draw:g draw:style-name="gr19" xml:id="id4" draw:id="id4">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39" draw:text-style-name="P20" draw:layer="layout" svg:width="9.207cm" svg:height="0.671cm" svg:x="10.19cm" svg:y="3.849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19"><text:span text:style-name="T20">heap</text:span></text:p>
            <draw:enhanced-geometry svg:viewBox="0 0 21600 21600" draw:mirror-horizontal="false" draw:mirror-vertical="false" draw:type="rectangle" draw:enhanced-path="M 0 0 L 21600 0 21600 21600 0 21600 0 0 Z N"/>
          </draw:custom-shape>
          <draw:custom-shape draw:style-name="gr40" draw:text-style-name="P22" draw:layer="layout" svg:width="9.207cm" svg:height="1.137cm" svg:x="10.19cm" svg:y="4.52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21"><text:span text:style-name="T20">-heap_size: grandezza totale in byte</text:span></text:p>
            <text:p text:style-name="P21"><text:span text:style-name="T20">-heap_start : indirizzo da cui inizia </text:span></text:p>
            <draw:enhanced-geometry svg:viewBox="0 0 21600 21600" draw:mirror-horizontal="false" draw:mirror-vertical="false" draw:type="rectangle" draw:enhanced-path="M 0 0 L 21600 0 21600 21600 0 21600 0 0 Z N"/>
          </draw:custom-shape>
        </draw:g>
        <draw:frame draw:style-name="gr41" draw:text-style-name="P27" draw:layer="layout" svg:width="0.711cm" svg:height="0.475cm" svg:x="15.021cm" svg:y="5.855cm">
          <draw:text-box>
            <text:p text:style-name="P26"><text:span text:style-name="T22">1..1</text:span></text:p>
          </draw:text-box>
        </draw:frame>
        <draw:frame draw:style-name="gr42" draw:text-style-name="P25" draw:layer="layout" svg:width="0.711cm" svg:height="0.536cm" svg:x="12.119cm" svg:y="6.624cm">
          <draw:text-box>
            <text:p text:style-name="P24"><text:span text:style-name="T21">1..*</text:span></text:p>
          </draw:text-box>
        </draw:frame>
        <draw:connector draw:style-name="gr43" draw:text-style-name="P30" draw:layer="layout" svg:x1="13.235cm" svg:y1="7.207cm" svg:x2="14.793cm" svg:y2="5.657cm" draw:end-shape="id4" draw:end-glue-point="2" svg:d="M13235 7207v-512h1558v-1038" svg:viewBox="0 0 1559 1551">
          <text:p/>
        </draw:connector>
        <draw:frame draw:style-name="gr15" draw:text-style-name="P15" draw:layer="layout" svg:width="0.943cm" svg:height="0.642cm" svg:x="1.475cm" svg:y="28.154cm">
          <draw:text-box>
            <text:p text:style-name="P1"><text:span text:style-name="T16">2</text:span></text:p>
          </draw:text-box>
        </draw:frame>
      </draw:page>
      <draw:page draw:name="page3" draw:style-name="dp1" draw:master-page-name="master-page64">
        <draw:frame draw:style-name="gr15" draw:text-style-name="P15" draw:layer="layout" svg:width="0.943cm" svg:height="0.642cm" svg:x="1.474cm" svg:y="28.154cm">
          <draw:text-box>
            <text:p text:style-name="P1"><text:span text:style-name="T16">3</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cypher_iter" draw:style-name="gr45" draw:text-style-name="P31" draw:layer="layout" svg:width="8.415cm" svg:height="0.543cm" svg:x="1.401cm" svg:y="2.623cm">
          <draw:text-box>
            <text:p text:style-name="P1"><text:span text:style-name="T25">cypher_iter:</text:span></text:p>
          </draw:text-box>
        </draw:frame>
        <draw:frame draw:style-name="gr46" draw:text-style-name="P32" draw:layer="layout" svg:width="18.237cm" svg:height="2.072cm" svg:x="1.455cm" svg:y="3.458cm">
          <draw:text-box>
            <text:p text:style-name="P1"><text:span text:style-name="T8">Procedura principale del programma, itera sulla stringa cypher passata come parametro, applica le funzioni di cifratura in base alla lettera corrente della stringa, poi stampa il risultato, e libera la stringa precedente a partire dal secondo ciclo.</text:span><text:span text:style-name="T8"><text:line-break/></text:span><text:span text:style-name="T8"/></text:p>
          </draw:text-box>
        </draw:frame>
        <draw:frame draw:style-name="gr47" draw:text-style-name="P33" draw:layer="layout" svg:width="8.051cm" svg:height="1.865cm" svg:x="1.493cm" svg:y="5.313cm">
          <draw:text-box>
            <text:p text:style-name="P1"><text:span text:style-name="T26">Parametri: </text:span></text:p>
            <text:p text:style-name="P1"><text:span text:style-name="T26">a0: La stringa da cifrare / decifrare (src)</text:span><text:span text:style-name="T26"><text:line-break/></text:span><text:span text:style-name="T26">a1: </text:span><text:span text:style-name="T27"><text:a xlink:href="#cypher_data" xlink:type="simple">cypher_data</text:a></text:span><text:span text:style-name="T27"><text:line-break/></text:span><text:span text:style-name="T26">a2: bool → criptazione / decifrazione (encrypt)</text:span></text:p>
          </draw:text-box>
        </draw:frame>
        <draw:frame draw:style-name="gr47" draw:text-style-name="P33" draw:layer="layout" svg:width="8.051cm" svg:height="1.865cm" svg:x="9.594cm" svg:y="5.423cm">
          <draw:text-box>
            <text:p text:style-name="P1"><text:span text:style-name="T26">Valore di ritorno: </text:span></text:p>
            <text:p text:style-name="P1"><text:span text:style-name="T26">a0: La stringa cifrata / decifrata (dest)</text:span></text:p>
          </draw:text-box>
        </draw:frame>
        <draw:g draw:style-name="gr48" xml:id="id31" draw:id="id31">
          <draw:path draw:style-name="gr49" draw:text-style-name="P34" draw:layer="layout" svg:width="0.5cm" svg:height="0.5cm" svg:x="3.932cm" svg:y="7.752cm" svg:viewBox="0 0 501 501" svg:d="M501 251c0 43-12 87-34 125s-53 69-91 91-82 34-125 34c-44 0-88-12-126-34s-69-53-91-91-34-82-34-125c0-44 12-88 34-126s53-69 91-91 82-34 126-34c43 0 87 12 125 34s69 53 91 91 34 82 34 126z">
            <text:p/>
          </draw:path>
          <draw:custom-shape draw:style-name="gr50" draw:text-style-name="P35" draw:layer="layout" svg:width="0.25cm" svg:height="0.25cm" svg:x="4.057cm" svg:y="7.877cm">
            <text:p/>
            <draw:enhanced-geometry svg:viewBox="0 0 21600 21600" draw:type="rectangle" draw:enhanced-path="M 0 0 L 21600 0 21600 21600 0 21600 0 0 Z N"/>
          </draw:custom-shape>
        </draw:g>
        <draw:connector draw:style-name="gr51" draw:text-style-name="P36" draw:layer="layout" svg:x1="12.577cm" svg:y1="10.304cm" svg:x2="11.332cm" svg:y2="8.622cm" draw:start-shape="id5" draw:end-shape="id6" draw:end-glue-point="6" svg:d="M12577 10304h-1245v-1682" svg:viewBox="0 0 1246 1683">
          <text:p/>
        </draw:connector>
        <draw:custom-shape draw:style-name="gr52" draw:text-style-name="P38" xml:id="id5" draw:id="id5" draw:layer="layout" svg:width="5.207cm" svg:height="1.854cm" svg:x="12.577cm" svg:y="9.37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0;</text:span></text:p>
          <text:p text:style-name="P37"><text:span text:style-name="T28"><text:s/>fine_iter = cypher_len; </text:span></text:p>
          <text:p text:style-name="P37"><text:span text:style-name="T28">iter_step = 1;</text:span></text:p>
          <text:p text:style-name="P37"><text:span text:style-name="T28">jump_table = encrypt_jump_tabl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3" draw:text-style-name="P40" draw:layer="layout" svg:width="2.534cm" svg:height="0.601cm" svg:x="11.49cm" svg:y="7.43cm">
          <draw:text-box>
            <text:p text:style-name="P39"><text:span text:style-name="T28">[Falso]</text:span></text:p>
          </draw:text-box>
        </draw:frame>
        <draw:connector draw:style-name="gr54" draw:text-style-name="P36" draw:layer="layout" svg:x1="12.693cm" svg:y1="8.09cm" svg:x2="11.832cm" svg:y2="8.122cm" draw:start-shape="id7" draw:start-glue-point="3" draw:end-shape="id6" draw:end-glue-point="7" svg:d="M12693 8090h-424v32h-437" svg:viewBox="0 0 862 33">
          <text:p/>
        </draw:connector>
        <draw:custom-shape draw:style-name="gr55" draw:text-style-name="P38" xml:id="id7" draw:id="id7" draw:layer="layout" svg:width="5.536cm" svg:height="1.805cm" svg:x="12.693cm" svg:y="7.18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cypher_len – 1;</text:span></text:p>
          <text:p text:style-name="P37"><text:span text:style-name="T28">fine_iter = <text:s/>-1;</text:span></text:p>
          <text:p text:style-name="P37"><text:span text:style-name="T28">iter_step = <text:s/>-1;</text:span></text:p>
          <text:p text:style-name="P37"><text:span text:style-name="T28">jump_table = decypher_jump_tabl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38" xml:id="id10" draw:id="id10" draw:layer="layout" svg:width="2.683cm" svg:height="0.819cm" svg:x="6.418cm" svg:y="13.25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yphe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7" draw:text-style-name="P36" draw:layer="layout" svg:x1="18.632cm" svg:y1="10.322cm" svg:x2="17.784cm" svg:y2="10.304cm" draw:start-shape="id8" draw:start-glue-point="5" draw:end-shape="id5" draw:end-glue-point="1" svg:d="M18632 10322h-429v-18h-419" svg:viewBox="0 0 849 19">
          <text:p/>
        </draw:connector>
        <draw:connector draw:style-name="gr58" draw:text-style-name="P36" draw:layer="layout" svg:x1="19.132cm" svg:y1="9.822cm" svg:x2="18.229cm" svg:y2="8.09cm" draw:start-shape="id8" draw:start-glue-point="4" draw:end-shape="id7" draw:end-glue-point="1" svg:d="M19132 9822v-1732h-903" svg:viewBox="0 0 904 1733">
          <text:p/>
        </draw:connector>
        <draw:frame draw:style-name="gr59" draw:text-style-name="P40" draw:layer="layout" svg:width="2.534cm" svg:height="0.736cm" svg:x="11.458cm" svg:y="9.483cm">
          <draw:text-box>
            <text:p text:style-name="P39"><text:span text:style-name="T28">[Vero]</text:span></text:p>
          </draw:text-box>
        </draw:frame>
        <draw:g draw:style-name="gr19">
          <draw:custom-shape draw:style-name="gr60" draw:text-style-name="P41" draw:layer="layout" svg:width="18.386cm" svg:height="13.836cm" svg:x="1.477cm" svg:y="12.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1" draw:text-style-name="P42" draw:layer="layout" svg:width="4.519cm" svg:height="0.614cm" svg:x="1.477cm" svg:y="12.037cm">
            <text:p text:style-name="P37"><text:span text:style-name="T28">Ciclo criptazione / decifraione <text:s/></text:span></text:p>
            <draw:enhanced-geometry svg:viewBox="0 0 21600 21600" draw:mirror-horizontal="false" draw:mirror-vertical="false" draw:type="non-primitve" draw:enhanced-path="M 0 0 L 21600 0 19000 21600 0 21600 0 0 Z N"/>
          </draw:custom-shape>
        </draw:g>
        <draw:custom-shape draw:style-name="gr62" draw:text-style-name="P43" xml:id="id9" draw:id="id9" draw:layer="layout" svg:width="1cm" svg:height="1cm" svg:x="1.844cm" svg:y="13.181cm">
          <text:p/>
          <draw:enhanced-geometry svg:viewBox="0 0 21600 21600" draw:glue-points="10800 0 0 10800 10800 21600 21600 10800" draw:text-areas="5400 5400 16200 16200" draw:type="diamond" draw:enhanced-path="M 10800 0 L 21600 10800 10800 21600 0 10800 10800 0 Z N"/>
        </draw:custom-shape>
        <draw:frame draw:style-name="gr63" draw:text-style-name="P40" draw:layer="layout" svg:width="4.399cm" svg:height="0.779cm" svg:x="2.512cm" svg:y="12.969cm">
          <draw:text-box>
            <text:p text:style-name="P39"><text:span text:style-name="T28">goto jump_table[c - 'A'] </text:span></text:p>
          </draw:text-box>
        </draw:frame>
        <draw:connector draw:style-name="gr64" draw:text-style-name="P36" draw:layer="layout" svg:x1="2.844cm" svg:y1="13.681cm" svg:x2="6.418cm" svg:y2="13.661cm" draw:start-shape="id9" draw:start-glue-point="7" draw:end-shape="id10" draw:end-glue-point="3" svg:d="M2844 13681h1793v-20h1781" svg:viewBox="0 0 3575 21">
          <text:p/>
        </draw:connector>
        <draw:connector draw:style-name="gr65" draw:text-style-name="P36" draw:layer="layout" svg:x1="4.93cm" svg:y1="24.934cm" svg:x2="2.344cm" svg:y2="14.181cm" draw:start-shape="id11" draw:start-glue-point="3" draw:end-shape="id9" draw:end-glue-point="6" svg:d="M4930 24934h-2586v-10753" svg:viewBox="0 0 2587 10754">
          <text:p/>
        </draw:connector>
        <draw:frame draw:style-name="gr66" draw:text-style-name="P40" draw:layer="layout" svg:width="2.576cm" svg:height="0.601cm" svg:x="9.248cm" svg:y="7.205cm">
          <draw:text-box>
            <text:p text:style-name="P39"><text:span text:style-name="T28">[Crittazione?]</text:span></text:p>
          </draw:text-box>
        </draw:frame>
        <draw:custom-shape draw:style-name="gr67" draw:text-style-name="P38" xml:id="id11" draw:id="id11" draw:layer="layout" svg:width="4.847cm" svg:height="0.772cm" svg:x="4.93cm" svg:y="24.54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inversion" xlink:type="simple">inversion</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8" draw:text-style-name="P36" draw:layer="layout" svg:x1="4.906cm" svg:y1="18.105cm" svg:x2="2.365cm" svg:y2="18.106cm" draw:start-shape="id12" draw:start-glue-point="3" svg:d="M4906 18105h-1534v1h-1007" svg:viewBox="0 0 2542 2">
          <text:p/>
        </draw:connector>
        <draw:custom-shape draw:style-name="gr69" draw:text-style-name="P43" xml:id="id8" draw:id="id8" draw:layer="layout" svg:width="1cm" svg:height="1cm" svg:x="18.632cm" svg:y="9.822cm">
          <text:p/>
          <draw:enhanced-geometry svg:viewBox="0 0 21600 21600" draw:glue-points="10800 0 0 10800 10800 21600 21600 10800" draw:text-areas="5400 5400 16200 16200" draw:type="diamond" draw:enhanced-path="M 10800 0 L 21600 10800 10800 21600 0 10800 10800 0 Z N"/>
        </draw:custom-shape>
        <draw:connector draw:style-name="gr70" draw:text-style-name="P36" draw:layer="layout" svg:x1="15.546cm" svg:y1="13.148cm" svg:x2="19.132cm" svg:y2="10.822cm" draw:start-shape="id13" draw:start-glue-point="0" draw:end-shape="id8" draw:end-glue-point="6" svg:d="M15546 13148v-1162h3586v-1164" svg:viewBox="0 0 3587 2327">
          <text:p/>
        </draw:connector>
        <draw:custom-shape draw:style-name="gr71" draw:text-style-name="P45" xml:id="id19" draw:id="id19" draw:layer="layout" svg:width="6.351cm" svg:height="0.977cm" svg:x="4.916cm" svg:y="23.24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4"><text:span text:style-name="T28">(dest, len) = </text:span><text:span text:style-name="T29"><text:a xlink:href="#dictionary" xlink:type="simple">dictionary</text:a></text:span><text:span text:style-name="T29"><text:line-break/></text:span><text:span text:style-name="T28">(src, len, </text:span><text:span text:style-name="T30"><text:a xlink:href="#cypher_data" xlink:type="simple">cypher_data</text:a></text:span><text:span text:style-name="T30">.</text:span><text:span text:style-name="T31"><text:a xlink:href="#dictionary" xlink:type="simple">dictionary_function</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2" draw:text-style-name="P36" draw:layer="layout" svg:x1="4.853cm" svg:y1="22.448cm" svg:x2="2.321cm" svg:y2="22.451cm" draw:start-shape="id14" draw:start-glue-point="3" svg:d="M4853 22448h-1530v3h-1002" svg:viewBox="0 0 2533 4">
          <text:p/>
        </draw:connector>
        <draw:frame draw:style-name="gr73" draw:text-style-name="P40" draw:layer="layout" svg:width="2.534cm" svg:height="0.489cm" svg:x="2.936cm" svg:y="24.934cm">
          <draw:text-box>
            <text:p text:style-name="P26"><text:span text:style-name="T28">[caso E]</text:span></text:p>
          </draw:text-box>
        </draw:frame>
        <draw:custom-shape draw:style-name="gr74" draw:text-style-name="P43" xml:id="id18" draw:id="id18" draw:layer="layout" svg:width="1cm" svg:height="1cm" svg:x="14.345cm" svg:y="14.7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5" draw:text-style-name="P38" xml:id="id15" draw:id="id15" draw:layer="layout" svg:width="6.491cm" svg:height="0.872cm" svg:x="4.827cm" svg:y="20.78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occurrence_encrypt" xlink:type="simple">occurrence_encrypt</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 draw:text-style-name="P38" xml:id="id14" draw:id="id14" draw:layer="layout" svg:width="6.687cm" svg:height="0.784cm" svg:x="4.853cm" svg:y="22.05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 len) = </text:span><text:span text:style-name="T29"><text:a xlink:href="#occurrence_decypher" xlink:type="simple">occurrence_decypher</text:a></text:span><text:span text:style-name="T28">(src, 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77" draw:text-style-name="P36" draw:layer="layout" svg:x1="4.827cm" svg:y1="21.223cm" svg:x2="2.381cm" svg:y2="21.216cm" draw:start-shape="id15" draw:start-glue-point="3" svg:d="M4827 21223h-1487v-7h-959" svg:viewBox="0 0 2447 8">
          <text:p/>
        </draw:connector>
        <draw:g draw:style-name="gr78" xml:id="id16" draw:id="id16">
          <draw:path draw:style-name="gr79" draw:text-style-name="P46" draw:layer="layout" svg:width="0.5cm" svg:height="0.5cm" svg:x="10.82cm" svg:y="28.018cm" svg:viewBox="0 0 501 501" svg:d="M501 251c0 43-12 87-34 125s-53 69-91 91-82 34-125 34c-44 0-88-12-126-34s-69-53-91-91-34-82-34-125c0-44 12-88 34-126s53-69 91-91 82-34 126-34c43 0 87 12 125 34s69 53 91 91 34 82 34 126z">
            <text:p/>
          </draw:path>
          <draw:path draw:style-name="gr80" draw:text-style-name="P34" draw:layer="layout" svg:width="0.2cm" svg:height="0.2cm" svg:x="10.97cm" svg:y="28.168cm" svg:viewBox="0 0 201 201" svg:d="M201 101c0 17-5 34-13 50-9 15-22 28-37 37-16 8-33 13-50 13-18 0-35-5-51-13-15-9-28-22-37-37-8-16-13-33-13-50 0-18 5-35 13-51 9-15 22-28 37-37 16-8 33-13 51-13 17 0 34 5 50 13 15 9 28 22 37 37 8 16 13 33 13 51z">
            <text:p/>
          </draw:path>
        </draw:g>
        <draw:connector draw:style-name="gr81" draw:text-style-name="P36" draw:layer="layout" svg:x1="11.07cm" svg:y1="28.018cm" svg:x2="11.064cm" svg:y2="27.182cm" draw:start-shape="id16" draw:start-glue-point="0" draw:end-shape="id17" draw:end-glue-point="2" svg:d="M11070 28018v-418h-6v-418" svg:viewBox="0 0 7 837">
          <text:p/>
        </draw:connector>
        <draw:connector draw:style-name="gr82" draw:text-style-name="P36" draw:layer="layout" draw:line-skew="0.526cm" svg:x1="14.345cm" svg:y1="15.242cm" svg:x2="9.777cm" svg:y2="24.934cm" draw:start-shape="id18" draw:start-glue-point="5" draw:end-shape="id11" draw:end-glue-point="1" svg:d="M14345 15242h-1763v9692h-2805" svg:viewBox="0 0 4569 9693">
          <text:p/>
        </draw:connector>
        <draw:connector draw:style-name="gr83" draw:text-style-name="P36" draw:layer="layout" svg:x1="12.534cm" svg:y1="23.753cm" svg:x2="11.267cm" svg:y2="23.734cm" draw:end-shape="id19" draw:end-glue-point="1" svg:d="M12534 23753h-370v-19h-897" svg:viewBox="0 0 1268 20">
          <text:p/>
        </draw:connector>
        <draw:custom-shape draw:style-name="gr84" draw:text-style-name="P38" xml:id="id21" draw:id="id21" draw:layer="layout" svg:width="2.798cm" svg:height="1.009cm" svg:x="16.331cm" svg:y="13.92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src = dest;</text:span></text:p>
          <text:p text:style-name="P37"><text:span text:style-name="T28">i = i + iter_step;</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5" draw:text-style-name="P36" draw:layer="layout" svg:x1="14.88cm" svg:y1="16.62cm" svg:x2="14.845cm" svg:y2="15.742cm" draw:start-shape="id20" draw:start-glue-point="4" draw:end-shape="id18" draw:end-glue-point="6" svg:d="M14880 16620v-438h-35v-440" svg:viewBox="0 0 36 879">
          <text:p/>
        </draw:connector>
        <draw:connector draw:style-name="gr86" draw:text-style-name="P36" draw:layer="layout" svg:x1="9.101cm" svg:y1="13.661cm" svg:x2="15.046cm" svg:y2="13.648cm" draw:start-shape="id10" draw:start-glue-point="1" draw:end-shape="id13" draw:end-glue-point="5" svg:d="M9101 13661h2967v-13h2978" svg:viewBox="0 0 5946 14">
          <text:p/>
        </draw:connector>
        <draw:connector draw:style-name="gr87" draw:text-style-name="P36" draw:layer="layout" svg:x1="15.546cm" svg:y1="14.148cm" svg:x2="16.331cm" svg:y2="14.432cm" draw:start-shape="id13" draw:start-glue-point="6" draw:end-shape="id21" draw:end-glue-point="3" svg:d="M15546 14148v284h785" svg:viewBox="0 0 786 285">
          <text:p/>
        </draw:connector>
        <draw:frame draw:style-name="gr88" draw:text-style-name="P40" draw:layer="layout" svg:width="2.534cm" svg:height="0.601cm" svg:x="2.796cm" svg:y="23.618cm">
          <draw:text-box>
            <text:p text:style-name="P26"><text:span text:style-name="T28">[caso D]</text:span></text:p>
          </draw:text-box>
        </draw:frame>
        <draw:frame draw:style-name="gr89" draw:text-style-name="P40" draw:layer="layout" svg:width="2.534cm" svg:height="0.601cm" svg:x="2.165cm" svg:y="22.564cm">
          <draw:text-box>
            <text:p text:style-name="P26"><text:span text:style-name="T28">[caso C] &amp;&amp;</text:span></text:p>
            <text:p text:style-name="P26"><text:span text:style-name="T28">[decyhper] </text:span></text:p>
          </draw:text-box>
        </draw:frame>
        <draw:frame draw:style-name="gr90" draw:text-style-name="P47" draw:layer="layout" svg:width="1.47cm" svg:height="0.62cm" svg:x="2.43cm" svg:y="21.305cm">
          <draw:text-box>
            <text:p><text:span text:style-name="T28">[caso C] &amp;&amp;</text:span></text:p>
            <text:p><text:span text:style-name="T28">[encrypt] </text:span></text:p>
          </draw:text-box>
        </draw:frame>
        <draw:custom-shape draw:style-name="gr91" draw:text-style-name="P48" xml:id="id12" draw:id="id12" draw:layer="layout" svg:width="5.54cm" svg:height="1.14cm" svg:x="4.906cm" svg:y="17.535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dest, len) = </text:span><text:span text:style-name="T29"><text:a xlink:href="#block_encrypt" xlink:type="simple">block_encrypt</text:a></text:span><text:span text:style-name="T29"><text:line-break/></text:span><text:span text:style-name="T28">(src, len, </text:span><text:span text:style-name="T30"><text:a xlink:href="#cypher_data" xlink:type="simple">cypher_data</text:a></text:span><text:span text:style-name="T30">.</text:span><text:span text:style-name="T32"><text:a xlink:href="#Parametri del programma" xlink:type="simple">blocKey</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2" draw:text-style-name="P50" xml:id="id23" draw:id="id23" draw:layer="layout" svg:width="5.131cm" svg:height="0.944cm" svg:x="4.878cm" svg:y="16.18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9"><text:span text:style-name="T28">(dest, len) = </text:span><text:span text:style-name="T29"><text:a xlink:href="#caesar_decypher" xlink:type="simple">caesar_decypher</text:a></text:span><text:span text:style-name="T29"><text:line-break/></text:span><text:span text:style-name="T33">(src, len, </text:span><text:span text:style-name="T30"><text:a xlink:href="#cypher_data" xlink:type="simple">cypher_data</text:a></text:span><text:span text:style-name="T30">.</text:span><text:span text:style-name="T32"><text:a xlink:href="#Parametri del programma" xlink:type="simple">sostK</text:a></text:span><text:span text:style-name="T34">);</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3" draw:text-style-name="P45" xml:id="id22" draw:id="id22" draw:layer="layout" svg:width="5.802cm" svg:height="1.216cm" svg:x="4.869cm" svg:y="19.061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4"><text:span text:style-name="T28">(dest, len) = </text:span><text:span text:style-name="T29"><text:a xlink:href="#block_decypher" xlink:type="simple">block_decypher</text:a></text:span><text:span text:style-name="T29"><text:line-break/></text:span><text:span text:style-name="T28">(src, len, </text:span><text:span text:style-name="T30"><text:a xlink:href="#cypher_data" xlink:type="simple">cypher_data</text:a></text:span><text:span text:style-name="T30">.</text:span><text:span text:style-name="T32"><text:a xlink:href="#Parametri del programma" xlink:type="simple">blocKey</text:a></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50" xml:id="id24" draw:id="id24" draw:layer="layout" svg:width="4.95cm" svg:height="0.944cm" svg:x="4.902cm" svg:y="14.775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49"><text:span text:style-name="T28">(dest, len) = </text:span><text:span text:style-name="T29"><text:a xlink:href="#caesar_encrypt" xlink:type="simple">caesar_encrypt</text:a></text:span><text:span text:style-name="T29"><text:line-break/></text:span><text:span text:style-name="T33">(src, len, </text:span><text:span text:style-name="T30"><text:a xlink:href="#cypher_data" xlink:type="simple">cypher_data</text:a></text:span><text:span text:style-name="T30">.</text:span><text:span text:style-name="T32"><text:a xlink:href="#Parametri del programma" xlink:type="simple">sostK</text:a></text:span><text:span text:style-name="T34">)</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95" draw:text-style-name="P36" draw:layer="layout" svg:x1="4.869cm" svg:y1="19.669cm" svg:x2="2.369cm" svg:y2="19.657cm" draw:start-shape="id22" draw:start-glue-point="3" svg:d="M4869 19669h-1513v-12h-987" svg:viewBox="0 0 2501 13">
          <text:p/>
        </draw:connector>
        <draw:connector draw:style-name="gr96" draw:text-style-name="P36" draw:layer="layout" svg:x1="4.916cm" svg:y1="23.734cm" svg:x2="2.339cm" svg:y2="23.728cm" draw:start-shape="id19" draw:start-glue-point="3" svg:d="M4916 23734h-1552v-6h-1025" svg:viewBox="0 0 2578 7">
          <text:p/>
        </draw:connector>
        <draw:connector draw:style-name="gr97" draw:text-style-name="P36" draw:layer="layout" svg:x1="4.878cm" svg:y1="16.66cm" svg:x2="2.336cm" svg:y2="16.658cm" draw:start-shape="id23" draw:start-glue-point="3" svg:d="M4878 16660h-1535v-2h-1007" svg:viewBox="0 0 2543 3">
          <text:p/>
        </draw:connector>
        <draw:connector draw:style-name="gr98" draw:text-style-name="P36" draw:layer="layout" svg:x1="4.902cm" svg:y1="15.247cm" svg:x2="2.296cm" svg:y2="15.252cm" draw:start-shape="id24" draw:start-glue-point="3" svg:d="M4902 15247h-1566v5h-1040" svg:viewBox="0 0 2607 6">
          <text:p/>
        </draw:connector>
        <draw:frame draw:style-name="gr99" draw:text-style-name="P40" draw:layer="layout" svg:width="2.534cm" svg:height="0.601cm" svg:x="2.344cm" svg:y="15.674cm">
          <draw:text-box>
            <text:p text:style-name="P26"><text:span text:style-name="T28">[caso A] &amp;&amp;</text:span><text:span text:style-name="T28"><text:line-break/></text:span><text:span text:style-name="T28">[encrypy]</text:span></text:p>
            <text:p text:style-name="P26"><text:span text:style-name="T28"><text:s/></text:span></text:p>
            <text:p text:style-name="P26"><text:span text:style-name="T28"/></text:p>
          </draw:text-box>
        </draw:frame>
        <draw:frame draw:style-name="gr100" draw:text-style-name="P40" draw:layer="layout" svg:width="2.534cm" svg:height="0.601cm" svg:x="2.244cm" svg:y="16.846cm">
          <draw:text-box>
            <text:p text:style-name="P26"><text:span text:style-name="T28">[caso A] &amp;&amp;</text:span><text:span text:style-name="T28"><text:line-break/></text:span><text:span text:style-name="T28">[decypher]</text:span></text:p>
            <text:p text:style-name="P26"><text:span text:style-name="T28"><text:s/></text:span></text:p>
          </draw:text-box>
        </draw:frame>
        <draw:frame draw:style-name="gr101" draw:text-style-name="P40" draw:layer="layout" svg:width="2.534cm" svg:height="0.601cm" svg:x="2.195cm" svg:y="18.318cm">
          <draw:text-box>
            <text:p text:style-name="P26"><text:span text:style-name="T28">[caso B] &amp;&amp;</text:span><text:span text:style-name="T28"><text:line-break/></text:span><text:span text:style-name="T28">[encrypt]</text:span></text:p>
            <text:p text:style-name="P26"><text:span text:style-name="T28"><text:s/></text:span></text:p>
          </draw:text-box>
        </draw:frame>
        <draw:frame draw:style-name="gr102" draw:text-style-name="P40" draw:layer="layout" svg:width="2.534cm" svg:height="0.601cm" svg:x="2.195cm" svg:y="19.819cm">
          <draw:text-box>
            <text:p text:style-name="P26"><text:span text:style-name="T28">[caso B] &amp;&amp;</text:span><text:span text:style-name="T28"><text:line-break/></text:span><text:span text:style-name="T28">[decypher]</text:span></text:p>
            <text:p text:style-name="P26"><text:span text:style-name="T28"><text:s/></text:span></text:p>
          </draw:text-box>
        </draw:frame>
        <draw:connector draw:style-name="gr103" draw:text-style-name="P36" draw:layer="layout" svg:x1="12.549cm" svg:y1="22.482cm" svg:x2="11.54cm" svg:y2="22.448cm" draw:end-shape="id14" draw:end-glue-point="1" svg:d="M12549 22482h-241v-34h-768" svg:viewBox="0 0 1010 35">
          <text:p/>
        </draw:connector>
        <draw:connector draw:style-name="gr104" draw:text-style-name="P36" draw:layer="layout" svg:x1="12.616cm" svg:y1="15.251cm" svg:x2="9.852cm" svg:y2="15.247cm" draw:end-shape="id24" draw:end-glue-point="1" svg:d="M12616 15251h-1118v-4h-1646" svg:viewBox="0 0 2765 5">
          <text:p/>
        </draw:connector>
        <draw:connector draw:style-name="gr105" draw:text-style-name="P36" draw:layer="layout" svg:x1="12.593cm" svg:y1="16.644cm" svg:x2="10.009cm" svg:y2="16.66cm" draw:end-shape="id23" draw:end-glue-point="1" svg:d="M12593 16644h-1028v16h-1556" svg:viewBox="0 0 2585 17">
          <text:p/>
        </draw:connector>
        <draw:connector draw:style-name="gr106" draw:text-style-name="P36" draw:layer="layout" svg:x1="12.549cm" svg:y1="18.107cm" svg:x2="10.446cm" svg:y2="18.105cm" draw:end-shape="id12" draw:end-glue-point="1" svg:d="M12549 18107h-787v-2h-1316" svg:viewBox="0 0 2104 3">
          <text:p/>
        </draw:connector>
        <draw:connector draw:style-name="gr107" draw:text-style-name="P36" draw:layer="layout" svg:x1="12.564cm" svg:y1="19.674cm" svg:x2="10.671cm" svg:y2="19.669cm" draw:end-shape="id22" draw:end-glue-point="1" svg:d="M12564 19674h-682v-5h-1211" svg:viewBox="0 0 1894 6">
          <text:p/>
        </draw:connector>
        <draw:connector draw:style-name="gr108" draw:text-style-name="P36" draw:layer="layout" svg:x1="12.595cm" svg:y1="21.231cm" svg:x2="11.318cm" svg:y2="21.223cm" draw:end-shape="id15" draw:end-glue-point="1" svg:d="M12595 21231h-375v-8h-902" svg:viewBox="0 0 1278 9">
          <text:p/>
        </draw:connector>
        <draw:custom-shape draw:style-name="gr109" draw:text-style-name="P43" xml:id="id20" draw:id="id20" draw:layer="layout" svg:width="1cm" svg:height="1cm" svg:x="14.38cm" svg:y="16.62cm">
          <text:p/>
          <draw:enhanced-geometry svg:viewBox="0 0 21600 21600" draw:glue-points="10800 0 0 10800 10800 21600 21600 10800" draw:text-areas="5400 5400 16200 16200" draw:type="diamond" draw:enhanced-path="M 10800 0 L 21600 10800 10800 21600 0 10800 10800 0 Z N"/>
        </draw:custom-shape>
        <draw:frame draw:style-name="gr110" draw:text-style-name="P40" draw:layer="layout" svg:width="2.534cm" svg:height="0.601cm" svg:x="12.799cm" svg:y="16.359cm">
          <draw:text-box>
            <text:p text:style-name="P26"><text:span text:style-name="T28">[prima_iter?]</text:span></text:p>
          </draw:text-box>
        </draw:frame>
        <draw:custom-shape draw:style-name="gr111" draw:text-style-name="P43" xml:id="id27" draw:id="id27" draw:layer="layout" svg:width="1cm" svg:height="1cm" svg:x="14.46cm" svg:y="20.20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2" draw:text-style-name="P36" draw:layer="layout" svg:x1="14.913cm" svg:y1="18.716cm" svg:x2="14.88cm" svg:y2="17.62cm" draw:start-shape="id25" draw:start-glue-point="0" draw:end-shape="id20" draw:end-glue-point="6" svg:d="M14913 18716v-542h-33v-554" svg:viewBox="0 0 34 1097">
          <text:p/>
        </draw:connector>
        <draw:connector draw:style-name="gr113" draw:text-style-name="P36" draw:layer="layout" svg:x1="14.954cm" svg:y1="22.28cm" svg:x2="14.96cm" svg:y2="21.208cm" draw:start-shape="id26" draw:start-glue-point="0" draw:end-shape="id27" draw:end-glue-point="6" svg:d="M14954 22280v-530h6v-542" svg:viewBox="0 0 7 1073">
          <text:p/>
        </draw:connector>
        <draw:connector draw:style-name="gr114" draw:text-style-name="P36" draw:layer="layout" svg:x1="17.227cm" svg:y1="17.732cm" svg:x2="15.38cm" svg:y2="17.12cm" draw:start-shape="id28" draw:start-glue-point="0" draw:end-shape="id20" draw:end-glue-point="7" svg:d="M17227 17732v-612h-1847" svg:viewBox="0 0 1848 613">
          <text:p/>
        </draw:connector>
        <draw:connector draw:style-name="gr115" draw:text-style-name="P36" draw:layer="layout" svg:x1="14.96cm" svg:y1="20.208cm" svg:x2="14.913cm" svg:y2="19.39cm" draw:start-shape="id27" draw:start-glue-point="4" draw:end-shape="id25" draw:end-glue-point="2" svg:d="M14960 20208v-414h-47v-404" svg:viewBox="0 0 48 819">
          <text:p/>
        </draw:connector>
        <draw:custom-shape draw:style-name="gr116" draw:text-style-name="P48" xml:id="id25" draw:id="id25" draw:layer="layout" svg:width="2.238cm" svg:height="0.674cm" svg:x="13.794cm" svg:y="18.71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text:s/>free(sr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7" draw:text-style-name="P40" draw:layer="layout" svg:width="2.534cm" svg:height="0.601cm" svg:x="15.479cm" svg:y="16.558cm">
          <draw:text-box>
            <text:p text:style-name="P26"><text:span text:style-name="T28">[vero]</text:span></text:p>
          </draw:text-box>
        </draw:frame>
        <draw:frame draw:style-name="gr118" draw:text-style-name="P40" draw:layer="layout" svg:width="1.245cm" svg:height="0.601cm" svg:x="13.711cm" svg:y="17.681cm">
          <draw:text-box>
            <text:p text:style-name="P26"><text:span text:style-name="T28">[falso]</text:span></text:p>
          </draw:text-box>
        </draw:frame>
        <draw:frame draw:style-name="gr119" draw:text-style-name="P40" draw:layer="layout" svg:width="2.534cm" svg:height="0.601cm" svg:x="19cm" svg:y="10.647cm">
          <draw:text-box>
            <text:p text:style-name="P26"><text:span text:style-name="T28">[end if]</text:span></text:p>
          </draw:text-box>
        </draw:frame>
        <draw:frame draw:style-name="gr120" draw:text-style-name="P40" draw:layer="layout" svg:width="2.534cm" svg:height="0.601cm" svg:x="12.879cm" svg:y="14.531cm">
          <draw:text-box>
            <text:p text:style-name="P26"><text:span text:style-name="T28">[end switch]</text:span></text:p>
          </draw:text-box>
        </draw:frame>
        <draw:polygon draw:style-name="gr121" draw:text-style-name="P52" xml:id="id30" draw:id="id30" draw:layer="layout" svg:width="3.764cm" svg:height="1.354cm" svg:x="2.297cm" svg:y="9.63cm" svg:viewBox="0 0 3765 1355" draw:points="0,0 2352,0 2824,0 3764,0 3764,677 3765,678 3764,678 3764,1354 2824,1354 2824,1355 0,1355 941,678">
          <text:p text:style-name="P51"><text:span text:style-name="T28">In:</text:span></text:p>
          <text:p text:style-name="P51"><text:span text:style-name="T28">src, </text:span><text:span text:style-name="T30"><text:a xlink:href="#cypher_data" xlink:type="simple">cypher_data</text:a></text:span><text:span text:style-name="T28">, </text:span></text:p>
          <text:p text:style-name="P51"><text:span text:style-name="T28">bool: encrypt </text:span></text:p>
        </draw:polygon>
        <draw:connector draw:style-name="gr122" draw:text-style-name="P36" draw:layer="layout" svg:x1="6.97cm" svg:y1="10.324cm" svg:x2="6.062cm" svg:y2="10.307cm" draw:start-shape="id29" draw:start-glue-point="3" draw:end-shape="id30" draw:end-glue-point="1" svg:d="M6970 10324h-454v-17h-454" svg:viewBox="0 0 909 18">
          <text:p/>
        </draw:connector>
        <draw:connector draw:style-name="gr123" draw:text-style-name="P36" draw:layer="layout" svg:x1="4.179cm" svg:y1="9.63cm" svg:x2="4.182cm" svg:y2="8.253cm" draw:start-shape="id30" draw:start-glue-point="0" draw:end-shape="id31" draw:end-glue-point="2" svg:d="M4179 9630v-695h3v-682" svg:viewBox="0 0 4 1378">
          <text:p/>
        </draw:connector>
        <draw:custom-shape draw:style-name="gr124" draw:text-style-name="P54" xml:id="id17" draw:id="id17" draw:layer="layout" svg:width="3.018cm" svg:height="0.611cm" svg:x="9.555cm" svg:y="26.571cm">
          <text:p text:style-name="P53"><text:span text:style-name="T28">out = dest</text:span></text:p>
          <draw:enhanced-geometry svg:viewBox="0 0 21600 21600" draw:mirror-horizontal="false" draw:mirror-vertical="false" draw:text-areas="0 0 21600 21600" draw:type="pentagon-right" draw:modifiers="15339.64889036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25" draw:text-style-name="P43" xml:id="id6" draw:id="id6" draw:layer="layout" svg:width="1cm" svg:height="1cm" svg:x="10.832cm" svg:y="7.6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38" xml:id="id29" draw:id="id29" draw:layer="layout" svg:width="4cm" svg:height="1.571cm" svg:x="6.97cm" svg:y="9.539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len = strlen(src);</text:span><text:span text:style-name="T28"><text:line-break/></text:span><text:span text:style-name="T28">cypher_len = strlen</text:span><text:span text:style-name="T28"><text:line-break/></text:span><text:span text:style-name="T28">(</text:span><text:span text:style-name="T30"><text:a xlink:href="#cypher_data" xlink:type="simple">cypher_data</text:a></text:span><text:span text:style-name="T30">.</text:span><text:span text:style-name="T32">mycypher</text:span><text:span text:style-name="T34">);</text:span></text:p>
          <text:p text:style-name="P37"><text:span text:style-name="T34">prima_iter = ver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27" draw:text-style-name="P36" draw:layer="layout" svg:x1="10.832cm" svg:y1="8.122cm" svg:x2="8.97cm" svg:y2="9.539cm" draw:start-shape="id6" draw:start-glue-point="5" draw:end-shape="id29" draw:end-glue-point="0" svg:d="M10832 8122h-1862v1417" svg:viewBox="0 0 1863 1418">
          <text:p/>
        </draw:connector>
        <draw:custom-shape draw:style-name="gr128" draw:text-style-name="P54" xml:id="id26" draw:id="id26" draw:layer="layout" svg:width="3.648cm" svg:height="0.611cm" svg:x="13.13cm" svg:y="22.28cm">
          <text:p text:style-name="P53"><text:span text:style-name="T28">printstr(dest + '\n');</text:span></text:p>
          <draw:enhanced-geometry svg:viewBox="0 0 21600 21600" draw:mirror-horizontal="false" draw:mirror-vertical="false" draw:text-areas="0 0 21600 21600" draw:type="pentagon-right" draw:modifiers="16414.5793368046"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29" draw:text-style-name="P48" xml:id="id28" draw:id="id28" draw:layer="layout" svg:width="2.302cm" svg:height="0.858cm" svg:x="16.076cm" svg:y="17.73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19"><text:span text:style-name="T28">prima_iter </text:span></text:p>
          <text:p text:style-name="P19"><text:span text:style-name="T28">= fals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30" draw:text-style-name="P36" draw:layer="layout" svg:x1="15.46cm" svg:y1="20.708cm" svg:x2="17.227cm" svg:y2="18.59cm" draw:start-shape="id27" draw:start-glue-point="7" draw:end-shape="id28" draw:end-glue-point="2" svg:d="M15460 20708h1767v-2118" svg:viewBox="0 0 1768 2119">
          <text:p/>
        </draw:connector>
        <draw:connector draw:style-name="gr131" draw:text-style-name="P36" draw:layer="layout" draw:line-skew="-0.396cm" svg:x1="19.129cm" svg:y1="14.432cm" svg:x2="16.778cm" svg:y2="22.585cm" draw:start-shape="id21" draw:start-glue-point="1" draw:end-shape="id26" draw:end-glue-point="1" svg:d="M19129 14432h132v8153h-2483" svg:viewBox="0 0 2484 8154">
          <text:p/>
        </draw:connector>
        <draw:custom-shape draw:style-name="gr132" draw:text-style-name="P43" xml:id="id13" draw:id="id13" draw:layer="layout" svg:width="1cm" svg:height="1cm" svg:x="15.046cm" svg:y="13.148cm">
          <text:p/>
          <draw:enhanced-geometry svg:viewBox="0 0 21600 21600" draw:glue-points="10800 0 0 10800 10800 21600 21600 10800" draw:text-areas="5400 5400 16200 16200" draw:type="diamond" draw:enhanced-path="M 10800 0 L 21600 10800 10800 21600 0 10800 10800 0 Z N"/>
        </draw:custom-shape>
        <draw:frame draw:style-name="gr133" draw:text-style-name="P40" draw:layer="layout" svg:width="2.534cm" svg:height="0.601cm" svg:x="13.312cm" svg:y="12.487cm">
          <draw:text-box>
            <text:p text:style-name="P26"><text:span text:style-name="T28">[i != fine_iter]</text:span></text:p>
          </draw:text-box>
        </draw:frame>
        <draw:frame draw:style-name="gr134" draw:text-style-name="P40" draw:layer="layout" svg:width="1.197cm" svg:height="0.601cm" svg:x="13.864cm" svg:y="13.547cm">
          <draw:text-box>
            <text:p text:style-name="P26"><text:span text:style-name="T28">[vero]</text:span></text:p>
          </draw:text-box>
        </draw:frame>
        <draw:frame draw:style-name="gr135" draw:text-style-name="P40" draw:layer="layout" svg:width="1.245cm" svg:height="0.601cm" svg:x="15.711cm" svg:y="13.088cm">
          <draw:text-box>
            <text:p text:style-name="P26"><text:span text:style-name="T28">[falso]</text:span></text:p>
          </draw:text-box>
        </draw:frame>
        <draw:custom-shape draw:style-name="gr136" draw:text-style-name="P43" xml:id="id32" draw:id="id32" draw:layer="layout" svg:width="1cm" svg:height="1cm" svg:x="14.815cm" svg:y="25.40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7" draw:text-style-name="P36" draw:layer="layout" draw:line-skew="4.752cm 3.179cm" svg:x1="15.315cm" svg:y1="25.403cm" svg:x2="16.046cm" svg:y2="13.648cm" draw:start-shape="id32" draw:start-glue-point="4" draw:end-shape="id13" draw:end-glue-point="7" svg:d="M15315 25403v-875h4449v-10880h-3718" svg:viewBox="0 0 4450 11756">
          <text:p/>
        </draw:connector>
        <draw:connector draw:style-name="gr138" draw:text-style-name="P36" draw:layer="layout" svg:x1="11.064cm" svg:y1="26.571cm" svg:x2="14.815cm" svg:y2="25.903cm" draw:start-shape="id17" draw:start-glue-point="0" draw:end-shape="id32" svg:d="M11064 26571v-668h3751" svg:viewBox="0 0 3752 669">
          <text:p/>
        </draw:connector>
        <draw:frame draw:style-name="gr139" draw:text-style-name="P40" draw:layer="layout" svg:width="2.534cm" svg:height="0.601cm" svg:x="13.312cm" svg:y="25.088cm">
          <draw:text-box>
            <text:p text:style-name="P26"><text:span text:style-name="T28">[end loop]</text:span></text:p>
          </draw:text-box>
        </draw:frame>
      </draw:page>
      <draw:page draw:name="page4" draw:style-name="dp1" draw:master-page-name="master-page64">
        <draw:frame draw:style-name="gr15" draw:text-style-name="P15" draw:layer="layout" svg:width="0.943cm" svg:height="0.642cm" svg:x="1.474cm" svg:y="28.154cm">
          <draw:text-box>
            <text:p text:style-name="P1"><text:span text:style-name="T16">4</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str_map_alloc" draw:style-name="gr45" draw:text-style-name="P31" draw:layer="layout" svg:width="8.415cm" svg:height="0.543cm" svg:x="1.421cm" svg:y="2.834cm">
          <draw:text-box>
            <text:p text:style-name="P1"><text:span text:style-name="T25">str_map_alloc: </text:span></text:p>
          </draw:text-box>
        </draw:frame>
        <draw:frame draw:style-name="gr140" draw:text-style-name="P55" draw:layer="layout" svg:width="18.237cm" svg:height="1.819cm" svg:x="1.391cm" svg:y="3.486cm">
          <draw:text-box>
            <text:p text:style-name="P1"><text:span text:style-name="T35">Procedura che alloca memoria per una stringa che passa come argomento a </text:span><text:span text:style-name="T36">str_map</text:span><text:span text:style-name="T35">.</text:span><text:span text:style-name="T35"><text:line-break/></text:span><text:span text:style-name="T35">Verrà usata spesso da altre procedure</text:span></text:p>
            <text:p text:style-name="P1"><text:span text:style-name="T35"/></text:p>
          </draw:text-box>
        </draw:frame>
        <draw:frame draw:style-name="gr141" draw:text-style-name="P47" draw:layer="layout" svg:width="12.7cm" svg:height="4.195cm" svg:x="1.391cm" svg:y="4.822cm">
          <draw:text-box>
            <text:p>Pseudocodice:</text:p>
            <text:p/>
            <text:p>(char [], int) str_map_alloc(char [] src, int src_len, char (*funzione)(char))</text:p>
            <text:p>{</text:p>
            <text:p><text:tab/>char [] dest = malloc(src_len + 1);</text:p>
            <text:p><text:tab/>dest = str_map(src, dest, funzione);</text:p>
            <text:p><text:tab/>return (dest, src_len);</text:p>
            <text:p>}</text:p>
            <text:p/>
          </draw:text-box>
        </draw:frame>
        <draw:frame draw:name="str_map" draw:style-name="gr45" draw:text-style-name="P31" draw:layer="layout" svg:width="8.415cm" svg:height="0.543cm" svg:x="1.399cm" svg:y="8.586cm">
          <draw:text-box>
            <text:p text:style-name="P1"><text:span text:style-name="T25">str_map: </text:span></text:p>
          </draw:text-box>
        </draw:frame>
        <draw:frame draw:style-name="gr142" draw:text-style-name="P55" draw:layer="layout" svg:width="18.237cm" svg:height="2.285cm" svg:x="1.409cm" svg:y="9.312cm">
          <draw:text-box>
            <text:p text:style-name="P1"><text:span text:style-name="T35">Procedura ispirata dal linguaggio funzionale che itera su una stringa, e che per ogni carattere nell’indice “i” applica la funzione passata come argomento, la quale produce un carattere che viene scritto nello stesso indice sulla stringa di destinazione.</text:span></text:p>
          </draw:text-box>
        </draw:frame>
        <draw:g draw:style-name="gr48" xml:id="id34" draw:id="id34">
          <draw:path draw:style-name="gr143" draw:text-style-name="P34" draw:layer="layout" svg:width="0.5cm" svg:height="0.5cm" svg:x="2.298cm" svg:y="11.699cm" svg:viewBox="0 0 501 501" svg:d="M501 251c0 43-12 87-34 125s-53 69-91 91-82 34-125 34c-44 0-88-12-126-34s-69-53-91-91-34-82-34-125c0-44 12-88 34-126s53-69 91-91 82-34 126-34c43 0 87 12 125 34s69 53 91 91 34 82 34 126z">
            <text:p/>
          </draw:path>
          <draw:custom-shape draw:style-name="gr144" draw:text-style-name="P35" draw:layer="layout" svg:width="0.25cm" svg:height="0.25cm" svg:x="2.423cm" svg:y="11.824cm">
            <text:p/>
            <draw:enhanced-geometry svg:viewBox="0 0 21600 21600" draw:type="rectangle" draw:enhanced-path="M 0 0 L 21600 0 21600 21600 0 21600 0 0 Z N"/>
          </draw:custom-shape>
        </draw:g>
        <draw:connector draw:style-name="gr145" draw:text-style-name="P56" draw:layer="layout" svg:x1="4.218cm" svg:y1="11.93cm" svg:x2="2.799cm" svg:y2="11.949cm" draw:start-shape="id33" draw:start-glue-point="3" draw:end-shape="id34" draw:end-glue-point="1" svg:d="M4218 11930h-716v19h-703" svg:viewBox="0 0 1420 20">
          <text:p/>
        </draw:connector>
        <draw:polygon draw:style-name="gr146" draw:text-style-name="P57" xml:id="id33" draw:id="id33" draw:layer="layout" svg:width="3.791cm" svg:height="1.432cm" svg:x="4.218cm" svg:y="11.214cm" svg:viewBox="0 0 3792 1433" draw:points="0,0 2369,0 2844,0 3791,0 3791,716 3792,717 3791,717 3791,1432 2844,1432 2844,1433 0,1433 948,717">
          <text:p text:style-name="P51"><text:span text:style-name="T28">In: char [] src, </text:span></text:p>
          <text:p text:style-name="P51"><text:span text:style-name="T28">char [] dest,</text:span></text:p>
          <text:p text:style-name="P51"><text:span text:style-name="T28"><text:s/>funzione (char) -&gt; char</text:span></text:p>
        </draw:polygon>
        <draw:custom-shape draw:style-name="gr147" draw:text-style-name="P38" xml:id="id35" draw:id="id35" draw:layer="layout" svg:width="3.042cm" svg:height="1.062cm" draw:transform="skewX (0.00663225115757845) translate (9.428cm 11.41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c = funzione(st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48" draw:text-style-name="P36" draw:layer="layout" svg:x1="9.421cm" svg:y1="11.944cm" svg:x2="8.01cm" svg:y2="11.93cm" draw:start-shape="id35" draw:start-glue-point="3" draw:end-shape="id33" draw:end-glue-point="1" svg:d="M9421 11944h-705v-14h-706" svg:viewBox="0 0 1412 15">
          <text:p/>
        </draw:connector>
        <draw:custom-shape draw:style-name="gr149" draw:text-style-name="P43" xml:id="id36" draw:id="id36" draw:layer="layout" svg:width="1cm" svg:height="1cm" svg:x="10.436cm" svg:y="13.525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150" draw:text-style-name="P41" draw:layer="layout" svg:width="11.561cm" svg:height="5.639cm" svg:x="5.252cm" svg:y="12.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51" draw:text-style-name="P42" draw:layer="layout" svg:width="2.363cm" svg:height="0.614cm" svg:x="5.252cm" svg:y="12.984cm">
            <text:p text:style-name="P37"><text:span text:style-name="T28">str_map loop</text:span></text:p>
            <draw:enhanced-geometry svg:viewBox="0 0 21600 21600" draw:type="non-primitve" draw:enhanced-path="M 0 0 L 21600 0 19000 21600 0 21600 0 0 Z N"/>
          </draw:custom-shape>
        </draw:g>
        <draw:connector draw:style-name="gr152" draw:text-style-name="P36" draw:layer="layout" svg:x1="10.936cm" svg:y1="13.525cm" svg:x2="10.942cm" svg:y2="12.475cm" draw:start-shape="id36" draw:start-glue-point="4" draw:end-shape="id35" draw:end-glue-point="2" svg:d="M10936 13525v-530h6v-520" svg:viewBox="0 0 7 1051">
          <text:p/>
        </draw:connector>
        <draw:custom-shape draw:style-name="gr153" draw:text-style-name="P43" xml:id="id38" draw:id="id38" draw:layer="layout" svg:width="1cm" svg:height="1cm" svg:x="10.436cm" svg:y="17.025cm">
          <text:p/>
          <draw:enhanced-geometry svg:viewBox="0 0 21600 21600" draw:glue-points="10800 0 0 10800 10800 21600 21600 10800" draw:text-areas="5400 5400 16200 16200" draw:type="diamond" draw:enhanced-path="M 10800 0 L 21600 10800 10800 21600 0 10800 10800 0 Z N"/>
        </draw:custom-shape>
        <draw:frame draw:style-name="gr154" draw:text-style-name="P40" draw:layer="layout" svg:width="1.245cm" svg:height="0.601cm" svg:x="11.214cm" svg:y="13.375cm">
          <draw:text-box>
            <text:p text:style-name="P26"><text:span text:style-name="T28">[falso]</text:span></text:p>
          </draw:text-box>
        </draw:frame>
        <draw:custom-shape draw:style-name="gr155" draw:text-style-name="P38" xml:id="id37" draw:id="id37" draw:layer="layout" svg:width="3.042cm" svg:height="1.21cm" draw:transform="skewX (0.00663225115757845) translate (9.416cm 15.42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i] = c;</text:span></text:p>
          <text:p text:style-name="P37"><text:span text:style-name="T28">i++;</text:span></text:p>
          <text:p text:style-name="P37"><text:span text:style-name="T28">c = funzione(str[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56" draw:text-style-name="P36" draw:layer="layout" svg:x1="10.937cm" svg:y1="15.428cm" svg:x2="10.936cm" svg:y2="14.525cm" draw:start-shape="id37" draw:start-glue-point="0" draw:end-shape="id36" draw:end-glue-point="6" svg:d="M10937 15428v-445h-1v-458" svg:viewBox="0 0 2 904">
          <text:p/>
        </draw:connector>
        <draw:connector draw:style-name="gr157" draw:text-style-name="P36" draw:layer="layout" svg:x1="10.436cm" svg:y1="14.025cm" svg:x2="9.408cm" svg:y2="16.033cm" draw:start-shape="id36" draw:start-glue-point="5" draw:end-shape="id37" draw:end-glue-point="3" svg:d="M10436 14025h-1553v2008h525" svg:viewBox="0 0 1554 2009">
          <text:p/>
        </draw:connector>
        <draw:frame draw:style-name="gr158" draw:text-style-name="P40" draw:layer="layout" svg:width="2.558cm" svg:height="0.601cm" svg:x="8.078cm" svg:y="13.275cm">
          <draw:text-box>
            <text:p text:style-name="P26"><text:span text:style-name="T28">[src[i] != ‘\0’] &amp;&amp; </text:span></text:p>
            <text:p text:style-name="P26"><text:span text:style-name="T28">[c != ‘\0’]</text:span></text:p>
          </draw:text-box>
        </draw:frame>
        <draw:frame draw:style-name="gr159" draw:text-style-name="P40" draw:layer="layout" svg:width="1.197cm" svg:height="0.668cm" svg:x="9.715cm" svg:y="14.525cm">
          <draw:text-box>
            <text:p text:style-name="P26"><text:span text:style-name="T28">[vero]</text:span></text:p>
          </draw:text-box>
        </draw:frame>
        <draw:connector draw:style-name="gr160" draw:text-style-name="P36" draw:layer="layout" draw:line-skew="1.585cm" svg:x1="11.436cm" svg:y1="17.525cm" svg:x2="11.436cm" svg:y2="14.025cm" draw:start-shape="id38" draw:start-glue-point="7" draw:end-shape="id36" draw:end-glue-point="7" svg:d="M11436 17525h2124v-3500h-2124" svg:viewBox="0 0 2125 3501">
          <text:p/>
        </draw:connector>
        <draw:custom-shape draw:style-name="gr161" draw:text-style-name="P38" xml:id="id39" draw:id="id39" draw:layer="layout" svg:width="3.042cm" svg:height="0.584cm" draw:transform="skewX (0.00680678408277789) translate (9.427cm 19.2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62" draw:text-style-name="P36" draw:layer="layout" svg:x1="10.948cm" svg:y1="19.211cm" svg:x2="10.936cm" svg:y2="18.025cm" draw:start-shape="id39" draw:start-glue-point="0" draw:end-shape="id38" draw:end-glue-point="6" svg:d="M10948 19211v-587h-12v-599" svg:viewBox="0 0 13 1187">
          <text:p/>
        </draw:connector>
        <draw:frame draw:style-name="gr163" draw:text-style-name="P40" draw:layer="layout" svg:width="1.715cm" svg:height="0.601cm" svg:x="10.983cm" svg:y="17.776cm">
          <draw:text-box>
            <text:p text:style-name="P26"><text:span text:style-name="T28">[end loop]</text:span></text:p>
          </draw:text-box>
        </draw:frame>
        <draw:custom-shape draw:style-name="gr164" draw:text-style-name="P54" xml:id="id40" draw:id="id40" draw:layer="layout" svg:width="2.635cm" svg:height="0.887cm" svg:x="13.972cm" svg:y="19.074cm">
          <text:p text:style-name="P53"><text:span text:style-name="T28">Out: dest</text:span></text:p>
          <draw:enhanced-geometry svg:viewBox="0 0 21600 21600" draw:text-areas="0 0 21600 21600" draw:type="pentagon-right" draw:modifiers="14438.239757207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41" draw:id="id41">
          <draw:path draw:style-name="gr165" draw:text-style-name="P46" draw:layer="layout" svg:width="0.5cm" svg:height="0.5cm" svg:x="17.798cm" svg:y="19.246cm" svg:viewBox="0 0 501 501" svg:d="M501 251c0 43-12 87-34 125s-53 69-91 91-82 34-125 34c-44 0-88-12-126-34s-69-53-91-91-34-82-34-125c0-44 12-88 34-126s53-69 91-91 82-34 126-34c43 0 87 12 125 34s69 53 91 91 34 82 34 126z">
            <text:p/>
          </draw:path>
          <draw:path draw:style-name="gr166" draw:text-style-name="P34" draw:layer="layout" svg:width="0.2cm" svg:height="0.2cm" svg:x="17.948cm" svg:y="19.396cm" svg:viewBox="0 0 201 201" svg:d="M201 101c0 17-5 34-13 50-9 15-22 28-37 37-16 8-33 13-50 13-18 0-35-5-51-13-15-9-28-22-37-37-8-16-13-33-13-50 0-18 5-35 13-51 9-15 22-28 37-37 16-8 33-13 51-13 17 0 34 5 50 13 15 9 28 22 37 37 8 16 13 33 13 51z">
            <text:p/>
          </draw:path>
        </draw:g>
        <draw:connector draw:style-name="gr167" draw:text-style-name="P36" draw:layer="layout" svg:x1="13.972cm" svg:y1="19.517cm" svg:x2="12.469cm" svg:y2="19.503cm" draw:start-shape="id40" draw:start-glue-point="3" draw:end-shape="id39" draw:end-glue-point="1" svg:d="M13972 19517h-752v-14h-751" svg:viewBox="0 0 1504 15">
          <text:p/>
        </draw:connector>
        <draw:connector draw:style-name="gr168" draw:text-style-name="P36" draw:layer="layout" svg:x1="17.798cm" svg:y1="19.496cm" svg:x2="16.607cm" svg:y2="19.517cm" draw:start-shape="id41" draw:start-glue-point="3" draw:end-shape="id40" draw:end-glue-point="1" svg:d="M17798 19496h-595v21h-596" svg:viewBox="0 0 1192 22">
          <text:p/>
        </draw:connector>
        <draw:frame draw:name="str_map_alloc 2" draw:style-name="gr169" draw:text-style-name="P58" draw:layer="layout" svg:width="3.213cm" svg:height="0.543cm" svg:x="1.4cm" svg:y="20.287cm">
          <draw:text-box>
            <text:p text:style-name="P1"><text:span text:style-name="T25">curry_word: </text:span></text:p>
          </draw:text-box>
        </draw:frame>
        <draw:frame draw:style-name="gr170" draw:text-style-name="P55" draw:layer="layout" svg:width="17.605cm" svg:height="6.038cm" svg:x="1.41cm" svg:y="21.113cm">
          <draw:text-box>
            <text:p text:style-name="P1"><text:span text:style-name="T35">Per fare pieno uso della potenzialità del linguaggio funzionale </text:span><text:span text:style-name="T37">è</text:span><text:span text:style-name="T35"> necessario essere in grado di eseguire l’operazione di </text:span><text:span text:style-name="T38">currying</text:span><text:span text:style-name="T35">, o di applicazione parziale di funzioni, in quanto </text:span><text:span text:style-name="T36"><text:a xlink:href="#str_map" xlink:type="simple">str_map</text:a></text:span><text:span text:style-name="T8"><text:s/>può solo valutare funzioni con un singolo parametro.</text:span><text:span text:style-name="T8"><text:line-break/></text:span><text:span text:style-name="T8">In linguaggio informale, eseguendo questa operazione su una funzione </text:span><text:span text:style-name="T39">f</text:span><text:span text:style-name="T40">: (X×Y )→Z, <text:s/></text:span><text:span text:style-name="T41">è</text:span><text:span text:style-name="T8"> possibile definire una funzione </text:span><text:span text:style-name="T40">f</text:span><text:span text:style-name="T42">x</text:span><text:span text:style-name="T43">:(Y)→Z, </text:span><text:span text:style-name="T44"><text:s/>che accetta un numero ridotto di argomenti, in un certo senso “fissando” il valore di x.</text:span></text:p>
            <text:p text:style-name="P1"><text:span text:style-name="T44">In questo documento richiamerò la funzione “curry()” come una funzione capace di associare la funzione passata come primo argomento, agli argomenti successivi, come dire: </text:span><text:span text:style-name="T44"><text:line-break/></text:span><text:span text:style-name="T44">curry(func(), a, b) = func(a, b, …). </text:span></text:p>
            <text:p text:style-name="P1"><text:span text:style-name="T44">Volevo far presente che l’implementazione effettiva differisce da questo comportamento, anche se produce un effetto analogo.</text:span></text:p>
          </draw:text-box>
        </draw:frame>
      </draw:page>
      <draw:page draw:name="page5" draw:style-name="dp1" draw:master-page-name="master-page64">
        <draw:frame draw:style-name="gr15" draw:text-style-name="P15" draw:layer="layout" svg:width="0.943cm" svg:height="0.642cm" svg:x="1.474cm" svg:y="28.154cm">
          <draw:text-box>
            <text:p text:style-name="P1"><text:span text:style-name="T16">5</text:span></text:p>
          </draw:text-box>
        </draw:frame>
        <draw:frame draw:style-name="gr44" draw:text-style-name="P8" draw:layer="layout" svg:width="5.771cm" svg:height="0.543cm" svg:x="1.401cm" svg:y="2.026cm">
          <draw:text-box>
            <text:p text:style-name="P1"><text:span text:style-name="T7">Procedure notevoli: </text:span></text:p>
          </draw:text-box>
        </draw:frame>
        <draw:frame draw:name="Implementazione di curry_word" draw:style-name="gr171" draw:text-style-name="P58" draw:layer="layout" svg:width="7.789cm" svg:height="0.543cm" svg:x="1.4cm" svg:y="2.987cm">
          <draw:text-box>
            <text:p text:style-name="P1"><text:span text:style-name="T25">Implementazione di curry_word: </text:span></text:p>
          </draw:text-box>
        </draw:frame>
        <draw:frame draw:style-name="gr172" draw:text-style-name="P59" draw:layer="layout" svg:width="17.605cm" svg:height="7.567cm" svg:x="1.658cm" svg:y="3.919cm">
          <draw:text-box>
            <text:p text:style-name="P1"><text:span text:style-name="T45">Nel codice l’implementazione della procedura risulta non convenzionale e rompe alcune delle regole che mi sono imposto durante la scrittura del codice, ho fatto questa scelta per mantenere il resto della struttura e logica del programma, e per evitare di appoggiarmi a variabili globali alterando ulteriormente lo stato del programma tra chiamate. </text:span><text:span text:style-name="T45"><text:line-break/></text:span><text:span text:style-name="T45">E in tutta onestà per testare i un po’ limiti della mia conoscenza di Riscv e Ripes, mantenendo comunque un codice deterministico.</text:span><text:span text:style-name="T45"><text:line-break/></text:span><text:span text:style-name="T45"><text:line-break/></text:span><text:span text:style-name="T45">In breve la procedura altera la sezione .text del programma durante l’esecuzione, inserendo due operazioni che permettono di caricare una parola arbitraria in un registro specificato durante la chiamata.</text:span><text:span text:style-name="T45"><text:line-break/></text:span><text:span text:style-name="T45">Questo pu</text:span><text:span text:style-name="T46">ò essere fatto con sicurezza solo se abbiamo definito un simbolo e lasciato spazio per due operazioni nella sezione del codice che vogliamo modificare.</text:span></text:p>
            <text:p text:style-name="P1"><text:span text:style-name="T45"><text:line-break/></text:span><text:span text:style-name="T45"/></text:p>
          </draw:text-box>
        </draw:frame>
        <draw:frame draw:style-name="gr173" draw:text-style-name="P60" draw:layer="layout" svg:width="6.644cm" svg:height="1.832cm" svg:x="10.692cm" svg:y="10.946cm">
          <draw:image xlink:href="Pictures/100000010000012200000050F922DA25.png" xlink:type="simple" xlink:show="embed" xlink:actuate="onLoad" draw:mime-type="image/png">
            <text:p/>
          </draw:image>
        </draw:frame>
        <draw:frame draw:style-name="gr173" draw:text-style-name="P60" draw:layer="layout" svg:width="9.153cm" svg:height="1.883cm" svg:x="10.647cm" svg:y="13.701cm">
          <draw:image xlink:href="Pictures/10000001000001800000004F28348659.png" xlink:type="simple" xlink:show="embed" xlink:actuate="onLoad" draw:mime-type="image/png">
            <text:p/>
          </draw:image>
        </draw:frame>
        <draw:frame draw:style-name="gr174" draw:text-style-name="P32" draw:layer="layout" svg:width="8.617cm" svg:height="6.497cm" svg:x="1.621cm" svg:y="10.817cm">
          <draw:text-box>
            <text:p text:style-name="P1"><text:span text:style-name="T46">Per esempio nella funzione </text:span><text:span text:style-name="T47"><text:a xlink:href="#caesar_sost" xlink:type="simple">caesar_sost</text:a></text:span><text:span text:style-name="T48"><text:s/>la sequenza di codice dopo il simbolo "caesar_sost_load_k" </text:span><text:span text:style-name="T46">è compresa intenzionalmente da due azioni senza effffetto, in modo che possa essere</text:span><text:span text:style-name="T48"> sovrascritta con una sequenza che carica il valore di </text:span><text:span text:style-name="T49"><text:a xlink:href="#Parametri del programma" xlink:type="simple">sostK</text:a></text:span><text:span text:style-name="T48"><text:s/>nel registro t1.</text:span><text:span text:style-name="T48"><text:line-break/></text:span><text:span text:style-name="T48">Questa sequenza spezza il valore in una parte superiore di 20 bit, e una inferiore di 12 e sfrutta le istruzioni immediate per costruire il valore nel registro scelto</text:span></text:p>
            <text:p text:style-name="P1"><text:span text:style-name="T48"/></text:p>
          </draw:text-box>
        </draw:frame>
        <draw:frame draw:style-name="gr175" draw:text-style-name="P47" draw:layer="layout" svg:width="16.865cm" svg:height="9.652cm" svg:x="1.491cm" svg:y="17.223cm">
          <draw:text-box>
            <text:p>Pseudocodice:</text:p>
            <text:p/>
            <text:p>void curry_word(32bit_int valore, int registro, 32bit_int *indirizzo_destinazione)</text:p>
            <text:p>{</text:p>
            <text:p><text:tab/>bit bit_flip = leggi_nesimo_bit(valore, 12); <text:s/>→ * </text:p>
            <text:p/>
            <text:p><text:tab/>32bit_int lui_opcode = 0b0110111; </text:p>
            <text:p><text:tab/></text:p>
            <text:p><text:tab/>32bit_int istruzione_lui = ((valore &gt;&gt; 12) + bit_flip) &lt;&lt; 12;</text:p>
            <text:p><text:tab/>istruzione_lui |= registro &lt;&lt; 7; </text:p>
            <text:p><text:tab/>istruzione_lui |= lui_opcode;</text:p>
            <text:p/>
            <text:p><text:tab/>32bit_int addi_opcode = 0b0010011;</text:p>
            <text:p/>
            <text:p><text:tab/>32bit_int istruzione_addi = valore &lt;&lt; 20; </text:p>
            <text:p><text:tab/>istruzione_addi |= registro &lt;&lt; 7 | registro &lt;&lt; 15; </text:p>
            <text:p><text:tab/>istruzione_addi |= addi_opcode; </text:p>
            <text:p/>
            <text:p><text:tab/>indirizzo_destinazione[0] = istruizione_lui;</text:p>
            <text:p><text:tab/>indirizzo_destinazione[1] = istruzione_addi;</text:p>
            <text:p>}</text:p>
            <text:p/>
          </draw:text-box>
        </draw:frame>
        <draw:frame draw:style-name="gr176" draw:text-style-name="P33" draw:layer="layout" svg:width="17.768cm" svg:height="1.171cm" svg:x="1.522cm" svg:y="26.618cm">
          <draw:text-box>
            <text:p text:style-name="P1"><text:span text:style-name="T50">* dato che il bit più significativo della codifica di un numero definisce il suo segno, in caso il 12esimo bit del valore sia uno si aggiunge 1 alla porzione superiore per bilanciare il fatto che la porzione inferiore sarà interpretata come negativa.</text:span></text:p>
          </draw:text-box>
        </draw:frame>
      </draw:page>
      <draw:page draw:name="page6" draw:style-name="dp1" draw:master-page-name="master-page64">
        <draw:frame draw:style-name="gr44" draw:text-style-name="P8" draw:layer="layout" svg:width="5.771cm" svg:height="0.543cm" svg:x="1.401cm" svg:y="2.026cm">
          <draw:text-box>
            <text:p text:style-name="P1"><text:span text:style-name="T7">Procedure notevoli: </text:span></text:p>
          </draw:text-box>
        </draw:frame>
        <draw:frame draw:style-name="gr177" draw:text-style-name="P47" draw:layer="layout" svg:width="16.392cm" svg:height="6.991cm" svg:x="1.548cm" svg:y="22.27cm">
          <draw:text-box>
            <text:p>Pseudocodice:</text:p>
            <text:p/>
            <text:p>(char [], int) block_encrypt(char [] src, int src_len, char [] blocKey)</text:p>
            <text:p>{</text:p>
            <text:p><text:tab/>int i = 0;</text:p>
            <text:p><text:tab/>return (str_map_alloc(src, src_len, curry(block_map, &amp;i, blockey, true));</text:p>
            <text:p>}</text:p>
            <text:p/>
            <text:p>(char [], int) block_decypher(char [] src, int src_len, char [] blocKey)</text:p>
            <text:p>{</text:p>
            <text:p><text:tab/>int i = 0;</text:p>
            <text:p><text:tab/>return (str_map_alloc(src, src_len, curry(block_map, &amp;i, blockey, false));</text:p>
            <text:p>}<text:line-break/></text:p>
          </draw:text-box>
        </draw:frame>
        <draw:frame draw:name="caesar_sost" draw:style-name="gr45" draw:text-style-name="P58" draw:layer="layout" svg:width="8.415cm" svg:height="0.543cm" svg:x="1.403cm" svg:y="12.326cm">
          <draw:text-box>
            <text:p text:style-name="P1"><text:span text:style-name="T25">cesar_sost: </text:span></text:p>
          </draw:text-box>
        </draw:frame>
        <draw:g draw:style-name="gr48" xml:id="id43" draw:id="id43">
          <draw:path draw:style-name="gr178" draw:text-style-name="P34" draw:layer="layout" svg:width="0.5cm" svg:height="0.5cm" svg:x="2.152cm" svg:y="16.291cm" svg:viewBox="0 0 501 501" svg:d="M501 251c0 43-12 87-34 125s-53 69-91 91-82 34-125 34c-44 0-88-12-126-34s-69-53-91-91-34-82-34-125c0-44 12-88 34-126s53-69 91-91 82-34 126-34c43 0 87 12 125 34s69 53 91 91 34 82 34 126z">
            <text:p/>
          </draw:path>
          <draw:custom-shape draw:style-name="gr179" draw:text-style-name="P35" draw:layer="layout" svg:width="0.25cm" svg:height="0.25cm" svg:x="2.277cm" svg:y="16.416cm">
            <text:p/>
            <draw:enhanced-geometry svg:viewBox="0 0 21600 21600" draw:type="rectangle" draw:enhanced-path="M 0 0 L 21600 0 21600 21600 0 21600 0 0 Z N"/>
          </draw:custom-shape>
        </draw:g>
        <draw:connector draw:style-name="gr180" draw:text-style-name="P36" draw:layer="layout" svg:x1="3.332cm" svg:y1="16.533cm" svg:x2="2.653cm" svg:y2="16.541cm" draw:start-shape="id42" draw:start-glue-point="3" draw:end-shape="id43" draw:end-glue-point="1" svg:d="M3332 16533h-346v8h-333" svg:viewBox="0 0 680 9">
          <text:p/>
        </draw:connector>
        <draw:custom-shape draw:style-name="gr181" draw:text-style-name="P62" xml:id="id45" draw:id="id45" draw:layer="layout" svg:width="2.26cm" svg:height="1.5cm" svg:x="14.915cm" svg:y="15.666cm">
          <text:p text:style-name="P61"><text:span text:style-name="T20">out: c</text:span></text:p>
          <draw:enhanced-geometry svg:viewBox="0 0 21600 21600" draw:text-areas="0 0 21600 21600" draw:type="pentagon-right" draw:modifiers="13240.866873065"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82" draw:text-style-name="P43" xml:id="id44" draw:id="id44" draw:layer="layout" svg:width="1cm" svg:height="1cm" svg:x="9.825cm" svg:y="14.37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3" draw:text-style-name="P36" draw:layer="layout" draw:line-skew="-0.606cm" svg:x1="9.825cm" svg:y1="14.878cm" svg:x2="7.332cm" svg:y2="16.533cm" draw:start-shape="id44" draw:end-shape="id42" draw:end-glue-point="1" svg:d="M9825 14878h-1858v1655h-635" svg:viewBox="0 0 2494 1656">
          <text:p/>
        </draw:connector>
        <draw:connector draw:style-name="gr184" draw:text-style-name="P36" draw:layer="layout" svg:x1="14.915cm" svg:y1="16.416cm" svg:x2="14.147cm" svg:y2="16.466cm" draw:start-shape="id45" draw:start-glue-point="3" draw:end-shape="id46" draw:end-glue-point="7" svg:d="M14915 16416h-378v50h-390" svg:viewBox="0 0 769 51">
          <text:p/>
        </draw:connector>
        <draw:connector draw:style-name="gr185" draw:text-style-name="P36" draw:layer="layout" svg:x1="13.647cm" svg:y1="15.966cm" svg:x2="10.825cm" svg:y2="14.878cm" draw:start-shape="id46" draw:start-glue-point="4" draw:end-shape="id44" draw:end-glue-point="7" svg:d="M13647 15966v-1088h-2822" svg:viewBox="0 0 2823 1089">
          <text:p/>
        </draw:connector>
        <draw:connector draw:style-name="gr186" draw:text-style-name="P36" draw:layer="layout" svg:x1="18.261cm" svg:y1="16.398cm" svg:x2="17.175cm" svg:y2="16.416cm" draw:start-shape="id47" draw:start-glue-point="3" draw:end-shape="id45" svg:d="M18261 16398h-542v18h-544" svg:viewBox="0 0 1087 19">
          <text:p/>
        </draw:connector>
        <draw:custom-shape draw:style-name="gr187" draw:text-style-name="P43" xml:id="id46" draw:id="id46" draw:layer="layout" svg:width="1cm" svg:height="1cm" svg:x="13.147cm" svg:y="15.966cm">
          <text:p/>
          <draw:enhanced-geometry svg:viewBox="0 0 21600 21600" draw:glue-points="10800 0 0 10800 10800 21600 21600 10800" draw:text-areas="5400 5400 16200 16200" draw:type="diamond" draw:enhanced-path="M 10800 0 L 21600 10800 10800 21600 0 10800 10800 0 Z N"/>
        </draw:custom-shape>
        <draw:g draw:style-name="gr78" xml:id="id47" draw:id="id47">
          <draw:path draw:style-name="gr188" draw:text-style-name="P46" draw:layer="layout" svg:width="0.5cm" svg:height="0.5cm" svg:x="18.261cm" svg:y="16.148cm" svg:viewBox="0 0 501 501" svg:d="M501 251c0 43-12 87-34 125s-53 69-91 91-82 34-125 34c-44 0-88-12-126-34s-69-53-91-91-34-82-34-125c0-44 12-88 34-126s53-69 91-91 82-34 126-34c43 0 87 12 125 34s69 53 91 91 34 82 34 126z">
            <text:p/>
          </draw:path>
          <draw:path draw:style-name="gr189" draw:text-style-name="P34" draw:layer="layout" svg:width="0.2cm" svg:height="0.2cm" svg:x="18.411cm" svg:y="16.298cm" svg:viewBox="0 0 201 201" svg:d="M201 101c0 17-5 34-13 50-9 15-22 28-37 37-16 8-33 13-50 13-18 0-35-5-51-13-15-9-28-22-37-37-8-16-13-33-13-50 0-18 5-35 13-51 9-15 22-28 37-37 16-8 33-13 51-13 17 0 34 5 50 13 15 9 28 22 37 37 8 16 13 33 13 51z">
            <text:p/>
          </draw:path>
        </draw:g>
        <draw:polygon draw:style-name="gr190" draw:text-style-name="P57" xml:id="id42" draw:id="id42" draw:layer="layout" svg:width="3.999cm" svg:height="1.499cm" svg:x="3.332cm" svg:y="15.783cm" svg:viewBox="0 0 4000 1500" draw:points="0,0 2499,0 3000,0 3999,0 3999,749 4000,750 3999,751 3999,1499 3000,1499 3000,1500 0,1500 1000,750">
          <text:p text:style-name="P63"><text:span text:style-name="T20">in: c, sostK</text:span></text:p>
        </draw:polygon>
        <draw:custom-shape draw:style-name="gr191" draw:text-style-name="P38" xml:id="id48" draw:id="id48" draw:layer="layout" svg:width="4.317cm" svg:height="1.644cm" svg:x="8.195cm" svg:y="16.43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minuscolo = c &amp; 32;</text:span></text:p>
          <text:p text:style-name="P37"><text:span text:style-name="T28">c = (c – 'A' - minuscolo + sostk);</text:span></text:p>
          <text:p text:style-name="P37"><text:span text:style-name="T28">c = c % 26 + minuscolo + 'A';</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92" draw:text-style-name="P36" draw:layer="layout" svg:x1="10.353cm" svg:y1="16.436cm" svg:x2="10.325cm" svg:y2="15.378cm" draw:start-shape="id48" draw:start-glue-point="0" draw:end-shape="id44" draw:end-glue-point="6" svg:d="M10353 16436v-523h-28v-535" svg:viewBox="0 0 29 1059">
          <text:p/>
        </draw:connector>
        <draw:connector draw:style-name="gr193" draw:text-style-name="P36" draw:layer="layout" svg:x1="13.147cm" svg:y1="16.466cm" svg:x2="12.512cm" svg:y2="17.258cm" draw:start-shape="id46" draw:start-glue-point="5" draw:end-shape="id48" draw:end-glue-point="1" svg:d="M13147 16466h-323v792h-312" svg:viewBox="0 0 636 793">
          <text:p/>
        </draw:connector>
        <draw:frame draw:style-name="gr194" draw:text-style-name="P40" draw:layer="layout" svg:width="2.553cm" svg:height="0.601cm" svg:x="7.479cm" svg:y="14.252cm">
          <draw:text-box>
            <text:p text:style-name="P64"><text:span text:style-name="T28">[c è una lettera?]</text:span></text:p>
          </draw:text-box>
        </draw:frame>
        <draw:frame draw:style-name="gr195" draw:text-style-name="P40" draw:layer="layout" svg:width="2.534cm" svg:height="0.601cm" svg:x="10.831cm" svg:y="14.36cm">
          <draw:text-box>
            <text:p text:style-name="P26"><text:span text:style-name="T28">[falso]</text:span></text:p>
          </draw:text-box>
        </draw:frame>
        <draw:frame draw:style-name="gr196" draw:text-style-name="P40" draw:layer="layout" svg:width="2.534cm" svg:height="0.601cm" svg:x="10.196cm" svg:y="15.196cm">
          <draw:text-box>
            <text:p text:style-name="P26"><text:span text:style-name="T28">[vero]</text:span></text:p>
          </draw:text-box>
        </draw:frame>
        <draw:frame draw:name="block_encrypt" draw:style-name="gr45" draw:text-style-name="P31" draw:layer="layout" svg:width="8.415cm" svg:height="0.543cm" svg:x="1.401cm" svg:y="18.425cm">
          <draw:text-box>
            <text:p text:style-name="P1"><text:span text:style-name="T25">block_encrypt: (Cifrario a blocchi)</text:span></text:p>
          </draw:text-box>
        </draw:frame>
        <draw:frame draw:style-name="gr197" draw:text-style-name="P66" draw:layer="layout" svg:width="18.237cm" svg:height="1.071cm" svg:x="1.455cm" svg:y="19.26cm">
          <draw:text-box>
            <text:p text:style-name="P65"><text:span text:style-name="T8">Semplice procedura che delega il processo alla procedura </text:span><text:span text:style-name="T36">str_map</text:span><text:span text:style-name="T8">, dopo aver effettuato il currying della funzione “</text:span><text:span text:style-name="T36"><text:a xlink:href="#block_map" xlink:type="simple">block_map</text:a></text:span><text:span text:style-name="T8">”</text:span></text:p>
          </draw:text-box>
        </draw:frame>
        <draw:frame draw:name="block_decypher" draw:style-name="gr198" draw:text-style-name="P31" draw:layer="layout" svg:width="8.588cm" svg:height="0.543cm" svg:x="1.402cm" svg:y="20.526cm">
          <draw:text-box>
            <text:p text:style-name="P1"><text:span text:style-name="T25">block_decypher: (Cifrario di Cesare)</text:span></text:p>
          </draw:text-box>
        </draw:frame>
        <draw:frame draw:style-name="gr199" draw:text-style-name="P32" draw:layer="layout" svg:width="18.237cm" svg:height="0.68cm" svg:x="1.456cm" svg:y="21.261cm">
          <draw:text-box>
            <text:p text:style-name="P67"><text:span text:style-name="T51">Uguale alla procedura di cifratura, eccetto che cambia l'argomento booleano</text:span></text:p>
          </draw:text-box>
        </draw:frame>
        <draw:frame draw:style-name="gr200" draw:text-style-name="P32" draw:layer="layout" svg:width="18.237cm" svg:height="1.147cm" svg:x="1.456cm" svg:y="13.06cm">
          <draw:text-box>
            <text:p text:style-name="P1"><text:span text:style-name="T8">Semplice procedura che effettua la cifratura a sostituzione di un carattere in base all’input. </text:span></text:p>
            <text:p text:style-name="P1"><text:span text:style-name="T8">Lascia tutti I caratteri al di fuori delle lettere invariati.</text:span></text:p>
          </draw:text-box>
        </draw:frame>
        <draw:frame draw:style-name="gr15" draw:text-style-name="P15" draw:layer="layout" svg:width="0.943cm" svg:height="0.642cm" svg:x="1.476cm" svg:y="28.155cm">
          <draw:text-box>
            <text:p text:style-name="P1"><text:span text:style-name="T16">6</text:span></text:p>
          </draw:text-box>
        </draw:frame>
        <draw:frame draw:style-name="gr201" draw:text-style-name="P47" draw:layer="layout" svg:width="12.7cm" svg:height="5.593cm" svg:x="1.535cm" svg:y="7.246cm">
          <draw:text-box>
            <text:p>Pseudocodice:</text:p>
            <text:p/>
            <text:p>(char [], int) caesar_encrypt(char [] src, int src_len, int sostK)</text:p>
            <text:p>{</text:p>
            <text:p><text:tab/>return (str_map_alloc(src, src_len, curry(caesar_sost, sostK));</text:p>
            <text:p>}</text:p>
            <text:p/>
            <text:p>(char [], int) caesar_decypher(char [] src, int src_len, int sostK)</text:p>
            <text:p>{</text:p>
            <text:p><text:tab/>return (caesar_encrypt(src, src_len, 26 – sostK));</text:p>
            <text:p>}<text:line-break/></text:p>
          </draw:text-box>
        </draw:frame>
        <draw:frame draw:name="caesar_encrypt" draw:style-name="gr45" draw:text-style-name="P31" draw:layer="layout" svg:width="8.415cm" svg:height="0.543cm" svg:x="1.401cm" svg:y="2.927cm">
          <draw:text-box>
            <text:p text:style-name="P1"><text:span text:style-name="T25">cesar_encrypt: (Cifrario di Cesare)</text:span></text:p>
          </draw:text-box>
        </draw:frame>
        <draw:frame draw:style-name="gr197" draw:text-style-name="P32" draw:layer="layout" svg:width="18.237cm" svg:height="1.071cm" svg:x="1.455cm" svg:y="3.762cm">
          <draw:text-box>
            <text:p text:style-name="P1"><text:span text:style-name="T8">Semplice procedura che delega il processo alla procedura </text:span><text:span text:style-name="T36">str_map</text:span><text:span text:style-name="T8">, dopo aver effettuato il currying della funzione “</text:span><text:span text:style-name="T36"><text:a xlink:href="#caesar_sost" xlink:type="simple">caesar_sost</text:a></text:span><text:span text:style-name="T8">”</text:span></text:p>
          </draw:text-box>
        </draw:frame>
        <draw:frame draw:name="caesar_decypher" draw:style-name="gr202" draw:text-style-name="P31" draw:layer="layout" svg:width="8.601cm" svg:height="0.543cm" svg:x="1.402cm" svg:y="5.128cm">
          <draw:text-box>
            <text:p text:style-name="P1"><text:span text:style-name="T25">cesar_decypher: (Cifrario di Cesare)</text:span></text:p>
          </draw:text-box>
        </draw:frame>
        <draw:frame draw:style-name="gr197" draw:text-style-name="P68" draw:layer="layout" svg:width="18.237cm" svg:height="1.071cm" svg:x="1.493cm" svg:y="5.863cm">
          <draw:text-box>
            <text:p text:style-name="P67"><text:span text:style-name="T52">Fa rieferimento a </text:span><text:span text:style-name="T47"><text:a xlink:href="#caesar_encrypt" xlink:type="simple">caesar_encrypt</text:a></text:span><text:span text:style-name="T46">, infatti tutto ciò che fa è chiamare la stessa cambiando il terzo argomento da “</text:span><text:span text:style-name="T49"><text:a xlink:href="#Parametri del programma" xlink:type="simple">sostK</text:a></text:span><text:span text:style-name="T46">” a “26 - </text:span><text:span text:style-name="T49"><text:a xlink:href="#Parametri del programma" xlink:type="simple">sostK</text:a></text:span><text:span text:style-name="T46">”</text:span></text:p>
          </draw:text-box>
        </draw:frame>
      </draw:page>
      <draw:page draw:name="page7" draw:style-name="dp1" draw:master-page-name="master-page79">
        <draw:frame draw:name="block_map" draw:style-name="gr45" draw:text-style-name="P31" draw:layer="layout" svg:width="8.415cm" svg:height="0.543cm" svg:x="1.402cm" svg:y="2.924cm">
          <draw:text-box>
            <text:p text:style-name="P1"><text:span text:style-name="T25">block_map:</text:span></text:p>
          </draw:text-box>
        </draw:frame>
        <draw:frame draw:style-name="gr197" draw:text-style-name="P66" draw:layer="layout" svg:width="18.237cm" svg:height="1.071cm" svg:x="1.534cm" svg:y="3.721cm">
          <draw:text-box>
            <text:p text:style-name="P65"><text:span text:style-name="T52">Funzione che ad ogni chiamata avanza la stringa associata, prende un carattere di input e lo somma col carattere corrente della stringa, e ritorna il risultato.</text:span></text:p>
          </draw:text-box>
        </draw:frame>
        <draw:g draw:style-name="gr48" xml:id="id50" draw:id="id50">
          <draw:path draw:style-name="gr203" draw:text-style-name="P34" draw:layer="layout" svg:width="0.5cm" svg:height="0.5cm" svg:x="1.552cm" svg:y="5.754cm" svg:viewBox="0 0 501 501" svg:d="M501 251c0 43-12 87-34 125s-53 69-91 91-82 34-125 34c-44 0-88-12-126-34s-69-53-91-91-34-82-34-125c0-44 12-88 34-126s53-69 91-91 82-34 126-34c43 0 87 12 125 34s69 53 91 91 34 82 34 126z">
            <text:p/>
          </draw:path>
          <draw:custom-shape draw:style-name="gr204" draw:text-style-name="P35" draw:layer="layout" svg:width="0.25cm" svg:height="0.25cm" svg:x="1.677cm" svg:y="5.879cm">
            <text:p/>
            <draw:enhanced-geometry svg:viewBox="0 0 21600 21600" draw:type="rectangle" draw:enhanced-path="M 0 0 L 21600 0 21600 21600 0 21600 0 0 Z N"/>
          </draw:custom-shape>
        </draw:g>
        <draw:connector draw:style-name="gr205" draw:text-style-name="P36" draw:layer="layout" svg:x1="3.17cm" svg:y1="5.992cm" svg:x2="2.053cm" svg:y2="6.004cm" draw:start-shape="id49" draw:start-glue-point="3" draw:end-shape="id50" draw:end-glue-point="1" svg:d="M3170 5992h-565v12h-552" svg:viewBox="0 0 1118 13">
          <text:p/>
        </draw:connector>
        <draw:custom-shape draw:style-name="gr206" draw:text-style-name="P38" xml:id="id56" draw:id="id56" draw:layer="layout" svg:width="1.841cm" svg:height="0.631cm" svg:x="4.058cm" svg:y="9.17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07" draw:text-style-name="P57" xml:id="id49" draw:id="id49" draw:layer="layout" svg:width="3.631cm" svg:height="1.611cm" svg:x="3.17cm" svg:y="5.186cm" svg:viewBox="0 0 3632 1612" draw:points="0,0 2269,0 2724,0 3631,0 3631,805 3632,807 3631,807 3631,1611 2724,1611 2724,1612 0,1612 908,807">
          <text:p text:style-name="P51"><text:span text:style-name="T28">In: char c,</text:span></text:p>
          <text:p text:style-name="P51"><text:span text:style-name="T28"><text:s/>int *i,</text:span></text:p>
          <text:p text:style-name="P51"><text:span text:style-name="T28"><text:s/>char [] block_str,</text:span></text:p>
          <text:p text:style-name="P51"><text:span text:style-name="T28">bool: encrypt</text:span></text:p>
        </draw:polygon>
        <draw:custom-shape draw:style-name="gr208" draw:text-style-name="P54" xml:id="id51" draw:id="id51" draw:layer="layout" svg:width="1.941cm" svg:height="1.27cm" svg:x="15.417cm" svg:y="7.966cm">
          <text:p text:style-name="P53"><text:span text:style-name="T28">out: c</text:span></text:p>
          <draw:enhanced-geometry svg:viewBox="0 0 21600 21600" draw:text-areas="0 0 21600 21600" draw:type="pentagon-right" draw:modifiers="11878.887744593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09" draw:text-style-name="P43" xml:id="id54" draw:id="id54" draw:layer="layout" svg:width="1cm" svg:height="1cm" svg:x="4.475cm" svg:y="7.546cm">
          <text:p/>
          <draw:enhanced-geometry svg:viewBox="0 0 21600 21600" draw:glue-points="10800 0 0 10800 10800 21600 21600 10800" draw:text-areas="5400 5400 16200 16200" draw:type="diamond" draw:enhanced-path="M 10800 0 L 21600 10800 10800 21600 0 10800 10800 0 Z N"/>
        </draw:custom-shape>
        <draw:connector draw:style-name="gr210" draw:text-style-name="P36" draw:layer="layout" svg:x1="15.417cm" svg:y1="8.601cm" svg:x2="14.42cm" svg:y2="8.567cm" draw:start-shape="id51" draw:start-glue-point="3" draw:end-shape="id52" draw:end-glue-point="7" svg:d="M15417 8601h-493v-34h-504" svg:viewBox="0 0 998 35">
          <text:p/>
        </draw:connector>
        <draw:connector draw:style-name="gr211" draw:text-style-name="P36" draw:layer="layout" svg:x1="6.769cm" svg:y1="8.063cm" svg:x2="5.475cm" svg:y2="8.046cm" draw:start-shape="id53" draw:end-shape="id54" draw:end-glue-point="7" svg:d="M6769 8063h-646v-17h-648" svg:viewBox="0 0 1295 18">
          <text:p/>
        </draw:connector>
        <draw:connector draw:style-name="gr212" draw:text-style-name="P36" draw:layer="layout" svg:x1="18.763cm" svg:y1="8.598cm" svg:x2="17.358cm" svg:y2="8.601cm" draw:start-shape="id55" draw:start-glue-point="3" draw:end-shape="id51" svg:d="M18763 8598h-702v3h-703" svg:viewBox="0 0 1406 4">
          <text:p/>
        </draw:connector>
        <draw:custom-shape draw:style-name="gr213" draw:text-style-name="P43" xml:id="id53" draw:id="id53" draw:layer="layout" svg:width="1cm" svg:height="1cm" svg:x="6.769cm" svg:y="7.563cm">
          <text:p/>
          <draw:enhanced-geometry svg:viewBox="0 0 21600 21600" draw:glue-points="10800 0 0 10800 10800 21600 21600 10800" draw:text-areas="5400 5400 16200 16200" draw:type="diamond" draw:enhanced-path="M 10800 0 L 21600 10800 10800 21600 0 10800 10800 0 Z N"/>
        </draw:custom-shape>
        <draw:g draw:style-name="gr78" xml:id="id55" draw:id="id55">
          <draw:path draw:style-name="gr214" draw:text-style-name="P46" draw:layer="layout" svg:width="0.5cm" svg:height="0.5cm" svg:x="18.763cm" svg:y="8.348cm" svg:viewBox="0 0 501 501" svg:d="M501 251c0 43-12 87-34 125s-53 69-91 91-82 34-125 34c-44 0-88-12-126-34s-69-53-91-91-34-82-34-125c0-44 12-88 34-126s53-69 91-91 82-34 126-34c43 0 87 12 125 34s69 53 91 91 34 82 34 126z">
            <text:p/>
          </draw:path>
          <draw:path draw:style-name="gr215" draw:text-style-name="P34" draw:layer="layout" svg:width="0.2cm" svg:height="0.2cm" svg:x="18.913cm" svg:y="8.498cm" svg:viewBox="0 0 201 201" svg:d="M201 101c0 17-5 34-13 50-9 15-22 28-37 37-16 8-33 13-50 13-18 0-35-5-51-13-15-9-28-22-37-37-8-16-13-33-13-50 0-18 5-35 13-51 9-15 22-28 37-37 16-8 33-13 51-13 17 0 34 5 50 13 15 9 28 22 37 37 8 16 13 33 13 51z">
            <text:p/>
          </draw:path>
        </draw:g>
        <draw:connector draw:style-name="gr216" draw:text-style-name="P36" draw:layer="layout" svg:x1="4.978cm" svg:y1="9.176cm" svg:x2="4.975cm" svg:y2="8.546cm" draw:start-shape="id56" draw:start-glue-point="0" draw:end-shape="id54" draw:end-glue-point="6" svg:d="M4978 9176v-309h-3v-321" svg:viewBox="0 0 4 631">
          <text:p/>
        </draw:connector>
        <draw:connector draw:style-name="gr217" draw:text-style-name="P36" draw:layer="layout" svg:x1="11.365cm" svg:y1="6.348cm" svg:x2="10.399cm" svg:y2="6.299cm" draw:start-shape="id57" draw:start-glue-point="5" draw:end-shape="id58" draw:end-glue-point="1" svg:d="M11365 6348h-488v-49h-478" svg:viewBox="0 0 967 50">
          <text:p/>
        </draw:connector>
        <draw:frame draw:style-name="gr218" draw:text-style-name="P40" draw:layer="layout" svg:width="1.245cm" svg:height="0.601cm" svg:x="5.656cm" svg:y="7.445cm">
          <draw:text-box>
            <text:p text:style-name="P26"><text:span text:style-name="T28">[falso]</text:span></text:p>
          </draw:text-box>
        </draw:frame>
        <draw:frame draw:style-name="gr219" draw:text-style-name="P40" draw:layer="layout" svg:width="1.197cm" svg:height="0.601cm" svg:x="3.886cm" svg:y="8.375cm">
          <draw:text-box>
            <text:p text:style-name="P26"><text:span text:style-name="T28">[vero]</text:span></text:p>
          </draw:text-box>
        </draw:frame>
        <draw:connector draw:style-name="gr220" draw:text-style-name="P36" draw:layer="layout" svg:x1="4.975cm" svg:y1="7.546cm" svg:x2="4.986cm" svg:y2="6.798cm" draw:start-shape="id54" draw:start-glue-point="4" draw:end-shape="id49" draw:end-glue-point="2" svg:d="M4975 7546v-379h11v-369" svg:viewBox="0 0 12 749">
          <text:p/>
        </draw:connector>
        <draw:connector draw:style-name="gr221" draw:text-style-name="P36" draw:layer="layout" svg:x1="8.806cm" svg:y1="6.702cm" svg:x2="7.769cm" svg:y2="8.063cm" draw:start-shape="id58" draw:start-glue-point="2" draw:end-shape="id53" draw:end-glue-point="7" svg:d="M8806 6702v1361h-1037" svg:viewBox="0 0 1038 1362">
          <text:p/>
        </draw:connector>
        <draw:custom-shape draw:style-name="gr222" draw:text-style-name="P43" xml:id="id57" draw:id="id57" draw:layer="layout" svg:width="1cm" svg:height="1cm" svg:x="11.365cm" svg:y="5.8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223" draw:text-style-name="P36" draw:layer="layout" svg:x1="7.269cm" svg:y1="8.563cm" svg:x2="5.899cm" svg:y2="9.491cm" draw:start-shape="id53" draw:start-glue-point="6" draw:end-shape="id56" draw:end-glue-point="1" svg:d="M7269 8563v928h-1370" svg:viewBox="0 0 1371 929">
          <text:p/>
        </draw:connector>
        <draw:frame draw:style-name="gr224" draw:text-style-name="P40" draw:layer="layout" svg:width="1.245cm" svg:height="0.601cm" svg:x="10.789cm" svg:y="6.702cm">
          <draw:text-box>
            <text:p text:style-name="P26"><text:span text:style-name="T28">[falso]</text:span></text:p>
          </draw:text-box>
        </draw:frame>
        <draw:frame draw:style-name="gr225" draw:text-style-name="P40" draw:layer="layout" svg:width="3.102cm" svg:height="0.601cm" svg:x="1.433cm" svg:y="7.211cm">
          <draw:text-box>
            <text:p text:style-name="P26"><text:span text:style-name="T28">[block_str[*i] == '\0'?]</text:span></text:p>
          </draw:text-box>
        </draw:frame>
        <draw:custom-shape draw:style-name="gr226" draw:text-style-name="P38" xml:id="id59" draw:id="id59" draw:layer="layout" svg:width="4.623cm" svg:height="0.733cm" svg:x="15.121cm" svg:y="5.953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block_char) % 96 + 3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7" draw:text-style-name="P40" draw:layer="layout" svg:width="1.732cm" svg:height="0.601cm" svg:x="10.435cm" svg:y="5.247cm">
          <draw:text-box>
            <text:p text:style-name="P26"><text:span text:style-name="T28">[encrypt?]</text:span></text:p>
          </draw:text-box>
        </draw:frame>
        <draw:frame draw:style-name="gr228" draw:text-style-name="P40" draw:layer="layout" svg:width="1.197cm" svg:height="0.601cm" svg:x="12.727cm" svg:y="5.652cm">
          <draw:text-box>
            <text:p text:style-name="P26"><text:span text:style-name="T28">[vero]</text:span></text:p>
          </draw:text-box>
        </draw:frame>
        <draw:custom-shape draw:style-name="gr229" draw:text-style-name="P43" xml:id="id52" draw:id="id52" draw:layer="layout" svg:width="1cm" svg:height="1cm" svg:x="13.42cm" svg:y="8.067cm">
          <text:p/>
          <draw:enhanced-geometry svg:viewBox="0 0 21600 21600" draw:glue-points="10800 0 0 10800 10800 21600 21600 10800" draw:text-areas="5400 5400 16200 16200" draw:type="diamond" draw:enhanced-path="M 10800 0 L 21600 10800 10800 21600 0 10800 10800 0 Z N"/>
        </draw:custom-shape>
        <draw:connector draw:style-name="gr230" draw:text-style-name="P36" draw:layer="layout" svg:x1="15.121cm" svg:y1="6.319cm" svg:x2="12.365cm" svg:y2="6.348cm" draw:start-shape="id59" draw:start-glue-point="3" draw:end-shape="id57" draw:end-glue-point="7" svg:d="M15121 6319h-1372v29h-1384" svg:viewBox="0 0 2757 30">
          <text:p/>
        </draw:connector>
        <draw:connector draw:style-name="gr231" draw:text-style-name="P36" draw:layer="layout" svg:x1="13.92cm" svg:y1="8.067cm" svg:x2="17.432cm" svg:y2="6.686cm" draw:start-shape="id52" draw:start-glue-point="4" draw:end-shape="id59" draw:end-glue-point="2" svg:d="M13920 8067v-696h3512v-685" svg:viewBox="0 0 3513 1382">
          <text:p/>
        </draw:connector>
        <draw:custom-shape draw:style-name="gr232" draw:text-style-name="P43" xml:id="id61" draw:id="id61" draw:layer="layout" svg:width="1cm" svg:height="1cm" svg:x="10.318cm" svg:y="9.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3" draw:text-style-name="P43" xml:id="id62" draw:id="id62" draw:layer="layout" svg:width="1cm" svg:height="1cm" svg:x="13.409cm" svg:y="9.8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4" draw:text-style-name="P38" xml:id="id60" draw:id="id60" draw:layer="layout" svg:width="3.491cm" svg:height="0.733cm" svg:x="9.076cm" svg:y="8.164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block_char – 3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5" draw:text-style-name="P38" xml:id="id58" draw:id="id58" draw:layer="layout" svg:width="3.186cm" svg:height="0.806cm" svg:x="7.213cm" svg:y="5.896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block_char = str[*i];</text:span></text:p>
          <text:p text:style-name="P37"><text:span text:style-name="T28">*i = *i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36" draw:text-style-name="P36" draw:layer="layout" svg:x1="10.821cm" svg:y1="8.164cm" svg:x2="11.865cm" svg:y2="6.848cm" draw:start-shape="id60" draw:end-shape="id57" draw:end-glue-point="6" svg:d="M10821 8164v-652h1044v-664" svg:viewBox="0 0 1045 1317">
          <text:p/>
        </draw:connector>
        <draw:connector draw:style-name="gr237" draw:text-style-name="P36" draw:layer="layout" svg:x1="10.818cm" svg:y1="9.86cm" svg:x2="10.821cm" svg:y2="8.897cm" draw:start-shape="id61" draw:start-glue-point="4" draw:end-shape="id60" draw:end-glue-point="2" svg:d="M10818 9860v-487h3v-476" svg:viewBox="0 0 4 964">
          <text:p/>
        </draw:connector>
        <draw:custom-shape draw:style-name="gr238" draw:text-style-name="P38" xml:id="id63" draw:id="id63" draw:layer="layout" svg:width="3.37cm" svg:height="0.733cm" svg:x="9.15cm" svg:y="11.502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c = c + 96;</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9" draw:text-style-name="P40" draw:layer="layout" svg:width="1.583cm" svg:height="0.601cm" svg:x="8.482cm" svg:y="9.735cm">
          <draw:text-box>
            <text:p text:style-name="P26"><text:span text:style-name="T28">[c &lt; 32?]</text:span></text:p>
          </draw:text-box>
        </draw:frame>
        <draw:connector draw:style-name="gr240" draw:text-style-name="P36" draw:layer="layout" svg:x1="13.92cm" svg:y1="9.067cm" svg:x2="13.909cm" svg:y2="9.856cm" draw:start-shape="id52" draw:start-glue-point="6" draw:end-shape="id62" draw:end-glue-point="4" svg:d="M13920 9067v395h-11v394" svg:viewBox="0 0 12 790">
          <text:p/>
        </draw:connector>
        <draw:connector draw:style-name="gr241" draw:text-style-name="P36" draw:layer="layout" svg:x1="13.409cm" svg:y1="10.356cm" svg:x2="11.318cm" svg:y2="10.36cm" draw:start-shape="id62" draw:start-glue-point="5" draw:end-shape="id61" draw:end-glue-point="7" svg:d="M13409 10356h-1045v4h-1046" svg:viewBox="0 0 2092 5">
          <text:p/>
        </draw:connector>
        <draw:connector draw:style-name="gr242" draw:text-style-name="P36" draw:layer="layout" svg:x1="10.318cm" svg:y1="10.36cm" svg:x2="9.15cm" svg:y2="11.868cm" draw:start-shape="id61" draw:start-glue-point="5" draw:end-shape="id63" draw:end-glue-point="3" svg:d="M10318 10360h-1695v1508h527" svg:viewBox="0 0 1696 1509">
          <text:p/>
        </draw:connector>
        <draw:connector draw:style-name="gr243" draw:text-style-name="P36" draw:layer="layout" svg:x1="10.835cm" svg:y1="11.502cm" svg:x2="10.818cm" svg:y2="10.86cm" draw:start-shape="id63" draw:start-glue-point="0" draw:end-shape="id61" draw:end-glue-point="6" svg:d="M10835 11502v-315h-17v-327" svg:viewBox="0 0 18 643">
          <text:p/>
        </draw:connector>
        <draw:frame draw:style-name="gr244" draw:text-style-name="P40" draw:layer="layout" svg:width="1.197cm" svg:height="0.601cm" svg:x="9.638cm" svg:y="10.86cm">
          <draw:text-box>
            <text:p text:style-name="P26"><text:span text:style-name="T28">[vero]</text:span></text:p>
          </draw:text-box>
        </draw:frame>
        <draw:frame draw:style-name="gr245" draw:text-style-name="P40" draw:layer="layout" svg:width="1.245cm" svg:height="0.601cm" svg:x="11.318cm" svg:y="9.755cm">
          <draw:text-box>
            <text:p text:style-name="P26"><text:span text:style-name="T28">[falso]</text:span></text:p>
          </draw:text-box>
        </draw:frame>
        <draw:frame draw:style-name="gr15" draw:text-style-name="P15" draw:layer="layout" svg:width="0.943cm" svg:height="0.642cm" svg:x="1.477cm" svg:y="28.055cm">
          <draw:text-box>
            <text:p text:style-name="P1"><text:span text:style-name="T16">7</text:span></text:p>
          </draw:text-box>
        </draw:frame>
        <draw:frame draw:style-name="gr44" draw:text-style-name="P8" draw:layer="layout" svg:width="5.771cm" svg:height="0.543cm" svg:x="1.402cm" svg:y="2.027cm">
          <draw:text-box>
            <text:p text:style-name="P1"><text:span text:style-name="T7">Procedure notevoli: </text:span></text:p>
          </draw:text-box>
        </draw:frame>
        <draw:frame draw:name="occurrence_encrypt" draw:style-name="gr45" draw:text-style-name="P31" draw:layer="layout" svg:width="8.415cm" svg:height="0.543cm" svg:x="1.403cm" svg:y="12.325cm">
          <draw:text-box>
            <text:p text:style-name="P1"><text:span text:style-name="T25">occurrence_encrypt:</text:span></text:p>
          </draw:text-box>
        </draw:frame>
        <draw:frame draw:style-name="gr246" draw:text-style-name="P66" draw:layer="layout" svg:width="18.237cm" svg:height="4.867cm" svg:x="1.535cm" svg:y="13.122cm">
          <draw:text-box>
            <text:p text:style-name="P69"><text:span text:style-name="T53">Probabilmente la procedura pi</text:span><text:span text:style-name="T54">ù complessa del progetto, insieme alla procedura associata di decifrazione. La procedura </text:span><text:span text:style-name="T55">è divisa in tre passaggi: </text:span><text:span text:style-name="T56"><text:a xlink:href="#get_occurrence_map" xlink:type="simple">get_occurrence_map</text:a></text:span><text:span text:style-name="T57"><text:s/>in cui si itera sulla stringa in input per ricavarne una </text:span><text:span text:style-name="T58"><text:a xlink:href="#occurrence_map" xlink:type="simple">occurrence_map</text:a></text:span><text:span text:style-name="T57">, </text:span><text:span text:style-name="T56"><text:a xlink:href="#occurrence_dest_size" xlink:type="simple">occurrence_dest_size</text:a></text:span><text:span text:style-name="T56"><text:s/></text:span><text:span text:style-name="T57">in cui si sfrutta la mappa ottenuta per calcolare la lunghezza della stringa finale, e infine </text:span><text:span text:style-name="T57"><text:line-break/></text:span><text:span text:style-name="T56"><text:a xlink:href="#occurrence_construct_cypher_text" xlink:type="simple">occurrence_construct_cypher_text</text:a></text:span><text:span text:style-name="T57"> che sfrutta le informazioni ottenute precedentemente per allocare e costruire la stringa finale.</text:span></text:p>
            <text:p text:style-name="P69"><text:span text:style-name="T57">La mappa </text:span><text:span text:style-name="T55">è composta, un array di puntatory salvato sulla stack, e di </text:span><text:span text:style-name="T59">src_len</text:span><text:span text:style-name="T55"> nodi di lista concatenata sullo heap, divisi in tante liste diverse quanti sono i caratteri diversi in src.</text:span><text:span text:style-name="T60"><text:line-break/></text:span><text:span text:style-name="T60"/></text:p>
          </draw:text-box>
        </draw:frame>
        <draw:g draw:style-name="gr48" xml:id="id65" draw:id="id65">
          <draw:path draw:style-name="gr247" draw:text-style-name="P34" draw:layer="layout" svg:width="0.5cm" svg:height="0.5cm" svg:x="1.561cm" svg:y="18.875cm" svg:viewBox="0 0 501 501" svg:d="M501 251c0 43-12 87-34 125s-53 69-91 91-82 34-125 34c-44 0-88-12-126-34s-69-53-91-91-34-82-34-125c0-44 12-88 34-126s53-69 91-91 82-34 126-34c43 0 87 12 125 34s69 53 91 91 34 82 34 126z">
            <text:p/>
          </draw:path>
          <draw:custom-shape draw:style-name="gr248" draw:text-style-name="P35" draw:layer="layout" svg:width="0.25cm" svg:height="0.25cm" svg:x="1.686cm" svg:y="19cm">
            <text:p/>
            <draw:enhanced-geometry svg:viewBox="0 0 21600 21600" draw:type="rectangle" draw:enhanced-path="M 0 0 L 21600 0 21600 21600 0 21600 0 0 Z N"/>
          </draw:custom-shape>
        </draw:g>
        <draw:connector draw:style-name="gr249" draw:text-style-name="P36" draw:layer="layout" svg:x1="2.626cm" svg:y1="19.147cm" svg:x2="2.062cm" svg:y2="19.125cm" draw:start-shape="id64" draw:start-glue-point="3" draw:end-shape="id65" draw:end-glue-point="1" svg:d="M2626 19147h-288v-22h-276" svg:viewBox="0 0 565 23">
          <text:p/>
        </draw:connector>
        <draw:custom-shape draw:style-name="gr250" draw:text-style-name="P38" xml:id="id66" draw:id="id66" draw:layer="layout" svg:width="4.2cm" svg:height="1.5cm" svg:x="5.325cm" svg:y="20.107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61"><text:a xlink:href="#occurrence_map" xlink:type="simple">occurrence_map</text:a></text:span><text:span text:style-name="T28"><text:s/>= </text:span><text:span text:style-name="T28"><text:line-break/></text:span><text:span text:style-name="T29"><text:a xlink:href="#get_occurrence_map" xlink:type="simple">get_occurrence_map</text:a></text:span><text:span text:style-name="T28">(sr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38" xml:id="id67" draw:id="id67" draw:layer="layout" svg:width="5.189cm" svg:height="1.5cm" svg:x="8.015cm" svg:y="18.199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37"><text:span text:style-name="T28">dest_len = <text:s/></text:span><text:span text:style-name="T29"><text:a xlink:href="#occurrence_dest_size" xlink:type="simple">occurrence_dest_size
</text:a></text:span></text:p>
          <text:p text:style-name="P37"><text:span text:style-name="T28">(</text:span><text:span text:style-name="T61"><text:a xlink:href="#occurrence_map" xlink:type="simple">occurrence_map</text:a></text:span><text:span text:style-name="T28">, src_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71" xml:id="id68" draw:id="id68" draw:layer="layout" svg:width="6.346cm" svg:height="1.697cm" svg:x="11.63cm" svg:y="20.068cm">
          <draw:glue-point draw:id="4" svg:x="1.666cm" svg:y="-5cm"/>
          <draw:glue-point draw:id="5" svg:x="-1.666cm" svg:y="-5cm"/>
          <draw:glue-point draw:id="6" svg:x="-3.333cm" svg:y="5cm"/>
          <draw:glue-point draw:id="7" svg:x="3.333cm" svg:y="5cm"/>
          <draw:glue-point draw:id="8" svg:x="1.666cm" svg:y="5cm"/>
          <draw:glue-point draw:id="9" svg:x="-1.666cm" svg:y="5cm"/>
          <draw:glue-point draw:id="10" svg:x="-3.333cm" svg:y="-5cm"/>
          <draw:glue-point draw:id="11" svg:x="3.333cm" svg:y="-5cm"/>
          <draw:glue-point draw:id="12" svg:x="-5cm" svg:y="-3.333cm"/>
          <draw:glue-point draw:id="13" svg:x="-5cm" svg:y="3.333cm"/>
          <draw:glue-point draw:id="14" svg:x="5cm" svg:y="3.333cm"/>
          <draw:glue-point draw:id="15" svg:x="5cm" svg:y="-3.333cm"/>
          <text:p text:style-name="P70"><text:span text:style-name="T28">dest = <text:s/></text:span><text:span text:style-name="T62"><text:a xlink:href="#occurrence_construct_cypher_text" xlink:type="simple">occurrence_construct_cypher_text
</text:a></text:span><text:span text:style-name="T28">(</text:span><text:span text:style-name="T61"><text:a xlink:href="#occurrence_map" xlink:type="simple">occurrence_map</text:a></text:span><text:span text:style-name="T28">, dest_len);</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54" xml:id="id69" draw:id="id69" draw:layer="layout" svg:width="2.458cm" svg:height="1.336cm" svg:x="15.639cm" svg:y="18.199cm">
          <text:p text:style-name="P53"><text:span text:style-name="T28">Out: dest, dest_len</text:span></text:p>
          <draw:enhanced-geometry svg:viewBox="0 0 21600 21600" draw:mirror-horizontal="false" draw:mirror-vertical="false" draw:text-areas="0 0 21600 21600" draw:type="pentagon-right" draw:modifiers="13913.9487596584" draw:enhanced-path="M 0 0 L ?f0 0 21600 10800 ?f0 21600 0 21600 Z N">
            <draw:equation draw:name="f0" draw:formula="$0 "/>
            <draw:handle draw:handle-range-x-minimum="0" draw:handle-range-x-maximum="21600" draw:handle-position="$0 top" draw:handle-position-x="$0" draw:handle-position-y="top"/>
          </draw:enhanced-geometry>
        </draw:custom-shape>
        <draw:polygon draw:style-name="gr254" draw:text-style-name="P52" xml:id="id64" draw:id="id64" draw:layer="layout" svg:width="2.934cm" svg:height="1.034cm" svg:x="2.626cm" svg:y="18.63cm" svg:viewBox="0 0 2935 1035" draw:points="0,0 1834,0 2201,0 2934,0 2934,517 2935,518 2934,518 2934,1034 2201,1034 2201,1035 0,1035 734,518">
          <text:p text:style-name="P63"><text:span text:style-name="T28">In: char [] src,</text:span><text:span text:style-name="T28"><text:line-break/></text:span><text:span text:style-name="T28">src_len</text:span></text:p>
        </draw:polygon>
        <draw:connector draw:style-name="gr255" draw:text-style-name="P36" draw:layer="layout" svg:x1="5.325cm" svg:y1="20.857cm" svg:x2="4.093cm" svg:y2="19.665cm" draw:start-shape="id66" draw:start-glue-point="3" draw:end-shape="id64" draw:end-glue-point="2" svg:d="M5325 20857h-1232v-1192" svg:viewBox="0 0 1233 1193">
          <text:p/>
        </draw:connector>
        <draw:connector draw:style-name="gr256" draw:text-style-name="P36" draw:layer="layout" svg:x1="8.015cm" svg:y1="18.949cm" svg:x2="7.425cm" svg:y2="20.107cm" draw:start-shape="id67" draw:end-shape="id66" draw:end-glue-point="0" svg:d="M8015 18949h-590v1158" svg:viewBox="0 0 591 1159">
          <text:p/>
        </draw:connector>
        <draw:connector draw:style-name="gr257" draw:text-style-name="P36" draw:layer="layout" svg:x1="11.63cm" svg:y1="20.916cm" svg:x2="10.609cm" svg:y2="19.699cm" draw:start-shape="id68" draw:start-glue-point="3" draw:end-shape="id67" draw:end-glue-point="2" svg:d="M11630 20916h-1021v-1217" svg:viewBox="0 0 1022 1218">
          <text:p/>
        </draw:connector>
        <draw:connector draw:style-name="gr258" draw:text-style-name="P36" draw:layer="layout" svg:x1="15.639cm" svg:y1="18.867cm" svg:x2="14.803cm" svg:y2="20.068cm" draw:start-shape="id69" draw:end-shape="id68" draw:end-glue-point="0" svg:d="M15639 18867h-836v1201" svg:viewBox="0 0 837 1202">
          <text:p/>
        </draw:connector>
        <draw:g draw:style-name="gr78" xml:id="id70" draw:id="id70">
          <draw:path draw:style-name="gr259" draw:text-style-name="P46" draw:layer="layout" svg:width="0.5cm" svg:height="0.5cm" svg:x="18.865cm" svg:y="18.607cm" svg:viewBox="0 0 501 501" svg:d="M501 251c0 43-12 87-34 125s-53 69-91 91-82 34-125 34c-44 0-88-12-126-34s-69-53-91-91-34-82-34-125c0-44 12-88 34-126s53-69 91-91 82-34 126-34c43 0 87 12 125 34s69 53 91 91 34 82 34 126z">
            <text:p/>
          </draw:path>
          <draw:path draw:style-name="gr260" draw:text-style-name="P34" draw:layer="layout" svg:width="0.2cm" svg:height="0.2cm" svg:x="19.015cm" svg:y="18.757cm" svg:viewBox="0 0 201 201" svg:d="M201 101c0 17-5 34-13 50-9 15-22 28-37 37-16 8-33 13-50 13-18 0-35-5-51-13-15-9-28-22-37-37-8-16-13-33-13-50 0-18 5-35 13-51 9-15 22-28 37-37 16-8 33-13 51-13 17 0 34 5 50 13 15 9 28 22 37 37 8 16 13 33 13 51z">
            <text:p/>
          </draw:path>
        </draw:g>
        <draw:connector draw:style-name="gr261" draw:text-style-name="P36" draw:layer="layout" svg:x1="18.865cm" svg:y1="18.857cm" svg:x2="18.097cm" svg:y2="18.867cm" draw:start-shape="id70" draw:start-glue-point="3" draw:end-shape="id69" draw:end-glue-point="1" svg:d="M18865 18857h-383v10h-385" svg:viewBox="0 0 769 11">
          <text:p/>
        </draw:connector>
        <draw:frame draw:name="occurrence_encrypt 1" draw:style-name="gr262" draw:text-style-name="P31" draw:layer="layout" svg:width="10.763cm" svg:height="0.543cm" svg:x="1.404cm" svg:y="22.226cm">
          <draw:text-box>
            <text:p text:style-name="P1"><text:span text:style-name="T25">Gesttione di memoria in occurrence_encrypt:</text:span></text:p>
          </draw:text-box>
        </draw:frame>
        <draw:frame draw:style-name="gr263" draw:text-style-name="P66" draw:layer="layout" svg:width="18.237cm" svg:height="4.816cm" svg:x="1.536cm" svg:y="23.023cm">
          <draw:text-box>
            <text:p text:style-name="P72"><text:span text:style-name="T63">Dato che la procedura produce una stringa dalla lungezza maggiore dalla stringa di partenza, ho ritenuto che sarebbe stato utile costruire un sistema per allocare memoria dinamicamente, infatti il programma </text:span><text:span text:style-name="T55">è supportato da una implementazione del pattern </text:span><text:span text:style-name="T64">malloc / free</text:span><text:span text:style-name="T55">, in cui si è possibile richiedere memoria dinamicamente dello heap con </text:span><text:span text:style-name="T56">malloc</text:span><text:span text:style-name="T55">, e restituirla con </text:span><text:span text:style-name="T56">free</text:span><text:span text:style-name="T55"> quando non pi</text:span><text:span text:style-name="T65">ù in uso; questo pattern verrà utilizzato quando la memoria richiesta non </text:span><text:span text:style-name="T55">è stimabile a compile time.</text:span><text:span text:style-name="T65"><text:line-break/></text:span><text:span text:style-name="T55">Tutte le procedure fanno uso di </text:span><text:span text:style-name="T56">malloc</text:span><text:span text:style-name="T55"> per allocare la memoria, in pi</text:span><text:span text:style-name="T65">ù nel</text:span><text:span text:style-name="T55"> caso di </text:span><text:span text:style-name="T56">occurrence_encrypt</text:span><text:span text:style-name="T57">, viene allocata con </text:span><text:span text:style-name="T56">malloc </text:span><text:span text:style-name="T57">una </text:span><text:span text:style-name="T66"><text:a xlink:href="#mem_arena" xlink:type="simple">mem_arena</text:a></text:span><text:span text:style-name="T67">, che permette di eseguire una richiesta di memoria iniziale, e spartire in maniera compatta diverse porzioni, associando gli oggetti che infine possono essere tutti liberati con una singola chiamata di </text:span><text:span text:style-name="T56">free</text:span><text:span text:style-name="T57">. Qui l’arena raccoglie </text:span><text:span text:style-name="T67">i </text:span><text:span text:style-name="T67"><text:tab/></text:span></text:p>
          </draw:text-box>
        </draw:frame>
        <draw:frame draw:style-name="gr264" draw:text-style-name="P73" draw:layer="layout" svg:width="18.237cm" svg:height="0.536cm" svg:x="0.637cm" svg:y="27.852cm">
          <draw:text-box>
            <text:p text:style-name="P72"><text:span text:style-name="T67"><text:tab/></text:span><text:span text:style-name="T68">src_len</text:span><text:span text:style-name="T69"> </text:span><text:span text:style-name="T69"><text:a xlink:href="#list_node" xlink:type="simple">list_node</text:a></text:span><text:span text:style-name="T66"><text:s/></text:span><text:span text:style-name="T67">puntati da </text:span><text:span text:style-name="T58"><text:a xlink:href="#occurrence_map" xlink:type="simple">occurrence_map</text:a></text:span><text:span text:style-name="T57">.</text:span></text:p>
          </draw:text-box>
        </draw:frame>
      </draw:page>
      <draw:page draw:name="page8" draw:style-name="dp1" draw:master-page-name="master-page79">
        <draw:frame draw:name="get_occurrence_map" draw:style-name="gr45" draw:text-style-name="P31" draw:layer="layout" svg:width="8.415cm" svg:height="0.543cm" svg:x="1.404cm" svg:y="2.826cm">
          <draw:text-box>
            <text:p text:style-name="P1"><text:span text:style-name="T25">get_occurrence_map:</text:span></text:p>
          </draw:text-box>
        </draw:frame>
        <draw:frame draw:style-name="gr15" draw:text-style-name="P15" draw:layer="layout" svg:width="0.943cm" svg:height="0.642cm" svg:x="1.478cm" svg:y="28.055cm">
          <draw:text-box>
            <text:p text:style-name="P1"><text:span text:style-name="T16">8</text:span></text:p>
          </draw:text-box>
        </draw:frame>
        <draw:frame draw:style-name="gr44" draw:text-style-name="P8" draw:layer="layout" svg:width="5.771cm" svg:height="0.543cm" svg:x="1.403cm" svg:y="2.028cm">
          <draw:text-box>
            <text:p text:style-name="P1"><text:span text:style-name="T7">Procedure notevoli: </text:span></text:p>
          </draw:text-box>
        </draw:frame>
        <draw:frame draw:style-name="gr265" draw:text-style-name="P66" draw:layer="layout" svg:width="18.237cm" svg:height="3.313cm" svg:x="1.536cm" svg:y="3.623cm">
          <draw:text-box>
            <text:p text:style-name="P69"><text:span text:style-name="T63">Questa procedura itera su una stringa, e crea un nodo di una lista concatenata per ogni carattere c, il </text:span><text:span text:style-name="T70"><text:a xlink:href="#list_node" xlink:type="simple">nodo</text:a></text:span><text:span text:style-name="T63"><text:s/>contiene l’indice numerico in cui il carattere si trova nella stringa, e l’indirizzo della memoria del prossimo nodo, 0 in caso sia l’ultimo.</text:span></text:p>
            <text:p text:style-name="P69"><text:span text:style-name="T63">Il nodo poi viene inserito nella lista puntata dall’array passato in input, nella posizione ‘c – 32’.</text:span></text:p>
            <text:p text:style-name="P69"><text:span text:style-name="T63">Inifine, quando si raggiunge il termine della stringa, viene restituito l’array popolato.</text:span><text:span text:style-name="T63"><text:line-break/></text:span><text:span text:style-name="T63">L’uso di questa struttura permette di mantenere una complessita lineare.</text:span></text:p>
          </draw:text-box>
        </draw:frame>
        <draw:g draw:style-name="gr48" xml:id="id72" draw:id="id72">
          <draw:path draw:style-name="gr266" draw:text-style-name="P34" draw:layer="layout" svg:width="0.5cm" svg:height="0.5cm" svg:x="2.299cm" svg:y="7.6cm" svg:viewBox="0 0 501 501" svg:d="M501 251c0 43-12 87-34 125s-53 69-91 91-82 34-125 34c-44 0-88-12-126-34s-69-53-91-91-34-82-34-125c0-44 12-88 34-126s53-69 91-91 82-34 126-34c43 0 87 12 125 34s69 53 91 91 34 82 34 126z">
            <text:p/>
          </draw:path>
          <draw:custom-shape draw:style-name="gr267" draw:text-style-name="P35" draw:layer="layout" svg:width="0.25cm" svg:height="0.25cm" svg:x="2.424cm" svg:y="7.725cm">
            <text:p/>
            <draw:enhanced-geometry svg:viewBox="0 0 21600 21600" draw:type="rectangle" draw:enhanced-path="M 0 0 L 21600 0 21600 21600 0 21600 0 0 Z N"/>
          </draw:custom-shape>
        </draw:g>
        <draw:connector draw:style-name="gr268" draw:text-style-name="P56" draw:layer="layout" svg:x1="4.219cm" svg:y1="7.836cm" svg:x2="2.8cm" svg:y2="7.85cm" draw:start-shape="id71" draw:start-glue-point="3" draw:end-shape="id72" draw:end-glue-point="1" svg:d="M4219 7836h-716v14h-703" svg:viewBox="0 0 1420 15">
          <text:p/>
        </draw:connector>
        <draw:polygon draw:style-name="gr269" draw:text-style-name="P57" xml:id="id71" draw:id="id71" draw:layer="layout" svg:width="3.791cm" svg:height="1.422cm" svg:x="4.219cm" svg:y="7.125cm" svg:viewBox="0 0 3792 1423" draw:points="0,0 2369,0 2844,0 3791,0 3791,711 3792,712 3791,712 3791,1422 2844,1422 2844,1423 0,1423 948,712">
          <text:p text:style-name="P51"><text:span text:style-name="T28">In: char [] src, </text:span></text:p>
          <text:p text:style-name="P51"><text:span text:style-name="T61"><text:a xlink:href="#list_node" xlink:type="simple">list_node</text:a></text:span><text:span text:style-name="T71"><text:s/></text:span><text:span text:style-name="T28">[96] </text:span><text:span text:style-name="T61"><text:a xlink:href="#occurrence_map" xlink:type="simple">map</text:a></text:span></text:p>
        </draw:polygon>
        <draw:custom-shape draw:style-name="gr270" draw:text-style-name="P38" xml:id="id73" draw:id="id73" draw:layer="layout" svg:width="3.451cm" svg:height="1.062cm" draw:transform="skewX (0.00663225115757845) translate (9.229cm 7.31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hiama bzero(map);**</text:span></text:p>
          <text:p text:style-name="P37"><text:span text:style-name="T28">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1" draw:text-style-name="P36" draw:layer="layout" svg:x1="9.222cm" svg:y1="7.845cm" svg:x2="8.011cm" svg:y2="7.836cm" draw:start-shape="id73" draw:start-glue-point="3" draw:end-shape="id71" draw:end-glue-point="1" svg:d="M9222 7845h-605v-9h-606" svg:viewBox="0 0 1212 10">
          <text:p/>
        </draw:connector>
        <draw:custom-shape draw:style-name="gr272" draw:text-style-name="P43" xml:id="id74" draw:id="id74" draw:layer="layout" svg:width="1cm" svg:height="1cm" svg:x="10.437cm" svg:y="9.826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273" draw:text-style-name="P41" draw:layer="layout" svg:width="16.581cm" svg:height="6.683cm" svg:x="2.428cm" svg:y="8.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74" draw:text-style-name="P42" draw:layer="layout" svg:width="4.058cm" svg:height="0.614cm" svg:x="2.428cm" svg:y="8.916cm">
            <text:p text:style-name="P37"><text:span text:style-name="T28">get_occurrence_map_loop</text:span></text:p>
            <draw:enhanced-geometry svg:viewBox="0 0 21600 21600" draw:type="non-primitve" draw:enhanced-path="M 0 0 L 21600 0 19000 21600 0 21600 0 0 Z N"/>
          </draw:custom-shape>
        </draw:g>
        <draw:connector draw:style-name="gr275" draw:text-style-name="P36" draw:layer="layout" svg:x1="10.937cm" svg:y1="9.826cm" svg:x2="10.947cm" svg:y2="8.376cm" draw:start-shape="id74" draw:start-glue-point="4" draw:end-shape="id73" draw:end-glue-point="2" svg:d="M10937 9826v-730h10v-720" svg:viewBox="0 0 11 1451">
          <text:p/>
        </draw:connector>
        <draw:custom-shape draw:style-name="gr276" draw:text-style-name="P43" xml:id="id77" draw:id="id77" draw:layer="layout" svg:width="1cm" svg:height="1cm" svg:x="10.437cm" svg:y="14.426cm">
          <text:p/>
          <draw:enhanced-geometry svg:viewBox="0 0 21600 21600" draw:glue-points="10800 0 0 10800 10800 21600 21600 10800" draw:text-areas="5400 5400 16200 16200" draw:type="diamond" draw:enhanced-path="M 10800 0 L 21600 10800 10800 21600 0 10800 10800 0 Z N"/>
        </draw:custom-shape>
        <draw:frame draw:style-name="gr277" draw:text-style-name="P40" draw:layer="layout" svg:width="1.245cm" svg:height="0.601cm" svg:x="11.215cm" svg:y="9.576cm">
          <draw:text-box>
            <text:p text:style-name="P26"><text:span text:style-name="T28">[falso]</text:span></text:p>
          </draw:text-box>
        </draw:frame>
        <draw:custom-shape draw:style-name="gr278" draw:text-style-name="P38" xml:id="id75" draw:id="id75" draw:layer="layout" svg:width="3.38cm" svg:height="0.9cm" draw:transform="skewX (0.00663225115757845) translate (3.019cm 9.89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pos = src[i] – 32;</text:span></text:p>
          <text:p text:style-name="P37"><text:span text:style-name="T28">nodo = nuovo nodo(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79" draw:text-style-name="P36" draw:layer="layout" svg:x1="6.399cm" svg:y1="10.348cm" svg:x2="10.437cm" svg:y2="10.326cm" draw:start-shape="id75" draw:start-glue-point="1" draw:end-shape="id74" draw:end-glue-point="5" svg:d="M6399 10348h2014v-22h2024" svg:viewBox="0 0 4039 23">
          <text:p/>
        </draw:connector>
        <draw:connector draw:style-name="gr280" draw:text-style-name="P36" draw:layer="layout" svg:x1="4.737cm" svg:y1="11.626cm" svg:x2="4.703cm" svg:y2="10.798cm" draw:start-shape="id76" draw:start-glue-point="4" draw:end-shape="id75" draw:end-glue-point="2" svg:d="M4737 11626v-419h-34v-409" svg:viewBox="0 0 35 829">
          <text:p/>
        </draw:connector>
        <draw:frame draw:style-name="gr281" draw:text-style-name="P40" draw:layer="layout" svg:width="2.558cm" svg:height="0.601cm" svg:x="8.657cm" svg:y="9.025cm">
          <draw:text-box>
            <text:p text:style-name="P26"><text:span text:style-name="T28">[src[i] != ‘\0’]</text:span></text:p>
          </draw:text-box>
        </draw:frame>
        <draw:frame draw:style-name="gr282" draw:text-style-name="P40" draw:layer="layout" svg:width="1.197cm" svg:height="0.668cm" svg:x="9.366cm" svg:y="10.146cm">
          <draw:text-box>
            <text:p text:style-name="P26"><text:span text:style-name="T28">[vero]</text:span></text:p>
          </draw:text-box>
        </draw:frame>
        <draw:connector draw:style-name="gr283" draw:text-style-name="P36" draw:layer="layout" draw:line-skew="6.853cm" svg:x1="11.437cm" svg:y1="14.926cm" svg:x2="11.437cm" svg:y2="10.326cm" draw:start-shape="id77" draw:start-glue-point="7" draw:end-shape="id74" draw:end-glue-point="7" svg:d="M11437 14926h7392v-4600h-7392" svg:viewBox="0 0 7393 4601">
          <text:p/>
        </draw:connector>
        <draw:connector draw:style-name="gr284" draw:text-style-name="P36" draw:layer="layout" svg:x1="10.929cm" svg:y1="15.975cm" svg:x2="10.937cm" svg:y2="15.426cm" draw:start-shape="id78" draw:start-glue-point="0" draw:end-shape="id77" draw:end-glue-point="6" svg:d="M10929 15975v-269h8v-280" svg:viewBox="0 0 9 550">
          <text:p/>
        </draw:connector>
        <draw:frame draw:style-name="gr285" draw:text-style-name="P40" draw:layer="layout" svg:width="1.715cm" svg:height="0.601cm" svg:x="11.484cm" svg:y="14.265cm">
          <draw:text-box>
            <text:p text:style-name="P26"><text:span text:style-name="T28">[end loop]</text:span></text:p>
          </draw:text-box>
        </draw:frame>
        <draw:custom-shape draw:style-name="gr286" draw:text-style-name="P38" xml:id="id78" draw:id="id78" draw:layer="layout" svg:width="2.757cm" svg:height="0.887cm" svg:x="9.551cm" svg:y="15.975cm">
          <text:p text:style-name="P37"><text:span text:style-name="T28">Out: </text:span><text:span text:style-name="T61"><text:a xlink:href="#occurrence_map" xlink:type="simple">map</text:a></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79" draw:id="id79">
          <draw:path draw:style-name="gr287" draw:text-style-name="P46" draw:layer="layout" svg:width="0.5cm" svg:height="0.5cm" svg:x="13.799cm" svg:y="16.147cm" svg:viewBox="0 0 501 501" svg:d="M501 251c0 43-12 87-34 125s-53 69-91 91-82 34-125 34c-44 0-88-12-126-34s-69-53-91-91-34-82-34-125c0-44 12-88 34-126s53-69 91-91 82-34 126-34c43 0 87 12 125 34s69 53 91 91 34 82 34 126z">
            <text:p/>
          </draw:path>
          <draw:path draw:style-name="gr288" draw:text-style-name="P34" draw:layer="layout" svg:width="0.2cm" svg:height="0.2cm" svg:x="13.949cm" svg:y="16.297cm" svg:viewBox="0 0 201 201" svg:d="M201 101c0 17-5 34-13 50-9 15-22 28-37 37-16 8-33 13-50 13-18 0-35-5-51-13-15-9-28-22-37-37-8-16-13-33-13-50 0-18 5-35 13-51 9-15 22-28 37-37 16-8 33-13 51-13 17 0 34 5 50 13 15 9 28 22 37 37 8 16 13 33 13 51z">
            <text:p/>
          </draw:path>
        </draw:g>
        <draw:connector draw:style-name="gr289" draw:text-style-name="P36" draw:layer="layout" svg:x1="13.799cm" svg:y1="16.397cm" svg:x2="12.308cm" svg:y2="16.418cm" draw:start-shape="id79" draw:start-glue-point="3" draw:end-shape="id78" draw:end-glue-point="1" svg:d="M13799 16397h-745v21h-746" svg:viewBox="0 0 1492 22">
          <text:p/>
        </draw:connector>
        <draw:custom-shape draw:style-name="gr290" draw:text-style-name="P43" xml:id="id76" draw:id="id76" draw:layer="layout" svg:width="1cm" svg:height="1cm" svg:x="4.237cm" svg:y="11.626cm">
          <text:p/>
          <draw:enhanced-geometry svg:viewBox="0 0 21600 21600" draw:glue-points="10800 0 0 10800 10800 21600 21600 10800" draw:text-areas="5400 5400 16200 16200" draw:type="diamond" draw:enhanced-path="M 10800 0 L 21600 10800 10800 21600 0 10800 10800 0 Z N"/>
        </draw:custom-shape>
        <draw:frame draw:style-name="gr291" draw:text-style-name="P40" draw:layer="layout" svg:width="2.598cm" svg:height="0.601cm" svg:x="2.305cm" svg:y="11.294cm">
          <draw:text-box>
            <text:p text:style-name="P26"><text:span text:style-name="T28">[map[pos] == 0?]</text:span></text:p>
          </draw:text-box>
        </draw:frame>
        <draw:custom-shape draw:style-name="gr292" draw:text-style-name="P38" xml:id="id80" draw:id="id80" draw:layer="layout" svg:width="1.376cm" svg:height="0.764cm" draw:transform="skewX (0.00645771823237902) translate (17.216cm 10.43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3" draw:text-style-name="P36" draw:layer="layout" draw:line-skew="-0.539cm" svg:x1="10.937cm" svg:y1="10.826cm" svg:x2="17.211cm" svg:y2="10.821cm" draw:start-shape="id74" draw:start-glue-point="6" draw:end-shape="id80" draw:end-glue-point="3" svg:d="M10937 10826h3393v-5h2881" svg:viewBox="0 0 6275 6">
          <text:p/>
        </draw:connector>
        <draw:custom-shape draw:style-name="gr294" draw:text-style-name="P38" xml:id="id82" draw:id="id82" draw:layer="layout" svg:width="2.783cm" svg:height="0.764cm" draw:transform="skewX (0.00645771823237902) translate (5.942cm 13.53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map[pos] = 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5" draw:text-style-name="P43" xml:id="id81" draw:id="id81" draw:layer="layout" svg:width="1cm" svg:height="1cm" svg:x="15.207cm" svg:y="13.404cm">
          <text:p/>
          <draw:enhanced-geometry svg:viewBox="0 0 21600 21600" draw:glue-points="10800 0 0 10800 10800 21600 21600 10800" draw:text-areas="5400 5400 16200 16200" draw:type="diamond" draw:enhanced-path="M 10800 0 L 21600 10800 10800 21600 0 10800 10800 0 Z N"/>
        </draw:custom-shape>
        <draw:connector draw:style-name="gr296" draw:text-style-name="P36" draw:layer="layout" svg:x1="17.899cm" svg:y1="11.203cm" svg:x2="16.207cm" svg:y2="13.904cm" draw:start-shape="id80" draw:start-glue-point="2" draw:end-shape="id81" draw:end-glue-point="7" svg:d="M17899 11203v2701h-1692" svg:viewBox="0 0 1693 2702">
          <text:p/>
        </draw:connector>
        <draw:connector draw:style-name="gr297" draw:text-style-name="P36" draw:layer="layout" svg:x1="15.207cm" svg:y1="13.904cm" svg:x2="8.725cm" svg:y2="13.921cm" draw:start-shape="id81" draw:start-glue-point="5" draw:end-shape="id82" draw:end-glue-point="1" svg:d="M15207 13904h-3246v17h-3236" svg:viewBox="0 0 6483 18">
          <text:p/>
        </draw:connector>
        <draw:custom-shape draw:style-name="gr298" draw:text-style-name="P38" xml:id="id83" draw:id="id83" draw:layer="layout" svg:width="4.58cm" svg:height="0.764cm" draw:transform="skewX (0.00645771823237902) translate (11.819cm 11.7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_prec.prossimo = 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299" draw:text-style-name="P36" draw:layer="layout" draw:line-skew="-0.134cm" svg:x1="15.707cm" svg:y1="13.404cm" svg:x2="14.104cm" svg:y2="12.522cm" draw:start-shape="id81" draw:start-glue-point="4" draw:end-shape="id83" draw:end-glue-point="2" svg:d="M15707 13404v-580h-1603v-302" svg:viewBox="0 0 1604 883">
          <text:p/>
        </draw:connector>
        <draw:connector draw:style-name="gr300" draw:text-style-name="P36" draw:layer="layout" svg:x1="5.937cm" svg:y1="13.921cm" svg:x2="4.737cm" svg:y2="12.626cm" draw:start-shape="id82" draw:start-glue-point="3" draw:end-shape="id76" draw:end-glue-point="6" svg:d="M5937 13921h-1200v-1295" svg:viewBox="0 0 1201 1296">
          <text:p/>
        </draw:connector>
        <draw:frame draw:style-name="gr301" draw:text-style-name="P40" draw:layer="layout" svg:width="1.197cm" svg:height="0.668cm" svg:x="4.567cm" svg:y="13.246cm">
          <draw:text-box>
            <text:p text:style-name="P26"><text:span text:style-name="T28">[vero]</text:span></text:p>
          </draw:text-box>
        </draw:frame>
        <draw:frame draw:style-name="gr302" draw:text-style-name="P40" draw:layer="layout" svg:width="1.245cm" svg:height="0.601cm" svg:x="5.116cm" svg:y="11.377cm">
          <draw:text-box>
            <text:p text:style-name="P26"><text:span text:style-name="T28">[falso]</text:span></text:p>
          </draw:text-box>
        </draw:frame>
        <draw:custom-shape draw:style-name="gr303" draw:text-style-name="P38" xml:id="id84" draw:id="id84" draw:layer="layout" svg:width="3.856cm" svg:height="0.906cm" draw:transform="skewX (0.00663225115757845) translate (6.474cm 11.6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_prec = map[pos].ultimo_nod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04" draw:text-style-name="P36" draw:layer="layout" svg:x1="6.468cm" svg:y1="12.111cm" svg:x2="5.237cm" svg:y2="12.126cm" draw:start-shape="id84" draw:start-glue-point="3" draw:end-shape="id76" draw:end-glue-point="7" svg:d="M6468 12111h-609v15h-622" svg:viewBox="0 0 1232 16">
          <text:p/>
        </draw:connector>
        <draw:connector draw:style-name="gr305" draw:text-style-name="P36" draw:layer="layout" svg:x1="11.814cm" svg:y1="12.14cm" svg:x2="10.33cm" svg:y2="12.111cm" draw:start-shape="id83" draw:start-glue-point="3" draw:end-shape="id84" draw:end-glue-point="1" svg:d="M11814 12140h-742v-29h-742" svg:viewBox="0 0 1485 30">
          <text:p/>
        </draw:connector>
        <draw:frame draw:style-name="gr306" draw:text-style-name="P47" draw:layer="layout" svg:width="17.084cm" svg:height="1.315cm" svg:x="2.475cm" svg:y="17.089cm">
          <draw:text-box>
            <text:p>*: list.utlimo_nodo() in realta si tratta di un semplice ciclo che itera fino alla fine della stringa <text:line-break/>**: bzero(generic *ptr, int size): azzera la zona di memoria da ptr a ptr + size</text:p>
          </draw:text-box>
        </draw:frame>
        <draw:frame draw:name="occurrence_dest_size" draw:style-name="gr45" draw:text-style-name="P31" draw:layer="layout" svg:width="8.415cm" svg:height="0.543cm" svg:x="1.405cm" svg:y="18.127cm">
          <draw:text-box>
            <text:p text:style-name="P1"><text:span text:style-name="T25">occurrence_dest_size:</text:span></text:p>
          </draw:text-box>
        </draw:frame>
        <draw:frame draw:style-name="gr307" draw:text-style-name="P66" draw:layer="layout" svg:width="18.237cm" svg:height="7.605cm" svg:x="1.537cm" svg:y="18.923cm">
          <draw:text-box>
            <text:p text:style-name="P69"><text:span text:style-name="T63">Procedura per calcolare la lunghezza della stringa cifrata, serve per allocare memoria in anticipo.</text:span><text:span text:style-name="T63"><text:line-break/></text:span><text:span text:style-name="T63">Dopo aver iterato sulla mappa per contare il numero di caratteri diversi, applica una formula per calcolare la grandezza finale, la formula deriva da questa intuizione: </text:span><text:span text:style-name="T63"><text:line-break/></text:span><text:span text:style-name="T63"><text:line-break/></text:span><text:span text:style-name="T72">1 carattere + 1 spazio </text:span><text:span text:style-name="T73">(2)</text:span><text:span text:style-name="T74"> </text:span><text:span text:style-name="T63">per ogni </text:span><text:span text:style-name="T75">carattere unico </text:span><text:span text:style-name="T76"><text:s/>(</text:span><text:span text:style-name="T77">eccetto il primo che non segue uno spazio</text:span><text:span text:style-name="T76">)</text:span><text:span text:style-name="T63"><text:line-break/></text:span><text:span text:style-name="T78">1</text:span><text:span text:style-name="T74"> '-' per </text:span><text:span text:style-name="T79">ogni carattere</text:span><text:span text:style-name="T74"> della stringa</text:span></text:p>
            <text:p text:style-name="P69"><text:span text:style-name="T74">1 stringa numerica per ogni carattere delal stringa -&gt; somma di lunghezza di ogni stringa numerica da 1 a src_len:</text:span></text:p>
            <text:p text:style-name="P74"><text:span text:style-name="T74">numstr_len(9) = (strlen("1") = 1) + (strlen("2") = 1) + ... + (strlen("9") = 1) = 1 * 9</text:span></text:p>
            <text:p text:style-name="P74"><text:span text:style-name="T74">numstr_len(10) = 2 * 1 + numstr_len(9)</text:span></text:p>
            <text:p text:style-name="P74"><text:span text:style-name="T74">numstr_len(11) = 2 * (11 – 9) + numstr_len(9)</text:span><text:span text:style-name="T74"><text:line-break/></text:span><text:span text:style-name="T74">numstr_len(100) = 3 * (100 – 99) + 2 * (100 – 10) + 1 * (10 – 1)</text:span></text:p>
            <text:p text:style-name="P75"><text:span text:style-name="T74">numstr_len(x): <text:s/>(</text:span><text:span text:style-name="T80">p+1) × (x − (10</text:span><text:span text:style-name="T81">p </text:span><text:span text:style-name="T80">-1)) +</text:span><text:span text:style-name="T74"> </text:span><text:span text:style-name="T82">∑</text:span><text:span text:style-name="T83">k=1</text:span><text:span text:style-name="T84"> p</text:span><text:span text:style-name="T81"> <text:s text:c="8"/></text:span><text:span text:style-name="T80">(k*(10</text:span><text:span text:style-name="T81">k</text:span><text:span text:style-name="T80">−10</text:span><text:span text:style-name="T81">k − 1</text:span><text:span text:style-name="T80">)), <text:s/>con p = </text:span><text:span text:style-name="T85">⌋log</text:span><text:span text:style-name="T86">10</text:span><text:span text:style-name="T85">(x)⌊</text:span></text:p>
          </draw:text-box>
        </draw:frame>
        <draw:frame draw:style-name="gr308" draw:text-style-name="P76" draw:layer="layout" svg:width="14.969cm" svg:height="1.433cm" svg:x="5.307cm" svg:y="27.226cm">
          <draw:text-box>
            <text:p><text:span text:style-name="T87">x =</text:span><text:span text:style-name="T88"> 2 </text:span><text:span text:style-name="T89">×</text:span><text:span text:style-name="T88">c </text:span><text:span text:style-name="T87">+ (</text:span><text:span text:style-name="T90">- 1</text:span><text:span text:style-name="T91">)</text:span><text:span text:style-name="T87">+</text:span><text:span text:style-name="T92">l</text:span><text:span text:style-name="T87"> <text:s/>+ <text:s/>∑</text:span><text:span text:style-name="T93">k=1</text:span><text:span text:style-name="T94"> p</text:span><text:span text:style-name="T95">(k*(10</text:span><text:span text:style-name="T96">k</text:span><text:span text:style-name="T95">−10</text:span><text:span text:style-name="T96">k − 1</text:span><text:span text:style-name="T95">)) + p × (l + 1 − <text:s/>10</text:span><text:span text:style-name="T96">p − 1</text:span><text:span text:style-name="T95">)</text:span></text:p>
          </draw:text-box>
        </draw:frame>
        <draw:frame draw:style-name="gr309" draw:text-style-name="P77" draw:layer="layout" svg:width="3.531cm" svg:height="1.337cm" svg:x="1.294cm" svg:y="26.966cm">
          <draw:text-box>
            <text:p text:style-name="P75"><text:span text:style-name="T97">c=caratteri diversi</text:span><text:span text:style-name="T97"><text:line-break/></text:span><text:span text:style-name="T98">l=lunghezza(src)</text:span><text:span text:style-name="T98"><text:line-break/></text:span><text:span text:style-name="T98">p= </text:span><text:span text:style-name="T99">⌋log</text:span><text:span text:style-name="T100">10</text:span><text:span text:style-name="T99">(x)⌊</text:span><text:span text:style-name="T99"><text:line-break/></text:span><text:span text:style-name="T99">P=⌈log</text:span><text:span text:style-name="T100">10</text:span><text:span text:style-name="T99">(x)⌉</text:span></text:p>
          </draw:text-box>
        </draw:frame>
      </draw:page>
      <draw:page draw:name="page9" draw:style-name="dp1" draw:master-page-name="master-page79">
        <draw:frame draw:name="occurrence_construct_cypher_text" draw:style-name="gr310" draw:text-style-name="P78" draw:layer="layout" svg:width="8.46cm" svg:height="0.624cm" svg:x="1.404cm" svg:y="3.026cm">
          <draw:text-box>
            <text:p text:style-name="P69"><text:span text:style-name="T101">occurrence_construct_cypher_text:</text:span></text:p>
          </draw:text-box>
        </draw:frame>
        <draw:frame draw:style-name="gr15" draw:text-style-name="P15" draw:layer="layout" svg:width="0.943cm" svg:height="0.642cm" svg:x="1.478cm" svg:y="28.055cm">
          <draw:text-box>
            <text:p text:style-name="P1"><text:span text:style-name="T16">9</text:span></text:p>
          </draw:text-box>
        </draw:frame>
        <draw:frame draw:style-name="gr44" draw:text-style-name="P8" draw:layer="layout" svg:width="5.771cm" svg:height="0.543cm" svg:x="1.403cm" svg:y="2.228cm">
          <draw:text-box>
            <text:p text:style-name="P1"><text:span text:style-name="T7">Procedure notevoli: </text:span></text:p>
          </draw:text-box>
        </draw:frame>
        <draw:frame draw:style-name="gr311" draw:text-style-name="P66" draw:layer="layout" svg:width="18.237cm" svg:height="2.141cm" svg:x="1.537cm" svg:y="3.823cm">
          <draw:text-box>
            <text:p text:style-name="P69"><text:span text:style-name="T63">Una volta presa la </text:span><text:span text:style-name="T58"><text:a xlink:href="#occurrence_map" xlink:type="simple">occurrence_map</text:a></text:span><text:span text:style-name="T57"><text:s/>calcolata precedentemente, iterare su essa:</text:span><text:span text:style-name="T57"><text:line-break/></text:span><text:span text:style-name="T57">Per ogni lista non nulla in indice i: si aggiunge il carattere in codifica ascii i + 32, poi per ogni nodo nella lista si appende ‘-’ e il numero salvato nel nodo in formato di stringa, infine si separa con uno spazio.</text:span></text:p>
          </draw:text-box>
        </draw:frame>
        <draw:g draw:style-name="gr48" xml:id="id86" draw:id="id86">
          <draw:path draw:style-name="gr312" draw:text-style-name="P34" draw:layer="layout" svg:width="0.5cm" svg:height="0.5cm" svg:x="2.299cm" svg:y="6.401cm" svg:viewBox="0 0 501 501" svg:d="M501 251c0 43-12 87-34 125s-53 69-91 91-82 34-125 34c-44 0-88-12-126-34s-69-53-91-91-34-82-34-125c0-44 12-88 34-126s53-69 91-91 82-34 126-34c43 0 87 12 125 34s69 53 91 91 34 82 34 126z">
            <text:p/>
          </draw:path>
          <draw:custom-shape draw:style-name="gr313" draw:text-style-name="P35" draw:layer="layout" svg:width="0.25cm" svg:height="0.25cm" svg:x="2.424cm" svg:y="6.526cm">
            <text:p/>
            <draw:enhanced-geometry svg:viewBox="0 0 21600 21600" draw:type="rectangle" draw:enhanced-path="M 0 0 L 21600 0 21600 21600 0 21600 0 0 Z N"/>
          </draw:custom-shape>
        </draw:g>
        <draw:connector draw:style-name="gr314" draw:text-style-name="P56" draw:layer="layout" svg:x1="3.619cm" svg:y1="6.637cm" svg:x2="2.8cm" svg:y2="6.651cm" draw:start-shape="id85" draw:start-glue-point="3" draw:end-shape="id86" draw:end-glue-point="1" svg:d="M3619 6637h-416v14h-403" svg:viewBox="0 0 820 15">
          <text:p/>
        </draw:connector>
        <draw:polygon draw:style-name="gr315" draw:text-style-name="P57" xml:id="id85" draw:id="id85" draw:layer="layout" svg:width="3.791cm" svg:height="1.422cm" svg:x="3.619cm" svg:y="5.926cm" svg:viewBox="0 0 3792 1423" draw:points="0,0 2369,0 2844,0 3791,0 3791,711 3792,712 3791,712 3791,1422 2844,1422 2844,1423 0,1423 948,712">
          <text:p text:style-name="P51"><text:span text:style-name="T28">In: dest_len, </text:span></text:p>
          <text:p text:style-name="P51"><text:span text:style-name="T61"><text:a xlink:href="#list_node" xlink:type="simple">list_node</text:a></text:span><text:span text:style-name="T71"><text:s/></text:span><text:span text:style-name="T28">[96] </text:span><text:span text:style-name="T61"><text:a xlink:href="#occurrence_map" xlink:type="simple">map</text:a></text:span></text:p>
        </draw:polygon>
        <draw:custom-shape draw:style-name="gr316" draw:text-style-name="P38" xml:id="id87" draw:id="id87" draw:layer="layout" svg:width="5.062cm" svg:height="1.265cm" draw:transform="skewX (0.00628318530717959) translate (8.43cm 6.012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malloc(dest_len + 1);</text:span></text:p>
          <text:p text:style-name="P37"><text:span text:style-name="T28">caratteri_scrit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17" draw:text-style-name="P36" draw:layer="layout" svg:x1="8.422cm" svg:y1="6.644cm" svg:x2="7.411cm" svg:y2="6.637cm" draw:start-shape="id87" draw:start-glue-point="3" draw:end-shape="id85" draw:end-glue-point="1" svg:d="M8422 6644h-504v-7h-507" svg:viewBox="0 0 1012 8">
          <text:p/>
        </draw:connector>
        <draw:custom-shape draw:style-name="gr318" draw:text-style-name="P43" xml:id="id88" draw:id="id88" draw:layer="layout" svg:width="1cm" svg:height="1cm" svg:x="10.437cm" svg:y="8.027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319" draw:text-style-name="P41" draw:layer="layout" svg:width="18.017cm" svg:height="7.063cm" svg:x="1.676cm" svg:y="7.6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20" draw:text-style-name="P42" draw:layer="layout" svg:width="5.702cm" svg:height="0.614cm" svg:x="1.676cm" svg:y="7.694cm">
            <text:p text:style-name="P37"><text:span text:style-name="T28">occurrence_construct_cypher_text_loop</text:span></text:p>
            <draw:enhanced-geometry svg:viewBox="0 0 21600 21600" draw:mirror-horizontal="false" draw:mirror-vertical="false" draw:type="non-primitve" draw:enhanced-path="M 0 0 L 21600 0 19000 21600 0 21600 0 0 Z N"/>
          </draw:custom-shape>
        </draw:g>
        <draw:connector draw:style-name="gr321" draw:text-style-name="P36" draw:layer="layout" svg:x1="10.937cm" svg:y1="8.027cm" svg:x2="10.953cm" svg:y2="7.277cm" draw:start-shape="id88" draw:start-glue-point="4" draw:end-shape="id87" draw:end-glue-point="2" svg:d="M10937 8027v-380h16v-370" svg:viewBox="0 0 17 751">
          <text:p/>
        </draw:connector>
        <draw:custom-shape draw:style-name="gr322" draw:text-style-name="P43" xml:id="id90" draw:id="id90" draw:layer="layout" svg:width="1cm" svg:height="1cm" svg:x="10.437cm" svg:y="14.027cm">
          <text:p/>
          <draw:enhanced-geometry svg:viewBox="0 0 21600 21600" draw:glue-points="10800 0 0 10800 10800 21600 21600 10800" draw:text-areas="5400 5400 16200 16200" draw:type="diamond" draw:enhanced-path="M 10800 0 L 21600 10800 10800 21600 0 10800 10800 0 Z N"/>
        </draw:custom-shape>
        <draw:frame draw:style-name="gr323" draw:text-style-name="P40" draw:layer="layout" svg:width="1.245cm" svg:height="0.601cm" svg:x="11.215cm" svg:y="8.377cm">
          <draw:text-box>
            <text:p text:style-name="P26"><text:span text:style-name="T28">[falso]</text:span></text:p>
          </draw:text-box>
        </draw:frame>
        <draw:connector draw:style-name="gr324" draw:text-style-name="P36" draw:layer="layout" svg:x1="2.337cm" svg:y1="9.527cm" svg:x2="10.437cm" svg:y2="8.527cm" draw:start-shape="id89" draw:start-glue-point="4" draw:end-shape="id88" draw:end-glue-point="5" svg:d="M2337 9527v-1000h8100" svg:viewBox="0 0 8101 1001">
          <text:p/>
        </draw:connector>
        <draw:frame draw:style-name="gr325" draw:text-style-name="P40" draw:layer="layout" svg:width="2.558cm" svg:height="0.601cm" svg:x="9.568cm" svg:y="7.694cm">
          <draw:text-box>
            <text:p text:style-name="P26"><text:span text:style-name="T28">[i &lt; 96?]</text:span></text:p>
          </draw:text-box>
        </draw:frame>
        <draw:frame draw:style-name="gr326" draw:text-style-name="P40" draw:layer="layout" svg:width="1.197cm" svg:height="0.668cm" svg:x="9.366cm" svg:y="8.427cm">
          <draw:text-box>
            <text:p text:style-name="P26"><text:span text:style-name="T28">[vero]</text:span></text:p>
          </draw:text-box>
        </draw:frame>
        <draw:connector draw:style-name="gr327" draw:text-style-name="P36" draw:layer="layout" draw:line-skew="7.371cm" svg:x1="11.437cm" svg:y1="14.527cm" svg:x2="11.437cm" svg:y2="8.527cm" draw:start-shape="id90" draw:start-glue-point="7" draw:end-shape="id88" draw:end-glue-point="7" svg:d="M11437 14527h7910v-6000h-7910" svg:viewBox="0 0 7911 6001">
          <text:p/>
        </draw:connector>
        <draw:connector draw:style-name="gr328" draw:text-style-name="P36" draw:layer="layout" svg:x1="10.927cm" svg:y1="15.685cm" svg:x2="10.937cm" svg:y2="15.027cm" draw:start-shape="id91" draw:start-glue-point="0" draw:end-shape="id90" draw:end-glue-point="6" svg:d="M10927 15685v-323h10v-335" svg:viewBox="0 0 11 659">
          <text:p/>
        </draw:connector>
        <draw:frame draw:style-name="gr329" draw:text-style-name="P40" draw:layer="layout" svg:width="1.715cm" svg:height="0.601cm" svg:x="9.036cm" svg:y="14.185cm">
          <draw:text-box>
            <text:p text:style-name="P26"><text:span text:style-name="T28">[end loop]</text:span></text:p>
          </draw:text-box>
        </draw:frame>
        <draw:custom-shape draw:style-name="gr330" draw:text-style-name="P38" xml:id="id93" draw:id="id93" draw:layer="layout" svg:width="2.757cm" svg:height="0.974cm" svg:x="13.751cm" svg:y="15.689cm">
          <text:p text:style-name="P37"><text:span text:style-name="T28">Out: dest</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92" draw:id="id92">
          <draw:path draw:style-name="gr331" draw:text-style-name="P46" draw:layer="layout" svg:width="0.5cm" svg:height="0.5cm" svg:x="17.499cm" svg:y="15.948cm" svg:viewBox="0 0 501 501" svg:d="M501 251c0 43-12 87-34 125s-53 69-91 91-82 34-125 34c-44 0-88-12-126-34s-69-53-91-91-34-82-34-125c0-44 12-88 34-126s53-69 91-91 82-34 126-34c43 0 87 12 125 34s69 53 91 91 34 82 34 126z">
            <text:p/>
          </draw:path>
          <draw:path draw:style-name="gr332" draw:text-style-name="P34" draw:layer="layout" svg:width="0.2cm" svg:height="0.2cm" svg:x="17.649cm" svg:y="16.098cm" svg:viewBox="0 0 201 201" svg:d="M201 101c0 17-5 34-13 50-9 15-22 28-37 37-16 8-33 13-50 13-18 0-35-5-51-13-15-9-28-22-37-37-8-16-13-33-13-50 0-18 5-35 13-51 9-15 22-28 37-37 16-8 33-13 51-13 17 0 34 5 50 13 15 9 28 22 37 37 8 16 13 33 13 51z">
            <text:p/>
          </draw:path>
        </draw:g>
        <draw:connector draw:style-name="gr333" draw:text-style-name="P36" draw:layer="layout" svg:x1="17.499cm" svg:y1="16.198cm" svg:x2="16.508cm" svg:y2="16.176cm" draw:start-shape="id92" draw:start-glue-point="3" draw:end-shape="id93" draw:end-glue-point="1" svg:d="M17499 16198h-495v-22h-496" svg:viewBox="0 0 992 23">
          <text:p/>
        </draw:connector>
        <draw:custom-shape draw:style-name="gr334" draw:text-style-name="P43" xml:id="id89" draw:id="id89" draw:layer="layout" svg:width="1cm" svg:height="1cm" svg:x="1.837cm" svg:y="9.5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35" draw:text-style-name="P38" xml:id="id94" draw:id="id94" draw:layer="layout" svg:width="1.376cm" svg:height="0.764cm" draw:transform="skewX (0.00645771823237902) translate (17.816cm 8.7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36" draw:text-style-name="P36" draw:layer="layout" draw:line-skew="-0.468cm" svg:x1="10.937cm" svg:y1="9.027cm" svg:x2="17.811cm" svg:y2="9.122cm" draw:start-shape="id88" draw:start-glue-point="6" draw:end-shape="id94" draw:end-glue-point="3" svg:d="M10937 9027v71h3693v24h3181" svg:viewBox="0 0 6875 96">
          <text:p/>
        </draw:connector>
        <draw:custom-shape draw:style-name="gr337" draw:text-style-name="P43" xml:id="id95" draw:id="id95" draw:layer="layout" svg:width="1cm" svg:height="1cm" svg:x="18.024cm" svg:y="12.44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38" draw:text-style-name="P36" draw:layer="layout" svg:x1="18.499cm" svg:y1="9.504cm" svg:x2="18.524cm" svg:y2="12.441cm" draw:start-shape="id94" draw:start-glue-point="2" draw:end-shape="id95" draw:end-glue-point="4" svg:d="M18499 9504v1464h25v1473" svg:viewBox="0 0 26 2938">
          <text:p/>
        </draw:connector>
        <draw:connector draw:style-name="gr339" draw:text-style-name="P36" draw:layer="layout" draw:line-skew="0cm 0.261cm" svg:x1="12.771cm" svg:y1="12.199cm" svg:x2="16.805cm" svg:y2="12.476cm" draw:start-shape="id96" draw:start-glue-point="1" draw:end-shape="id97" draw:end-glue-point="4" svg:d="M12771 12199h1761 2273v277" svg:viewBox="0 0 4035 278">
          <text:p/>
        </draw:connector>
        <draw:connector draw:style-name="gr340" draw:text-style-name="P36" draw:layer="layout" svg:x1="18.024cm" svg:y1="12.941cm" svg:x2="17.305cm" svg:y2="12.976cm" draw:start-shape="id95" draw:start-glue-point="5" draw:end-shape="id97" draw:end-glue-point="7" svg:d="M18024 12941h-359v35h-360" svg:viewBox="0 0 720 36">
          <text:p/>
        </draw:connector>
        <draw:connector draw:style-name="gr341" draw:text-style-name="P36" draw:layer="layout" svg:x1="18.524cm" svg:y1="13.441cm" svg:x2="2.337cm" svg:y2="10.527cm" draw:start-shape="id95" draw:start-glue-point="6" draw:end-shape="id89" draw:end-glue-point="6" svg:d="M18524 13441v539h-16187v-3453" svg:viewBox="0 0 16188 3454">
          <text:p/>
        </draw:connector>
        <draw:frame draw:style-name="gr342" draw:text-style-name="P40" draw:layer="layout" svg:width="1.197cm" svg:height="0.668cm" svg:x="2.191cm" svg:y="13.312cm">
          <draw:text-box>
            <text:p text:style-name="P26"><text:span text:style-name="T28">[vero]</text:span></text:p>
          </draw:text-box>
        </draw:frame>
        <draw:frame draw:style-name="gr343" draw:text-style-name="P40" draw:layer="layout" svg:width="1.245cm" svg:height="0.601cm" svg:x="2.75cm" svg:y="9.926cm">
          <draw:text-box>
            <text:p text:style-name="P26"><text:span text:style-name="T28">[falso]</text:span></text:p>
          </draw:text-box>
        </draw:frame>
        <draw:custom-shape draw:style-name="gr344" draw:text-style-name="P38" xml:id="id99" draw:id="id99" draw:layer="layout" svg:width="4.447cm" svg:height="1.073cm" draw:transform="skewX (0.00645771823237902) translate (8.036cm 9.45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odo = map[i];</text:span></text:p>
          <text:p text:style-name="P37"><text:span text:style-name="T28">dest[caratteri_scritti] = i + 32;</text:span></text:p>
          <text:p text:style-name="P37"><text:span text:style-name="T28">caratteri_scritt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45" draw:text-style-name="P36" draw:layer="layout" svg:x1="4.262cm" svg:y1="10.015cm" svg:x2="2.837cm" svg:y2="10.027cm" draw:start-shape="id98" draw:start-glue-point="5" draw:end-shape="id89" draw:end-glue-point="7" svg:d="M4262 10015h-712v12h-713" svg:viewBox="0 0 1426 13">
          <text:p/>
        </draw:connector>
        <draw:connector draw:style-name="gr346" draw:text-style-name="P36" draw:layer="layout" svg:x1="10.303cm" svg:y1="11.291cm" svg:x2="10.252cm" svg:y2="10.527cm" draw:start-shape="id96" draw:start-glue-point="0" draw:end-shape="id99" draw:end-glue-point="2" svg:d="M10303 11291v-382h-51v-382" svg:viewBox="0 0 52 765">
          <text:p/>
        </draw:connector>
        <draw:frame draw:style-name="gr347" draw:text-style-name="P40" draw:layer="layout" svg:width="2.558cm" svg:height="0.601cm" svg:x="2.162cm" svg:y="8.425cm">
          <draw:text-box>
            <text:p text:style-name="P26"><text:span text:style-name="T28">[map[i] == 0?]</text:span></text:p>
          </draw:text-box>
        </draw:frame>
        <draw:custom-shape draw:style-name="gr348" draw:text-style-name="P43" xml:id="id98" draw:id="id98" draw:layer="layout" svg:width="1cm" svg:height="1cm" svg:x="4.262cm" svg:y="9.5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349" draw:text-style-name="P36" draw:layer="layout" svg:x1="6.408cm" svg:y1="9.964cm" svg:x2="5.262cm" svg:y2="10.015cm" draw:start-shape="id100" draw:start-glue-point="5" draw:end-shape="id98" draw:end-glue-point="7" svg:d="M6408 9964h-572v51h-574" svg:viewBox="0 0 1147 52">
          <text:p/>
        </draw:connector>
        <draw:connector draw:style-name="gr350" draw:text-style-name="P36" draw:layer="layout" draw:line-skew="0cm -0.244cm" svg:x1="6.908cm" svg:y1="10.464cm" svg:x2="6.626cm" svg:y2="12.158cm" draw:start-shape="id100" draw:start-glue-point="6" draw:end-shape="id101" draw:end-glue-point="1" svg:d="M6908 10464v616 1078h-282" svg:viewBox="0 0 283 1695">
          <text:p/>
        </draw:connector>
        <draw:frame draw:style-name="gr351" draw:text-style-name="P40" draw:layer="layout" svg:width="1.245cm" svg:height="0.668cm" svg:x="3.549cm" svg:y="11.116cm">
          <draw:text-box>
            <text:p text:style-name="P26"><text:span text:style-name="T28">[falso]</text:span></text:p>
          </draw:text-box>
        </draw:frame>
        <draw:custom-shape draw:style-name="gr352" draw:text-style-name="P38" xml:id="id101" draw:id="id101" draw:layer="layout" svg:width="3.799cm" svg:height="0.949cm" draw:transform="skewX (0.00628318530717959) translate (2.827cm 11.68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caratteri_scritti] = ' ';</text:span></text:p>
          <text:p text:style-name="P37"><text:span text:style-name="T28">caratteri_scritt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53" draw:text-style-name="P36" draw:layer="layout" svg:x1="4.726cm" svg:y1="11.684cm" svg:x2="4.762cm" svg:y2="10.515cm" draw:start-shape="id101" draw:start-glue-point="0" draw:end-shape="id98" draw:end-glue-point="6" svg:d="M4726 11684v-579h36v-590" svg:viewBox="0 0 37 1170">
          <text:p/>
        </draw:connector>
        <draw:frame draw:style-name="gr354" draw:text-style-name="P40" draw:layer="layout" svg:width="1.245cm" svg:height="0.601cm" svg:x="5.533cm" svg:y="8.956cm">
          <draw:text-box>
            <text:p text:style-name="P26"><text:span text:style-name="T28">[vero]</text:span></text:p>
          </draw:text-box>
        </draw:frame>
        <draw:frame draw:style-name="gr355" draw:text-style-name="P40" draw:layer="layout" svg:width="2.487cm" svg:height="0.545cm" svg:x="3.088cm" svg:y="9.112cm">
          <draw:text-box>
            <text:p text:style-name="P26"><text:span text:style-name="T28">[c..scritti == 0?]</text:span></text:p>
          </draw:text-box>
        </draw:frame>
        <draw:custom-shape draw:style-name="gr356" draw:text-style-name="P43" xml:id="id100" draw:id="id100" draw:layer="layout" svg:width="1cm" svg:height="1cm" svg:x="6.408cm" svg:y="9.46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57" draw:text-style-name="P36" draw:layer="layout" svg:x1="8.029cm" svg:y1="9.99cm" svg:x2="7.408cm" svg:y2="9.964cm" draw:start-shape="id99" draw:start-glue-point="3" draw:end-shape="id100" draw:end-glue-point="7" svg:d="M8029 9990h-304v-26h-317" svg:viewBox="0 0 622 27">
          <text:p/>
        </draw:connector>
        <draw:custom-shape draw:style-name="gr358" draw:text-style-name="P43" xml:id="id97" draw:id="id97" draw:layer="layout" svg:width="1cm" svg:height="1cm" svg:x="16.305cm" svg:y="12.47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9" draw:text-style-name="P38" xml:id="id96" draw:id="id96" draw:layer="layout" svg:width="4.935cm" svg:height="1.817cm" draw:transform="skewX (0.00663225115757845) translate (7.836cm 11.29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umstr = "-" + uitoa(nodo.val+1)*;</text:span><text:span text:style-name="T28"><text:line-break/></text:span><text:span text:style-name="T28">caratteri_scritti += </text:span><text:span text:style-name="T28"><text:line-break/></text:span><text:span text:style-name="T28">strlncpy(numstr, dest + c..scritti, dest_len – c..scritti)**;</text:span></text:p>
          <text:p text:style-name="P37"><text:span text:style-name="T28">nodo = nodo.prossim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60" draw:text-style-name="P36" draw:layer="layout" draw:line-skew="-0.539cm" svg:x1="16.805cm" svg:y1="13.476cm" svg:x2="10.291cm" svg:y2="13.108cm" draw:start-shape="id97" draw:start-glue-point="6" draw:end-shape="id96" draw:end-glue-point="2" svg:d="M16805 13476h-6514v-368" svg:viewBox="0 0 6515 369">
          <text:p/>
        </draw:connector>
        <draw:frame draw:style-name="gr361" draw:text-style-name="P40" draw:layer="layout" svg:width="2.535cm" svg:height="0.601cm" svg:x="13.976cm" svg:y="12.65cm">
          <draw:text-box>
            <text:p text:style-name="P26"><text:span text:style-name="T28">[while nodo != 0]</text:span></text:p>
          </draw:text-box>
        </draw:frame>
        <draw:custom-shape draw:style-name="gr362" draw:text-style-name="P38" xml:id="id91" draw:id="id91" draw:layer="layout" svg:width="3.799cm" svg:height="0.949cm" draw:transform="skewX (0.00628318530717959) translate (9.028cm 15.68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caratteri_scritti]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63" draw:text-style-name="P36" draw:layer="layout" svg:x1="13.751cm" svg:y1="16.176cm" svg:x2="12.827cm" svg:y2="16.159cm" draw:start-shape="id93" draw:start-glue-point="3" draw:end-shape="id91" draw:end-glue-point="1" svg:d="M13751 16176h-463v-17h-461" svg:viewBox="0 0 925 18">
          <text:p/>
        </draw:connector>
        <draw:frame draw:style-name="gr364" draw:text-style-name="P47" draw:layer="layout" svg:width="17.084cm" svg:height="1.612cm" svg:x="1.675cm" svg:y="16.59cm">
          <draw:text-box>
            <text:p>Procedure ispirate dalla libreria standard di c:</text:p>
            <text:p>*: uitoa(uint n) “unsigned int to ascii” calcola la stringa equivalente al numero passato in input<text:line-break/>**:strlncpy(char [] src, char [] dest, int dest_size): copia al massimo n – 1 caratteri da una stringa all’altra, null-termina la stringa e ritorna la lunghezza della stringa copiata</text:p>
          </draw:text-box>
        </draw:frame>
        <draw:frame draw:name="occurrence_decypher" draw:style-name="gr45" draw:text-style-name="P31" draw:layer="layout" svg:width="8.415cm" svg:height="0.543cm" svg:x="1.404cm" svg:y="18.225cm">
          <draw:text-box>
            <text:p text:style-name="P1"><text:span text:style-name="T25">occurrence_decypher:</text:span></text:p>
          </draw:text-box>
        </draw:frame>
        <draw:frame draw:style-name="gr365" draw:text-style-name="P79" draw:layer="layout" svg:width="18.237cm" svg:height="1.973cm" svg:x="1.536cm" svg:y="18.822cm">
          <draw:text-box>
            <text:p text:style-name="P72"><text:span text:style-name="T63">Un po’ pi</text:span><text:span text:style-name="T102">ù</text:span><text:span text:style-name="T103"> semplice della procedura associata, </text:span><text:span text:style-name="T104">occurrence_decypher</text:span><text:span text:style-name="T105"> calcola la grandezza della stringa decifrata chiamando </text:span><text:span text:style-name="T104">occurrence_plain_text_size</text:span><text:span text:style-name="T105"> per poi allocare spazio per la stringa decifrata e comporla con </text:span><text:span text:style-name="T104">occurrence_construct_plain_text</text:span><text:span text:style-name="T106">, il risultato viene ritornato.</text:span></text:p>
          </draw:text-box>
        </draw:frame>
        <draw:frame draw:style-name="gr366" draw:text-style-name="P47" draw:layer="layout" svg:width="16.392cm" svg:height="3.655cm" svg:x="1.548cm" svg:y="20.671cm">
          <draw:text-box>
            <text:p><text:span text:style-name="T107">(char [], int) occurrence_decypher(char [] src, int src_len) <text:s text:c="22"/>← </text:span>Pseudocodice</text:p>
            <text:p>{</text:p>
            <text:p><text:tab/>int dest_len = occurrence_plaintext_size(src, src_len);</text:p>
            <text:p><text:tab/>char [] dest = malloc(dest_len + 1);</text:p>
            <text:p><text:tab/>return (occurrence_construct_plain_text(src, dest), dest_len);</text:p>
            <text:p>}<text:line-break/></text:p>
          </draw:text-box>
        </draw:frame>
        <draw:frame draw:name="occurrence_decypher 1" draw:style-name="gr45" draw:text-style-name="P31" draw:layer="layout" svg:width="8.415cm" svg:height="0.543cm" svg:x="1.405cm" svg:y="23.426cm">
          <draw:text-box>
            <text:p text:style-name="P1"><text:span text:style-name="T25">occurrence_plain_text_size:</text:span></text:p>
          </draw:text-box>
        </draw:frame>
        <draw:frame draw:style-name="gr367" draw:text-style-name="P79" draw:layer="layout" svg:width="18.237cm" svg:height="1.119cm" svg:x="1.536cm" svg:y="24.123cm">
          <draw:text-box>
            <text:p text:style-name="P72"><text:span text:style-name="T108">Per calcolare la dimensione della stringa decifrata, si cerca il numero maggiore sulla stringa cirata</text:span></text:p>
          </draw:text-box>
        </draw:frame>
        <draw:frame draw:style-name="gr366" draw:text-style-name="P47" draw:layer="layout" svg:width="16.392cm" svg:height="3.655cm" svg:x="2.036cm" svg:y="24.842cm">
          <draw:text-box>
            <text:p text:style-name="P80"><text:span text:style-name="T107">int occurrence_plain_text_size(char [] src, int src_len) <text:s text:c="22"/>← </text:span>Pseudocodice</text:p>
            <text:p><text:span text:style-name="T107">{</text:span></text:p>
            <text:p><text:tab/>int max_num = 0;</text:p>
            <text:p><text:tab/>for (int i = 2; i &lt; src_len; i += strchr(src + i, ‘-’)* + 1)</text:p>
            <text:p><text:tab/><text:tab/>max_num = max(max_num, atoui(i)**);</text:p>
            <text:p><text:tab/>return (max_num);</text:p>
            <text:p>}<text:line-break/></text:p>
          </draw:text-box>
        </draw:frame>
        <draw:frame draw:style-name="gr364" draw:text-style-name="P47" draw:layer="layout" svg:width="17.084cm" svg:height="1.612cm" svg:x="3.075cm" svg:y="27.79cm">
          <draw:text-box>
            <text:p text:style-name="P80"><text:span text:style-name="T107">*:strchr(char [] str, char c) cerca la prima occorrenza del carattere nella stringa e ritorna il suo indice </text:span></text:p>
            <text:p><text:span text:style-name="T107">**: atoui(char [] str) “ascii to </text:span>unsigned int” calcola l’intero equivalente alla stringa passata in input<text:line-break/></text:p>
          </draw:text-box>
        </draw:frame>
      </draw:page>
      <draw:page draw:name="page10" draw:style-name="dp1" draw:master-page-name="master-page79">
        <draw:frame draw:name="occurrencce_construct_plain_text" draw:style-name="gr45" draw:text-style-name="P31" draw:layer="layout" svg:width="8.415cm" svg:height="0.543cm" svg:x="1.404cm" svg:y="2.826cm">
          <draw:text-box>
            <text:p text:style-name="P69"><text:span text:style-name="T56">occurrence_construct_plain_text:</text:span></text:p>
          </draw:text-box>
        </draw:frame>
        <draw:frame draw:style-name="gr15" draw:text-style-name="P15" draw:layer="layout" svg:width="0.943cm" svg:height="0.642cm" svg:x="1.478cm" svg:y="28.055cm">
          <draw:text-box>
            <text:p text:style-name="P1"><text:span text:style-name="T16">10</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03" draw:id="id103">
          <draw:path draw:style-name="gr368" draw:text-style-name="P34" draw:layer="layout" svg:width="0.5cm" svg:height="0.5cm" svg:x="2.3cm" svg:y="5.602cm" svg:viewBox="0 0 501 501" svg:d="M501 251c0 43-12 87-34 125s-53 69-91 91-82 34-125 34c-44 0-88-12-126-34s-69-53-91-91-34-82-34-125c0-44 12-88 34-126s53-69 91-91 82-34 126-34c43 0 87 12 125 34s69 53 91 91 34 82 34 126z">
            <text:p/>
          </draw:path>
          <draw:custom-shape draw:style-name="gr369" draw:text-style-name="P35" draw:layer="layout" svg:width="0.25cm" svg:height="0.25cm" svg:x="2.425cm" svg:y="5.727cm">
            <text:p/>
            <draw:enhanced-geometry svg:viewBox="0 0 21600 21600" draw:type="rectangle" draw:enhanced-path="M 0 0 L 21600 0 21600 21600 0 21600 0 0 Z N"/>
          </draw:custom-shape>
        </draw:g>
        <draw:connector draw:style-name="gr370" draw:text-style-name="P56" draw:layer="layout" svg:x1="4.044cm" svg:y1="5.838cm" svg:x2="2.801cm" svg:y2="5.852cm" draw:start-shape="id102" draw:start-glue-point="3" draw:end-shape="id103" draw:end-glue-point="1" svg:d="M4044 5838h-628v14h-615" svg:viewBox="0 0 1244 15">
          <text:p/>
        </draw:connector>
        <draw:polygon draw:style-name="gr371" draw:text-style-name="P57" xml:id="id102" draw:id="id102" draw:layer="layout" svg:width="2.567cm" svg:height="1.422cm" svg:x="4.044cm" svg:y="5.127cm" svg:viewBox="0 0 2568 1423" draw:points="0,0 1604,0 1926,0 2567,0 2567,711 2568,712 2567,712 2567,1422 1926,1422 1926,1423 0,1423 642,712">
          <text:p text:style-name="P51"><text:span text:style-name="T28">In: src, </text:span></text:p>
          <text:p text:style-name="P51"><text:span text:style-name="T109">dest_len</text:span></text:p>
        </draw:polygon>
        <draw:custom-shape draw:style-name="gr372" draw:text-style-name="P38" xml:id="id104" draw:id="id104" draw:layer="layout" svg:width="5.062cm" svg:height="1.641cm" draw:transform="skewX (0.00610865238198015) translate (8.433cm 5.037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malloc(dest_len + 1);</text:span></text:p>
          <text:p text:style-name="P37"><text:span text:style-name="T28">next_space = strchr(src + 1, ' ')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73" draw:text-style-name="P36" draw:layer="layout" svg:x1="8.423cm" svg:y1="5.857cm" svg:x2="6.612cm" svg:y2="5.838cm" draw:start-shape="id104" draw:start-glue-point="3" draw:end-shape="id102" draw:end-glue-point="1" svg:d="M8423 5857h-904v-19h-907" svg:viewBox="0 0 1812 20">
          <text:p/>
        </draw:connector>
        <draw:custom-shape draw:style-name="gr374" draw:text-style-name="P43" xml:id="id105" draw:id="id105" draw:layer="layout" svg:width="1cm" svg:height="1cm" svg:x="10.438cm" svg:y="8.228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375" draw:text-style-name="P41" draw:layer="layout" svg:width="17.66cm" svg:height="7.22cm" svg:x="1.677cm" svg:y="7.0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76" draw:text-style-name="P42" draw:layer="layout" svg:width="5.456cm" svg:height="0.614cm" svg:x="1.677cm" svg:y="7.095cm">
            <text:p text:style-name="P37"><text:span text:style-name="T28">occurrence_construct_plain_text_loop</text:span></text:p>
            <draw:enhanced-geometry svg:viewBox="0 0 21600 21600" draw:mirror-horizontal="false" draw:mirror-vertical="false" draw:type="non-primitve" draw:enhanced-path="M 0 0 L 21600 0 19000 21600 0 21600 0 0 Z N"/>
          </draw:custom-shape>
        </draw:g>
        <draw:connector draw:style-name="gr377" draw:text-style-name="P36" draw:layer="layout" svg:x1="10.938cm" svg:y1="8.228cm" svg:x2="10.954cm" svg:y2="6.678cm" draw:start-shape="id105" draw:start-glue-point="4" draw:end-shape="id104" draw:end-glue-point="2" svg:d="M10938 8228v-780h16v-770" svg:viewBox="0 0 17 1551">
          <text:p/>
        </draw:connector>
        <draw:custom-shape draw:style-name="gr378" draw:text-style-name="P43" xml:id="id107" draw:id="id107" draw:layer="layout" svg:width="1cm" svg:height="1cm" svg:x="10.438cm" svg:y="13.428cm">
          <text:p/>
          <draw:enhanced-geometry svg:viewBox="0 0 21600 21600" draw:glue-points="10800 0 0 10800 10800 21600 21600 10800" draw:text-areas="5400 5400 16200 16200" draw:type="diamond" draw:enhanced-path="M 10800 0 L 21600 10800 10800 21600 0 10800 10800 0 Z N"/>
        </draw:custom-shape>
        <draw:frame draw:style-name="gr379" draw:text-style-name="P81" draw:layer="layout" svg:width="1.245cm" svg:height="0.601cm" svg:x="11.216cm" svg:y="7.978cm">
          <draw:text-box>
            <text:p text:style-name="P26"><text:span text:style-name="T110">[falso]</text:span></text:p>
          </draw:text-box>
        </draw:frame>
        <draw:connector draw:style-name="gr380" draw:text-style-name="P36" draw:layer="layout" svg:x1="5.342cm" svg:y1="8.682cm" svg:x2="10.438cm" svg:y2="8.728cm" draw:start-shape="id106" draw:start-glue-point="1" draw:end-shape="id105" draw:end-glue-point="5" svg:d="M5342 8682h2542v46h2554" svg:viewBox="0 0 5097 47">
          <text:p/>
        </draw:connector>
        <draw:frame draw:style-name="gr381" draw:text-style-name="P40" draw:layer="layout" svg:width="3.363cm" svg:height="0.601cm" svg:x="7.671cm" svg:y="7.095cm">
          <draw:text-box>
            <text:p text:style-name="P26"><text:span text:style-name="T28">[src[next_group] != ‘\0’]</text:span></text:p>
          </draw:text-box>
        </draw:frame>
        <draw:frame draw:style-name="gr382" draw:text-style-name="P40" draw:layer="layout" svg:width="1.197cm" svg:height="0.668cm" svg:x="9.367cm" svg:y="7.928cm">
          <draw:text-box>
            <text:p text:style-name="P26"><text:span text:style-name="T28">[vero]</text:span></text:p>
          </draw:text-box>
        </draw:frame>
        <draw:connector draw:style-name="gr383" draw:text-style-name="P36" draw:layer="layout" draw:line-skew="6.943cm" svg:x1="11.438cm" svg:y1="13.928cm" svg:x2="11.438cm" svg:y2="8.728cm" draw:start-shape="id107" draw:start-glue-point="7" draw:end-shape="id105" draw:end-glue-point="7" svg:d="M11438 13928h7482v-5200h-7482" svg:viewBox="0 0 7483 5201">
          <text:p/>
        </draw:connector>
        <draw:connector draw:style-name="gr384" draw:text-style-name="P36" draw:layer="layout" svg:x1="10.928cm" svg:y1="14.986cm" svg:x2="10.938cm" svg:y2="14.428cm" draw:start-shape="id108" draw:start-glue-point="0" draw:end-shape="id107" draw:end-glue-point="6" svg:d="M10928 14986v-273h10v-285" svg:viewBox="0 0 11 559">
          <text:p/>
        </draw:connector>
        <draw:frame draw:style-name="gr385" draw:text-style-name="P40" draw:layer="layout" svg:width="1.715cm" svg:height="0.601cm" svg:x="8.837cm" svg:y="13.586cm">
          <draw:text-box>
            <text:p text:style-name="P26"><text:span text:style-name="T28">[end loop]</text:span></text:p>
          </draw:text-box>
        </draw:frame>
        <draw:custom-shape draw:style-name="gr386" draw:text-style-name="P38" xml:id="id110" draw:id="id110" draw:layer="layout" svg:width="2.757cm" svg:height="0.974cm" svg:x="13.952cm" svg:y="14.99cm">
          <text:p text:style-name="P37"><text:span text:style-name="T28">Out: dest</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09" draw:id="id109">
          <draw:path draw:style-name="gr387" draw:text-style-name="P46" draw:layer="layout" svg:width="0.5cm" svg:height="0.5cm" svg:x="17.5cm" svg:y="15.249cm" svg:viewBox="0 0 501 501" svg:d="M501 251c0 43-12 87-34 125s-53 69-91 91-82 34-125 34c-44 0-88-12-126-34s-69-53-91-91-34-82-34-125c0-44 12-88 34-126s53-69 91-91 82-34 126-34c43 0 87 12 125 34s69 53 91 91 34 82 34 126z">
            <text:p/>
          </draw:path>
          <draw:path draw:style-name="gr388" draw:text-style-name="P34" draw:layer="layout" svg:width="0.2cm" svg:height="0.2cm" svg:x="17.65cm" svg:y="15.399cm" svg:viewBox="0 0 201 201" svg:d="M201 101c0 17-5 34-13 50-9 15-22 28-37 37-16 8-33 13-50 13-18 0-35-5-51-13-15-9-28-22-37-37-8-16-13-33-13-50 0-18 5-35 13-51 9-15 22-28 37-37 16-8 33-13 51-13 17 0 34 5 50 13 15 9 28 22 37 37 8 16 13 33 13 51z">
            <text:p/>
          </draw:path>
        </draw:g>
        <draw:connector draw:style-name="gr389" draw:text-style-name="P36" draw:layer="layout" svg:x1="17.5cm" svg:y1="15.499cm" svg:x2="16.709cm" svg:y2="15.477cm" draw:start-shape="id109" draw:start-glue-point="3" draw:end-shape="id110" draw:end-glue-point="1" svg:d="M17500 15499h-395v-22h-396" svg:viewBox="0 0 792 23">
          <text:p/>
        </draw:connector>
        <draw:custom-shape draw:style-name="gr390" draw:text-style-name="P38" xml:id="id111" draw:id="id111" draw:layer="layout" svg:width="4.172cm" svg:height="1.379cm" draw:transform="skewX (0.00645771823237902) translate (14.421cm 9.94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src += next_space + 1;</text:span></text:p>
          <text:p text:style-name="P37"><text:span text:style-name="T28">next_space = strchr(src, ' ');</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91" draw:text-style-name="P36" draw:layer="layout" draw:line-skew="-0.382cm" svg:x1="10.938cm" svg:y1="9.228cm" svg:x2="16.507cm" svg:y2="9.941cm" draw:start-shape="id105" draw:start-glue-point="6" draw:end-shape="id111" draw:end-glue-point="0" svg:d="M10938 9228v157h1994v28h3575v528" svg:viewBox="0 0 5570 714">
          <text:p/>
        </draw:connector>
        <draw:connector draw:style-name="gr392" draw:text-style-name="P36" draw:layer="layout" svg:x1="4.85cm" svg:y1="11.947cm" svg:x2="4.005cm" svg:y2="9.283cm" draw:start-shape="id112" draw:start-glue-point="5" draw:end-shape="id106" draw:end-glue-point="2" svg:d="M4850 11947h-845v-2664" svg:viewBox="0 0 846 2665">
          <text:p/>
        </draw:connector>
        <draw:connector draw:style-name="gr393" draw:text-style-name="P36" draw:layer="layout" svg:x1="16.498cm" svg:y1="11.32cm" svg:x2="13.424cm" svg:y2="13.156cm" draw:start-shape="id111" draw:start-glue-point="2" draw:end-shape="id113" draw:end-glue-point="7" svg:d="M16498 11320v1836h-3074" svg:viewBox="0 0 3075 1837">
          <text:p/>
        </draw:connector>
        <draw:frame draw:style-name="gr394" draw:text-style-name="P40" draw:layer="layout" svg:width="1.245cm" svg:height="0.668cm" svg:x="5.25cm" svg:y="12.517cm">
          <draw:text-box>
            <text:p text:style-name="P26"><text:span text:style-name="T28">[falso]</text:span></text:p>
          </draw:text-box>
        </draw:frame>
        <draw:custom-shape draw:style-name="gr395" draw:text-style-name="P38" xml:id="id106" draw:id="id106" draw:layer="layout" svg:width="2.657cm" svg:height="1.202cm" draw:transform="skewX (0.00663225115757845) translate (2.685cm 8.08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 = src[0];</text:span></text:p>
          <text:p text:style-name="P37"><text:span text:style-name="T28">next_num = 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96" draw:text-style-name="P36" draw:layer="layout" svg:x1="6.808cm" svg:y1="11.964cm" svg:x2="5.85cm" svg:y2="11.947cm" draw:start-shape="id114" draw:start-glue-point="3" draw:end-shape="id112" draw:end-glue-point="7" svg:d="M6808 11964h-472v-17h-486" svg:viewBox="0 0 959 18">
          <text:p/>
        </draw:connector>
        <draw:frame draw:style-name="gr397" draw:text-style-name="P40" draw:layer="layout" svg:width="1.245cm" svg:height="0.601cm" svg:x="5.55cm" svg:y="10.618cm">
          <draw:text-box>
            <text:p text:style-name="P26"><text:span text:style-name="T28">[vero]</text:span></text:p>
          </draw:text-box>
        </draw:frame>
        <draw:frame draw:style-name="gr398" draw:text-style-name="P40" draw:layer="layout" svg:width="2.487cm" svg:height="0.545cm" svg:x="2.628cm" svg:y="12.122cm">
          <draw:text-box>
            <text:p text:style-name="P26"><text:span text:style-name="T28">[next_num &lt;</text:span><text:span text:style-name="T28"><text:line-break/></text:span><text:span text:style-name="T28"> next_space?]</text:span></text:p>
          </draw:text-box>
        </draw:frame>
        <draw:custom-shape draw:style-name="gr399" draw:text-style-name="P38" xml:id="id108" draw:id="id108" draw:layer="layout" svg:width="3.799cm" svg:height="0.949cm" draw:transform="skewX (0.00628318530717959) translate (9.029cm 14.986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dest_len]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0" draw:text-style-name="P36" draw:layer="layout" svg:x1="13.952cm" svg:y1="15.477cm" svg:x2="12.828cm" svg:y2="15.46cm" draw:start-shape="id110" draw:start-glue-point="3" draw:end-shape="id108" draw:end-glue-point="1" svg:d="M13952 15477h-563v-17h-561" svg:viewBox="0 0 1125 18">
          <text:p/>
        </draw:connector>
        <draw:custom-shape draw:style-name="gr401" draw:text-style-name="P43" xml:id="id113" draw:id="id113" draw:layer="layout" svg:width="1cm" svg:height="1cm" svg:x="12.424cm" svg:y="12.6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2" draw:text-style-name="P38" xml:id="id114" draw:id="id114" draw:layer="layout" svg:width="4.447cm" svg:height="1.126cm" draw:transform="skewX (0.00628318530717959) translate (6.815cm 11.40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pos = atoui(src[next_num] - 1);</text:span><text:span text:style-name="T28"><text:line-break/></text:span><text:span text:style-name="T28">dest[pos] = c;</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3" draw:text-style-name="P36" draw:layer="layout" svg:x1="9.067cm" svg:y1="10.53cm" svg:x2="9.038cm" svg:y2="11.401cm" draw:start-shape="id115" draw:start-glue-point="2" draw:end-shape="id114" draw:end-glue-point="0" svg:d="M9067 10530v436h-29v435" svg:viewBox="0 0 30 872">
          <text:p/>
        </draw:connector>
        <draw:custom-shape draw:style-name="gr404" draw:text-style-name="P43" xml:id="id112" draw:id="id112" draw:layer="layout" svg:width="1cm" svg:height="1cm" svg:x="4.85cm" svg:y="11.4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5" draw:text-style-name="P38" xml:id="id115" draw:id="id115" draw:layer="layout" svg:width="3.728cm" svg:height="1.019cm" draw:transform="skewX (0.00680678408277789) translate (7.21cm 9.5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ext_num += strchr</text:span><text:span text:style-name="T28"><text:line-break/></text:span><text:span text:style-name="T28">(src + next_num, '-')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06" draw:text-style-name="P36" draw:layer="layout" svg:x1="5.35cm" svg:y1="11.447cm" svg:x2="7.203cm" svg:y2="10.02cm" draw:start-shape="id112" draw:start-glue-point="4" draw:end-shape="id115" draw:end-glue-point="3" svg:d="M5350 11447v-1427h1853" svg:viewBox="0 0 1854 1428">
          <text:p/>
        </draw:connector>
        <draw:connector draw:style-name="gr407" draw:text-style-name="P36" draw:layer="layout" svg:x1="12.424cm" svg:y1="13.156cm" svg:x2="5.35cm" svg:y2="12.447cm" draw:start-shape="id113" draw:end-shape="id112" draw:end-glue-point="6" svg:d="M12424 13156h-7074v-709" svg:viewBox="0 0 7075 710">
          <text:p/>
        </draw:connector>
        <draw:frame draw:style-name="gr408" draw:text-style-name="P40" draw:layer="layout" svg:width="1.715cm" svg:height="0.601cm" svg:x="13.152cm" svg:y="12.555cm">
          <draw:text-box>
            <text:p text:style-name="P26"><text:span text:style-name="T28">[end loop]</text:span></text:p>
          </draw:text-box>
        </draw:frame>
        <draw:frame draw:style-name="gr409" draw:text-style-name="P82" draw:layer="layout" svg:width="18.237cm" svg:height="1.468cm" svg:x="1.538cm" svg:y="3.624cm">
          <draw:text-box>
            <text:p text:style-name="P69"><text:span text:style-name="T111">A questo punto si itera sulla stringa cifrata, e dividendola in porzioni diverse in base agli spazi, si inserisce il carattere all’inizio in ogni posizione descritta dagli interi che appaiono successivamente.</text:span></text:p>
          </draw:text-box>
        </draw:frame>
        <draw:frame draw:name="dictionary" draw:style-name="gr45" draw:text-style-name="P31" draw:layer="layout" svg:width="8.415cm" svg:height="0.543cm" svg:x="1.405cm" svg:y="15.727cm">
          <draw:text-box>
            <text:p text:style-name="P69"><text:span text:style-name="T56">dictionary:</text:span></text:p>
          </draw:text-box>
        </draw:frame>
        <draw:frame draw:style-name="gr410" draw:text-style-name="P82" draw:layer="layout" svg:width="18.237cm" svg:height="2.141cm" svg:x="1.539cm" svg:y="16.424cm">
          <draw:text-box>
            <text:p text:style-name="P69"><text:span text:style-name="T111">Equivale a chiamare </text:span><text:span text:style-name="T112"><text:a xlink:href="#str_map_alloc" xlink:type="simple">str_map_alloc</text:a></text:span><text:span text:style-name="T113"><text:s/>con (src, src_len, </text:span><text:span text:style-name="T112">dictionary_function</text:span><text:span text:style-name="T113">) come argomenti, quindi alloca una stringa e scrive in ogni indice il risultato della funzione applicata al carattere originale. La funzione viene chiamata sia in cifratura che decifrazione, in quanto equivale alla propria funzione inversa.</text:span></text:p>
          </draw:text-box>
        </draw:frame>
        <draw:frame draw:style-name="gr173" draw:text-style-name="P60" draw:layer="layout" svg:width="6.658cm" svg:height="1.789cm" svg:x="1.88cm" svg:y="18.671cm">
          <draw:image xlink:href="Pictures/10000001000001AC000000731F0ACCE0.png" xlink:type="simple" xlink:show="embed" xlink:actuate="onLoad" draw:mime-type="image/png">
            <text:p/>
          </draw:image>
        </draw:frame>
        <draw:frame draw:name="dictionary_function" draw:style-name="gr45" draw:text-style-name="P31" draw:layer="layout" svg:width="8.415cm" svg:height="0.543cm" svg:x="1.406cm" svg:y="22.628cm">
          <draw:text-box>
            <text:p text:style-name="P69"><text:span text:style-name="T56">dictionary_function:</text:span></text:p>
          </draw:text-box>
        </draw:frame>
        <draw:frame draw:style-name="gr173" draw:text-style-name="P60" draw:layer="layout" svg:width="18.454cm" svg:height="1.786cm" svg:x="1.36cm" svg:y="20.7cm">
          <draw:image xlink:href="Pictures/10000001000004A300000073D2B6E90F.png" xlink:type="simple" xlink:show="embed" xlink:actuate="onLoad" draw:mime-type="image/png">
            <text:p/>
          </draw:image>
        </draw:frame>
        <draw:g draw:style-name="gr48" xml:id="id117" draw:id="id117">
          <draw:path draw:style-name="gr411" draw:text-style-name="P34" draw:layer="layout" svg:width="0.5cm" svg:height="0.5cm" svg:x="2.043cm" svg:y="24.527cm" svg:viewBox="0 0 501 501" svg:d="M501 251c0 43-12 87-34 125s-53 69-91 91-82 34-125 34c-44 0-88-12-126-34s-69-53-91-91-34-82-34-125c0-44 12-88 34-126s53-69 91-91 82-34 126-34c43 0 87 12 125 34s69 53 91 91 34 82 34 126z">
            <text:p/>
          </draw:path>
          <draw:custom-shape draw:style-name="gr412" draw:text-style-name="P35" draw:layer="layout" svg:width="0.25cm" svg:height="0.25cm" svg:x="2.168cm" svg:y="24.652cm">
            <text:p/>
            <draw:enhanced-geometry svg:viewBox="0 0 21600 21600" draw:type="rectangle" draw:enhanced-path="M 0 0 L 21600 0 21600 21600 0 21600 0 0 Z N"/>
          </draw:custom-shape>
        </draw:g>
        <draw:connector draw:style-name="gr413" draw:text-style-name="P36" draw:layer="layout" svg:x1="3.528cm" svg:y1="25.928cm" svg:x2="2.544cm" svg:y2="24.777cm" draw:start-shape="id116" draw:start-glue-point="0" draw:end-shape="id117" draw:end-glue-point="1" svg:d="M3528 25928v-1151h-984" svg:viewBox="0 0 985 1152">
          <text:p/>
        </draw:connector>
        <draw:polygon draw:style-name="gr414" draw:text-style-name="P57" xml:id="id116" draw:id="id116" draw:layer="layout" svg:width="2.567cm" svg:height="1.422cm" svg:x="2.244cm" svg:y="25.928cm" svg:viewBox="0 0 2568 1423" draw:points="0,0 1604,0 1926,0 2567,0 2567,711 2568,712 2567,712 2567,1422 1926,1422 1926,1423 0,1423 642,712">
          <text:p text:style-name="P51"><text:span text:style-name="T28">In: char c</text:span></text:p>
        </draw:polygon>
        <draw:custom-shape draw:style-name="gr415" draw:text-style-name="P43" xml:id="id118" draw:id="id118" draw:layer="layout" svg:width="1cm" svg:height="1cm" svg:x="5.879cm" svg:y="26.122cm">
          <text:p/>
          <draw:enhanced-geometry svg:viewBox="0 0 21600 21600" draw:glue-points="10800 0 0 10800 10800 21600 21600 10800" draw:text-areas="5400 5400 16200 16200" draw:type="diamond" draw:enhanced-path="M 10800 0 L 21600 10800 10800 21600 0 10800 10800 0 Z N"/>
        </draw:custom-shape>
        <draw:connector draw:style-name="gr416" draw:text-style-name="P36" draw:layer="layout" svg:x1="5.879cm" svg:y1="26.622cm" svg:x2="4.812cm" svg:y2="26.639cm" draw:start-shape="id118" draw:start-glue-point="5" draw:end-shape="id116" draw:end-glue-point="1" svg:d="M5879 26622h-539v17h-528" svg:viewBox="0 0 1068 18">
          <text:p/>
        </draw:connector>
        <draw:custom-shape draw:style-name="gr417" draw:text-style-name="P43" xml:id="id119" draw:id="id119" draw:layer="layout" svg:width="1cm" svg:height="1cm" svg:x="13.549cm" svg:y="26.08cm">
          <text:p/>
          <draw:enhanced-geometry svg:viewBox="0 0 21600 21600" draw:glue-points="10800 0 0 10800 10800 21600 21600 10800" draw:text-areas="5400 5400 16200 16200" draw:type="diamond" draw:enhanced-path="M 10800 0 L 21600 10800 10800 21600 0 10800 10800 0 Z N"/>
        </draw:custom-shape>
        <draw:connector draw:style-name="gr418" draw:text-style-name="P36" draw:layer="layout" draw:line-skew="0.645cm" svg:x1="14.049cm" svg:y1="27.08cm" svg:x2="6.379cm" svg:y2="27.122cm" draw:start-shape="id119" draw:start-glue-point="6" draw:end-shape="id118" draw:end-glue-point="6" svg:d="M14049 27080v1226h-7670v-1184" svg:viewBox="0 0 7671 1227">
          <text:p/>
        </draw:connector>
        <draw:custom-shape draw:style-name="gr419" draw:text-style-name="P38" xml:id="id121" draw:id="id121" draw:layer="layout" svg:width="2.757cm" svg:height="0.974cm" svg:x="15.753cm" svg:y="26.09cm">
          <text:p text:style-name="P37"><text:span text:style-name="T28">Out: c</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20" draw:id="id120">
          <draw:path draw:style-name="gr420" draw:text-style-name="P46" draw:layer="layout" svg:width="0.5cm" svg:height="0.5cm" svg:x="19.301cm" svg:y="26.349cm" svg:viewBox="0 0 501 501" svg:d="M501 251c0 43-12 87-34 125s-53 69-91 91-82 34-125 34c-44 0-88-12-126-34s-69-53-91-91-34-82-34-125c0-44 12-88 34-126s53-69 91-91 82-34 126-34c43 0 87 12 125 34s69 53 91 91 34 82 34 126z">
            <text:p/>
          </draw:path>
          <draw:path draw:style-name="gr421" draw:text-style-name="P34" draw:layer="layout" svg:width="0.2cm" svg:height="0.2cm" svg:x="19.451cm" svg:y="26.499cm" svg:viewBox="0 0 201 201" svg:d="M201 101c0 17-5 34-13 50-9 15-22 28-37 37-16 8-33 13-50 13-18 0-35-5-51-13-15-9-28-22-37-37-8-16-13-33-13-50 0-18 5-35 13-51 9-15 22-28 37-37 16-8 33-13 51-13 17 0 34 5 50 13 15 9 28 22 37 37 8 16 13 33 13 51z">
            <text:p/>
          </draw:path>
        </draw:g>
        <draw:connector draw:style-name="gr422" draw:text-style-name="P36" draw:layer="layout" svg:x1="19.301cm" svg:y1="26.599cm" svg:x2="18.51cm" svg:y2="26.577cm" draw:start-shape="id120" draw:start-glue-point="3" draw:end-shape="id121" draw:end-glue-point="1" svg:d="M19301 26599h-395v-22h-396" svg:viewBox="0 0 792 23">
          <text:p/>
        </draw:connector>
        <draw:connector draw:style-name="gr423" draw:text-style-name="P36" draw:layer="layout" svg:x1="15.753cm" svg:y1="26.577cm" svg:x2="14.549cm" svg:y2="26.58cm" draw:start-shape="id121" draw:start-glue-point="3" draw:end-shape="id119" draw:end-glue-point="7" svg:d="M15753 26577h-596v3h-608" svg:viewBox="0 0 1205 4">
          <text:p/>
        </draw:connector>
        <draw:custom-shape draw:style-name="gr424" draw:text-style-name="P38" xml:id="id123" draw:id="id123" draw:layer="layout" svg:width="3.799cm" svg:height="1.353cm" draw:transform="skewX (0.00663225115757845) translate (8.03cm 25.91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minuscolo = c &amp; 32;</text:span></text:p>
          <text:p text:style-name="P37"><text:span text:style-name="T28">c = 'a' – (c | 32);</text:span></text:p>
          <text:p text:style-name="P37"><text:span text:style-name="T28">c = c ^ minuscol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5" draw:text-style-name="P38" xml:id="id122" draw:id="id122" draw:layer="layout" svg:width="3.799cm" svg:height="0.949cm" draw:transform="skewX (0.00628318530717959) translate (7.981cm 24.1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 = '9' – (c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26" draw:text-style-name="P36" draw:layer="layout" svg:x1="7.975cm" svg:y1="24.654cm" svg:x2="6.379cm" svg:y2="26.122cm" draw:start-shape="id122" draw:start-glue-point="3" draw:end-shape="id118" draw:end-glue-point="4" svg:d="M7975 24654h-1596v1468" svg:viewBox="0 0 1597 1469">
          <text:p/>
        </draw:connector>
        <draw:connector draw:style-name="gr427" draw:text-style-name="P36" draw:layer="layout" svg:x1="14.049cm" svg:y1="26.08cm" svg:x2="11.78cm" svg:y2="24.654cm" draw:start-shape="id119" draw:start-glue-point="4" draw:end-shape="id122" draw:end-glue-point="1" svg:d="M14049 26080v-1426h-2269" svg:viewBox="0 0 2270 1427">
          <text:p/>
        </draw:connector>
        <draw:connector draw:style-name="gr428" draw:text-style-name="P36" draw:layer="layout" svg:x1="8.021cm" svg:y1="26.595cm" svg:x2="6.879cm" svg:y2="26.622cm" draw:start-shape="id123" draw:start-glue-point="3" draw:end-shape="id118" draw:end-glue-point="7" svg:d="M8021 26595h-564v27h-578" svg:viewBox="0 0 1143 28">
          <text:p/>
        </draw:connector>
        <draw:connector draw:style-name="gr429" draw:text-style-name="P36" draw:layer="layout" svg:x1="13.549cm" svg:y1="26.58cm" svg:x2="11.829cm" svg:y2="26.595cm" draw:start-shape="id119" draw:start-glue-point="5" draw:end-shape="id123" draw:end-glue-point="1" svg:d="M13549 26580h-866v15h-854" svg:viewBox="0 0 1721 16">
          <text:p/>
        </draw:connector>
        <draw:frame draw:style-name="gr409" draw:text-style-name="P82" draw:layer="layout" svg:width="18.237cm" svg:height="1.468cm" svg:x="1.54cm" svg:y="23.324cm">
          <draw:text-box>
            <text:p text:style-name="P69"><text:span text:style-name="T111">Applica la funzione dizionario a un signolo crattere.</text:span></text:p>
          </draw:text-box>
        </draw:frame>
        <draw:frame draw:style-name="gr430" draw:text-style-name="P40" draw:layer="layout" svg:width="2.558cm" svg:height="0.601cm" svg:x="6.512cm" svg:y="27.743cm">
          <draw:text-box>
            <text:p text:style-name="P26"><text:span text:style-name="T28">[altrimenti]</text:span></text:p>
          </draw:text-box>
        </draw:frame>
        <draw:frame draw:style-name="gr431" draw:text-style-name="P40" draw:layer="layout" svg:width="2.558cm" svg:height="0.601cm" svg:x="5.174cm" svg:y="24.163cm">
          <draw:text-box>
            <text:p text:style-name="P26"><text:span text:style-name="T28">['0' &lt; = 'c' &lt;= '9']</text:span></text:p>
          </draw:text-box>
        </draw:frame>
        <draw:frame draw:style-name="gr432" draw:text-style-name="P40" draw:layer="layout" svg:width="2.623cm" svg:height="0.601cm" svg:x="6.651cm" svg:y="25.318cm">
          <draw:text-box>
            <text:p text:style-name="P26"><text:span text:style-name="T28">['A' &lt; = c &lt;= 'Z'] ||</text:span><text:span text:style-name="T28"><text:line-break/></text:span><text:span text:style-name="T28">[‘a’ &lt;= c &lt;= ‘z’]</text:span></text:p>
          </draw:text-box>
        </draw:frame>
      </draw:page>
      <draw:page draw:name="page11" draw:style-name="dp1" draw:master-page-name="master-page79">
        <draw:frame draw:name="inversion" draw:style-name="gr45" draw:text-style-name="P31" draw:layer="layout" svg:width="8.415cm" svg:height="0.543cm" svg:x="1.404cm" svg:y="2.826cm">
          <draw:text-box>
            <text:p text:style-name="P69"><text:span text:style-name="T56">Inversion:</text:span></text:p>
          </draw:text-box>
        </draw:frame>
        <draw:frame draw:style-name="gr15" draw:text-style-name="P15" draw:layer="layout" svg:width="0.943cm" svg:height="0.642cm" svg:x="1.478cm" svg:y="28.055cm">
          <draw:text-box>
            <text:p text:style-name="P1"><text:span text:style-name="T16">11</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25" draw:id="id125">
          <draw:path draw:style-name="gr433" draw:text-style-name="P34" draw:layer="layout" svg:width="0.5cm" svg:height="0.5cm" svg:x="2.3cm" svg:y="5.402cm" svg:viewBox="0 0 501 501" svg:d="M501 251c0 43-12 87-34 125s-53 69-91 91-82 34-125 34c-44 0-88-12-126-34s-69-53-91-91-34-82-34-125c0-44 12-88 34-126s53-69 91-91 82-34 126-34c43 0 87 12 125 34s69 53 91 91 34 82 34 126z">
            <text:p/>
          </draw:path>
          <draw:custom-shape draw:style-name="gr434" draw:text-style-name="P35" draw:layer="layout" svg:width="0.25cm" svg:height="0.25cm" svg:x="2.425cm" svg:y="5.527cm">
            <text:p/>
            <draw:enhanced-geometry svg:viewBox="0 0 21600 21600" draw:type="rectangle" draw:enhanced-path="M 0 0 L 21600 0 21600 21600 0 21600 0 0 Z N"/>
          </draw:custom-shape>
        </draw:g>
        <draw:connector draw:style-name="gr435" draw:text-style-name="P56" draw:layer="layout" svg:x1="4.044cm" svg:y1="5.638cm" svg:x2="2.801cm" svg:y2="5.652cm" draw:start-shape="id124" draw:start-glue-point="3" draw:end-shape="id125" draw:end-glue-point="1" svg:d="M4044 5638h-628v14h-615" svg:viewBox="0 0 1244 15">
          <text:p/>
        </draw:connector>
        <draw:polygon draw:style-name="gr436" draw:text-style-name="P57" xml:id="id124" draw:id="id124" draw:layer="layout" svg:width="2.567cm" svg:height="1.422cm" svg:x="4.044cm" svg:y="4.927cm" svg:viewBox="0 0 2568 1423" draw:points="0,0 1604,0 1926,0 2567,0 2567,711 2568,712 2567,712 2567,1422 1926,1422 1926,1423 0,1423 642,712">
          <text:p text:style-name="P51"><text:span text:style-name="T28">In: src, </text:span></text:p>
          <text:p text:style-name="P51"><text:span text:style-name="T109">src_len</text:span></text:p>
        </draw:polygon>
        <draw:custom-shape draw:style-name="gr437" draw:text-style-name="P38" xml:id="id126" draw:id="id126" draw:layer="layout" svg:width="5.062cm" svg:height="1.043cm" draw:transform="skewX (0.00663225115757845) translate (8.429cm 5.13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 = 0;</text:span></text:p>
          <text:p text:style-name="P37"><text:span text:style-name="T28">dest = malloc(src_len + 1);</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38" draw:text-style-name="P36" draw:layer="layout" svg:x1="8.422cm" svg:y1="5.656cm" svg:x2="6.612cm" svg:y2="5.638cm" draw:start-shape="id126" draw:start-glue-point="3" draw:end-shape="id124" draw:end-glue-point="1" svg:d="M8422 5656h-904v-18h-906" svg:viewBox="0 0 1811 19">
          <text:p/>
        </draw:connector>
        <draw:custom-shape draw:style-name="gr439" draw:text-style-name="P43" xml:id="id127" draw:id="id127" draw:layer="layout" svg:width="1cm" svg:height="1cm" svg:x="10.438cm" svg:y="7.228cm">
          <text:p/>
          <draw:enhanced-geometry svg:viewBox="0 0 21600 21600" draw:glue-points="10800 0 0 10800 10800 21600 21600 10800" draw:text-areas="5400 5400 16200 16200" draw:type="diamond" draw:enhanced-path="M 10800 0 L 21600 10800 10800 21600 0 10800 10800 0 Z N"/>
        </draw:custom-shape>
        <draw:g draw:style-name="gr19">
          <draw:custom-shape draw:style-name="gr440" draw:text-style-name="P41" draw:layer="layout" svg:width="14.773cm" svg:height="4.092cm" svg:x="3.307cm" svg:y="6.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41" draw:text-style-name="P42" draw:layer="layout" svg:width="2.544cm" svg:height="0.614cm" svg:x="3.307cm" svg:y="6.895cm">
            <text:p text:style-name="P37"><text:span text:style-name="T28">inversion_loop</text:span></text:p>
            <draw:enhanced-geometry svg:viewBox="0 0 21600 21600" draw:mirror-horizontal="false" draw:mirror-vertical="false" draw:type="non-primitve" draw:enhanced-path="M 0 0 L 21600 0 19000 21600 0 21600 0 0 Z N"/>
          </draw:custom-shape>
        </draw:g>
        <draw:connector draw:style-name="gr442" draw:text-style-name="P36" draw:layer="layout" svg:x1="10.938cm" svg:y1="7.228cm" svg:x2="10.953cm" svg:y2="6.178cm" draw:start-shape="id127" draw:start-glue-point="4" draw:end-shape="id126" draw:end-glue-point="2" svg:d="M10938 7228v-530h15v-520" svg:viewBox="0 0 16 1051">
          <text:p/>
        </draw:connector>
        <draw:custom-shape draw:style-name="gr443" draw:text-style-name="P43" xml:id="id129" draw:id="id129" draw:layer="layout" svg:width="1cm" svg:height="1cm" svg:x="10.438cm" svg:y="9.928cm">
          <text:p/>
          <draw:enhanced-geometry svg:viewBox="0 0 21600 21600" draw:glue-points="10800 0 0 10800 10800 21600 21600 10800" draw:text-areas="5400 5400 16200 16200" draw:type="diamond" draw:enhanced-path="M 10800 0 L 21600 10800 10800 21600 0 10800 10800 0 Z N"/>
        </draw:custom-shape>
        <draw:frame draw:style-name="gr444" draw:text-style-name="P81" draw:layer="layout" svg:width="1.245cm" svg:height="0.601cm" svg:x="12.116cm" svg:y="7.278cm">
          <draw:text-box>
            <text:p text:style-name="P26"><text:span text:style-name="T110">[falso]</text:span></text:p>
          </draw:text-box>
        </draw:frame>
        <draw:connector draw:style-name="gr445" draw:text-style-name="P36" draw:layer="layout" svg:x1="6.412cm" svg:y1="8.878cm" svg:x2="10.438cm" svg:y2="7.728cm" draw:start-shape="id128" draw:start-glue-point="0" draw:end-shape="id127" draw:end-glue-point="5" svg:d="M6412 8878v-1150h4026" svg:viewBox="0 0 4027 1151">
          <text:p/>
        </draw:connector>
        <draw:frame draw:style-name="gr446" draw:text-style-name="P40" draw:layer="layout" svg:width="2.558cm" svg:height="0.601cm" svg:x="8.973cm" svg:y="6.795cm">
          <draw:text-box>
            <text:p text:style-name="P26"><text:span text:style-name="T28">[i &lt; src_len]</text:span></text:p>
          </draw:text-box>
        </draw:frame>
        <draw:frame draw:style-name="gr447" draw:text-style-name="P40" draw:layer="layout" svg:width="1.197cm" svg:height="0.668cm" svg:x="9.367cm" svg:y="7.728cm">
          <draw:text-box>
            <text:p text:style-name="P26"><text:span text:style-name="T28">[vero]</text:span></text:p>
          </draw:text-box>
        </draw:frame>
        <draw:connector draw:style-name="gr448" draw:text-style-name="P36" draw:layer="layout" draw:line-skew="4.623cm" svg:x1="11.438cm" svg:y1="10.428cm" svg:x2="11.438cm" svg:y2="7.728cm" draw:start-shape="id129" draw:start-glue-point="7" draw:end-shape="id127" draw:end-glue-point="7" svg:d="M11438 10428h5162v-2700h-5162" svg:viewBox="0 0 5163 2701">
          <text:p/>
        </draw:connector>
        <draw:connector draw:style-name="gr449" draw:text-style-name="P36" draw:layer="layout" svg:x1="10.928cm" svg:y1="11.686cm" svg:x2="10.938cm" svg:y2="10.928cm" draw:start-shape="id130" draw:start-glue-point="0" draw:end-shape="id129" draw:end-glue-point="6" svg:d="M10928 11686v-373h10v-385" svg:viewBox="0 0 11 759">
          <text:p/>
        </draw:connector>
        <draw:frame draw:style-name="gr450" draw:text-style-name="P40" draw:layer="layout" svg:width="1.715cm" svg:height="0.601cm" svg:x="8.837cm" svg:y="10.386cm">
          <draw:text-box>
            <text:p text:style-name="P26"><text:span text:style-name="T28">[end loop]</text:span></text:p>
          </draw:text-box>
        </draw:frame>
        <draw:custom-shape draw:style-name="gr451" draw:text-style-name="P38" xml:id="id132" draw:id="id132" draw:layer="layout" svg:width="2.757cm" svg:height="0.974cm" svg:x="13.952cm" svg:y="11.69cm">
          <text:p text:style-name="P37"><text:span text:style-name="T28">Out: dest,</text:span></text:p>
          <text:p text:style-name="P37"><text:span text:style-name="T28">src_len</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31" draw:id="id131">
          <draw:path draw:style-name="gr452" draw:text-style-name="P46" draw:layer="layout" svg:width="0.5cm" svg:height="0.5cm" svg:x="17.5cm" svg:y="11.949cm" svg:viewBox="0 0 501 501" svg:d="M501 251c0 43-12 87-34 125s-53 69-91 91-82 34-125 34c-44 0-88-12-126-34s-69-53-91-91-34-82-34-125c0-44 12-88 34-126s53-69 91-91 82-34 126-34c43 0 87 12 125 34s69 53 91 91 34 82 34 126z">
            <text:p/>
          </draw:path>
          <draw:path draw:style-name="gr453" draw:text-style-name="P34" draw:layer="layout" svg:width="0.2cm" svg:height="0.2cm" svg:x="17.65cm" svg:y="12.099cm" svg:viewBox="0 0 201 201" svg:d="M201 101c0 17-5 34-13 50-9 15-22 28-37 37-16 8-33 13-50 13-18 0-35-5-51-13-15-9-28-22-37-37-8-16-13-33-13-50 0-18 5-35 13-51 9-15 22-28 37-37 16-8 33-13 51-13 17 0 34 5 50 13 15 9 28 22 37 37 8 16 13 33 13 51z">
            <text:p/>
          </draw:path>
        </draw:g>
        <draw:connector draw:style-name="gr454" draw:text-style-name="P36" draw:layer="layout" svg:x1="17.5cm" svg:y1="12.199cm" svg:x2="16.709cm" svg:y2="12.177cm" draw:start-shape="id131" draw:start-glue-point="3" draw:end-shape="id132" draw:end-glue-point="1" svg:d="M17500 12199h-395v-22h-396" svg:viewBox="0 0 792 23">
          <text:p/>
        </draw:connector>
        <draw:custom-shape draw:style-name="gr455" draw:text-style-name="P38" xml:id="id133" draw:id="id133" draw:layer="layout" svg:width="1.698cm" svg:height="0.673cm" draw:transform="skewX (0.00593411945678072) translate (14.421cm 8.04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56" draw:text-style-name="P36" draw:layer="layout" draw:line-skew="-0.39cm" svg:x1="10.938cm" svg:y1="8.228cm" svg:x2="14.417cm" svg:y2="8.377cm" draw:start-shape="id127" draw:start-glue-point="6" draw:end-shape="id133" draw:end-glue-point="3" svg:d="M10938 8228v149h1996 1483" svg:viewBox="0 0 3480 150">
          <text:p/>
        </draw:connector>
        <draw:connector draw:style-name="gr457" draw:text-style-name="P36" draw:layer="layout" svg:x1="15.266cm" svg:y1="8.714cm" svg:x2="8.436cm" svg:y2="9.479cm" draw:start-shape="id133" draw:start-glue-point="2" draw:end-shape="id128" draw:end-glue-point="1" svg:d="M15266 8714v765h-6830" svg:viewBox="0 0 6831 766">
          <text:p/>
        </draw:connector>
        <draw:custom-shape draw:style-name="gr458" draw:text-style-name="P38" xml:id="id128" draw:id="id128" draw:layer="layout" svg:width="4.048cm" svg:height="1.202cm" draw:transform="skewX (0.00663225115757845) translate (4.388cm 8.87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src_len – i – 1] = src[i];</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9" draw:text-style-name="P38" xml:id="id130" draw:id="id130" draw:layer="layout" svg:width="3.799cm" svg:height="0.949cm" draw:transform="skewX (0.00628318530717959) translate (9.029cm 11.686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dest[src_len] = 0;</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60" draw:text-style-name="P36" draw:layer="layout" svg:x1="13.952cm" svg:y1="12.177cm" svg:x2="12.828cm" svg:y2="12.16cm" draw:start-shape="id132" draw:start-glue-point="3" draw:end-shape="id130" draw:end-glue-point="1" svg:d="M13952 12177h-563v-17h-561" svg:viewBox="0 0 1125 18">
          <text:p/>
        </draw:connector>
        <draw:frame draw:style-name="gr197" draw:text-style-name="P82" draw:layer="layout" svg:width="18.237cm" svg:height="1.071cm" svg:x="1.538cm" svg:y="3.624cm">
          <draw:text-box>
            <text:p text:style-name="P69"><text:span text:style-name="T111">Si itera sulla stringa originale, copiando i caratteri dall’ultima posizione alla prima. Anche qui la procedura di ciratura e decifrazione si equivalgono.</text:span></text:p>
          </draw:text-box>
        </draw:frame>
        <draw:frame draw:name="inversion 1" draw:style-name="gr45" draw:text-style-name="P31" draw:layer="layout" svg:width="8.415cm" svg:height="0.543cm" svg:x="1.405cm" svg:y="12.627cm">
          <draw:text-box>
            <text:p text:style-name="P69"><text:span text:style-name="T56">Malloc:</text:span></text:p>
          </draw:text-box>
        </draw:frame>
        <draw:frame draw:style-name="gr197" draw:text-style-name="P82" draw:layer="layout" svg:width="18.237cm" svg:height="14.446cm" svg:x="1.539cm" svg:y="13.225cm">
          <draw:text-box>
            <text:p text:style-name="P69"><text:span text:style-name="T114">Procedura utilizzata per allocare memoria dinamicamente dallo heap. In questa semplice implementazione si fa uso delle strutture </text:span><text:span text:style-name="T115"><text:a xlink:href="#heap_chunk" xlink:type="simple">heap_chunk</text:a></text:span><text:span text:style-name="T116">, che permettono di spartire la memoria della sezione </text:span><text:span text:style-name="T117">bss </text:span><text:span text:style-name="T116">del programma, insieme ad un valore intero nella sezione data che indica il numero totale di byte disponibile, il programma inizia con 1024 byte.</text:span><text:span text:style-name="T116"><text:line-break/></text:span><text:span text:style-name="T116">Quando si chiama </text:span><text:span text:style-name="T118">malloc</text:span><text:span text:style-name="T116">, prima si controlla che la richiesta sia un intero positivo, poi che lo heap sia stato inizializzato, ovvero che sia stato creato il primo chunk, dopo si aggiorna la globale </text:span><text:span text:style-name="T117">request_size</text:span><text:span text:style-name="T116"> raddoppiandola finch</text:span><text:span text:style-name="T119">é non eccede la richiesta corrente</text:span><text:span text:style-name="T116">, e si ricerca la zona di memoria libera pi</text:span><text:span text:style-name="T119">ù piccola che può contenere la richiesta per selezionarla.</text:span><text:span text:style-name="T119"><text:line-break/></text:span><text:span text:style-name="T119">A questo punto se il programma non ha abbastanza memoria viene effettuata una chiamata a brk, che estende la sezione </text:span><text:span text:style-name="T120">bss</text:span><text:span text:style-name="T119"> di </text:span><text:span text:style-name="T121">request_size</text:span><text:span text:style-name="T122"> </text:span><text:span text:style-name="T123">byte, e crea una nuova porzione che li contiene, la quale viene unita con la porizione precedente se libera, quest’ultima porzione viene selezionata.</text:span><text:span text:style-name="T123"><text:line-break/></text:span><text:span text:style-name="T123">Una volta selezionata una porzione adatta, se eccede di almeno 16 byte la grandezza richiesta, si divide la porzione in una dalla grandezza specificata, arrotondata al prossimo multiplo di 4, e una porzione libera.</text:span><text:span text:style-name="T123"><text:line-break/></text:span><text:span text:style-name="T123">Nei primi 12 byte si scrive l’indirizzo del blocco precedente, uno per indicare che il blocco </text:span><text:span text:style-name="T124">è occupato, e infine la quantit</text:span><text:span text:style-name="T125">à</text:span><text:span text:style-name="T123"> di byte utilizzabili, per poi ritornare l’indirizzo del 12esimo byte, dove iniza la zona di memoria richiesta.</text:span><text:span text:style-name="T123"><text:line-break/></text:span><text:span text:style-name="T123"><text:line-break/></text:span><text:span text:style-name="T123">Ci sono infiniti modi di scrivere un sistema per allocare memoria dinamicamente, con i propri pro e contro, io volevo implementare un metodo semplice e intuitivo con abbastanza flessibilit</text:span><text:span text:style-name="T125">à</text:span><text:span text:style-name="T123">, originariamente questo sistema l’avevo ideato come progetto personale, ma ho deciso di adattarlo al progetto del cifrario.</text:span><text:span text:style-name="T123"><text:line-break/></text:span><text:span text:style-name="T123">Questo approccio spreca relativamente abbastanza memoria per le piccole allocazioni, dato che ogni allocazione usa 12 byte per l'header della porzione, ma impiega pochi calcoli per richiesta pur offrendo abbastanza flessibilit</text:span><text:span text:style-name="T125">à</text:span><text:span text:style-name="T123">, per ovviare al problema si pu</text:span><text:span text:style-name="T125">ò</text:span><text:span text:style-name="T123"> richiedere tanta memoria per raggruppare diversi oggetti piccoli usando una </text:span><text:span text:style-name="T126"><text:a xlink:href="#mem_arena" xlink:type="simple">mem_arena</text:a></text:span><text:span text:style-name="T123">, o bump allocator, che sfrutta un sistema pi</text:span><text:span text:style-name="T125">ù</text:span><text:span text:style-name="T123"> rudimentale e meno flessibile, pur essendo efficace.</text:span></text:p>
          </draw:text-box>
        </draw:frame>
      </draw:page>
      <draw:page draw:name="page12" draw:style-name="dp1" draw:master-page-name="master-page79">
        <draw:frame draw:name="logica di malloc" draw:style-name="gr45" draw:text-style-name="P31" draw:layer="layout" svg:width="8.415cm" svg:height="0.543cm" svg:x="1.504cm" svg:y="2.826cm">
          <draw:text-box>
            <text:p text:style-name="P69"><text:span text:style-name="T56">Logica di malloc:</text:span></text:p>
          </draw:text-box>
        </draw:frame>
        <draw:frame draw:style-name="gr15" draw:text-style-name="P15" draw:layer="layout" svg:width="0.943cm" svg:height="0.642cm" svg:x="1.478cm" svg:y="28.055cm">
          <draw:text-box>
            <text:p text:style-name="P1"><text:span text:style-name="T16">12</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35" draw:id="id135">
          <draw:path draw:style-name="gr461" draw:text-style-name="P34" draw:layer="layout" svg:width="0.5cm" svg:height="0.5cm" svg:x="2.3cm" svg:y="4.202cm" svg:viewBox="0 0 501 501" svg:d="M501 251c0 43-12 87-34 125s-53 69-91 91-82 34-125 34c-44 0-88-12-126-34s-69-53-91-91-34-82-34-125c0-44 12-88 34-126s53-69 91-91 82-34 126-34c43 0 87 12 125 34s69 53 91 91 34 82 34 126z">
            <text:p/>
          </draw:path>
          <draw:custom-shape draw:style-name="gr462" draw:text-style-name="P35" draw:layer="layout" svg:width="0.25cm" svg:height="0.25cm" svg:x="2.425cm" svg:y="4.327cm">
            <text:p/>
            <draw:enhanced-geometry svg:viewBox="0 0 21600 21600" draw:type="rectangle" draw:enhanced-path="M 0 0 L 21600 0 21600 21600 0 21600 0 0 Z N"/>
          </draw:custom-shape>
        </draw:g>
        <draw:connector draw:style-name="gr463" draw:text-style-name="P56" draw:layer="layout" svg:x1="4.044cm" svg:y1="4.438cm" svg:x2="2.801cm" svg:y2="4.452cm" draw:start-shape="id134" draw:start-glue-point="3" draw:end-shape="id135" draw:end-glue-point="1" svg:d="M4044 4438h-628v14h-615" svg:viewBox="0 0 1244 15">
          <text:p/>
        </draw:connector>
        <draw:polygon draw:style-name="gr464" draw:text-style-name="P57" xml:id="id134" draw:id="id134" draw:layer="layout" svg:width="3.064cm" svg:height="1.422cm" svg:x="4.044cm" svg:y="3.727cm" svg:viewBox="0 0 3065 1423" draw:points="0,0 1914,0 2299,0 3064,0 3064,711 3065,712 3064,712 3064,1422 2299,1422 2299,1423 0,1423 766,712">
          <text:p text:style-name="P51"><text:span text:style-name="T28">In: </text:span><text:span text:style-name="T28"><text:line-break/></text:span><text:span text:style-name="T28">int request</text:span></text:p>
        </draw:polygon>
        <draw:connector draw:style-name="gr465" draw:text-style-name="P36" draw:layer="layout" svg:x1="10.438cm" svg:y1="4.428cm" svg:x2="7.109cm" svg:y2="4.438cm" draw:start-shape="id136" draw:start-glue-point="5" draw:end-shape="id134" draw:end-glue-point="1" svg:d="M10438 4428h-1670v10h-1659" svg:viewBox="0 0 3330 11">
          <text:p/>
        </draw:connector>
        <draw:custom-shape draw:style-name="gr466" draw:text-style-name="P43" xml:id="id137" draw:id="id137" draw:layer="layout" svg:width="1cm" svg:height="1cm" svg:x="10.438cm" svg:y="5.928cm">
          <text:p/>
          <draw:enhanced-geometry svg:viewBox="0 0 21600 21600" draw:glue-points="10800 0 0 10800 10800 21600 21600 10800" draw:text-areas="5400 5400 16200 16200" draw:type="diamond" draw:enhanced-path="M 10800 0 L 21600 10800 10800 21600 0 10800 10800 0 Z N"/>
        </draw:custom-shape>
        <draw:connector draw:style-name="gr467" draw:text-style-name="P36" draw:layer="layout" svg:x1="10.938cm" svg:y1="5.928cm" svg:x2="10.938cm" svg:y2="4.928cm" draw:start-shape="id137" draw:start-glue-point="4" draw:end-shape="id136" draw:end-glue-point="6" svg:d="M10938 5928v-1000" svg:viewBox="0 0 1 1001">
          <text:p/>
        </draw:connector>
        <draw:custom-shape draw:style-name="gr468" draw:text-style-name="P43" xml:id="id140" draw:id="id140" draw:layer="layout" svg:width="1cm" svg:height="1cm" svg:x="10.464cm" svg:y="11.965cm">
          <text:p/>
          <draw:enhanced-geometry svg:viewBox="0 0 21600 21600" draw:glue-points="10800 0 0 10800 10800 21600 21600 10800" draw:text-areas="5400 5400 16200 16200" draw:type="diamond" draw:enhanced-path="M 10800 0 L 21600 10800 10800 21600 0 10800 10800 0 Z N"/>
        </draw:custom-shape>
        <draw:frame draw:style-name="gr469" draw:text-style-name="P81" draw:layer="layout" svg:width="1.245cm" svg:height="0.601cm" svg:x="11.544cm" svg:y="5.919cm">
          <draw:text-box>
            <text:p text:style-name="P26"><text:span text:style-name="T110">[falso]</text:span></text:p>
          </draw:text-box>
        </draw:frame>
        <draw:connector draw:style-name="gr470" draw:text-style-name="P36" draw:layer="layout" svg:x1="13.154cm" svg:y1="6.394cm" svg:x2="11.438cm" svg:y2="6.428cm" draw:start-shape="id138" draw:start-glue-point="3" draw:end-shape="id137" draw:end-glue-point="7" svg:d="M13154 6394h-851v34h-865" svg:viewBox="0 0 1717 35">
          <text:p/>
        </draw:connector>
        <draw:frame draw:style-name="gr471" draw:text-style-name="P40" draw:layer="layout" svg:width="3.635cm" svg:height="0.601cm" svg:x="6.926cm" svg:y="5.814cm">
          <draw:text-box>
            <text:p text:style-name="P26"><text:span text:style-name="T28">[request_size &gt;= request]</text:span></text:p>
          </draw:text-box>
        </draw:frame>
        <draw:frame draw:style-name="gr472" draw:text-style-name="P40" draw:layer="layout" svg:width="1.197cm" svg:height="0.668cm" svg:x="10.846cm" svg:y="6.797cm">
          <draw:text-box>
            <text:p text:style-name="P26"><text:span text:style-name="T28">[vero]</text:span></text:p>
          </draw:text-box>
        </draw:frame>
        <draw:connector draw:style-name="gr473" draw:text-style-name="P36" draw:layer="layout" svg:x1="10.945cm" svg:y1="7.505cm" svg:x2="10.938cm" svg:y2="6.928cm" draw:start-shape="id139" draw:start-glue-point="4" draw:end-shape="id137" draw:end-glue-point="6" svg:d="M10945 7505v-288h-7v-289" svg:viewBox="0 0 8 578">
          <text:p/>
        </draw:connector>
        <draw:connector draw:style-name="gr474" draw:text-style-name="P36" draw:layer="layout" svg:x1="10.964cm" svg:y1="11.965cm" svg:x2="10.962cm" svg:y2="11.044cm" draw:start-shape="id140" draw:start-glue-point="4" draw:end-shape="id141" draw:end-glue-point="2" svg:d="M10964 11965v-465h-2v-456" svg:viewBox="0 0 3 922">
          <text:p/>
        </draw:connector>
        <draw:custom-shape draw:style-name="gr475" draw:text-style-name="P38" xml:id="id143" draw:id="id143" draw:layer="layout" svg:width="2.757cm" svg:height="0.974cm" svg:x="9.608cm" svg:y="16.742cm">
          <text:p text:style-name="P37"><text:span text:style-name="T28">Out: mem_ptr</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42" draw:id="id142">
          <draw:path draw:style-name="gr476" draw:text-style-name="P46" draw:layer="layout" svg:width="0.5cm" svg:height="0.5cm" svg:x="13.8cm" svg:y="16.949cm" svg:viewBox="0 0 501 501" svg:d="M501 251c0 43-12 87-34 125s-53 69-91 91-82 34-125 34c-44 0-88-12-126-34s-69-53-91-91-34-82-34-125c0-44 12-88 34-126s53-69 91-91 82-34 126-34c43 0 87 12 125 34s69 53 91 91 34 82 34 126z">
            <text:p/>
          </draw:path>
          <draw:path draw:style-name="gr477" draw:text-style-name="P34" draw:layer="layout" svg:width="0.2cm" svg:height="0.2cm" svg:x="13.95cm" svg:y="17.099cm" svg:viewBox="0 0 201 201" svg:d="M201 101c0 17-5 34-13 50-9 15-22 28-37 37-16 8-33 13-50 13-18 0-35-5-51-13-15-9-28-22-37-37-8-16-13-33-13-50 0-18 5-35 13-51 9-15 22-28 37-37 16-8 33-13 51-13 17 0 34 5 50 13 15 9 28 22 37 37 8 16 13 33 13 51z">
            <text:p/>
          </draw:path>
        </draw:g>
        <draw:connector draw:style-name="gr478" draw:text-style-name="P36" draw:layer="layout" svg:x1="13.8cm" svg:y1="17.199cm" svg:x2="12.365cm" svg:y2="17.229cm" draw:start-shape="id142" draw:start-glue-point="3" draw:end-shape="id143" draw:end-glue-point="1" svg:d="M13800 17199h-717v30h-718" svg:viewBox="0 0 1436 31">
          <text:p/>
        </draw:connector>
        <draw:connector draw:style-name="gr479" draw:text-style-name="P36" draw:layer="layout" svg:x1="10.975cm" svg:y1="5.311cm" svg:x2="14.631cm" svg:y2="6.049cm" draw:end-shape="id138" draw:end-glue-point="0" svg:d="M10975 5311v105h3656v633" svg:viewBox="0 0 3657 739">
          <text:p/>
        </draw:connector>
        <draw:custom-shape draw:style-name="gr480" draw:text-style-name="P38" xml:id="id138" draw:id="id138" draw:layer="layout" svg:width="2.945cm" svg:height="0.691cm" draw:transform="skewX (0.00663225115757845) translate (13.159cm 6.049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request_size *= 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1" draw:text-style-name="P38" xml:id="id144" draw:id="id144" draw:layer="layout" svg:width="5.583cm" svg:height="2.379cm" draw:transform="skewX (0.00628318530717959) translate (8.178cm 13.65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7">chunk_scelto</text:span><text:span text:style-name="T28"> = </text:span><text:span text:style-name="T29">split_chunk</text:span><text:span text:style-name="T28">(</text:span><text:span text:style-name="T127">chunk_scelto</text:span><text:span text:style-name="T28">, request);</text:span></text:p>
          <text:p text:style-name="P37"><text:span text:style-name="T28"/></text:p>
          <text:p text:style-name="P37"><text:span text:style-name="T127">chunk_scelto.occupied</text:span><text:span text:style-name="T28"> = vero;</text:span><text:span text:style-name="T28"><text:line-break/></text:span><text:span text:style-name="T28"/></text:p>
          <text:p text:style-name="P37"><text:span text:style-name="T28">mem_ptr = </text:span><text:span text:style-name="T127">chunk_scelto</text:span><text:span text:style-name="T28">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82" draw:text-style-name="P36" draw:layer="layout" svg:x1="10.986cm" svg:y1="16.742cm" svg:x2="10.954cm" svg:y2="16.037cm" draw:start-shape="id143" draw:start-glue-point="0" draw:end-shape="id144" draw:end-glue-point="2" svg:d="M10986 16742v-352h-32v-353" svg:viewBox="0 0 33 706">
          <text:p/>
        </draw:connector>
        <draw:custom-shape draw:style-name="gr483" draw:text-style-name="P43" xml:id="id136" draw:id="id136" draw:layer="layout" svg:width="1cm" svg:height="1cm" svg:x="10.438cm" svg:y="3.9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38" xml:id="id146" draw:id="id146" draw:layer="layout" svg:width="2.757cm" svg:height="0.974cm" svg:x="15.653cm" svg:y="3.99cm">
          <text:p text:style-name="P37"><text:span text:style-name="T28">Out: null ptr</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45" draw:id="id145">
          <draw:path draw:style-name="gr485" draw:text-style-name="P46" draw:layer="layout" svg:width="0.5cm" svg:height="0.5cm" svg:x="19.401cm" svg:y="4.249cm" svg:viewBox="0 0 501 501" svg:d="M501 251c0 43-12 87-34 125s-53 69-91 91-82 34-125 34c-44 0-88-12-126-34s-69-53-91-91-34-82-34-125c0-44 12-88 34-126s53-69 91-91 82-34 126-34c43 0 87 12 125 34s69 53 91 91 34 82 34 126z">
            <text:p/>
          </draw:path>
          <draw:path draw:style-name="gr486" draw:text-style-name="P34" draw:layer="layout" svg:width="0.2cm" svg:height="0.2cm" svg:x="19.551cm" svg:y="4.399cm" svg:viewBox="0 0 201 201" svg:d="M201 101c0 17-5 34-13 50-9 15-22 28-37 37-16 8-33 13-50 13-18 0-35-5-51-13-15-9-28-22-37-37-8-16-13-33-13-50 0-18 5-35 13-51 9-15 22-28 37-37 16-8 33-13 51-13 17 0 34 5 50 13 15 9 28 22 37 37 8 16 13 33 13 51z">
            <text:p/>
          </draw:path>
        </draw:g>
        <draw:connector draw:style-name="gr487" draw:text-style-name="P36" draw:layer="layout" svg:x1="19.401cm" svg:y1="4.499cm" svg:x2="18.41cm" svg:y2="4.477cm" draw:start-shape="id145" draw:start-glue-point="3" draw:end-shape="id146" draw:end-glue-point="1" svg:d="M19401 4499h-495v-22h-496" svg:viewBox="0 0 992 23">
          <text:p/>
        </draw:connector>
        <draw:connector draw:style-name="gr488" draw:text-style-name="P36" draw:layer="layout" svg:x1="15.653cm" svg:y1="4.477cm" svg:x2="11.438cm" svg:y2="4.428cm" draw:start-shape="id146" draw:start-glue-point="3" draw:end-shape="id136" draw:end-glue-point="7" svg:d="M15653 4477h-2102v-49h-2113" svg:viewBox="0 0 4216 50">
          <text:p/>
        </draw:connector>
        <draw:frame draw:style-name="gr489" draw:text-style-name="P40" draw:layer="layout" svg:width="2.866cm" svg:height="0.601cm" svg:x="7.991cm" svg:y="3.582cm">
          <draw:text-box>
            <text:p text:style-name="P26"><text:span text:style-name="T28">[request_size &lt;= 0]</text:span></text:p>
          </draw:text-box>
        </draw:frame>
        <draw:frame draw:style-name="gr490" draw:text-style-name="P40" draw:layer="layout" svg:width="1.197cm" svg:height="0.668cm" svg:x="11.468cm" svg:y="3.828cm">
          <draw:text-box>
            <text:p text:style-name="P26"><text:span text:style-name="T28">[vero]</text:span></text:p>
          </draw:text-box>
        </draw:frame>
        <draw:custom-shape draw:style-name="gr491" draw:text-style-name="P43" xml:id="id139" draw:id="id139" draw:layer="layout" svg:width="1cm" svg:height="1cm" svg:x="10.445cm" svg:y="7.505cm">
          <text:p/>
          <draw:enhanced-geometry svg:viewBox="0 0 21600 21600" draw:glue-points="10800 0 0 10800 10800 21600 21600 10800" draw:text-areas="5400 5400 16200 16200" draw:type="diamond" draw:enhanced-path="M 10800 0 L 21600 10800 10800 21600 0 10800 10800 0 Z N"/>
        </draw:custom-shape>
        <draw:frame draw:style-name="gr492" draw:text-style-name="P40" draw:layer="layout" svg:width="1.948cm" svg:height="0.601cm" svg:x="11.256cm" svg:y="7.709cm">
          <draw:text-box>
            <text:p text:style-name="P26"><text:span text:style-name="T28">[heap_init]?</text:span></text:p>
          </draw:text-box>
        </draw:frame>
        <draw:connector draw:style-name="gr493" draw:text-style-name="P36" draw:layer="layout" svg:x1="10.973cm" svg:y1="9.34cm" svg:x2="10.945cm" svg:y2="8.505cm" draw:start-shape="id141" draw:start-glue-point="0" draw:end-shape="id139" draw:end-glue-point="6" svg:d="M10973 9340v-411h-28v-424" svg:viewBox="0 0 29 836">
          <text:p/>
        </draw:connector>
        <draw:connector draw:style-name="gr494" draw:text-style-name="P36" draw:layer="layout" draw:line-skew="0.693cm" svg:x1="7.446cm" svg:y1="8.006cm" svg:x2="10.445cm" svg:y2="8.005cm" draw:start-shape="id147" draw:start-glue-point="1" draw:end-shape="id139" draw:end-glue-point="5" svg:d="M7446 8006h2187v-1h812" svg:viewBox="0 0 3000 2">
          <text:p/>
        </draw:connector>
        <draw:custom-shape draw:style-name="gr495" draw:text-style-name="P38" xml:id="id147" draw:id="id147" draw:layer="layout" svg:width="3.276cm" svg:height="1.324cm" draw:transform="skewX (0.00663225115757845) translate (4.17cm 7.34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heap_init = vero;</text:span><text:span text:style-name="T28"><text:line-break/></text:span><text:span text:style-name="T29">new_chunk</text:span><text:span text:style-name="T28"><text:line-break/></text:span><text:span text:style-name="T28">(0, 0, heap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96" draw:text-style-name="P40" draw:layer="layout" svg:width="1.197cm" svg:height="0.668cm" svg:x="10.863cm" svg:y="8.773cm">
          <draw:text-box>
            <text:p text:style-name="P26"><text:span text:style-name="T28">[vero]</text:span></text:p>
          </draw:text-box>
        </draw:frame>
        <draw:frame draw:style-name="gr497" draw:text-style-name="P81" draw:layer="layout" svg:width="1.245cm" svg:height="0.601cm" svg:x="8.982cm" svg:y="7.536cm">
          <draw:text-box>
            <text:p text:style-name="P26"><text:span text:style-name="T110">[falso]</text:span></text:p>
          </draw:text-box>
        </draw:frame>
        <draw:connector draw:style-name="gr498" draw:text-style-name="P36" draw:layer="layout" svg:x1="8.091cm" svg:y1="10.192cm" svg:x2="5.799cm" svg:y2="8.668cm" draw:start-shape="id141" draw:start-glue-point="3" draw:end-shape="id147" draw:end-glue-point="2" svg:d="M8091 10192h-2292v-1524" svg:viewBox="0 0 2293 1525">
          <text:p/>
        </draw:connector>
        <draw:custom-shape draw:style-name="gr499" draw:text-style-name="P38" xml:id="id141" draw:id="id141" draw:layer="layout" svg:width="5.742cm" svg:height="1.704cm" draw:transform="skewX (0.00663225115757845) translate (8.102cm 9.34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request = prossimo_multiplo_4(request);</text:span></text:p>
          <text:p text:style-name="P37"><text:span text:style-name="T28"><text:line-break/></text:span><text:span text:style-name="T28">(</text:span><text:span text:style-name="T127">ultimo_chunk, chunk_scelto</text:span><text:span text:style-name="T33">)</text:span><text:span text:style-name="T28"> =</text:span><text:span text:style-name="T28"><text:line-break/></text:span><text:span text:style-name="T29"><text:a xlink:href="#best_fit_chunk_search" xlink:type="simple">best_fit_chunk_search</text:a></text:span><text:span text:style-name="T28">(request);</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0" draw:text-style-name="P36" draw:layer="layout" svg:x1="10.969cm" svg:y1="13.658cm" svg:x2="10.964cm" svg:y2="12.965cm" draw:start-shape="id144" draw:start-glue-point="0" draw:end-shape="id140" draw:end-glue-point="6" svg:d="M10969 13658v-341h-5v-352" svg:viewBox="0 0 6 694">
          <text:p/>
        </draw:connector>
        <draw:connector draw:style-name="gr501" draw:text-style-name="P36" draw:layer="layout" svg:x1="12.683cm" svg:y1="12.45cm" svg:x2="11.464cm" svg:y2="12.465cm" draw:start-shape="id148" draw:start-glue-point="3" draw:end-shape="id140" draw:end-glue-point="7" svg:d="M12683 12450h-603v15h-616" svg:viewBox="0 0 1220 16">
          <text:p/>
        </draw:connector>
        <draw:frame draw:style-name="gr502" draw:text-style-name="P40" draw:layer="layout" svg:width="3.054cm" svg:height="0.601cm" svg:x="7.856cm" svg:y="11.685cm">
          <draw:text-box>
            <text:p text:style-name="P26"><text:span text:style-name="T128">[</text:span><text:span text:style-name="T129">chunk_scelto</text:span><text:span text:style-name="T28"> != null]</text:span></text:p>
          </draw:text-box>
        </draw:frame>
        <draw:custom-shape draw:style-name="gr503" draw:text-style-name="P38" xml:id="id148" draw:id="id148" draw:layer="layout" svg:width="5.101cm" svg:height="1.114cm" draw:transform="skewX (0.00663225115757845) translate (12.69cm 11.89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7">chunk_scelto</text:span><text:span text:style-name="T28"> = </text:span><text:span text:style-name="T29">request_memory</text:span><text:span text:style-name="T28">(</text:span><text:span text:style-name="T127">ultimo_chunk</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04" draw:text-style-name="P36" draw:layer="layout" svg:x1="13.761cm" svg:y1="14.847cm" svg:x2="18.969cm" svg:y2="12.919cm" draw:start-shape="id144" draw:start-glue-point="1" draw:end-shape="id149" draw:end-glue-point="6" svg:d="M13761 14847h5208v-1928" svg:viewBox="0 0 5209 1929">
          <text:p/>
        </draw:connector>
        <draw:custom-shape draw:style-name="gr505" draw:text-style-name="P43" xml:id="id149" draw:id="id149" draw:layer="layout" svg:width="1cm" svg:height="1cm" svg:x="18.469cm" svg:y="11.919cm">
          <text:p/>
          <draw:enhanced-geometry svg:viewBox="0 0 21600 21600" draw:glue-points="10800 0 0 10800 10800 21600 21600 10800" draw:text-areas="5400 5400 16200 16200" draw:type="diamond" draw:enhanced-path="M 10800 0 L 21600 10800 10800 21600 0 10800 10800 0 Z N"/>
        </draw:custom-shape>
        <draw:connector draw:style-name="gr506" draw:text-style-name="P36" draw:layer="layout" svg:x1="17.031cm" svg:y1="4.964cm" svg:x2="18.969cm" svg:y2="11.919cm" draw:start-shape="id146" draw:start-glue-point="2" draw:end-shape="id149" draw:end-glue-point="4" svg:d="M17031 4964v3473h1938v3482" svg:viewBox="0 0 1939 6956">
          <text:p/>
        </draw:connector>
        <draw:connector draw:style-name="gr507" draw:text-style-name="P36" draw:layer="layout" svg:x1="18.469cm" svg:y1="12.419cm" svg:x2="17.791cm" svg:y2="12.45cm" draw:start-shape="id149" draw:start-glue-point="5" draw:end-shape="id148" draw:end-glue-point="1" svg:d="M18469 12419h-345v31h-333" svg:viewBox="0 0 679 32">
          <text:p/>
        </draw:connector>
        <draw:frame draw:style-name="gr508" draw:text-style-name="P40" draw:layer="layout" svg:width="3.117cm" svg:height="0.601cm" svg:x="15.936cm" svg:y="11.388cm">
          <draw:text-box>
            <text:p text:style-name="P26"><text:span text:style-name="T28">[chunk_scelto != null]</text:span></text:p>
          </draw:text-box>
        </draw:frame>
        <draw:frame draw:style-name="gr509" draw:text-style-name="P81" draw:layer="layout" svg:width="1.245cm" svg:height="0.601cm" svg:x="18.877cm" svg:y="11.388cm">
          <draw:text-box>
            <text:p text:style-name="P26"><text:span text:style-name="T110">[falso]</text:span></text:p>
          </draw:text-box>
        </draw:frame>
        <draw:frame draw:style-name="gr510" draw:text-style-name="P40" draw:layer="layout" svg:width="1.197cm" svg:height="0.668cm" svg:x="18.898cm" svg:y="13.119cm">
          <draw:text-box>
            <text:p text:style-name="P26"><text:span text:style-name="T28">[vero]</text:span></text:p>
          </draw:text-box>
        </draw:frame>
        <draw:frame draw:style-name="gr511" draw:text-style-name="P40" draw:layer="layout" svg:width="1.197cm" svg:height="0.668cm" svg:x="9.773cm" svg:y="12.855cm">
          <draw:text-box>
            <text:p text:style-name="P26"><text:span text:style-name="T28">[vero]</text:span></text:p>
          </draw:text-box>
        </draw:frame>
        <draw:frame draw:style-name="gr512" draw:text-style-name="P81" draw:layer="layout" svg:width="1.245cm" svg:height="0.601cm" svg:x="11.717cm" svg:y="11.363cm">
          <draw:text-box>
            <text:p text:style-name="P26"><text:span text:style-name="T110">[falso]</text:span></text:p>
          </draw:text-box>
        </draw:frame>
        <draw:frame draw:name="best_fit_chunk_search" draw:style-name="gr45" draw:text-style-name="P31" draw:layer="layout" svg:width="8.415cm" svg:height="0.543cm" svg:x="1.488cm" svg:y="17.626cm">
          <draw:text-box>
            <text:p text:style-name="P69"><text:span text:style-name="T56">best_fit_chunk_search:</text:span></text:p>
          </draw:text-box>
        </draw:frame>
        <draw:frame draw:style-name="gr197" draw:text-style-name="P82" draw:layer="layout" svg:width="18.237cm" svg:height="1.606cm" svg:x="1.539cm" svg:y="18.225cm">
          <draw:text-box>
            <text:p text:style-name="P69"><text:span text:style-name="T111">Partendo da </text:span><text:span text:style-name="T130">heap_start</text:span><text:span text:style-name="T63"> iteriamo su sulla lista di </text:span><text:span text:style-name="T115"><text:a xlink:href="#heap_chunk" xlink:type="simple">heap_chunk</text:a></text:span><text:span text:style-name="T115"><text:s/></text:span><text:span text:style-name="T116">selezionando il primo dalla dimensione minore, che pu</text:span><text:span text:style-name="T131">ò</text:span><text:span text:style-name="T119"> accomodare la richiesta, viene inoltre ritornato l’ultimo chunk nello heap, per permettere di estenderlo in caso di richiesta di memoria dal sistema.</text:span></text:p>
          </draw:text-box>
        </draw:frame>
        <draw:g draw:style-name="gr48" xml:id="id151" draw:id="id151">
          <draw:path draw:style-name="gr513" draw:text-style-name="P34" draw:layer="layout" svg:width="0.5cm" svg:height="0.5cm" svg:x="1.481cm" svg:y="20.806cm" svg:viewBox="0 0 501 501" svg:d="M501 251c0 43-12 87-34 125s-53 69-91 91-82 34-125 34c-44 0-88-12-126-34s-69-53-91-91-34-82-34-125c0-44 12-88 34-126s53-69 91-91 82-34 126-34c43 0 87 12 125 34s69 53 91 91 34 82 34 126z">
            <text:p/>
          </draw:path>
          <draw:custom-shape draw:style-name="gr514" draw:text-style-name="P35" draw:layer="layout" svg:width="0.25cm" svg:height="0.25cm" svg:x="1.606cm" svg:y="20.931cm">
            <text:p/>
            <draw:enhanced-geometry svg:viewBox="0 0 21600 21600" draw:type="rectangle" draw:enhanced-path="M 0 0 L 21600 0 21600 21600 0 21600 0 0 Z N"/>
          </draw:custom-shape>
        </draw:g>
        <draw:connector draw:style-name="gr515" draw:text-style-name="P56" draw:layer="layout" svg:x1="3.225cm" svg:y1="21.042cm" svg:x2="1.982cm" svg:y2="21.056cm" draw:start-shape="id150" draw:start-glue-point="3" draw:end-shape="id151" draw:end-glue-point="1" svg:d="M3225 21042h-628v14h-615" svg:viewBox="0 0 1244 15">
          <text:p/>
        </draw:connector>
        <draw:polygon draw:style-name="gr516" draw:text-style-name="P57" xml:id="id150" draw:id="id150" draw:layer="layout" svg:width="3.064cm" svg:height="1.422cm" svg:x="3.225cm" svg:y="20.331cm" svg:viewBox="0 0 3065 1423" draw:points="0,0 1914,0 2299,0 3064,0 3064,711 3065,712 3064,712 3064,1422 2299,1422 2299,1423 0,1423 766,712">
          <text:p text:style-name="P51"><text:span text:style-name="T28">In: </text:span><text:span text:style-name="T28"><text:line-break/></text:span><text:span text:style-name="T28">int target_size</text:span></text:p>
        </draw:polygon>
        <draw:connector draw:style-name="gr517" draw:text-style-name="P36" draw:layer="layout" svg:x1="7.141cm" svg:y1="21.048cm" svg:x2="6.29cm" svg:y2="21.042cm" draw:start-shape="id152" draw:start-glue-point="3" draw:end-shape="id150" draw:end-glue-point="1" svg:d="M7141 21048h-424v-6h-427" svg:viewBox="0 0 852 7">
          <text:p/>
        </draw:connector>
        <draw:custom-shape draw:style-name="gr518" draw:text-style-name="P43" xml:id="id153" draw:id="id153" draw:layer="layout" svg:width="1cm" svg:height="1cm" svg:x="5.798cm" svg:y="22.865cm">
          <text:p/>
          <draw:enhanced-geometry svg:viewBox="0 0 21600 21600" draw:glue-points="10800 0 0 10800 10800 21600 21600 10800" draw:text-areas="5400 5400 16200 16200" draw:type="diamond" draw:enhanced-path="M 10800 0 L 21600 10800 10800 21600 0 10800 10800 0 Z N"/>
        </draw:custom-shape>
        <draw:connector draw:style-name="gr519" draw:text-style-name="P36" draw:layer="layout" svg:x1="6.798cm" svg:y1="23.365cm" svg:x2="14.232cm" svg:y2="23.384cm" draw:start-shape="id153" draw:start-glue-point="7" draw:end-shape="id154" draw:end-glue-point="5" svg:d="M6798 23365h3718v19h3716" svg:viewBox="0 0 7435 20">
          <text:p/>
        </draw:connector>
        <draw:frame draw:style-name="gr520" draw:text-style-name="P81" draw:layer="layout" svg:width="1.245cm" svg:height="0.601cm" svg:x="6.798cm" svg:y="25.45cm">
          <draw:text-box>
            <text:p text:style-name="P26"><text:span text:style-name="T110">[falso]</text:span></text:p>
          </draw:text-box>
        </draw:frame>
        <draw:connector draw:style-name="gr521" draw:text-style-name="P36" draw:layer="layout" draw:line-skew="0.923cm -1.067cm" svg:x1="6.298cm" svg:y1="24.878cm" svg:x2="6.298cm" svg:y2="23.865cm" draw:start-shape="id155" draw:start-glue-point="5" draw:end-shape="id153" draw:end-glue-point="6" svg:d="M6298 24878h-115v-28h115v-985" svg:viewBox="0 0 116 1014">
          <text:p/>
        </draw:connector>
        <draw:frame draw:style-name="gr522" draw:text-style-name="P40" draw:layer="layout" svg:width="4.068cm" svg:height="0.601cm" svg:x="7.122cm" svg:y="22.601cm">
          <draw:text-box>
            <text:p text:style-name="P26"><text:span text:style-name="T28">[corrente.occupato?] ||</text:span></text:p>
            <text:p text:style-name="P26"><text:span text:style-name="T28">[corrente.size &lt; target_size]?</text:span></text:p>
          </draw:text-box>
        </draw:frame>
        <draw:connector draw:style-name="gr523" draw:text-style-name="P36" draw:layer="layout" draw:line-skew="0cm -2.679cm" svg:x1="16.275cm" svg:y1="26.078cm" svg:x2="5.798cm" svg:y2="23.365cm" draw:start-shape="id156" draw:start-glue-point="2" draw:end-shape="id153" draw:end-glue-point="5" svg:d="M16275 26078v527h-13694v-3240h3217" svg:viewBox="0 0 13695 3241">
          <text:p/>
        </draw:connector>
        <draw:connector draw:style-name="gr524" draw:text-style-name="P36" draw:layer="layout" svg:x1="14.732cm" svg:y1="22.884cm" svg:x2="13.251cm" svg:y2="21.048cm" draw:start-shape="id154" draw:start-glue-point="4" draw:end-shape="id152" draw:end-glue-point="1" svg:d="M14732 22884v-1836h-1481" svg:viewBox="0 0 1482 1837">
          <text:p/>
        </draw:connector>
        <draw:custom-shape draw:style-name="gr525" draw:text-style-name="P38" xml:id="id161" draw:id="id161" draw:layer="layout" svg:width="2.945cm" svg:height="0.691cm" draw:transform="skewX (0.00663225115757845) translate (8.364cm 24.07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32">best_fit</text:span><text:span text:style-name="T28"> = </text:span><text:span text:style-name="T132">corrente</text:span><text:span text:style-name="T28">;</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6" draw:text-style-name="P43" xml:id="id154" draw:id="id154" draw:layer="layout" svg:width="1cm" svg:height="1cm" svg:x="14.232cm" svg:y="22.8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27" draw:text-style-name="P38" xml:id="id158" draw:id="id158" draw:layer="layout" svg:width="2.757cm" svg:height="0.974cm" svg:x="12.395cm" svg:y="27.482cm">
          <text:p text:style-name="P37"><text:span text:style-name="T28">Out: best_fit,</text:span><text:span text:style-name="T28"><text:line-break/></text:span><text:span text:style-name="T28">prev</text:span></text:p>
          <draw:enhanced-geometry svg:viewBox="0 0 21600 21600" draw:text-areas="0 0 21600 21600" draw:type="pentagon-right" draw:modifiers="14755.0398839739"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57" draw:id="id157">
          <draw:path draw:style-name="gr528" draw:text-style-name="P46" draw:layer="layout" svg:width="0.5cm" svg:height="0.5cm" svg:x="16.011cm" svg:y="27.714cm" svg:viewBox="0 0 501 501" svg:d="M501 251c0 43-12 87-34 125s-53 69-91 91-82 34-125 34c-44 0-88-12-126-34s-69-53-91-91-34-82-34-125c0-44 12-88 34-126s53-69 91-91 82-34 126-34c43 0 87 12 125 34s69 53 91 91 34 82 34 126z">
            <text:p/>
          </draw:path>
          <draw:path draw:style-name="gr529" draw:text-style-name="P34" draw:layer="layout" svg:width="0.2cm" svg:height="0.2cm" svg:x="16.161cm" svg:y="27.864cm" svg:viewBox="0 0 201 201" svg:d="M201 101c0 17-5 34-13 50-9 15-22 28-37 37-16 8-33 13-50 13-18 0-35-5-51-13-15-9-28-22-37-37-8-16-13-33-13-50 0-18 5-35 13-51 9-15 22-28 37-37 16-8 33-13 51-13 17 0 34 5 50 13 15 9 28 22 37 37 8 16 13 33 13 51z">
            <text:p/>
          </draw:path>
        </draw:g>
        <draw:connector draw:style-name="gr530" draw:text-style-name="P36" draw:layer="layout" svg:x1="16.011cm" svg:y1="27.964cm" svg:x2="15.152cm" svg:y2="27.969cm" draw:start-shape="id157" draw:start-glue-point="3" draw:end-shape="id158" draw:end-glue-point="1" svg:d="M16011 27964h-429v5h-430" svg:viewBox="0 0 860 6">
          <text:p/>
        </draw:connector>
        <draw:connector draw:style-name="gr531" draw:text-style-name="P36" draw:layer="layout" draw:line-skew="2.58cm" svg:x1="12.128cm" svg:y1="26.898cm" svg:x2="15.232cm" svg:y2="23.384cm" draw:start-shape="id159" draw:start-glue-point="7" draw:end-shape="id154" draw:end-glue-point="7" svg:d="M12128 26898h6223v-3514h-3119" svg:viewBox="0 0 6224 3515">
          <text:p/>
        </draw:connector>
        <draw:frame draw:style-name="gr532" draw:text-style-name="P40" draw:layer="layout" svg:width="3.515cm" svg:height="0.517cm" svg:x="11.375cm" svg:y="22.608cm">
          <draw:text-box>
            <text:p text:style-name="P26"><text:span text:style-name="T28">[corrente &lt;= fine_heap]?</text:span></text:p>
          </draw:text-box>
        </draw:frame>
        <draw:frame draw:style-name="gr533" draw:text-style-name="P40" draw:layer="layout" svg:width="1.197cm" svg:height="0.668cm" svg:x="4.884cm" svg:y="22.697cm">
          <draw:text-box>
            <text:p text:style-name="P26"><text:span text:style-name="T28">[vero]</text:span></text:p>
          </draw:text-box>
        </draw:frame>
        <draw:custom-shape draw:style-name="gr534" draw:text-style-name="P43" xml:id="id159" draw:id="id159" draw:layer="layout" svg:width="1cm" svg:height="1cm" svg:x="11.128cm" svg:y="26.398cm">
          <text:p/>
          <draw:enhanced-geometry svg:viewBox="0 0 21600 21600" draw:glue-points="10800 0 0 10800 10800 21600 21600 10800" draw:text-areas="5400 5400 16200 16200" draw:type="diamond" draw:enhanced-path="M 10800 0 L 21600 10800 10800 21600 0 10800 10800 0 Z N"/>
        </draw:custom-shape>
        <draw:connector draw:style-name="gr535" draw:text-style-name="P36" draw:layer="layout" svg:x1="12.395cm" svg:y1="27.969cm" svg:x2="11.628cm" svg:y2="27.398cm" draw:start-shape="id158" draw:start-glue-point="3" draw:end-shape="id159" draw:end-glue-point="6" svg:d="M12395 27969h-767v-571" svg:viewBox="0 0 768 572">
          <text:p/>
        </draw:connector>
        <draw:custom-shape draw:style-name="gr536" draw:text-style-name="P38" xml:id="id152" draw:id="id152" draw:layer="layout" svg:width="6.098cm" svg:height="1.877cm" draw:transform="skewX (0.00663225115757845) translate (7.153cm 20.1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27"><text:a xlink:href="#heap_chunk" xlink:type="simple">prec</text:a></text:span><text:span text:style-name="T109"><text:s/>= null;</text:span><text:span text:style-name="T109"><text:line-break/></text:span><text:span text:style-name="T127"><text:a xlink:href="#heap_chunk" xlink:type="simple">corrente</text:a></text:span><text:span text:style-name="T109"> = heap_start;</text:span></text:p>
          <text:p text:style-name="P37"><text:span text:style-name="T109">fine_heap = heap_start + heap_size – 12;</text:span><text:span text:style-name="T109"><text:line-break/></text:span><text:span text:style-name="T127"><text:a xlink:href="#heap_chunk" xlink:type="simple">best_fit</text:a></text:span><text:span text:style-name="T109"> = null; </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7" draw:text-style-name="P38" xml:id="id156" draw:id="id156" draw:layer="layout" svg:width="3.207cm" svg:height="1.357cm" draw:transform="skewX (0.00663225115757845) translate (14.681cm 24.72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33">prec</text:span><text:span text:style-name="T109"> = </text:span><text:span text:style-name="T133">corrente</text:span><text:span text:style-name="T109">;</text:span></text:p>
          <text:p text:style-name="P37"><text:span text:style-name="T133">corrente</text:span><text:span text:style-name="T109"> += </text:span><text:span text:style-name="T133">corrente</text:span><text:span text:style-name="T109">.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38" draw:text-style-name="P36" draw:layer="layout" svg:x1="14.732cm" svg:y1="23.884cm" svg:x2="16.284cm" svg:y2="24.721cm" draw:start-shape="id154" draw:start-glue-point="6" draw:end-shape="id156" draw:end-glue-point="0" svg:d="M14732 23884v424h1552v413" svg:viewBox="0 0 1553 838">
          <text:p/>
        </draw:connector>
        <draw:custom-shape draw:style-name="gr539" draw:text-style-name="P43" xml:id="id155" draw:id="id155" draw:layer="layout" svg:width="1cm" svg:height="1cm" svg:x="6.298cm" svg:y="24.378cm">
          <text:p/>
          <draw:enhanced-geometry svg:viewBox="0 0 21600 21600" draw:glue-points="10800 0 0 10800 10800 21600 21600 10800" draw:text-areas="5400 5400 16200 16200" draw:type="diamond" draw:enhanced-path="M 10800 0 L 21600 10800 10800 21600 0 10800 10800 0 Z N"/>
        </draw:custom-shape>
        <draw:frame draw:style-name="gr540" draw:text-style-name="P40" draw:layer="layout" svg:width="3.927cm" svg:height="0.601cm" svg:x="2.751cm" svg:y="24.65cm">
          <draw:text-box>
            <text:p text:style-name="P26"><text:span text:style-name="T28">[best_fit == null] ||</text:span><text:span text:style-name="T28"><text:line-break/></text:span><text:span text:style-name="T28">[best_fit.size &gt; current.size] </text:span></text:p>
          </draw:text-box>
        </draw:frame>
        <draw:frame draw:style-name="gr541" draw:text-style-name="P40" draw:layer="layout" svg:width="1.197cm" svg:height="0.668cm" svg:x="12.751cm" svg:y="23.252cm">
          <draw:text-box>
            <text:p text:style-name="P26"><text:span text:style-name="T28">[vero]</text:span></text:p>
          </draw:text-box>
        </draw:frame>
        <draw:custom-shape draw:style-name="gr542" draw:text-style-name="P43" xml:id="id160" draw:id="id160" draw:layer="layout" svg:width="1cm" svg:height="1cm" svg:x="12.415cm" svg:y="24.959cm">
          <text:p/>
          <draw:enhanced-geometry svg:viewBox="0 0 21600 21600" draw:glue-points="10800 0 0 10800 10800 21600 21600 10800" draw:text-areas="5400 5400 16200 16200" draw:type="diamond" draw:enhanced-path="M 10800 0 L 21600 10800 10800 21600 0 10800 10800 0 Z N"/>
        </draw:custom-shape>
        <draw:connector draw:style-name="gr543" draw:text-style-name="P36" draw:layer="layout" draw:line-skew="0.022cm" svg:x1="14.672cm" svg:y1="25.466cm" svg:x2="13.415cm" svg:y2="25.459cm" draw:end-shape="id160" draw:end-glue-point="7" svg:d="M14672 25466h-337v-7h-920" svg:viewBox="0 0 1258 8">
          <text:p/>
        </draw:connector>
        <draw:connector draw:style-name="gr544" draw:text-style-name="P36" draw:layer="layout" draw:line-skew="1.079cm 0.831cm" svg:x1="8.359cm" svg:y1="24.42cm" svg:x2="6.798cm" svg:y2="24.378cm" draw:start-shape="id161" draw:start-glue-point="3" draw:end-shape="id155" draw:end-glue-point="4" svg:d="M8359 24420h-1520v-42h-41" svg:viewBox="0 0 1562 43">
          <text:p/>
        </draw:connector>
        <draw:connector draw:style-name="gr545" draw:text-style-name="P36" draw:layer="layout" svg:x1="12.915cm" svg:y1="24.959cm" svg:x2="11.309cm" svg:y2="24.42cm" draw:start-shape="id160" draw:start-glue-point="4" draw:end-shape="id161" draw:end-glue-point="1" svg:d="M12915 24959v-539h-1606" svg:viewBox="0 0 1607 540">
          <text:p/>
        </draw:connector>
        <draw:connector draw:style-name="gr546" draw:text-style-name="P36" draw:layer="layout" draw:line-skew="-0.55cm" svg:x1="12.915cm" svg:y1="25.959cm" svg:x2="6.798cm" svg:y2="25.378cm" draw:start-shape="id160" draw:start-glue-point="6" draw:end-shape="id155" draw:end-glue-point="6" svg:d="M12915 25959v-11h-6117v-570" svg:viewBox="0 0 6118 582">
          <text:p/>
        </draw:connector>
        <draw:g draw:style-name="gr19">
          <draw:custom-shape draw:style-name="gr547" draw:text-style-name="P41" draw:layer="layout" svg:width="17.34cm" svg:height="4.942cm" svg:x="2.008cm" svg:y="22.2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48" draw:text-style-name="P42" draw:layer="layout" svg:width="3.325cm" svg:height="0.614cm" svg:x="2.008cm" svg:y="22.281cm">
            <text:p text:style-name="P37"><text:span text:style-name="T28">best_fit_search_loop</text:span></text:p>
            <draw:enhanced-geometry svg:viewBox="0 0 21600 21600" draw:type="non-primitve" draw:enhanced-path="M 0 0 L 21600 0 19000 21600 0 21600 0 0 Z N"/>
          </draw:custom-shape>
        </draw:g>
        <draw:frame draw:style-name="gr549" draw:text-style-name="P81" draw:layer="layout" svg:width="1.245cm" svg:height="0.601cm" svg:x="15.377cm" svg:y="22.783cm">
          <draw:text-box>
            <text:p text:style-name="P26"><text:span text:style-name="T110">[falso]</text:span></text:p>
          </draw:text-box>
        </draw:frame>
        <draw:frame draw:style-name="gr550" draw:text-style-name="P40" draw:layer="layout" svg:width="1.197cm" svg:height="0.668cm" svg:x="7.384cm" svg:y="23.752cm">
          <draw:text-box>
            <text:p text:style-name="P26"><text:span text:style-name="T28">[vero]</text:span></text:p>
          </draw:text-box>
        </draw:frame>
      </draw:page>
      <draw:page draw:name="page13" draw:style-name="dp1" draw:master-page-name="master-page79">
        <draw:frame draw:style-name="gr551" draw:text-style-name="P40" draw:layer="layout" svg:width="2.797cm" svg:height="0.601cm" svg:x="2.766cm" svg:y="17.896cm">
          <draw:text-box>
            <text:p text:style-name="P26"><text:span text:style-name="T28">[next &lt; heap_start </text:span><text:span text:style-name="T28"><text:line-break/></text:span><text:span text:style-name="T28">+ heap_size]</text:span></text:p>
          </draw:text-box>
        </draw:frame>
        <draw:frame draw:name="new chunk" draw:style-name="gr552" draw:text-style-name="P83" draw:layer="layout" svg:width="2.567cm" svg:height="0.543cm" svg:x="1.504cm" svg:y="2.826cm">
          <draw:text-box>
            <text:p text:style-name="P69"><text:span text:style-name="T56">new_chunk:</text:span></text:p>
          </draw:text-box>
        </draw:frame>
        <draw:frame draw:style-name="gr15" draw:text-style-name="P15" draw:layer="layout" svg:width="0.943cm" svg:height="0.642cm" svg:x="1.478cm" svg:y="28.055cm">
          <draw:text-box>
            <text:p text:style-name="P1"><text:span text:style-name="T16">13</text:span></text:p>
          </draw:text-box>
        </draw:frame>
        <draw:frame draw:style-name="gr44" draw:text-style-name="P8" draw:layer="layout" svg:width="5.771cm" svg:height="0.543cm" svg:x="1.403cm" svg:y="2.028cm">
          <draw:text-box>
            <text:p text:style-name="P1"><text:span text:style-name="T7">Procedure notevoli: </text:span></text:p>
          </draw:text-box>
        </draw:frame>
        <draw:g draw:style-name="gr48" xml:id="id163" draw:id="id163">
          <draw:path draw:style-name="gr553" draw:text-style-name="P34" draw:layer="layout" svg:width="0.5cm" svg:height="0.5cm" svg:x="2.3cm" svg:y="7.502cm" svg:viewBox="0 0 501 501" svg:d="M501 251c0 43-12 87-34 125s-53 69-91 91-82 34-125 34c-44 0-88-12-126-34s-69-53-91-91-34-82-34-125c0-44 12-88 34-126s53-69 91-91 82-34 126-34c43 0 87 12 125 34s69 53 91 91 34 82 34 126z">
            <text:p/>
          </draw:path>
          <draw:custom-shape draw:style-name="gr554" draw:text-style-name="P35" draw:layer="layout" svg:width="0.25cm" svg:height="0.25cm" svg:x="2.425cm" svg:y="7.627cm">
            <text:p/>
            <draw:enhanced-geometry svg:viewBox="0 0 21600 21600" draw:type="rectangle" draw:enhanced-path="M 0 0 L 21600 0 21600 21600 0 21600 0 0 Z N"/>
          </draw:custom-shape>
        </draw:g>
        <draw:connector draw:style-name="gr555" draw:text-style-name="P56" draw:layer="layout" svg:x1="3.944cm" svg:y1="7.78cm" svg:x2="2.801cm" svg:y2="7.752cm" draw:start-shape="id162" draw:start-glue-point="3" draw:end-shape="id163" draw:end-glue-point="1" svg:d="M3944 7780h-578v-28h-565" svg:viewBox="0 0 1144 29">
          <text:p/>
        </draw:connector>
        <draw:polygon draw:style-name="gr556" draw:text-style-name="P57" xml:id="id162" draw:id="id162" draw:layer="layout" svg:width="3.872cm" svg:height="1.706cm" svg:x="3.944cm" svg:y="6.927cm" svg:viewBox="0 0 3873 1707" draw:points="0,0 2419,0 2905,0 3871,0 3871,853 3873,854 3871,854 3871,1706 2905,1706 2905,1707 0,1707 968,854">
          <text:p text:style-name="P51"><text:span text:style-name="T28">In: </text:span><text:span text:style-name="T28"><text:line-break/></text:span><text:span text:style-name="T28">heap_chunk: prev,</text:span><text:span text:style-name="T28"><text:line-break/></text:span><text:span text:style-name="T28">int: target_size,</text:span></text:p>
          <text:p text:style-name="P51"><text:span text:style-name="T28">Int: available_mem</text:span></text:p>
        </draw:polygon>
        <draw:connector draw:style-name="gr557" draw:text-style-name="P36" draw:layer="layout" svg:x1="8.544cm" svg:y1="7.72cm" svg:x2="7.817cm" svg:y2="7.78cm" draw:start-shape="id164" draw:start-glue-point="3" draw:end-shape="id162" draw:end-glue-point="1" svg:d="M8544 7720h-362v60h-365" svg:viewBox="0 0 728 61">
          <text:p/>
        </draw:connector>
        <draw:custom-shape draw:style-name="gr558" draw:text-style-name="P43" xml:id="id174" draw:id="id174" draw:layer="layout" svg:width="1cm" svg:height="1cm" svg:x="11.033cm" svg:y="16.966cm">
          <text:p/>
          <draw:enhanced-geometry svg:viewBox="0 0 21600 21600" draw:glue-points="10800 0 0 10800 10800 21600 21600 10800" draw:text-areas="5400 5400 16200 16200" draw:type="diamond" draw:enhanced-path="M 10800 0 L 21600 10800 10800 21600 0 10800 10800 0 Z N"/>
        </draw:custom-shape>
        <draw:connector draw:style-name="gr559" draw:text-style-name="P36" draw:layer="layout" svg:x1="8.397cm" svg:y1="13.03cm" svg:x2="10.991cm" svg:y2="12.988cm" draw:start-shape="id165" draw:start-glue-point="1" draw:end-shape="id166" draw:end-glue-point="5" svg:d="M8397 13030h1291v-42h1303" svg:viewBox="0 0 2595 43">
          <text:p/>
        </draw:connector>
        <draw:custom-shape draw:style-name="gr560" draw:text-style-name="P43" xml:id="id169" draw:id="id169" draw:layer="layout" svg:width="1cm" svg:height="1cm" svg:x="11.01cm" svg:y="10.888cm">
          <text:p/>
          <draw:enhanced-geometry svg:viewBox="0 0 21600 21600" draw:glue-points="10800 0 0 10800 10800 21600 21600 10800" draw:text-areas="5400 5400 16200 16200" draw:type="diamond" draw:enhanced-path="M 10800 0 L 21600 10800 10800 21600 0 10800 10800 0 Z N"/>
        </draw:custom-shape>
        <draw:frame draw:style-name="gr561" draw:text-style-name="P81" draw:layer="layout" svg:width="1.245cm" svg:height="0.633cm" svg:x="9.988cm" svg:y="16.833cm">
          <draw:text-box>
            <text:p text:style-name="P26"><text:span text:style-name="T110">[falso]</text:span></text:p>
          </draw:text-box>
        </draw:frame>
        <draw:connector draw:style-name="gr562" draw:text-style-name="P36" draw:layer="layout" svg:x1="11.512cm" svg:y1="15.208cm" svg:x2="11.473cm" svg:y2="14.656cm" draw:start-shape="id167" draw:start-glue-point="0" draw:end-shape="id168" draw:end-glue-point="6" svg:d="M11512 15208v-270h-39v-282" svg:viewBox="0 0 40 553">
          <text:p/>
        </draw:connector>
        <draw:frame draw:style-name="gr563" draw:text-style-name="P40" draw:layer="layout" svg:width="2.19cm" svg:height="0.601cm" svg:x="9.301cm" svg:y="12.15cm">
          <draw:text-box>
            <text:p text:style-name="P26"><text:span text:style-name="T28">[prev != null]?</text:span></text:p>
          </draw:text-box>
        </draw:frame>
        <draw:frame draw:style-name="gr564" draw:text-style-name="P40" draw:layer="layout" svg:width="1.197cm" svg:height="0.668cm" svg:x="12.033cm" svg:y="16.798cm">
          <draw:text-box>
            <text:p text:style-name="P26"><text:span text:style-name="T28">[vero]</text:span></text:p>
          </draw:text-box>
        </draw:frame>
        <draw:connector draw:style-name="gr565" draw:text-style-name="P36" draw:layer="layout" svg:x1="11.51cm" svg:y1="10.888cm" svg:x2="11.473cm" svg:y2="10.173cm" draw:start-shape="id169" draw:start-glue-point="4" draw:end-shape="id170" draw:end-glue-point="6" svg:d="M11510 10888v-357h-37v-358" svg:viewBox="0 0 38 716">
          <text:p/>
        </draw:connector>
        <draw:connector draw:style-name="gr566" draw:text-style-name="P36" draw:layer="layout" svg:x1="11.01cm" svg:y1="11.388cm" svg:x2="6.306cm" svg:y2="10.065cm" draw:start-shape="id169" draw:start-glue-point="5" draw:end-shape="id171" draw:end-glue-point="2" svg:d="M11010 11388h-4704v-1323" svg:viewBox="0 0 4705 1324">
          <text:p/>
        </draw:connector>
        <draw:custom-shape draw:style-name="gr567" draw:text-style-name="P38" xml:id="id173" draw:id="id173" draw:layer="layout" svg:width="2.757cm" svg:height="0.974cm" svg:x="13.156cm" svg:y="20.142cm">
          <text:p text:style-name="P37"><text:span text:style-name="T28">Out: chunk</text:span></text:p>
          <draw:enhanced-geometry svg:viewBox="0 0 21600 21600" draw:text-areas="0 0 21600 21600" draw:type="pentagon-right" draw:modifiers="17566.6424945613"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8" xml:id="id172" draw:id="id172">
          <draw:path draw:style-name="gr568" draw:text-style-name="P46" draw:layer="layout" svg:width="0.5cm" svg:height="0.5cm" svg:x="17.121cm" svg:y="20.375cm" svg:viewBox="0 0 501 501" svg:d="M501 251c0 43-12 87-34 125s-53 69-91 91-82 34-125 34c-44 0-88-12-126-34s-69-53-91-91-34-82-34-125c0-44 12-88 34-126s53-69 91-91 82-34 126-34c43 0 87 12 125 34s69 53 91 91 34 82 34 126z">
            <text:p/>
          </draw:path>
          <draw:path draw:style-name="gr569" draw:text-style-name="P34" draw:layer="layout" svg:width="0.2cm" svg:height="0.2cm" svg:x="17.271cm" svg:y="20.525cm" svg:viewBox="0 0 201 201" svg:d="M201 101c0 17-5 34-13 50-9 15-22 28-37 37-16 8-33 13-50 13-18 0-35-5-51-13-15-9-28-22-37-37-8-16-13-33-13-50 0-18 5-35 13-51 9-15 22-28 37-37 16-8 33-13 51-13 17 0 34 5 50 13 15 9 28 22 37 37 8 16 13 33 13 51z">
            <text:p/>
          </draw:path>
        </draw:g>
        <draw:connector draw:style-name="gr570" draw:text-style-name="P36" draw:layer="layout" svg:x1="17.121cm" svg:y1="20.625cm" svg:x2="15.913cm" svg:y2="20.629cm" draw:start-shape="id172" draw:start-glue-point="3" draw:end-shape="id173" draw:end-glue-point="1" svg:d="M17121 20625h-604v4h-604" svg:viewBox="0 0 1209 5">
          <text:p/>
        </draw:connector>
        <draw:connector draw:style-name="gr571" draw:text-style-name="P36" draw:layer="layout" svg:x1="11.533cm" svg:y1="16.966cm" svg:x2="11.504cm" svg:y2="16.441cm" draw:start-shape="id174" draw:start-glue-point="4" draw:end-shape="id167" draw:end-glue-point="2" svg:d="M11533 16966v-268h-29v-257" svg:viewBox="0 0 30 526">
          <text:p/>
        </draw:connector>
        <draw:custom-shape draw:style-name="gr572" draw:text-style-name="P38" xml:id="id167" draw:id="id167" draw:layer="layout" svg:width="3.731cm" svg:height="1.233cm" draw:transform="skewX (0.00663225115757845) translate (9.647cm 15.208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chunk.prev = prev;</text:span><text:span text:style-name="T28"><text:line-break/></text:span><text:span text:style-name="T28">chunk.occupied = falso;</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3" draw:text-style-name="P38" xml:id="id176" draw:id="id176" draw:layer="layout" svg:width="4.841cm" svg:height="1.058cm" draw:transform="skewX (0.00628318530717959) translate (2.811cm 15.81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chunk.size = available_mem;</text:span></text:p>
          <text:p text:style-name="P37"><text:span text:style-name="T109">next = chunk + chunk.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74" draw:text-style-name="P36" draw:layer="layout" svg:x1="3.843cm" svg:y1="19.249cm" svg:x2="2.804cm" svg:y2="16.344cm" draw:start-shape="id175" draw:start-glue-point="5" draw:end-shape="id176" draw:end-glue-point="3" svg:d="M3843 19249h-1565v-2905h526" svg:viewBox="0 0 1566 2906">
          <text:p/>
        </draw:connector>
        <draw:custom-shape draw:style-name="gr575" draw:text-style-name="P43" xml:id="id170" draw:id="id170" draw:layer="layout" svg:width="1cm" svg:height="1cm" svg:x="10.973cm" svg:y="9.173cm">
          <text:p/>
          <draw:enhanced-geometry svg:viewBox="0 0 21600 21600" draw:glue-points="10800 0 0 10800 10800 21600 21600 10800" draw:text-areas="5400 5400 16200 16200" draw:type="diamond" draw:enhanced-path="M 10800 0 L 21600 10800 10800 21600 0 10800 10800 0 Z N"/>
        </draw:custom-shape>
        <draw:connector draw:style-name="gr576" draw:text-style-name="P36" draw:layer="layout" svg:x1="11.973cm" svg:y1="9.673cm" svg:x2="17.126cm" svg:y2="8.227cm" draw:start-shape="id170" draw:start-glue-point="7" draw:end-shape="id177" draw:end-glue-point="2" svg:d="M11973 9673h5153v-1446" svg:viewBox="0 0 5154 1447">
          <text:p/>
        </draw:connector>
        <draw:frame draw:style-name="gr577" draw:text-style-name="P40" draw:layer="layout" svg:width="2.74cm" svg:height="0.601cm" svg:x="11.365cm" svg:y="8.795cm">
          <draw:text-box>
            <text:p text:style-name="P26"><text:span text:style-name="T28">[target_size != 0]?</text:span></text:p>
          </draw:text-box>
        </draw:frame>
        <draw:connector draw:style-name="gr578" draw:text-style-name="P36" draw:layer="layout" svg:x1="8.57cm" svg:y1="9.674cm" svg:x2="10.973cm" svg:y2="9.673cm" draw:start-shape="id171" draw:start-glue-point="1" draw:end-shape="id170" draw:end-glue-point="5" svg:d="M8570 9674h1196v-1h1207" svg:viewBox="0 0 2404 2">
          <text:p/>
        </draw:connector>
        <draw:connector draw:style-name="gr579" draw:text-style-name="P36" draw:layer="layout" svg:x1="15.255cm" svg:y1="7.729cm" svg:x2="14.47cm" svg:y2="7.72cm" draw:start-shape="id177" draw:start-glue-point="3" draw:end-shape="id164" draw:end-glue-point="1" svg:d="M15255 7729h-392v-9h-393" svg:viewBox="0 0 786 10">
          <text:p/>
        </draw:connector>
        <draw:custom-shape draw:style-name="gr580" draw:text-style-name="P38" xml:id="id164" draw:id="id164" draw:layer="layout" svg:width="5.914cm" svg:height="1.839cm" draw:transform="skewX (0.00663225115757845) translate (8.556cm 6.80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available_mem -= available_mem % 4;</text:span><text:span text:style-name="T109"><text:line-break/></text:span><text:span text:style-name="T109">target_size = prossimo_mulitplo_4(target_size);</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81" draw:text-style-name="P40" draw:layer="layout" svg:width="1.197cm" svg:height="0.668cm" svg:x="11.473cm" svg:y="9.886cm">
          <draw:text-box>
            <text:p text:style-name="P26"><text:span text:style-name="T28">[vero]</text:span></text:p>
          </draw:text-box>
        </draw:frame>
        <draw:frame draw:style-name="gr582" draw:text-style-name="P81" draw:layer="layout" svg:width="1.245cm" svg:height="0.601cm" svg:x="10.12cm" svg:y="8.936cm">
          <draw:text-box>
            <text:p text:style-name="P26"><text:span text:style-name="T110">[falso]</text:span></text:p>
          </draw:text-box>
        </draw:frame>
        <draw:connector draw:style-name="gr583" draw:text-style-name="P36" draw:layer="layout" svg:x1="10.973cm" svg:y1="14.156cm" svg:x2="6.414cm" svg:y2="13.587cm" draw:start-shape="id168" draw:start-glue-point="5" draw:end-shape="id165" draw:end-glue-point="2" svg:d="M10973 14156h-4559v-569" svg:viewBox="0 0 4560 570">
          <text:p/>
        </draw:connector>
        <draw:custom-shape draw:style-name="gr584" draw:text-style-name="P38" xml:id="id171" draw:id="id171" draw:layer="layout" svg:width="4.518cm" svg:height="0.782cm" draw:transform="skewX (0.00663225115757845) translate (4.052cm 9.28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target_size = available_mem;</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85" draw:text-style-name="P36" draw:layer="layout" svg:x1="11.491cm" svg:y1="12.488cm" svg:x2="11.51cm" svg:y2="11.888cm" draw:start-shape="id166" draw:start-glue-point="4" svg:d="M11491 12488v-569h19v-31" svg:viewBox="0 0 20 601">
          <text:p/>
        </draw:connector>
        <draw:connector draw:style-name="gr586" draw:text-style-name="P36" draw:layer="layout" svg:x1="13.841cm" svg:y1="12.99cm" svg:x2="11.991cm" svg:y2="12.988cm" draw:start-shape="id178" draw:start-glue-point="3" draw:end-shape="id166" draw:end-glue-point="7" svg:d="M13841 12990h-918v-2h-932" svg:viewBox="0 0 1851 3">
          <text:p/>
        </draw:connector>
        <draw:custom-shape draw:style-name="gr587" draw:text-style-name="P38" xml:id="id178" draw:id="id178" draw:layer="layout" svg:width="3.949cm" svg:height="1.114cm" draw:transform="skewX (0.00663225115757845) translate (13.848cm 12.43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chunk = heap_start;</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88" draw:text-style-name="P36" draw:layer="layout" svg:x1="7.652cm" svg:y1="16.344cm" svg:x2="11.033cm" svg:y2="17.466cm" draw:start-shape="id176" draw:start-glue-point="1" draw:end-shape="id174" draw:end-glue-point="5" svg:d="M7652 16344h1685v1122h1696" svg:viewBox="0 0 3382 1123">
          <text:p/>
        </draw:connector>
        <draw:connector draw:style-name="gr589" draw:text-style-name="P36" draw:layer="layout" svg:x1="13.537cm" svg:y1="17.482cm" svg:x2="12.033cm" svg:y2="17.466cm" draw:start-shape="id179" draw:start-glue-point="3" draw:end-shape="id174" draw:end-glue-point="7" svg:d="M13537 17482h-745v-16h-759" svg:viewBox="0 0 1505 17">
          <text:p/>
        </draw:connector>
        <draw:connector draw:style-name="gr590" draw:text-style-name="P36" draw:layer="layout" svg:x1="11.973cm" svg:y1="14.156cm" svg:x2="15.814cm" svg:y2="13.547cm" draw:start-shape="id168" draw:start-glue-point="7" draw:end-shape="id178" draw:end-glue-point="2" svg:d="M11973 14156h3841v-609" svg:viewBox="0 0 3842 610">
          <text:p/>
        </draw:connector>
        <draw:frame draw:style-name="gr591" draw:text-style-name="P40" draw:layer="layout" svg:width="2.733cm" svg:height="0.601cm" svg:x="10.328cm" svg:y="18.026cm">
          <draw:text-box>
            <text:p text:style-name="P26"><text:span text:style-name="T28">[available_mem – </text:span><text:span text:style-name="T28"><text:line-break/></text:span><text:span text:style-name="T28">target_size &gt;= 16]</text:span></text:p>
          </draw:text-box>
        </draw:frame>
        <draw:frame draw:style-name="gr592" draw:text-style-name="P40" draw:layer="layout" svg:width="1.197cm" svg:height="0.668cm" svg:x="10.136cm" svg:y="12.988cm">
          <draw:text-box>
            <text:p text:style-name="P26"><text:span text:style-name="T28">[vero]</text:span></text:p>
          </draw:text-box>
        </draw:frame>
        <draw:frame draw:style-name="gr593" draw:text-style-name="P81" draw:layer="layout" svg:width="1.245cm" svg:height="0.601cm" svg:x="11.717cm" svg:y="12.988cm">
          <draw:text-box>
            <text:p text:style-name="P26"><text:span text:style-name="T110">[falso]</text:span></text:p>
          </draw:text-box>
        </draw:frame>
        <draw:custom-shape draw:style-name="gr594" draw:text-style-name="P38" xml:id="id177" draw:id="id177" draw:layer="layout" svg:width="3.742cm" svg:height="0.995cm" draw:transform="skewX (0.00663225115757845) translate (15.262cm 7.232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available_mem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5" draw:text-style-name="P43" xml:id="id166" draw:id="id166" draw:layer="layout" svg:width="1cm" svg:height="1cm" svg:x="10.991cm" svg:y="12.4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96" draw:text-style-name="P38" xml:id="id165" draw:id="id165" draw:layer="layout" svg:width="3.949cm" svg:height="1.114cm" draw:transform="skewX (0.00663225115757845) translate (4.448cm 12.473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chunk =</text:span><text:span text:style-name="T109"><text:line-break/></text:span><text:span text:style-name="T109"> prev + prev.size + 12;</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7" draw:text-style-name="P43" xml:id="id168" draw:id="id168" draw:layer="layout" svg:width="1cm" svg:height="1cm" svg:x="10.973cm" svg:y="13.6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98" draw:text-style-name="P38" xml:id="id179" draw:id="id179" draw:layer="layout" svg:width="4.51cm" svg:height="0.934cm" draw:transform="skewX (0.00663225115757845) translate (13.543cm 17.015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28">new_chunk(chunk, 0, available_mem – target</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9" draw:text-style-name="P43" xml:id="id181" draw:id="id181" draw:layer="layout" svg:width="1cm" svg:height="1cm" svg:x="11.099cm" svg:y="19.2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00" draw:text-style-name="P43" xml:id="id175" draw:id="id175" draw:layer="layout" svg:width="1cm" svg:height="1cm" svg:x="3.843cm" svg:y="18.7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1" draw:text-style-name="P36" draw:layer="layout" draw:line-skew="0cm 0.538cm" svg:x1="7.56cm" svg:y1="18.797cm" svg:x2="4.343cm" svg:y2="18.749cm" draw:start-shape="id180" draw:start-glue-point="3" draw:end-shape="id175" draw:end-glue-point="4" svg:d="M7560 18797h-1352v-48h-1865" svg:viewBox="0 0 3218 49">
          <text:p/>
        </draw:connector>
        <draw:custom-shape draw:style-name="gr602" draw:text-style-name="P38" xml:id="id180" draw:id="id180" draw:layer="layout" svg:width="2.924cm" svg:height="0.752cm" draw:transform="skewX (0.00628318530717959) translate (7.565cm 18.421cm)">
          <draw:glue-point draw:id="4" svg:x="1.685cm" svg:y="-4.994cm"/>
          <draw:glue-point draw:id="5" svg:x="-1.622cm" svg:y="-4.994cm"/>
          <draw:glue-point draw:id="6" svg:x="-3.336cm" svg:y="4.994cm"/>
          <draw:glue-point draw:id="7" svg:x="3.281cm" svg:y="4.994cm"/>
          <draw:glue-point draw:id="8" svg:x="1.624cm" svg:y="4.994cm"/>
          <draw:glue-point draw:id="9" svg:x="-1.682cm" svg:y="4.994cm"/>
          <draw:glue-point draw:id="10" svg:x="-3.278cm" svg:y="-4.994cm"/>
          <draw:glue-point draw:id="11" svg:x="3.339cm" svg:y="-4.994cm"/>
          <draw:glue-point draw:id="12" svg:x="-4.943cm" svg:y="-3.326cm"/>
          <draw:glue-point draw:id="13" svg:x="-4.987cm" svg:y="3.326cm"/>
          <draw:glue-point draw:id="14" svg:x="4.946cm" svg:y="3.326cm"/>
          <draw:glue-point draw:id="15" svg:x="4.989cm" svg:y="-3.326cm"/>
          <text:p text:style-name="P37"><text:span text:style-name="T109">next.prev = chunk;</text:span></text:p>
          <draw:enhanced-geometry svg:viewBox="0 0 21600 21600" draw:mirror-horizontal="false" draw:mirror-vertical="false" draw:path-stretchpoint-x="10800" draw:path-stretchpoint-y="10800" draw:text-areas="?f3 ?f4 ?f5 ?f6" draw:type="round-rectangle" draw:modifiers="4173.015252248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03" draw:text-style-name="P36" draw:layer="layout" svg:x1="11.599cm" svg:y1="19.237cm" svg:x2="10.489cm" svg:y2="18.797cm" draw:start-shape="id181" draw:start-glue-point="4" draw:end-shape="id180" draw:end-glue-point="1" svg:d="M11599 19237v-440h-1110" svg:viewBox="0 0 1111 441">
          <text:p/>
        </draw:connector>
        <draw:connector draw:style-name="gr604" draw:text-style-name="P36" draw:layer="layout" draw:line-skew="0cm -0.539cm" svg:x1="11.099cm" svg:y1="19.737cm" svg:x2="4.343cm" svg:y2="19.749cm" draw:start-shape="id181" draw:start-glue-point="5" draw:end-shape="id175" draw:end-glue-point="6" svg:d="M11099 19737h-3127v12h-3629" svg:viewBox="0 0 6757 13">
          <text:p/>
        </draw:connector>
        <draw:connector draw:style-name="gr605" draw:text-style-name="P36" draw:layer="layout" svg:x1="13.156cm" svg:y1="20.629cm" svg:x2="11.599cm" svg:y2="20.237cm" draw:start-shape="id173" draw:start-glue-point="3" draw:end-shape="id181" draw:end-glue-point="6" svg:d="M13156 20629h-1557v-392" svg:viewBox="0 0 1558 393">
          <text:p/>
        </draw:connector>
      </draw:page>
      <draw:page draw:name="page14" draw:style-name="dp1" draw:master-page-name="master-page79">
        <draw:frame draw:style-name="gr8" draw:text-style-name="P7" draw:layer="layout" svg:width="0.388cm" svg:height="0.437cm" svg:x="10.401cm" svg:y="27.996cm">
          <draw:text-box>
            <text:p text:style-name="P1"><text:span text:style-name="T16">8 </text:span></text:p>
          </draw:text-box>
        </draw:frame>
        <draw:frame draw:style-name="gr606" draw:text-style-name="P84" draw:layer="layout" svg:width="6.257cm" svg:height="0.543cm" svg:x="1.401cm" svg:y="2.026cm">
          <draw:text-box>
            <text:p text:style-name="P1"><text:span text:style-name="T134">Note e Modalità di Consegna </text:span></text:p>
          </draw:text-box>
        </draw:frame>
        <draw:frame draw:style-name="gr607" draw:text-style-name="P85" draw:layer="layout" svg:width="1.147cm" svg:height="0.501cm" svg:x="1.401cm" svg:y="3.043cm">
          <draw:text-box>
            <text:p text:style-name="P1"><text:span text:style-name="T135">Note <text:s/></text:span></text:p>
          </draw:text-box>
        </draw:frame>
        <draw:frame draw:style-name="gr608" draw:text-style-name="P86" draw:layer="layout" svg:width="0.422cm" svg:height="0.422cm" svg:x="1.401cm" svg:y="3.771cm">
          <draw:text-box>
            <text:p text:style-name="P1"><text:span text:style-name="T136">•</text:span></text:p>
          </draw:text-box>
        </draw:frame>
        <draw:frame draw:style-name="gr609" draw:text-style-name="P86" draw:layer="layout" svg:width="0.422cm" svg:height="0.467cm" svg:x="1.596cm" svg:y="3.683cm">
          <draw:text-box>
            <text:p text:style-name="P1"><text:span text:style-name="T137"><text:s/></text:span></text:p>
          </draw:text-box>
        </draw:frame>
        <draw:frame draw:style-name="gr610" draw:text-style-name="P86" draw:layer="layout" svg:width="18.315cm" svg:height="0.467cm" svg:x="2.036cm" svg:y="3.683cm">
          <draw:text-box>
            <text:p text:style-name="P1"><text:span text:style-name="T138">Seguire fedelmente tutte le specifiche dell’esercizio (incluse quelle relative ai nomi delle variabili e al </text:span></text:p>
          </draw:text-box>
        </draw:frame>
        <draw:frame draw:style-name="gr611" draw:text-style-name="P86" draw:layer="layout" svg:width="5.228cm" svg:height="0.467cm" svg:x="2.036cm" svg:y="4.276cm">
          <draw:text-box>
            <text:p text:style-name="P1"><text:span text:style-name="T138">formato del loro contenuto). <text:s/></text:span></text:p>
          </draw:text-box>
        </draw:frame>
        <draw:frame draw:style-name="gr608" draw:text-style-name="P86" draw:layer="layout" svg:width="0.422cm" svg:height="0.422cm" svg:x="1.401cm" svg:y="4.981cm">
          <draw:text-box>
            <text:p text:style-name="P1"><text:span text:style-name="T136">•</text:span></text:p>
          </draw:text-box>
        </draw:frame>
        <draw:frame draw:style-name="gr609" draw:text-style-name="P86" draw:layer="layout" svg:width="0.422cm" svg:height="0.467cm" svg:x="1.596cm" svg:y="4.894cm">
          <draw:text-box>
            <text:p text:style-name="P1"><text:span text:style-name="T137"><text:s/></text:span></text:p>
          </draw:text-box>
        </draw:frame>
        <draw:polygon draw:style-name="gr612" draw:text-style-name="P87" draw:layer="layout" svg:width="16.175cm" svg:height="0.029cm" svg:x="2.036cm" svg:y="5.321cm" svg:viewBox="0 0 16176 30" draw:points="0,0 16176,0 16176,30 0,30">
          <text:p/>
        </draw:polygon>
        <draw:frame draw:style-name="gr613" draw:text-style-name="P86" draw:layer="layout" svg:width="17.964cm" svg:height="0.467cm" svg:x="2.036cm" svg:y="4.894cm">
          <draw:text-box>
            <text:p text:style-name="P1"><text:span text:style-name="T138">Rendere il codice </text:span><text:span text:style-name="T139">modulare </text:span><text:span text:style-name="T138">utilizzando ove opportuno </text:span><text:span text:style-name="T139">chiamate a procedure </text:span><text:span text:style-name="T138">e </text:span><text:span text:style-name="T139">rispettando le </text:span></text:p>
          </draw:text-box>
        </draw:frame>
        <draw:polygon draw:style-name="gr612" draw:text-style-name="P87" draw:layer="layout" svg:width="8.462cm" svg:height="0.03cm" svg:x="2.036cm" svg:y="5.913cm" svg:viewBox="0 0 8463 31" draw:points="0,0 8463,0 8463,31 0,31">
          <text:p/>
        </draw:polygon>
        <draw:frame draw:style-name="gr614" draw:text-style-name="P86" draw:layer="layout" svg:width="17.666cm" svg:height="0.467cm" svg:x="2.036cm" svg:y="5.486cm">
          <draw:text-box>
            <text:p text:style-name="P1"><text:span text:style-name="T139">convenzioni fra procedura chiamante/chiamata</text:span><text:span text:style-name="T138">. La modularità del codice ed il rispetto delle </text:span></text:p>
          </draw:text-box>
        </draw:frame>
        <draw:frame draw:style-name="gr615" draw:text-style-name="P86" draw:layer="layout" svg:width="16.88cm" svg:height="0.467cm" svg:x="2.036cm" svg:y="6.079cm">
          <draw:text-box>
            <text:p text:style-name="P1"><text:span text:style-name="T138">convenzioni saranno aspetti fondamentali per ottenere un’ottima valutazione del progetto. Si </text:span></text:p>
          </draw:text-box>
        </draw:frame>
        <draw:frame draw:style-name="gr616" draw:text-style-name="P86" draw:layer="layout" svg:width="18.675cm" svg:height="0.467cm" svg:x="2.036cm" svg:y="6.676cm">
          <draw:text-box>
            <text:p text:style-name="P1"><text:span text:style-name="T138">richiede in particolare di </text:span><text:span text:style-name="T140">implementare ogni cifrario (ciascun algoritmo A-B-C-D-E, e le loro inversioni </text:span></text:p>
          </draw:text-box>
        </draw:frame>
        <draw:frame draw:style-name="gr617" draw:text-style-name="P86" draw:layer="layout" svg:width="16.827cm" svg:height="0.467cm" svg:x="2.036cm" svg:y="7.269cm">
          <draw:text-box>
            <text:p text:style-name="P1"><text:span text:style-name="T140">per la decifratura) come una procedura separata (chiamate con jal, non con delle branch). </text:span></text:p>
          </draw:text-box>
        </draw:frame>
        <draw:frame draw:style-name="gr608" draw:text-style-name="P86" draw:layer="layout" svg:width="0.422cm" svg:height="0.422cm" svg:x="1.401cm" svg:y="7.974cm">
          <draw:text-box>
            <text:p text:style-name="P1"><text:span text:style-name="T136">•</text:span></text:p>
          </draw:text-box>
        </draw:frame>
        <draw:frame draw:style-name="gr609" draw:text-style-name="P86" draw:layer="layout" svg:width="0.422cm" svg:height="0.467cm" svg:x="1.596cm" svg:y="7.887cm">
          <draw:text-box>
            <text:p text:style-name="P1"><text:span text:style-name="T137"><text:s/></text:span></text:p>
          </draw:text-box>
        </draw:frame>
        <draw:frame draw:style-name="gr618" draw:text-style-name="P86" draw:layer="layout" svg:width="17.521cm" svg:height="0.467cm" svg:x="2.036cm" svg:y="7.887cm">
          <draw:text-box>
            <text:p text:style-name="P1"><text:span text:style-name="T138">Commentare in modo significativo (non commentare </text:span><text:span text:style-name="T140">addi s3, s3, 1 </text:span><text:span text:style-name="T138">con “sommo uno ad s3”.... ). </text:span></text:p>
          </draw:text-box>
        </draw:frame>
        <draw:frame draw:style-name="gr619" draw:text-style-name="P85" draw:layer="layout" svg:width="4.625cm" svg:height="0.501cm" svg:x="1.401cm" svg:y="8.838cm">
          <draw:text-box>
            <text:p text:style-name="P1"><text:span text:style-name="T135">Dettagli sulla Consegna</text:span></text:p>
          </draw:text-box>
        </draw:frame>
        <draw:frame draw:style-name="gr13" draw:text-style-name="P13" draw:layer="layout" svg:width="0.35cm" svg:height="0.391cm" svg:x="6.303cm" svg:y="8.934cm">
          <draw:text-box>
            <text:p text:style-name="P1"><text:span text:style-name="T141"><text:s/></text:span></text:p>
          </draw:text-box>
        </draw:frame>
        <draw:frame draw:style-name="gr608" draw:text-style-name="P86" draw:layer="layout" svg:width="0.422cm" svg:height="0.422cm" svg:x="1.405cm" svg:y="9.566cm">
          <draw:text-box>
            <text:p text:style-name="P1"><text:span text:style-name="T136">•</text:span></text:p>
          </draw:text-box>
        </draw:frame>
        <draw:frame draw:style-name="gr609" draw:text-style-name="P86" draw:layer="layout" svg:width="0.422cm" svg:height="0.467cm" svg:x="1.6cm" svg:y="9.478cm">
          <draw:text-box>
            <text:p text:style-name="P1"><text:span text:style-name="T137"><text:s/></text:span></text:p>
          </draw:text-box>
        </draw:frame>
        <draw:frame draw:style-name="gr620" draw:text-style-name="P86" draw:layer="layout" svg:width="18.708cm" svg:height="0.467cm" svg:x="2.036cm" svg:y="9.478cm">
          <draw:text-box>
            <text:p text:style-name="P1"><text:span text:style-name="T138">Per sostenere l'esame è necessario consegnare il codice e una relazione PDF sul progetto assegnato, </text:span></text:p>
          </draw:text-box>
        </draw:frame>
        <draw:frame draw:style-name="gr621" draw:text-style-name="P86" draw:layer="layout" svg:width="11.762cm" svg:height="0.467cm" svg:x="2.036cm" svg:y="10.067cm">
          <draw:text-box>
            <text:p text:style-name="P1"><text:span text:style-name="T138">oltre ad un breve video che spieghi il funzionamento del codice. <text:s/></text:span></text:p>
          </draw:text-box>
        </draw:frame>
        <draw:frame draw:style-name="gr608" draw:text-style-name="P86" draw:layer="layout" svg:width="0.422cm" svg:height="0.422cm" svg:x="1.405cm" svg:y="10.988cm">
          <draw:text-box>
            <text:p text:style-name="P1"><text:span text:style-name="T136">•</text:span></text:p>
          </draw:text-box>
        </draw:frame>
        <draw:frame draw:style-name="gr609" draw:text-style-name="P86" draw:layer="layout" svg:width="0.422cm" svg:height="0.467cm" svg:x="1.6cm" svg:y="10.901cm">
          <draw:text-box>
            <text:p text:style-name="P1"><text:span text:style-name="T137"><text:s/></text:span></text:p>
          </draw:text-box>
        </draw:frame>
        <draw:frame draw:style-name="gr622" draw:text-style-name="P86" draw:layer="layout" svg:width="16.991cm" svg:height="0.467cm" svg:x="2.036cm" svg:y="10.901cm">
          <draw:text-box>
            <text:p text:style-name="P1"><text:span text:style-name="T138">Il codice consegnato deve essere funzionante sul simulatore RIPES, usato durante le lezioni. </text:span></text:p>
          </draw:text-box>
        </draw:frame>
        <draw:frame draw:style-name="gr608" draw:text-style-name="P86" draw:layer="layout" svg:width="0.422cm" svg:height="0.422cm" svg:x="1.405cm" svg:y="11.814cm">
          <draw:text-box>
            <text:p text:style-name="P1"><text:span text:style-name="T136">•</text:span></text:p>
          </draw:text-box>
        </draw:frame>
        <draw:frame draw:style-name="gr609" draw:text-style-name="P86" draw:layer="layout" svg:width="0.422cm" svg:height="0.467cm" svg:x="1.6cm" svg:y="11.726cm">
          <draw:text-box>
            <text:p text:style-name="P1"><text:span text:style-name="T137"><text:s/></text:span></text:p>
          </draw:text-box>
        </draw:frame>
        <draw:frame draw:style-name="gr623" draw:text-style-name="P86" draw:layer="layout" svg:width="17.777cm" svg:height="0.467cm" svg:x="2.036cm" svg:y="11.726cm">
          <draw:text-box>
            <text:p text:style-name="P1"><text:span text:style-name="T138">La scadenza esatta della consegna verrà resa nota di volta in volta, in base alle date dell’appello. </text:span></text:p>
          </draw:text-box>
        </draw:frame>
        <draw:frame draw:style-name="gr608" draw:text-style-name="P86" draw:layer="layout" svg:width="0.422cm" svg:height="0.422cm" svg:x="1.405cm" svg:y="12.644cm">
          <draw:text-box>
            <text:p text:style-name="P1"><text:span text:style-name="T136">•</text:span></text:p>
          </draw:text-box>
        </draw:frame>
        <draw:frame draw:style-name="gr609" draw:text-style-name="P86" draw:layer="layout" svg:width="0.422cm" svg:height="0.467cm" svg:x="1.6cm" svg:y="12.556cm">
          <draw:text-box>
            <text:p text:style-name="P1"><text:span text:style-name="T137"><text:s/></text:span></text:p>
          </draw:text-box>
        </draw:frame>
        <draw:frame draw:style-name="gr624" draw:text-style-name="P86" draw:layer="layout" svg:width="18.185cm" svg:height="0.467cm" svg:x="2.036cm" svg:y="12.556cm">
          <draw:text-box>
            <text:p text:style-name="P1"><text:span text:style-name="T138">Discussione e valutazione: la discussione degli elaborati avverrà contestualmente all’esame orale e </text:span></text:p>
          </draw:text-box>
        </draw:frame>
        <draw:polygon draw:style-name="gr612" draw:text-style-name="P87" draw:layer="layout" svg:width="13.669cm" svg:height="0.029cm" svg:x="2.036cm" svg:y="13.576cm" svg:viewBox="0 0 13670 30" draw:points="0,0 13670,0 13670,30 0,30">
          <text:p/>
        </draw:polygon>
        <draw:frame draw:style-name="gr625" draw:text-style-name="P86" draw:layer="layout" svg:width="15.936cm" svg:height="0.467cm" svg:x="2.036cm" svg:y="13.149cm">
          <draw:text-box>
            <text:p text:style-name="P1"><text:span text:style-name="T139">prevede anche domande su tutti gli argomenti di laboratorio trattati a lezione</text:span><text:span text:style-name="T138">. <text:s/></text:span></text:p>
          </draw:text-box>
        </draw:frame>
        <draw:frame draw:style-name="gr626" draw:text-style-name="P85" draw:layer="layout" svg:width="5.041cm" svg:height="0.501cm" svg:x="1.401cm" svg:y="14.096cm">
          <draw:text-box>
            <text:p text:style-name="P1"><text:span text:style-name="T135">Struttura della Consegna </text:span></text:p>
          </draw:text-box>
        </draw:frame>
        <draw:frame draw:style-name="gr627" draw:text-style-name="P86" draw:layer="layout" svg:width="18.32cm" svg:height="0.467cm" svg:x="1.401cm" svg:y="14.715cm">
          <draw:text-box>
            <text:p text:style-name="P1"><text:span text:style-name="T138">La consegna dovrà consistere di un unico achivio contenente 3 componenti. L’archivio dovrà essere </text:span></text:p>
          </draw:text-box>
        </draw:frame>
        <draw:frame draw:style-name="gr628" draw:text-style-name="P86" draw:layer="layout" svg:width="17.934cm" svg:height="0.467cm" svg:x="1.401cm" svg:y="15.308cm">
          <draw:text-box>
            <text:p text:style-name="P1"><text:span text:style-name="T138">caricato sul sito moodle del corso seguendo il link che verrà reso disponibile alla pagina del corso. </text:span></text:p>
          </draw:text-box>
        </draw:frame>
        <draw:frame draw:style-name="gr608" draw:text-style-name="P86" draw:layer="layout" svg:width="0.422cm" svg:height="0.422cm" svg:x="1.405cm" svg:y="16.225cm">
          <draw:text-box>
            <text:p text:style-name="P1"><text:span text:style-name="T136">•</text:span></text:p>
          </draw:text-box>
        </draw:frame>
        <draw:frame draw:style-name="gr609" draw:text-style-name="P86" draw:layer="layout" svg:width="0.422cm" svg:height="0.467cm" svg:x="1.6cm" svg:y="16.137cm">
          <draw:text-box>
            <text:p text:style-name="P1"><text:span text:style-name="T137"><text:s/></text:span></text:p>
          </draw:text-box>
        </draw:frame>
        <draw:frame draw:style-name="gr629" draw:text-style-name="P86" draw:layer="layout" svg:width="7.44cm" svg:height="0.467cm" svg:x="2.036cm" svg:y="16.137cm">
          <draw:text-box>
            <text:p text:style-name="P1"><text:span text:style-name="T138">Un file .s contenente il </text:span><text:span text:style-name="T139">codice </text:span><text:span text:style-name="T138">assembly </text:span></text:p>
          </draw:text-box>
        </draw:frame>
        <draw:frame draw:style-name="gr608" draw:text-style-name="P86" draw:layer="layout" svg:width="0.422cm" svg:height="0.422cm" svg:x="1.405cm" svg:y="17.055cm">
          <draw:text-box>
            <text:p text:style-name="P1"><text:span text:style-name="T136">•</text:span></text:p>
          </draw:text-box>
        </draw:frame>
        <draw:frame draw:style-name="gr609" draw:text-style-name="P86" draw:layer="layout" svg:width="0.422cm" svg:height="0.467cm" svg:x="1.6cm" svg:y="16.967cm">
          <draw:text-box>
            <text:p text:style-name="P1"><text:span text:style-name="T137"><text:s/></text:span></text:p>
          </draw:text-box>
        </draw:frame>
        <draw:frame draw:style-name="gr630" draw:text-style-name="P86" draw:layer="layout" svg:width="17.836cm" svg:height="0.467cm" svg:x="2.036cm" svg:y="16.967cm">
          <draw:text-box>
            <text:p text:style-name="P1"><text:span text:style-name="T138">un </text:span><text:span text:style-name="T139">breve video </text:span><text:span text:style-name="T138">(max 5 minuti) dove si registra lo schermo del dispositivo che avete utilizzato per </text:span></text:p>
          </draw:text-box>
        </draw:frame>
        <draw:frame draw:style-name="gr631" draw:text-style-name="P86" draw:layer="layout" svg:width="18.36cm" svg:height="0.467cm" svg:x="2.036cm" svg:y="17.56cm">
          <draw:text-box>
            <text:p text:style-name="P1"><text:span text:style-name="T138">l’implementazione durante l’esecuzione del programma, commentandone il funzionamento in base a </text:span></text:p>
          </draw:text-box>
        </draw:frame>
        <draw:frame draw:style-name="gr632" draw:text-style-name="P86" draw:layer="layout" svg:width="6.137cm" svg:height="0.467cm" svg:x="2.036cm" svg:y="18.153cm">
          <draw:text-box>
            <text:p text:style-name="P1"><text:span text:style-name="T138">2-3 combinazioni di input diverse </text:span></text:p>
          </draw:text-box>
        </draw:frame>
        <draw:frame draw:style-name="gr608" draw:text-style-name="P86" draw:layer="layout" svg:width="0.422cm" svg:height="0.422cm" svg:x="1.405cm" svg:y="19.07cm">
          <draw:text-box>
            <text:p text:style-name="P1"><text:span text:style-name="T136">•</text:span></text:p>
          </draw:text-box>
        </draw:frame>
        <draw:frame draw:style-name="gr609" draw:text-style-name="P86" draw:layer="layout" svg:width="0.422cm" svg:height="0.467cm" svg:x="1.6cm" svg:y="18.982cm">
          <draw:text-box>
            <text:p text:style-name="P1"><text:span text:style-name="T137"><text:s/></text:span></text:p>
          </draw:text-box>
        </draw:frame>
        <draw:frame draw:style-name="gr633" draw:text-style-name="P86" draw:layer="layout" svg:width="9.83cm" svg:height="0.467cm" svg:x="2.036cm" svg:y="18.982cm">
          <draw:text-box>
            <text:p text:style-name="P1"><text:span text:style-name="T138">la </text:span><text:span text:style-name="T139">relazione </text:span><text:span text:style-name="T138">in formato PDF, strutturata come segue. </text:span></text:p>
          </draw:text-box>
        </draw:frame>
        <draw:frame draw:style-name="gr634" draw:text-style-name="P86" draw:layer="layout" svg:width="0.449cm" svg:height="0.467cm" svg:x="2.036cm" svg:y="19.787cm">
          <draw:text-box>
            <text:p text:style-name="P1"><text:span text:style-name="T138">1. </text:span></text:p>
          </draw:text-box>
        </draw:frame>
        <draw:frame draw:style-name="gr635" draw:text-style-name="P86" draw:layer="layout" svg:width="12.596cm" svg:height="0.467cm" svg:x="2.671cm" svg:y="19.787cm">
          <draw:text-box>
            <text:p text:style-name="P1"><text:span text:style-name="T139">Informazioni </text:span><text:span text:style-name="T138">su autore, indirizzo mail, matricola e data di consegna </text:span></text:p>
          </draw:text-box>
        </draw:frame>
        <draw:frame draw:style-name="gr634" draw:text-style-name="P86" draw:layer="layout" svg:width="0.449cm" svg:height="0.467cm" svg:x="2.036cm" svg:y="20.595cm">
          <draw:text-box>
            <text:p text:style-name="P1"><text:span text:style-name="T138">2. </text:span></text:p>
          </draw:text-box>
        </draw:frame>
        <draw:frame draw:style-name="gr636" draw:text-style-name="P86" draw:layer="layout" svg:width="14.619cm" svg:height="0.467cm" svg:x="2.671cm" svg:y="20.595cm">
          <draw:text-box>
            <text:p text:style-name="P1"><text:span text:style-name="T139">Descrizione </text:span><text:span text:style-name="T138">della soluzione adottata, trattando principalmente i seguenti punti: </text:span></text:p>
          </draw:text-box>
        </draw:frame>
        <draw:frame draw:style-name="gr637" draw:text-style-name="P86" draw:layer="layout" svg:width="0.444cm" svg:height="0.467cm" svg:x="3.306cm" svg:y="21.4cm">
          <draw:text-box>
            <text:p text:style-name="P1"><text:span text:style-name="T138">a. </text:span></text:p>
          </draw:text-box>
        </draw:frame>
        <draw:frame draw:style-name="gr638" draw:text-style-name="P86" draw:layer="layout" svg:width="13.652cm" svg:height="0.467cm" svg:x="3.941cm" svg:y="21.4cm">
          <draw:text-box>
            <text:p text:style-name="P1"><text:span text:style-name="T138">Descrizione ad alto livello della struttura del codice, di ciascun algoritmo di </text:span></text:p>
          </draw:text-box>
        </draw:frame>
        <draw:frame draw:style-name="gr639" draw:text-style-name="P86" draw:layer="layout" svg:width="15.929cm" svg:height="0.467cm" svg:x="3.941cm" svg:y="21.992cm">
          <draw:text-box>
            <text:p text:style-name="P1"><text:span text:style-name="T138">cifratura/decifratura, di altre eventuali procedure e del main, in linguaggio naturale, con </text:span></text:p>
          </draw:text-box>
        </draw:frame>
        <draw:frame draw:style-name="gr640" draw:text-style-name="P86" draw:layer="layout" svg:width="6.73cm" svg:height="0.467cm" svg:x="3.941cm" svg:y="22.589cm">
          <draw:text-box>
            <text:p text:style-name="P1"><text:span text:style-name="T138">flow-chart, in pseudo-linguaggio, etc </text:span></text:p>
          </draw:text-box>
        </draw:frame>
        <draw:frame draw:style-name="gr641" draw:text-style-name="P86" draw:layer="layout" svg:width="0.45cm" svg:height="0.467cm" svg:x="3.306cm" svg:y="23.393cm">
          <draw:text-box>
            <text:p text:style-name="P1"><text:span text:style-name="T138">b. </text:span></text:p>
          </draw:text-box>
        </draw:frame>
        <draw:frame draw:style-name="gr642" draw:text-style-name="P86" draw:layer="layout" svg:width="14.1cm" svg:height="0.467cm" svg:x="3.941cm" svg:y="23.393cm">
          <draw:text-box>
            <text:p text:style-name="P1"><text:span text:style-name="T138">Uso dei registri e memoria (stack, piuttosto che memoria statica o dinamica) <text:s/></text:span></text:p>
          </draw:text-box>
        </draw:frame>
        <draw:frame draw:style-name="gr634" draw:text-style-name="P86" draw:layer="layout" svg:width="0.449cm" svg:height="0.467cm" svg:x="2.036cm" svg:y="24.198cm">
          <draw:text-box>
            <text:p text:style-name="P1"><text:span text:style-name="T138">3. </text:span></text:p>
          </draw:text-box>
        </draw:frame>
        <draw:frame draw:style-name="gr643" draw:text-style-name="P86" draw:layer="layout" svg:width="18.251cm" svg:height="0.467cm" svg:x="2.671cm" svg:y="24.198cm">
          <draw:text-box>
            <text:p text:style-name="P1"><text:span text:style-name="T139">Test di corretto funzionamento</text:span><text:span text:style-name="T138">, per fornire evidenze del corretto funzionamento del programma, </text:span></text:p>
          </draw:text-box>
        </draw:frame>
        <draw:frame draw:style-name="gr644" draw:text-style-name="P86" draw:layer="layout" svg:width="3.895cm" svg:height="0.467cm" svg:x="2.671cm" svg:y="24.795cm">
          <draw:text-box>
            <text:p text:style-name="P1"><text:span text:style-name="T138">usando diversi input. </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Calibri" svg:font-family="Calibri"/>
    <style:font-face style:name="Cambria" svg:font-family="Cambria"/>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adornments="Regular" style:font-family-generic="swiss" style:font-pitch="variable"/>
    <style:font-face style:name="FreeSans4" svg:font-family="FreeSans" style:font-family-generic="system" style:font-pitch="variable"/>
    <style:font-face style:name="FreeSerif" svg:font-family="FreeSerif" style:font-family-generic="roman" style:font-pitch="variable"/>
    <style:font-face style:name="FreeSerif1" svg:font-family="FreeSerif" style:font-family-generic="roma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exMaths Symbols" svg:font-family="'TexMaths Symbols'"/>
    <style:font-face style:name="TexMaths Symbols1" svg:font-family="'TexMaths Symbols'" style:font-pitch="variable"/>
    <style:font-face style:name="Unifont" svg:font-family="Unifont" style:font-family-generic="system"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Navigation" svg:viewBox="0 0 786 1228" svg:d="M151 1228l-76-25-75-25 318-952 76-226 75 226 317 952-76 25-75 25-162-486v462h-80-79v-464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FreeSerif" fo:font-size="24pt" fo:language="en" fo:country="US" style:font-name-asian="Adwaita Sans" style:font-size-asian="24pt" style:language-asian="zh" style:country-asian="CN" style:font-name-complex="FreeSans4" style:font-size-complex="24pt" style:language-complex="hi" style:country-complex="IN"/>
    </style:default-style>
    <style:style style:name="standard" style:family="graphic">
      <style:graphic-properties draw:stroke-dash="Dashed_20__28_var_29__20_4" draw:fill="solid" draw:fill-color="#729fcf" draw:shadow-color="#000000"/>
      <style:text-properties style:font-name="FreeSans3" fo:font-family="FreeSans" style:font-style-name="Regular" style:font-family-generic="swiss" style:font-pitch="variable" fo:font-size="10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graphic-properties draw:fill="none" draw:fill-color="#ffffff" loext:fill-use-slide-background="false" draw:shadow-color="#000000"/>
      <style:paragraph-properties fo:margin-top="0cm" fo:margin-bottom="0.076cm" fo:line-height="115%" style:text-autospace="none"/>
      <style:text-properties style:font-name="FreeSans3" fo:font-family="FreeSans" style:font-style-name="Regular" style:font-family-generic="swiss" style:font-pitch="variable" fo:font-size="12pt"/>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FreeSans1" fo:font-family="FreeSans" style:font-family-generic="swiss" style:font-pitch="variable" fo:font-size="14pt" style:font-name-asian="WenQuanYi Micro Hei1" style:font-family-asian="'WenQuanYi Micro Hei'" style:font-pitch-asian="variable" style:font-name-complex="FreeSans1" style:font-family-complex="FreeSans"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 style:font-family-complex="FreeSans" style:font-family-generic-complex="swiss"/>
    </style:style>
    <style:style style:name="List" style:family="graphic">
      <style:paragraph-properties style:text-autospace="none"/>
      <style:text-properties style:font-name-complex="FreeSans"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Normal" style:family="graphic">
      <style:graphic-properties style:writing-mode="lr-tb"/>
      <style:paragraph-properties style:text-autospace="none"/>
      <style:text-properties style:use-window-font-color="true" loext:opacity="0%" style:font-name="FreeSerif" fo:font-family="FreeSerif" style:font-family-generic="roman" style:font-pitch="variable" fo:font-size="12pt" fo:language="en" fo:country="US" style:letter-kerning="true" style:font-name-asian="WenQuanYi Micro Hei1" style:font-family-asian="'WenQuanYi Micro Hei'" style:font-pitch-asian="variable" style:language-asian="zh" style:country-asian="CN" style:font-name-complex="FreeSerif" style:font-family-complex="FreeSerif" style:font-family-generic-complex="roman" style:font-pitch-complex="variable" style:font-size-complex="12pt" style:language-complex="en" style:country-complex="US"/>
    </style:style>
    <style:style style:name="caption" style:family="graphic">
      <style:paragraph-properties fo:margin-top="0.051cm" fo:margin-bottom="0.051cm" style:text-autospace="none"/>
      <style:text-properties style:font-name="FreeSans3" fo:font-family="FreeSans" style:font-style-name="Regular" style:font-family-generic="swiss" style:font-pitch="variable" fo:font-size="10pt" fo:font-style="normal" style:font-size-asian="12pt" style:font-style-asian="italic" style:font-name-complex="FreeSans" style:font-family-complex="FreeSans" style:font-family-generic-complex="swiss" style:font-size-complex="12pt" style:font-style-complex="italic"/>
    </style:style>
  </office:styles>
  <office:automatic-styles>
    <style:page-layout style:name="PM0">
      <style:page-layout-properties fo:margin-top="2cm" fo:margin-bottom="1cm" fo:margin-left="1.3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6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Linux_X86_64 LibreOffice_project/620$Build-2</meta:generator>
    <meta:document-statistic meta:object-count="768"/>
  </office:meta>
</office:document-meta>
</file>